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ato" svg:font-family="La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adornments="Regular"/>
    <style:font-face style:name="roboto" svg:font-family="roboto"/>
    <style:font-face style:name="roboto1" svg:font-family="roboto" style:font-adornments="Bold"/>
  </office:font-face-decls>
  <office:automatic-styles>
    <style:style style:name="Table1" style:family="table">
      <style:table-properties style:width="6.925in" table:align="left"/>
    </style:style>
    <style:style style:name="Table1.A" style:family="table-column">
      <style:table-column-properties style:column-width="1.0597in"/>
    </style:style>
    <style:style style:name="Table1.B" style:family="table-column">
      <style:table-column-properties style:column-width="1.4667in"/>
    </style:style>
    <style:style style:name="Table1.C" style:family="table-column">
      <style:table-column-properties style:column-width="4.3986in"/>
    </style:style>
    <style:style style:name="Table1.A1" style:family="table-cell">
      <style:table-cell-properties style:vertical-align="middle" fo:padding="0.0194in" fo:border="none"/>
    </style:style>
    <style:style style:name="Table4" style:family="table">
      <style:table-properties style:width="6.9125in" table:align="left"/>
    </style:style>
    <style:style style:name="Table4.A" style:family="table-column">
      <style:table-column-properties style:column-width="1.0653in"/>
    </style:style>
    <style:style style:name="Table4.B" style:family="table-column">
      <style:table-column-properties style:column-width="1.1764in"/>
    </style:style>
    <style:style style:name="Table4.C" style:family="table-column">
      <style:table-column-properties style:column-width="1.4861in"/>
    </style:style>
    <style:style style:name="Table4.D" style:family="table-column">
      <style:table-column-properties style:column-width="3.1847in"/>
    </style:style>
    <style:style style:name="Table4.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1.1458in"/>
    </style:style>
    <style:style style:name="Table2.B" style:family="table-column">
      <style:table-column-properties style:column-width="2.1215in"/>
    </style:style>
    <style:style style:name="Table2.C" style:family="table-column">
      <style:table-column-properties style:column-width="0.8771in"/>
    </style:style>
    <style:style style:name="Table2.D" style:family="table-column">
      <style:table-column-properties style:column-width="2.7826in"/>
    </style:style>
    <style:style style:name="Table2.A1" style:family="table-cell">
      <style:table-cell-properties style:vertical-align="middle" fo:padding="0.0194in" fo:border="none"/>
    </style:style>
    <style:style style:name="Table2.14" style:family="table-row">
      <style:table-row-properties style:min-row-height="0.5229in"/>
    </style:style>
    <style:style style:name="Table16" style:family="table">
      <style:table-properties style:width="6.925in" table:align="left"/>
    </style:style>
    <style:style style:name="Table16.A" style:family="table-column">
      <style:table-column-properties style:column-width="1.2049in"/>
    </style:style>
    <style:style style:name="Table16.B" style:family="table-column">
      <style:table-column-properties style:column-width="1.6083in"/>
    </style:style>
    <style:style style:name="Table16.C" style:family="table-column">
      <style:table-column-properties style:column-width="1.6722in"/>
    </style:style>
    <style:style style:name="Table16.D" style:family="table-column">
      <style:table-column-properties style:column-width="2.4396in"/>
    </style:style>
    <style:style style:name="Table16.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875in"/>
    </style:style>
    <style:style style:name="Table5.B" style:family="table-column">
      <style:table-column-properties style:column-width="1.2132in"/>
    </style:style>
    <style:style style:name="Table5.C" style:family="table-column">
      <style:table-column-properties style:column-width="0.7028in"/>
    </style:style>
    <style:style style:name="Table5.D" style:family="table-column">
      <style:table-column-properties style:column-width="0.991in"/>
    </style:style>
    <style:style style:name="Table5.E" style:family="table-column">
      <style:table-column-properties style:column-width="2.8306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8264in"/>
    </style:style>
    <style:style style:name="Table6.B" style:family="table-column">
      <style:table-column-properties style:column-width="0.984in"/>
    </style:style>
    <style:style style:name="Table6.C" style:family="table-column">
      <style:table-column-properties style:column-width="0.7056in"/>
    </style:style>
    <style:style style:name="Table6.D" style:family="table-column">
      <style:table-column-properties style:column-width="0.7576in"/>
    </style:style>
    <style:style style:name="Table6.E" style:family="table-column">
      <style:table-column-properties style:column-width="2.6514in"/>
    </style:style>
    <style:style style:name="Table6.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7215in"/>
    </style:style>
    <style:style style:name="Table3.B" style:family="table-column">
      <style:table-column-properties style:column-width="1.4292in"/>
    </style:style>
    <style:style style:name="Table3.C" style:family="table-column">
      <style:table-column-properties style:column-width="0.6528in"/>
    </style:style>
    <style:style style:name="Table3.D" style:family="table-column">
      <style:table-column-properties style:column-width="3.1215in"/>
    </style:style>
    <style:style style:name="Table3.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1208in"/>
    </style:style>
    <style:style style:name="Table7.B" style:family="table-column">
      <style:table-column-properties style:column-width="0.9347in"/>
    </style:style>
    <style:style style:name="Table7.C" style:family="table-column">
      <style:table-column-properties style:column-width="0.6681in"/>
    </style:style>
    <style:style style:name="Table7.D" style:family="table-column">
      <style:table-column-properties style:column-width="4.2014in"/>
    </style:style>
    <style:style style:name="Table7.A1" style:family="table-cell">
      <style:table-cell-properties style:vertical-align="middle" fo:padding="0.0194in" fo:border="none"/>
    </style:style>
    <style:style style:name="Table23" style:family="table">
      <style:table-properties style:width="6.925in" table:align="left"/>
    </style:style>
    <style:style style:name="Table23.A" style:family="table-column">
      <style:table-column-properties style:column-width="1.2035in"/>
    </style:style>
    <style:style style:name="Table23.B" style:family="table-column">
      <style:table-column-properties style:column-width="0.6229in"/>
    </style:style>
    <style:style style:name="Table23.C" style:family="table-column">
      <style:table-column-properties style:column-width="0.7493in"/>
    </style:style>
    <style:style style:name="Table23.D" style:family="table-column">
      <style:table-column-properties style:column-width="0.6181in"/>
    </style:style>
    <style:style style:name="Table23.E" style:family="table-column">
      <style:table-column-properties style:column-width="0.525in"/>
    </style:style>
    <style:style style:name="Table23.F" style:family="table-column">
      <style:table-column-properties style:column-width="0.6306in"/>
    </style:style>
    <style:style style:name="Table23.G" style:family="table-column">
      <style:table-column-properties style:column-width="2.5757in"/>
    </style:style>
    <style:style style:name="Table23.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2549in"/>
    </style:style>
    <style:style style:name="Table8.B" style:family="table-column">
      <style:table-column-properties style:column-width="0.6701in"/>
    </style:style>
    <style:style style:name="Table8.C" style:family="table-column">
      <style:table-column-properties style:column-width="0.7611in"/>
    </style:style>
    <style:style style:name="Table8.D" style:family="table-column">
      <style:table-column-properties style:column-width="4.2389in"/>
    </style:style>
    <style:style style:name="Table8.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813in"/>
    </style:style>
    <style:style style:name="Table24.B" style:family="table-column">
      <style:table-column-properties style:column-width="0.4549in"/>
    </style:style>
    <style:style style:name="Table24.C" style:family="table-column">
      <style:table-column-properties style:column-width="1.4354in"/>
    </style:style>
    <style:style style:name="Table24.D" style:family="table-column">
      <style:table-column-properties style:column-width="0.7056in"/>
    </style:style>
    <style:style style:name="Table24.E" style:family="table-column">
      <style:table-column-properties style:column-width="0.525in"/>
    </style:style>
    <style:style style:name="Table24.F" style:family="table-column">
      <style:table-column-properties style:column-width="2.7229in"/>
    </style:style>
    <style:style style:name="Table24.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1764in"/>
    </style:style>
    <style:style style:name="Table9.B" style:family="table-column">
      <style:table-column-properties style:column-width="1.0736in"/>
    </style:style>
    <style:style style:name="Table9.C" style:family="table-column">
      <style:table-column-properties style:column-width="0.5826in"/>
    </style:style>
    <style:style style:name="Table9.D" style:family="table-column">
      <style:table-column-properties style:column-width="0.7861in"/>
    </style:style>
    <style:style style:name="Table9.E" style:family="table-column">
      <style:table-column-properties style:column-width="3.3063in"/>
    </style:style>
    <style:style style:name="Table9.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1604in"/>
    </style:style>
    <style:style style:name="Table25.B" style:family="table-column">
      <style:table-column-properties style:column-width="1.2458in"/>
    </style:style>
    <style:style style:name="Table25.C" style:family="table-column">
      <style:table-column-properties style:column-width="0.6104in"/>
    </style:style>
    <style:style style:name="Table25.D" style:family="table-column">
      <style:table-column-properties style:column-width="0.7076in"/>
    </style:style>
    <style:style style:name="Table25.E" style:family="table-column">
      <style:table-column-properties style:column-width="3.2007in"/>
    </style:style>
    <style:style style:name="Table25.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1.2736in"/>
    </style:style>
    <style:style style:name="Table10.B" style:family="table-column">
      <style:table-column-properties style:column-width="1.6736in"/>
    </style:style>
    <style:style style:name="Table10.C" style:family="table-column">
      <style:table-column-properties style:column-width="0.5528in"/>
    </style:style>
    <style:style style:name="Table10.D" style:family="table-column">
      <style:table-column-properties style:column-width="3.425in"/>
    </style:style>
    <style:style style:name="Table10.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1.3035in"/>
    </style:style>
    <style:style style:name="Table28.B" style:family="table-column">
      <style:table-column-properties style:column-width="0.9625in"/>
    </style:style>
    <style:style style:name="Table28.C" style:family="table-column">
      <style:table-column-properties style:column-width="0.8444in"/>
    </style:style>
    <style:style style:name="Table28.D" style:family="table-column">
      <style:table-column-properties style:column-width="0.525in"/>
    </style:style>
    <style:style style:name="Table28.E" style:family="table-column">
      <style:table-column-properties style:column-width="0.9583in"/>
    </style:style>
    <style:style style:name="Table28.F" style:family="table-column">
      <style:table-column-properties style:column-width="2.3313in"/>
    </style:style>
    <style:style style:name="Table28.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1.234in"/>
    </style:style>
    <style:style style:name="Table29.B" style:family="table-column">
      <style:table-column-properties style:column-width="0.6063in"/>
    </style:style>
    <style:style style:name="Table29.C" style:family="table-column">
      <style:table-column-properties style:column-width="0.8375in"/>
    </style:style>
    <style:style style:name="Table29.D" style:family="table-column">
      <style:table-column-properties style:column-width="0.525in"/>
    </style:style>
    <style:style style:name="Table29.E" style:family="table-column">
      <style:table-column-properties style:column-width="0.9319in"/>
    </style:style>
    <style:style style:name="Table29.F" style:family="table-column">
      <style:table-column-properties style:column-width="2.7903in"/>
    </style:style>
    <style:style style:name="Table29.A1" style:family="table-cell">
      <style:table-cell-properties style:vertical-align="middle" fo:padding="0.0194in" fo:border="none"/>
    </style:style>
    <style:style style:name="Table15" style:family="table">
      <style:table-properties style:width="6.925in" table:align="left"/>
    </style:style>
    <style:style style:name="Table15.A" style:family="table-column">
      <style:table-column-properties style:column-width="1.1972in"/>
    </style:style>
    <style:style style:name="Table15.B" style:family="table-column">
      <style:table-column-properties style:column-width="1.241in"/>
    </style:style>
    <style:style style:name="Table15.C" style:family="table-column">
      <style:table-column-properties style:column-width="1.184in"/>
    </style:style>
    <style:style style:name="Table15.D" style:family="table-column">
      <style:table-column-properties style:column-width="3.3028in"/>
    </style:style>
    <style:style style:name="Table15.A1" style:family="table-cell">
      <style:table-cell-properties style:vertical-align="middle" fo:padding="0.0194in" fo:border="none"/>
    </style:style>
    <style:style style:name="Table30" style:family="table">
      <style:table-properties style:width="6.925in" table:align="left"/>
    </style:style>
    <style:style style:name="Table30.A" style:family="table-column">
      <style:table-column-properties style:column-width="1.0583in"/>
    </style:style>
    <style:style style:name="Table30.B" style:family="table-column">
      <style:table-column-properties style:column-width="0.8271in"/>
    </style:style>
    <style:style style:name="Table30.C" style:family="table-column">
      <style:table-column-properties style:column-width="0.6563in"/>
    </style:style>
    <style:style style:name="Table30.D" style:family="table-column">
      <style:table-column-properties style:column-width="0.7056in"/>
    </style:style>
    <style:style style:name="Table30.E" style:family="table-column">
      <style:table-column-properties style:column-width="0.525in"/>
    </style:style>
    <style:style style:name="Table30.F" style:family="table-column">
      <style:table-column-properties style:column-width="3.1528in"/>
    </style:style>
    <style:style style:name="Table30.A1" style:family="table-cell">
      <style:table-cell-properties style:vertical-align="middle" fo:padding="0.0194in" fo:border="none"/>
    </style:style>
    <style:style style:name="Table11" style:family="table">
      <style:table-properties style:width="6.925in" table:align="left"/>
    </style:style>
    <style:style style:name="Table11.A" style:family="table-column">
      <style:table-column-properties style:column-width="1.0611in"/>
    </style:style>
    <style:style style:name="Table11.B" style:family="table-column">
      <style:table-column-properties style:column-width="1.2326in"/>
    </style:style>
    <style:style style:name="Table11.C" style:family="table-column">
      <style:table-column-properties style:column-width="1.184in"/>
    </style:style>
    <style:style style:name="Table11.D" style:family="table-column">
      <style:table-column-properties style:column-width="3.4472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9938in"/>
    </style:style>
    <style:style style:name="Table12.B" style:family="table-column">
      <style:table-column-properties style:column-width="0.6764in"/>
    </style:style>
    <style:style style:name="Table12.C" style:family="table-column">
      <style:table-column-properties style:column-width="0.7056in"/>
    </style:style>
    <style:style style:name="Table12.D" style:family="table-column">
      <style:table-column-properties style:column-width="0.8764in"/>
    </style:style>
    <style:style style:name="Table12.E" style:family="table-column">
      <style:table-column-properties style:column-width="0.9021in"/>
    </style:style>
    <style:style style:name="Table12.F" style:family="table-column">
      <style:table-column-properties style:column-width="0.525in"/>
    </style:style>
    <style:style style:name="Table12.G" style:family="table-column">
      <style:table-column-properties style:column-width="2.2458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5465in"/>
    </style:style>
    <style:style style:name="Table13.B" style:family="table-column">
      <style:table-column-properties style:column-width="0.9021in"/>
    </style:style>
    <style:style style:name="Table13.C" style:family="table-column">
      <style:table-column-properties style:column-width="1.184in"/>
    </style:style>
    <style:style style:name="Table13.D" style:family="table-column">
      <style:table-column-properties style:column-width="3.2924in"/>
    </style:style>
    <style:style style:name="Table13.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0083in"/>
    </style:style>
    <style:style style:name="Table14.B" style:family="table-column">
      <style:table-column-properties style:column-width="0.5806in"/>
    </style:style>
    <style:style style:name="Table14.C" style:family="table-column">
      <style:table-column-properties style:column-width="0.5104in"/>
    </style:style>
    <style:style style:name="Table14.D" style:family="table-column">
      <style:table-column-properties style:column-width="0.9049in"/>
    </style:style>
    <style:style style:name="Table14.E" style:family="table-column">
      <style:table-column-properties style:column-width="0.525in"/>
    </style:style>
    <style:style style:name="Table14.F" style:family="table-column">
      <style:table-column-properties style:column-width="3.3958in"/>
    </style:style>
    <style:style style:name="Table14.A1" style:family="table-cell">
      <style:table-cell-properties style:vertical-align="middle" fo:padding="0.0194in" fo:border="none"/>
    </style:style>
    <style:style style:name="Table31" style:family="table">
      <style:table-properties style:width="6.925in" table:align="left"/>
    </style:style>
    <style:style style:name="Table31.A" style:family="table-column">
      <style:table-column-properties style:column-width="0.9944in"/>
    </style:style>
    <style:style style:name="Table31.B" style:family="table-column">
      <style:table-column-properties style:column-width="1.2458in"/>
    </style:style>
    <style:style style:name="Table31.C" style:family="table-column">
      <style:table-column-properties style:column-width="1.184in"/>
    </style:style>
    <style:style style:name="Table31.D" style:family="table-column">
      <style:table-column-properties style:column-width="3.5007in"/>
    </style:style>
    <style:style style:name="Table31.A1" style:family="table-cell">
      <style:table-cell-properties style:vertical-align="middle" fo:padding="0.0194in" fo:border="none"/>
    </style:style>
    <style:style style:name="Table32" style:family="table">
      <style:table-properties style:width="6.925in" table:align="left"/>
    </style:style>
    <style:style style:name="Table32.A" style:family="table-column">
      <style:table-column-properties style:column-width="1.1799in"/>
    </style:style>
    <style:style style:name="Table32.B" style:family="table-column">
      <style:table-column-properties style:column-width="0.6035in"/>
    </style:style>
    <style:style style:name="Table32.C" style:family="table-column">
      <style:table-column-properties style:column-width="0.7056in"/>
    </style:style>
    <style:style style:name="Table32.D" style:family="table-column">
      <style:table-column-properties style:column-width="0.8285in"/>
    </style:style>
    <style:style style:name="Table32.E" style:family="table-column">
      <style:table-column-properties style:column-width="0.9021in"/>
    </style:style>
    <style:style style:name="Table32.F" style:family="table-column">
      <style:table-column-properties style:column-width="0.525in"/>
    </style:style>
    <style:style style:name="Table32.G" style:family="table-column">
      <style:table-column-properties style:column-width="2.1806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0.9292in"/>
    </style:style>
    <style:style style:name="Table33.B" style:family="table-column">
      <style:table-column-properties style:column-width="1.2674in"/>
    </style:style>
    <style:style style:name="Table33.C" style:family="table-column">
      <style:table-column-properties style:column-width="1.184in"/>
    </style:style>
    <style:style style:name="Table33.D" style:family="table-column">
      <style:table-column-properties style:column-width="3.5444in"/>
    </style:style>
    <style:style style:name="Table33.A1" style:family="table-cell">
      <style:table-cell-properties style:vertical-align="middle" fo:padding="0.0194in" fo:border="none"/>
    </style:style>
    <style:style style:name="Table34" style:family="table">
      <style:table-properties style:width="6.925in" table:align="left"/>
    </style:style>
    <style:style style:name="Table34.A" style:family="table-column">
      <style:table-column-properties style:column-width="1.075in"/>
    </style:style>
    <style:style style:name="Table34.B" style:family="table-column">
      <style:table-column-properties style:column-width="0.5021in"/>
    </style:style>
    <style:style style:name="Table34.C" style:family="table-column">
      <style:table-column-properties style:column-width="0.7056in"/>
    </style:style>
    <style:style style:name="Table34.D" style:family="table-column">
      <style:table-column-properties style:column-width="0.8021in"/>
    </style:style>
    <style:style style:name="Table34.E" style:family="table-column">
      <style:table-column-properties style:column-width="0.9021in"/>
    </style:style>
    <style:style style:name="Table34.F" style:family="table-column">
      <style:table-column-properties style:column-width="0.525in"/>
    </style:style>
    <style:style style:name="Table34.G" style:family="table-column">
      <style:table-column-properties style:column-width="2.4132in"/>
    </style:style>
    <style:style style:name="Table34.A1" style:family="table-cell">
      <style:table-cell-properties style:vertical-align="middle" fo:padding="0.0194in" fo:border="none"/>
    </style:style>
    <style:style style:name="Table17" style:family="table">
      <style:table-properties style:width="6.8174in" table:align="left"/>
    </style:style>
    <style:style style:name="Table17.A" style:family="table-column">
      <style:table-column-properties style:column-width="1.684in"/>
    </style:style>
    <style:style style:name="Table17.B" style:family="table-column">
      <style:table-column-properties style:column-width="0.8514in"/>
    </style:style>
    <style:style style:name="Table17.C" style:family="table-column">
      <style:table-column-properties style:column-width="1.2535in"/>
    </style:style>
    <style:style style:name="Table17.D" style:family="table-column">
      <style:table-column-properties style:column-width="3.0285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0285in"/>
    </style:style>
    <style:style style:name="Table18.B" style:family="table-column">
      <style:table-column-properties style:column-width="1.1014in"/>
    </style:style>
    <style:style style:name="Table18.C" style:family="table-column">
      <style:table-column-properties style:column-width="0.9528in"/>
    </style:style>
    <style:style style:name="Table18.D" style:family="table-column">
      <style:table-column-properties style:column-width="3.8424in"/>
    </style:style>
    <style:style style:name="Table18.A1" style:family="table-cell">
      <style:table-cell-properties style:vertical-align="middle" fo:padding="0.0194in" fo:border="none"/>
    </style:style>
    <style:style style:name="Table35" style:family="table">
      <style:table-properties style:width="6.925in" table:align="left"/>
    </style:style>
    <style:style style:name="Table35.A" style:family="table-column">
      <style:table-column-properties style:column-width="1.1326in"/>
    </style:style>
    <style:style style:name="Table35.B" style:family="table-column">
      <style:table-column-properties style:column-width="0.6563in"/>
    </style:style>
    <style:style style:name="Table35.C" style:family="table-column">
      <style:table-column-properties style:column-width="0.4625in"/>
    </style:style>
    <style:style style:name="Table35.D" style:family="table-column">
      <style:table-column-properties style:column-width="0.716in"/>
    </style:style>
    <style:style style:name="Table35.E" style:family="table-column">
      <style:table-column-properties style:column-width="3.9576in"/>
    </style:style>
    <style:style style:name="Table35.A1" style:family="table-cell">
      <style:table-cell-properties style:vertical-align="middle" fo:padding="0.0194in" fo:border="none"/>
    </style:style>
    <style:style style:name="Table19" style:family="table">
      <style:table-properties style:width="6.925in" table:align="left"/>
    </style:style>
    <style:style style:name="Table19.A" style:family="table-column">
      <style:table-column-properties style:column-width="1.1354in"/>
    </style:style>
    <style:style style:name="Table19.B" style:family="table-column">
      <style:table-column-properties style:column-width="1.075in"/>
    </style:style>
    <style:style style:name="Table19.C" style:family="table-column">
      <style:table-column-properties style:column-width="2.7576in"/>
    </style:style>
    <style:style style:name="Table19.D" style:family="table-column">
      <style:table-column-properties style:column-width="1.9569in"/>
    </style:style>
    <style:style style:name="Table19.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0.9785in"/>
    </style:style>
    <style:style style:name="Table37.B" style:family="table-column">
      <style:table-column-properties style:column-width="2.9431in"/>
    </style:style>
    <style:style style:name="Table37.C" style:family="table-column">
      <style:table-column-properties style:column-width="0.5917in"/>
    </style:style>
    <style:style style:name="Table37.D" style:family="table-column">
      <style:table-column-properties style:column-width="2.4118in"/>
    </style:style>
    <style:style style:name="Table37.A1" style:family="table-cell">
      <style:table-cell-properties style:vertical-align="middle" fo:padding="0.0194in" fo:border="none"/>
    </style:style>
    <style:style style:name="Table39" style:family="table">
      <style:table-properties style:width="6.925in" table:align="left"/>
    </style:style>
    <style:style style:name="Table39.A" style:family="table-column">
      <style:table-column-properties style:column-width="0.3861in"/>
    </style:style>
    <style:style style:name="Table39.B" style:family="table-column">
      <style:table-column-properties style:column-width="1.0521in"/>
    </style:style>
    <style:style style:name="Table39.C" style:family="table-column">
      <style:table-column-properties style:column-width="1.3938in"/>
    </style:style>
    <style:style style:name="Table39.D" style:family="table-column">
      <style:table-column-properties style:column-width="0.8792in"/>
    </style:style>
    <style:style style:name="Table39.E" style:family="table-column">
      <style:table-column-properties style:column-width="3.2139in"/>
    </style:style>
    <style:style style:name="Table39.A1" style:family="table-cell">
      <style:table-cell-properties style:vertical-align="middle" fo:padding="0.0194in" fo:border="none"/>
    </style:style>
    <style:style style:name="Table45" style:family="table">
      <style:table-properties style:width="6.925in" table:align="left"/>
    </style:style>
    <style:style style:name="Table45.A" style:family="table-column">
      <style:table-column-properties style:column-width="1.8556in"/>
    </style:style>
    <style:style style:name="Table45.B" style:family="table-column">
      <style:table-column-properties style:column-width="1.5938in"/>
    </style:style>
    <style:style style:name="Table45.C" style:family="table-column">
      <style:table-column-properties style:column-width="1.3097in"/>
    </style:style>
    <style:style style:name="Table45.D" style:family="table-column">
      <style:table-column-properties style:column-width="2.166in"/>
    </style:style>
    <style:style style:name="Table45.A1" style:family="table-cell">
      <style:table-cell-properties style:vertical-align="middle" fo:padding="0.0194in" fo:border="none"/>
    </style:style>
    <style:style style:name="Table36" style:family="table">
      <style:table-properties style:width="6.925in" table:align="left"/>
    </style:style>
    <style:style style:name="Table36.A" style:family="table-column">
      <style:table-column-properties style:column-width="0.2694in"/>
    </style:style>
    <style:style style:name="Table36.B" style:family="table-column">
      <style:table-column-properties style:column-width="0.8965in"/>
    </style:style>
    <style:style style:name="Table36.C" style:family="table-column">
      <style:table-column-properties style:column-width="2.7319in"/>
    </style:style>
    <style:style style:name="Table36.D" style:family="table-column">
      <style:table-column-properties style:column-width="3.0271in"/>
    </style:style>
    <style:style style:name="Table36.A1" style:family="table-cell">
      <style:table-cell-properties style:vertical-align="middle" fo:padding="0.0194in" fo:border="none"/>
    </style:style>
    <style:style style:name="Table21" style:family="table">
      <style:table-properties style:width="5.6368in" table:align="left"/>
    </style:style>
    <style:style style:name="Table21.A" style:family="table-column">
      <style:table-column-properties style:column-width="1.2757in"/>
    </style:style>
    <style:style style:name="Table21.B" style:family="table-column">
      <style:table-column-properties style:column-width="0.8424in"/>
    </style:style>
    <style:style style:name="Table21.C" style:family="table-column">
      <style:table-column-properties style:column-width="0.8576in"/>
    </style:style>
    <style:style style:name="Table21.D" style:family="table-column">
      <style:table-column-properties style:column-width="0.5826in"/>
    </style:style>
    <style:style style:name="Table21.E" style:family="table-column">
      <style:table-column-properties style:column-width="0.4069in"/>
    </style:style>
    <style:style style:name="Table21.F" style:family="table-column">
      <style:table-column-properties style:column-width="0.2813in"/>
    </style:style>
    <style:style style:name="Table21.G" style:family="table-column">
      <style:table-column-properties style:column-width="0.2868in"/>
    </style:style>
    <style:style style:name="Table21.I" style:family="table-column">
      <style:table-column-properties style:column-width="0.391in"/>
    </style:style>
    <style:style style:name="Table21.J" style:family="table-column">
      <style:table-column-properties style:column-width="0.3056in"/>
    </style:style>
    <style:style style:name="Table21.A1" style:family="table-cell">
      <style:table-cell-properties style:vertical-align="middle" fo:padding="0.0194in" fo:border="none"/>
    </style:style>
    <style:style style:name="Table26" style:family="table">
      <style:table-properties style:width="4.1451in" table:align="left"/>
    </style:style>
    <style:style style:name="Table26.A" style:family="table-column">
      <style:table-column-properties style:column-width="1.2757in"/>
    </style:style>
    <style:style style:name="Table26.B" style:family="table-column">
      <style:table-column-properties style:column-width="0.4069in"/>
    </style:style>
    <style:style style:name="Table26.C" style:family="table-column">
      <style:table-column-properties style:column-width="0.3326in"/>
    </style:style>
    <style:style style:name="Table26.D" style:family="table-column">
      <style:table-column-properties style:column-width="0.3146in"/>
    </style:style>
    <style:style style:name="Table26.E" style:family="table-column">
      <style:table-column-properties style:column-width="0.2958in"/>
    </style:style>
    <style:style style:name="Table26.F" style:family="table-column">
      <style:table-column-properties style:column-width="0.3049in"/>
    </style:style>
    <style:style style:name="Table26.J" style:family="table-column">
      <style:table-column-properties style:column-width="0.3181in"/>
    </style:style>
    <style:style style:name="Table26.A1" style:family="table-cell">
      <style:table-cell-properties style:vertical-align="middle" fo:padding="0.0194in" fo:border="none"/>
    </style:style>
    <style:style style:name="Table27" style:family="table">
      <style:table-properties style:width="4.0576in" table:align="left"/>
    </style:style>
    <style:style style:name="Table27.A" style:family="table-column">
      <style:table-column-properties style:column-width="1.2757in"/>
    </style:style>
    <style:style style:name="Table27.B" style:family="table-column">
      <style:table-column-properties style:column-width="0.3146in"/>
    </style:style>
    <style:style style:name="Table27.C" style:family="table-column">
      <style:table-column-properties style:column-width="0.2868in"/>
    </style:style>
    <style:style style:name="Table27.F" style:family="table-column">
      <style:table-column-properties style:column-width="0.3236in"/>
    </style:style>
    <style:style style:name="Table27.H" style:family="table-column">
      <style:table-column-properties style:column-width="0.3326in"/>
    </style:style>
    <style:style style:name="Table27.J" style:family="table-column">
      <style:table-column-properties style:column-width="0.3125in"/>
    </style:style>
    <style:style style:name="Table27.A1" style:family="table-cell">
      <style:table-cell-properties style:vertical-align="middle" fo:padding="0.0194in" fo:border="none"/>
    </style:style>
    <style:style style:name="Table22" style:family="table">
      <style:table-properties style:width="6.8403in" table:align="left"/>
    </style:style>
    <style:style style:name="Table22.A" style:family="table-column">
      <style:table-column-properties style:column-width="0.8333in"/>
    </style:style>
    <style:style style:name="Table22.B" style:family="table-column">
      <style:table-column-properties style:column-width="0.5188in"/>
    </style:style>
    <style:style style:name="Table22.C" style:family="table-column">
      <style:table-column-properties style:column-width="0.416in"/>
    </style:style>
    <style:style style:name="Table22.D" style:family="table-column">
      <style:table-column-properties style:column-width="0.5931in"/>
    </style:style>
    <style:style style:name="Table22.E" style:family="table-column">
      <style:table-column-properties style:column-width="0.6563in"/>
    </style:style>
    <style:style style:name="Table22.F" style:family="table-column">
      <style:table-column-properties style:column-width="0.4431in"/>
    </style:style>
    <style:style style:name="Table22.G" style:family="table-column">
      <style:table-column-properties style:column-width="0.3708in"/>
    </style:style>
    <style:style style:name="Table22.H" style:family="table-column">
      <style:table-column-properties style:column-width="0.6944in"/>
    </style:style>
    <style:style style:name="Table22.I" style:family="table-column">
      <style:table-column-properties style:column-width="0.5556in"/>
    </style:style>
    <style:style style:name="Table22.L" style:family="table-column">
      <style:table-column-properties style:column-width="0.509in"/>
    </style:style>
    <style:style style:name="Table22.A1" style:family="table-cell">
      <style:table-cell-properties style:vertical-align="middle" fo:padding="0.0194in" fo:border="none"/>
    </style:style>
    <style:style style:name="P1" style:family="paragraph" style:parent-style-name="Contents_20_Heading">
      <style:text-properties officeooo:paragraph-rsid="0005af04"/>
    </style:style>
    <style:style style:name="P2" style:family="paragraph" style:parent-style-name="Heading_20_2">
      <style:text-properties officeooo:paragraph-rsid="0005af04"/>
    </style:style>
    <style:style style:name="P3" style:family="paragraph" style:parent-style-name="Heading_20_3">
      <style:text-properties officeooo:paragraph-rsid="0005af04"/>
    </style:style>
    <style:style style:name="P4" style:family="paragraph" style:parent-style-name="Text_20_body">
      <style:paragraph-properties fo:margin-top="0in" fo:margin-bottom="0in" style:contextual-spacing="true"/>
      <style:text-properties officeooo:paragraph-rsid="0005af04"/>
    </style:style>
    <style:style style:name="P5" style:family="paragraph" style:parent-style-name="Preformatted_20_Text">
      <style:paragraph-properties fo:margin-top="0in" fo:margin-bottom="0.1965in" style:contextual-spacing="false"/>
      <style:text-properties officeooo:paragraph-rsid="0005af04"/>
    </style:style>
    <style:style style:name="P6" style:family="paragraph" style:parent-style-name="Preformatted_20_Text">
      <style:text-properties officeooo:paragraph-rsid="0005af04"/>
    </style:style>
    <style:style style:name="P7" style:family="paragraph" style:parent-style-name="Text_20_body">
      <style:text-properties officeooo:paragraph-rsid="0005af04"/>
    </style:style>
    <style:style style:name="P8" style:family="paragraph" style:parent-style-name="Heading_20_2">
      <style:text-properties style:font-name="roboto" officeooo:rsid="00127b79" officeooo:paragraph-rsid="006597ac"/>
    </style:style>
    <style:style style:name="P9" style:family="paragraph" style:parent-style-name="Heading_20_3">
      <style:text-properties style:font-name="roboto" officeooo:paragraph-rsid="0005af04"/>
    </style:style>
    <style:style style:name="P10" style:family="paragraph" style:parent-style-name="Heading_20_3">
      <style:paragraph-properties fo:margin-top="0in" fo:margin-bottom="0in" style:contextual-spacing="true"/>
      <style:text-properties style:font-name="roboto" fo:font-weight="bold" officeooo:paragraph-rsid="006597ac"/>
    </style:style>
    <style:style style:name="P11" style:family="paragraph" style:parent-style-name="Text_20_body">
      <style:paragraph-properties fo:margin-top="0in" fo:margin-bottom="0in" style:contextual-spacing="true"/>
      <style:text-properties style:font-name="roboto" fo:font-weight="bold" officeooo:rsid="006f5baa" officeooo:paragraph-rsid="006f5baa" style:font-weight-asian="bold" style:font-weight-complex="bold"/>
    </style:style>
    <style:style style:name="P12" style:family="paragraph" style:parent-style-name="Heading_20_4">
      <style:text-properties style:font-name="roboto" officeooo:rsid="0014e929" officeooo:paragraph-rsid="006597ac"/>
    </style:style>
    <style:style style:name="P13" style:family="paragraph" style:parent-style-name="Table_20_Contents">
      <style:paragraph-properties fo:margin-top="0in" fo:margin-bottom="0in" style:contextual-spacing="true" fo:text-align="center" style:justify-single-word="false"/>
      <style:text-properties style:font-name="roboto" fo:font-size="12pt" officeooo:rsid="001579a0" officeooo:paragraph-rsid="006597ac" style:font-size-asian="12pt" style:font-size-complex="12pt"/>
    </style:style>
    <style:style style:name="P14" style:family="paragraph" style:parent-style-name="Table_20_Contents">
      <style:paragraph-properties fo:margin-top="0in" fo:margin-bottom="0in" style:contextual-spacing="true" fo:text-align="center" style:justify-single-word="false"/>
      <style:text-properties style:font-name="roboto" fo:font-size="12pt" officeooo:rsid="005a98e8" officeooo:paragraph-rsid="006597ac" style:font-size-asian="12pt" style:font-size-complex="12pt"/>
    </style:style>
    <style:style style:name="P15" style:family="paragraph" style:parent-style-name="Table_20_Contents">
      <style:paragraph-properties fo:margin-top="0in" fo:margin-bottom="0in" style:contextual-spacing="true" fo:text-align="center" style:justify-single-word="false"/>
      <style:text-properties style:font-name="roboto" fo:font-size="12pt" officeooo:rsid="00d2610f" officeooo:paragraph-rsid="006597ac" style:font-size-asian="12pt" style:font-size-complex="12pt"/>
    </style:style>
    <style:style style:name="P16" style:family="paragraph" style:parent-style-name="Table_20_Heading">
      <style:paragraph-properties fo:margin-top="0in" fo:margin-bottom="0in" style:contextual-spacing="true" fo:text-align="center" style:justify-single-word="false"/>
      <style:text-properties style:font-name="roboto" fo:font-size="12pt" officeooo:paragraph-rsid="006597ac" style:font-size-asian="12pt" style:font-size-complex="12pt"/>
    </style:style>
    <style:style style:name="P17" style:family="paragraph" style:parent-style-name="Table_20_Contents">
      <style:paragraph-properties fo:margin-top="0in" fo:margin-bottom="0in" style:contextual-spacing="true" fo:text-align="center" style:justify-single-word="false"/>
      <style:text-properties style:font-name="roboto" fo:font-size="12pt" officeooo:rsid="00326e0f" officeooo:paragraph-rsid="006597ac" style:font-size-asian="12pt" style:font-size-complex="12pt"/>
    </style:style>
    <style:style style:name="P18" style:family="paragraph" style:parent-style-name="Table_20_Heading">
      <style:paragraph-properties fo:margin-top="0in" fo:margin-bottom="0in" style:contextual-spacing="true"/>
      <style:text-properties style:font-name="roboto" fo:font-size="12pt" officeooo:paragraph-rsid="006597ac" style:font-size-asian="12pt" style:font-size-complex="12pt"/>
    </style:style>
    <style:style style:name="P19" style:family="paragraph" style:parent-style-name="Table_20_Contents">
      <style:paragraph-properties fo:text-align="center" style:justify-single-word="false"/>
      <style:text-properties style:font-name="roboto" fo:font-weight="normal" officeooo:paragraph-rsid="006597ac" style:font-weight-asian="normal" style:font-weight-complex="normal"/>
    </style:style>
    <style:style style:name="P20" style:family="paragraph" style:parent-style-name="Table_20_Contents">
      <style:paragraph-properties fo:text-align="center" style:justify-single-word="false"/>
      <style:text-properties style:font-name="roboto" fo:font-weight="normal" officeooo:rsid="00d118b1" officeooo:paragraph-rsid="006597ac" style:font-weight-asian="normal" style:font-weight-complex="normal"/>
    </style:style>
    <style:style style:name="P21" style:family="paragraph" style:parent-style-name="Text_20_body">
      <style:paragraph-properties fo:margin-top="0in" fo:margin-bottom="0in" style:contextual-spacing="true"/>
      <style:text-properties style:font-name="roboto" fo:font-weight="normal" officeooo:rsid="0099877e" officeooo:paragraph-rsid="0099877e" style:font-weight-asian="normal" style:font-weight-complex="normal"/>
    </style:style>
    <style:style style:name="P22" style:family="paragraph" style:parent-style-name="Text_20_body">
      <style:paragraph-properties fo:margin-top="0in" fo:margin-bottom="0in" style:contextual-spacing="true"/>
      <style:text-properties style:font-name="roboto" officeooo:rsid="002ff849" officeooo:paragraph-rsid="006597ac"/>
    </style:style>
    <style:style style:name="P23" style:family="paragraph" style:parent-style-name="Text_20_body">
      <style:paragraph-properties fo:margin-top="0in" fo:margin-bottom="0in" style:contextual-spacing="true"/>
      <style:text-properties style:font-name="roboto" officeooo:rsid="00315ace" officeooo:paragraph-rsid="006597ac"/>
    </style:style>
    <style:style style:name="P24" style:family="paragraph" style:parent-style-name="Text_20_body">
      <style:paragraph-properties fo:margin-top="0in" fo:margin-bottom="0in" style:contextual-spacing="true"/>
      <style:text-properties style:font-name="roboto" officeooo:rsid="00b49ca5" officeooo:paragraph-rsid="006597ac"/>
    </style:style>
    <style:style style:name="P25" style:family="paragraph" style:parent-style-name="Text_20_body">
      <style:paragraph-properties fo:margin-top="0in" fo:margin-bottom="0in" style:contextual-spacing="true"/>
      <style:text-properties style:font-name="roboto" officeooo:rsid="00b29438" officeooo:paragraph-rsid="006597ac"/>
    </style:style>
    <style:style style:name="P26" style:family="paragraph" style:parent-style-name="Text_20_body">
      <style:text-properties style:font-name="roboto" officeooo:paragraph-rsid="001b822c"/>
    </style:style>
    <style:style style:name="P27" style:family="paragraph" style:parent-style-name="Heading_20_2">
      <style:text-properties style:font-name="roboto" officeooo:paragraph-rsid="001b822c"/>
    </style:style>
    <style:style style:name="P28" style:family="paragraph" style:parent-style-name="Heading_20_2">
      <style:text-properties style:font-name="roboto" officeooo:rsid="004b7dd7" officeooo:paragraph-rsid="001b822c"/>
    </style:style>
    <style:style style:name="P29" style:family="paragraph" style:parent-style-name="Heading_20_2">
      <style:text-properties style:font-name="roboto" officeooo:paragraph-rsid="006597ac"/>
    </style:style>
    <style:style style:name="P30" style:family="paragraph" style:parent-style-name="Heading_20_3">
      <style:text-properties style:font-name="roboto" officeooo:paragraph-rsid="006597ac"/>
    </style:style>
    <style:style style:name="P31" style:family="paragraph" style:parent-style-name="Heading_20_3">
      <style:paragraph-properties fo:margin-top="0in" fo:margin-bottom="0in" style:contextual-spacing="true"/>
      <style:text-properties style:font-name="roboto" officeooo:paragraph-rsid="006597ac"/>
    </style:style>
    <style:style style:name="P32" style:family="paragraph" style:parent-style-name="Standard">
      <style:paragraph-properties fo:margin-top="0in" fo:margin-bottom="0in" style:contextual-spacing="true"/>
      <style:text-properties style:font-name="roboto" officeooo:paragraph-rsid="006597ac"/>
    </style:style>
    <style:style style:name="P33" style:family="paragraph" style:parent-style-name="Text_20_body">
      <style:paragraph-properties fo:margin-top="0in" fo:margin-bottom="0in" style:contextual-spacing="true"/>
      <style:text-properties style:font-name="roboto" officeooo:paragraph-rsid="006597ac"/>
    </style:style>
    <style:style style:name="P34" style:family="paragraph" style:parent-style-name="Heading_20_4">
      <style:text-properties style:font-name="roboto" officeooo:paragraph-rsid="006597ac"/>
    </style:style>
    <style:style style:name="P35" style:family="paragraph" style:parent-style-name="Text_20_body">
      <style:text-properties style:font-name="roboto" officeooo:paragraph-rsid="006597ac"/>
    </style:style>
    <style:style style:name="P36" style:family="paragraph" style:parent-style-name="Heading_20_4">
      <style:text-properties style:font-name="roboto" officeooo:paragraph-rsid="009d243c"/>
    </style:style>
    <style:style style:name="P37" style:family="paragraph" style:parent-style-name="Text_20_body">
      <style:paragraph-properties fo:margin-top="0in" fo:margin-bottom="0in" style:contextual-spacing="true"/>
      <style:text-properties style:font-name="roboto" officeooo:paragraph-rsid="0099877e"/>
    </style:style>
    <style:style style:name="P38" style:family="paragraph" style:parent-style-name="Heading_20_3">
      <style:text-properties officeooo:rsid="00405a7f" officeooo:paragraph-rsid="0005af04"/>
    </style:style>
    <style:style style:name="P39" style:family="paragraph" style:parent-style-name="Text_20_body">
      <style:text-properties officeooo:rsid="00405a7f" officeooo:paragraph-rsid="0005af04"/>
    </style:style>
    <style:style style:name="P40" style:family="paragraph" style:parent-style-name="Heading_20_4">
      <style:text-properties officeooo:rsid="00de0ccc" officeooo:paragraph-rsid="006597ac"/>
    </style:style>
    <style:style style:name="P41" style:family="paragraph" style:parent-style-name="Text_20_body">
      <style:text-properties officeooo:rsid="00de0ccc" officeooo:paragraph-rsid="006597ac"/>
    </style:style>
    <style:style style:name="P42" style:family="paragraph" style:parent-style-name="Text_20_body">
      <style:text-properties officeooo:rsid="00127b79" officeooo:paragraph-rsid="0005af04"/>
    </style:style>
    <style:style style:name="P43" style:family="paragraph" style:parent-style-name="Table_20_Contents">
      <style:paragraph-properties fo:margin-top="0in" fo:margin-bottom="0in" style:contextual-spacing="true" fo:text-align="center" style:justify-single-word="false"/>
      <style:text-properties officeooo:paragraph-rsid="006597ac"/>
    </style:style>
    <style:style style:name="P44" style:family="paragraph" style:parent-style-name="Table_20_Contents">
      <style:paragraph-properties fo:text-align="center" style:justify-single-word="false"/>
      <style:text-properties officeooo:paragraph-rsid="006597ac"/>
    </style:style>
    <style:style style:name="P45" style:family="paragraph" style:parent-style-name="Text_20_body">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ext-properties officeooo:rsid="00cfad9e" officeooo:paragraph-rsid="006597ac"/>
    </style:style>
    <style:style style:name="P46" style:family="paragraph" style:parent-style-name="Text_20_body">
      <style:text-properties officeooo:rsid="00bdc1ed" officeooo:paragraph-rsid="006597ac"/>
    </style:style>
    <style:style style:name="P47" style:family="paragraph" style:parent-style-name="Text_20_body">
      <style:text-properties officeooo:rsid="009f293c" officeooo:paragraph-rsid="0005af04"/>
    </style:style>
    <style:style style:name="P48" style:family="paragraph" style:parent-style-name="Text_20_body">
      <style:text-properties officeooo:rsid="0041397b" officeooo:paragraph-rsid="0005af04"/>
    </style:style>
    <style:style style:name="P49" style:family="paragraph" style:parent-style-name="Text_20_body">
      <style:text-properties officeooo:rsid="004f0a34" officeooo:paragraph-rsid="0005af04"/>
    </style:style>
    <style:style style:name="P50" style:family="paragraph" style:parent-style-name="Text_20_body">
      <style:text-properties officeooo:rsid="004f79c8" officeooo:paragraph-rsid="0005af04"/>
    </style:style>
    <style:style style:name="P51" style:family="paragraph" style:parent-style-name="Text_20_body">
      <style:text-properties officeooo:rsid="0050e21c" officeooo:paragraph-rsid="0005af04"/>
    </style:style>
    <style:style style:name="P52" style:family="paragraph" style:parent-style-name="Text_20_body">
      <style:text-properties fo:font-style="italic" officeooo:rsid="0050e21c" officeooo:paragraph-rsid="0005af04"/>
    </style:style>
    <style:style style:name="P53" style:family="paragraph" style:parent-style-name="Text_20_body">
      <style:text-properties officeooo:rsid="0051528d" officeooo:paragraph-rsid="0005af04"/>
    </style:style>
    <style:style style:name="P54" style:family="paragraph" style:parent-style-name="Text_20_body">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6597ac"/>
    </style:style>
    <style:style style:name="P55" style:family="paragraph" style:parent-style-name="Text_20_body">
      <style:text-properties officeooo:paragraph-rsid="001c39df"/>
    </style:style>
    <style:style style:name="P56" style:family="paragraph" style:parent-style-name="Heading_20_2">
      <style:text-properties officeooo:paragraph-rsid="001b822c"/>
    </style:style>
    <style:style style:name="P57" style:family="paragraph" style:parent-style-name="Text_20_body">
      <style:text-properties officeooo:paragraph-rsid="001b822c"/>
    </style:style>
    <style:style style:name="P58" style:family="paragraph" style:parent-style-name="Heading_20_3">
      <style:text-properties officeooo:paragraph-rsid="00390517"/>
    </style:style>
    <style:style style:name="P59" style:family="paragraph" style:parent-style-name="Text_20_body">
      <style:text-properties officeooo:paragraph-rsid="00390517"/>
    </style:style>
    <style:style style:name="P60" style:family="paragraph" style:parent-style-name="Heading_20_3">
      <style:text-properties officeooo:paragraph-rsid="00397eda"/>
    </style:style>
    <style:style style:name="P61" style:family="paragraph" style:parent-style-name="Text_20_body">
      <style:text-properties officeooo:paragraph-rsid="00397eda"/>
    </style:style>
    <style:style style:name="P62" style:family="paragraph" style:parent-style-name="Text_20_body">
      <style:text-properties fo:font-weight="bold" officeooo:paragraph-rsid="006a3d02" style:font-weight-asian="bold" style:font-weight-complex="bold"/>
    </style:style>
    <style:style style:name="P63" style:family="paragraph" style:parent-style-name="Heading_20_3">
      <style:text-properties fo:font-weight="bold" style:font-weight-asian="bold" style:font-weight-complex="bold"/>
    </style:style>
    <style:style style:name="P64" style:family="paragraph" style:parent-style-name="Text_20_body">
      <style:text-properties fo:font-weight="bold" officeooo:paragraph-rsid="00a349ab" style:font-weight-asian="bold" style:font-weight-complex="bold"/>
    </style:style>
    <style:style style:name="P65" style:family="paragraph" style:parent-style-name="Table_20_Contents">
      <style:paragraph-properties fo:margin-top="0in" fo:margin-bottom="0.1965in" style:contextual-spacing="false"/>
      <style:text-properties fo:font-weight="bold" officeooo:rsid="00f31413" officeooo:paragraph-rsid="00f31413" style:font-weight-asian="bold" style:font-weight-complex="bold"/>
    </style:style>
    <style:style style:name="P66" style:family="paragraph" style:parent-style-name="Text_20_body">
      <style:text-properties officeooo:paragraph-rsid="0034689f"/>
    </style:style>
    <style:style style:name="P67" style:family="paragraph" style:parent-style-name="Text_20_body">
      <style:text-properties officeooo:paragraph-rsid="00536f0f"/>
    </style:style>
    <style:style style:name="P68" style:family="paragraph" style:parent-style-name="Text_20_body">
      <style:text-properties fo:font-weight="normal" officeooo:paragraph-rsid="006a3d02" style:font-weight-asian="normal" style:font-weight-complex="normal"/>
    </style:style>
    <style:style style:name="P69" style:family="paragraph" style:parent-style-name="Text_20_body">
      <style:text-properties fo:font-weight="normal" style:font-weight-asian="normal" style:font-weight-complex="normal"/>
    </style:style>
    <style:style style:name="P70" style:family="paragraph" style:parent-style-name="Heading_20_1">
      <style:text-properties officeooo:paragraph-rsid="006597ac"/>
    </style:style>
    <style:style style:name="P71" style:family="paragraph" style:parent-style-name="Heading_20_2">
      <style:text-properties officeooo:paragraph-rsid="006597ac"/>
    </style:style>
    <style:style style:name="P72" style:family="paragraph" style:parent-style-name="Heading_20_3">
      <style:text-properties officeooo:paragraph-rsid="006597ac"/>
    </style:style>
    <style:style style:name="P73" style:family="paragraph" style:parent-style-name="Heading_20_4">
      <style:paragraph-properties fo:margin-top="0in" fo:margin-bottom="0in" style:contextual-spacing="true"/>
      <style:text-properties officeooo:paragraph-rsid="006597ac"/>
    </style:style>
    <style:style style:name="P74" style:family="paragraph" style:parent-style-name="Preformatted_20_Text">
      <style:paragraph-properties fo:margin-top="0in" fo:margin-bottom="0in" style:contextual-spacing="true"/>
      <style:text-properties officeooo:paragraph-rsid="006597ac"/>
    </style:style>
    <style:style style:name="P75" style:family="paragraph" style:parent-style-name="Text_20_body">
      <style:paragraph-properties fo:margin-top="0in" fo:margin-bottom="0in" style:contextual-spacing="true"/>
      <style:text-properties officeooo:paragraph-rsid="006597ac"/>
    </style:style>
    <style:style style:name="P76" style:family="paragraph" style:parent-style-name="Heading_20_4">
      <style:text-properties officeooo:paragraph-rsid="006597ac"/>
    </style:style>
    <style:style style:name="P77" style:family="paragraph" style:parent-style-name="Heading_20_5">
      <style:text-properties officeooo:paragraph-rsid="006597ac"/>
    </style:style>
    <style:style style:name="P78" style:family="paragraph" style:parent-style-name="Preformatted_20_Text">
      <style:paragraph-properties fo:margin-top="0in" fo:margin-bottom="0.1965in" style:contextual-spacing="false"/>
      <style:text-properties officeooo:paragraph-rsid="006597ac"/>
    </style:style>
    <style:style style:name="P79" style:family="paragraph" style:parent-style-name="Table_20_Contents">
      <style:paragraph-properties fo:margin-top="0in" fo:margin-bottom="0.1965in" style:contextual-spacing="false"/>
      <style:text-properties officeooo:paragraph-rsid="006597ac"/>
    </style:style>
    <style:style style:name="P80" style:family="paragraph" style:parent-style-name="Table_20_Heading">
      <style:paragraph-properties fo:margin-top="0in" fo:margin-bottom="0.1965in" style:contextual-spacing="false"/>
      <style:text-properties officeooo:paragraph-rsid="006597ac"/>
    </style:style>
    <style:style style:name="P81" style:family="paragraph" style:parent-style-name="Text_20_body">
      <style:paragraph-properties fo:margin-top="0in" fo:margin-bottom="0.1965in" style:contextual-spacing="false"/>
      <style:text-properties officeooo:paragraph-rsid="006597ac"/>
    </style:style>
    <style:style style:name="P82" style:family="paragraph" style:parent-style-name="Preformatted_20_Text">
      <style:text-properties officeooo:paragraph-rsid="006597ac"/>
    </style:style>
    <style:style style:name="P83" style:family="paragraph" style:parent-style-name="Text_20_body">
      <style:text-properties officeooo:paragraph-rsid="006597ac"/>
    </style:style>
    <style:style style:name="P84" style:family="paragraph" style:parent-style-name="Heading_20_3">
      <style:text-properties officeooo:paragraph-rsid="0067e673"/>
    </style:style>
    <style:style style:name="P85" style:family="paragraph" style:parent-style-name="Heading_20_4">
      <style:text-properties officeooo:paragraph-rsid="0067e673"/>
    </style:style>
    <style:style style:name="P86" style:family="paragraph" style:parent-style-name="Text_20_body">
      <style:text-properties officeooo:paragraph-rsid="0067e673"/>
    </style:style>
    <style:style style:name="P87" style:family="paragraph" style:parent-style-name="Text_20_body">
      <style:text-properties officeooo:rsid="001b6e47" officeooo:paragraph-rsid="0067e673"/>
    </style:style>
    <style:style style:name="P88" style:family="paragraph" style:parent-style-name="Heading_20_4">
      <style:text-properties officeooo:rsid="001b6e47" officeooo:paragraph-rsid="0067e673"/>
    </style:style>
    <style:style style:name="P89" style:family="paragraph" style:parent-style-name="Heading_20_4">
      <style:text-properties officeooo:rsid="001b6e47" officeooo:paragraph-rsid="00f82f31"/>
    </style:style>
    <style:style style:name="P90" style:family="paragraph" style:parent-style-name="Heading_20_4">
      <style:text-properties fo:font-style="normal" officeooo:paragraph-rsid="006a3d02" style:font-style-asian="normal" style:font-style-complex="normal"/>
    </style:style>
    <style:style style:name="P91" style:family="paragraph" style:parent-style-name="Heading_20_4">
      <style:text-properties officeooo:paragraph-rsid="006a3d02"/>
    </style:style>
    <style:style style:name="P92" style:family="paragraph" style:parent-style-name="Heading_20_5">
      <style:text-properties officeooo:paragraph-rsid="006a3d02"/>
    </style:style>
    <style:style style:name="P93" style:family="paragraph" style:parent-style-name="Text_20_body">
      <style:text-properties officeooo:paragraph-rsid="006a3d02"/>
    </style:style>
    <style:style style:name="P94" style:family="paragraph" style:parent-style-name="Table_20_Contents">
      <style:paragraph-properties fo:margin-top="0in" fo:margin-bottom="0.1965in" style:contextual-spacing="false"/>
    </style:style>
    <style:style style:name="P95" style:family="paragraph" style:parent-style-name="Table_20_Heading">
      <style:paragraph-properties fo:margin-top="0in" fo:margin-bottom="0.1965in" style:contextual-spacing="false"/>
    </style:style>
    <style:style style:name="P96" style:family="paragraph" style:parent-style-name="Preformatted_20_Text">
      <style:paragraph-properties fo:margin-top="0in" fo:margin-bottom="0.1965in" style:contextual-spacing="false"/>
    </style:style>
    <style:style style:name="P97" style:family="paragraph" style:parent-style-name="Heading_20_4">
      <style:text-properties officeooo:rsid="0081fe67" officeooo:paragraph-rsid="0081fe67"/>
    </style:style>
    <style:style style:name="P98" style:family="paragraph" style:parent-style-name="Text_20_body">
      <style:text-properties officeooo:rsid="0081fe67" officeooo:paragraph-rsid="0081fe67"/>
    </style:style>
    <style:style style:name="P99" style:family="paragraph" style:parent-style-name="Heading_20_5">
      <style:text-properties officeooo:paragraph-rsid="0087e3de"/>
    </style:style>
    <style:style style:name="P100" style:family="paragraph" style:parent-style-name="Text_20_body">
      <style:text-properties officeooo:paragraph-rsid="0083bfae"/>
    </style:style>
    <style:style style:name="P101" style:family="paragraph" style:parent-style-name="Text_20_body">
      <style:text-properties officeooo:rsid="0087e3de" officeooo:paragraph-rsid="0087e3de"/>
    </style:style>
    <style:style style:name="P102" style:family="paragraph" style:parent-style-name="Preformatted_20_Text">
      <style:text-properties officeooo:paragraph-rsid="009ae0ac"/>
    </style:style>
    <style:style style:name="P103" style:family="paragraph" style:parent-style-name="Preformatted_20_Text">
      <style:paragraph-properties fo:margin-top="0in" fo:margin-bottom="0.1965in" style:contextual-spacing="false"/>
      <style:text-properties officeooo:paragraph-rsid="009ae0ac"/>
    </style:style>
    <style:style style:name="P104" style:family="paragraph" style:parent-style-name="Table_20_Contents">
      <style:paragraph-properties fo:margin-top="0in" fo:margin-bottom="0.1965in" style:contextual-spacing="false"/>
      <style:text-properties officeooo:paragraph-rsid="009ae0ac"/>
    </style:style>
    <style:style style:name="P105" style:family="paragraph" style:parent-style-name="Table_20_Heading">
      <style:paragraph-properties fo:margin-top="0in" fo:margin-bottom="0.1965in" style:contextual-spacing="false"/>
      <style:text-properties officeooo:paragraph-rsid="009ae0ac"/>
    </style:style>
    <style:style style:name="P106" style:family="paragraph" style:parent-style-name="Text_20_body">
      <style:text-properties officeooo:paragraph-rsid="009ae0ac"/>
    </style:style>
    <style:style style:name="P107" style:family="paragraph" style:parent-style-name="Text_20_body">
      <style:paragraph-properties fo:margin-top="0in" fo:margin-bottom="0in" style:contextual-spacing="true"/>
      <style:text-properties officeooo:paragraph-rsid="009ae0ac"/>
    </style:style>
    <style:style style:name="P108" style:family="paragraph" style:parent-style-name="Preformatted_20_Text">
      <style:text-properties officeooo:paragraph-rsid="009ba52b"/>
    </style:style>
    <style:style style:name="P109" style:family="paragraph" style:parent-style-name="Preformatted_20_Text">
      <style:paragraph-properties fo:margin-top="0in" fo:margin-bottom="0.1965in" style:contextual-spacing="false"/>
      <style:text-properties officeooo:paragraph-rsid="009ba52b"/>
    </style:style>
    <style:style style:name="P110" style:family="paragraph" style:parent-style-name="Table_20_Contents">
      <style:paragraph-properties fo:margin-top="0in" fo:margin-bottom="0.1965in" style:contextual-spacing="false"/>
      <style:text-properties officeooo:paragraph-rsid="009ba52b"/>
    </style:style>
    <style:style style:name="P111" style:family="paragraph" style:parent-style-name="Table_20_Heading">
      <style:paragraph-properties fo:margin-top="0in" fo:margin-bottom="0.1965in" style:contextual-spacing="false"/>
      <style:text-properties officeooo:paragraph-rsid="009ba52b"/>
    </style:style>
    <style:style style:name="P112" style:family="paragraph" style:parent-style-name="Text_20_body">
      <style:text-properties officeooo:paragraph-rsid="009ba52b"/>
    </style:style>
    <style:style style:name="P113" style:family="paragraph" style:parent-style-name="Preformatted_20_Text">
      <style:text-properties officeooo:paragraph-rsid="009c7a28"/>
    </style:style>
    <style:style style:name="P114" style:family="paragraph" style:parent-style-name="Preformatted_20_Text">
      <style:paragraph-properties fo:margin-top="0in" fo:margin-bottom="0.1965in" style:contextual-spacing="false"/>
      <style:text-properties officeooo:paragraph-rsid="009c7a28"/>
    </style:style>
    <style:style style:name="P115" style:family="paragraph" style:parent-style-name="Table_20_Contents">
      <style:paragraph-properties fo:margin-top="0in" fo:margin-bottom="0.1965in" style:contextual-spacing="false"/>
      <style:text-properties officeooo:paragraph-rsid="009c7a28"/>
    </style:style>
    <style:style style:name="P116" style:family="paragraph" style:parent-style-name="Table_20_Heading">
      <style:paragraph-properties fo:margin-top="0in" fo:margin-bottom="0.1965in" style:contextual-spacing="false"/>
      <style:text-properties officeooo:paragraph-rsid="009c7a28"/>
    </style:style>
    <style:style style:name="P117" style:family="paragraph" style:parent-style-name="Text_20_body">
      <style:text-properties officeooo:paragraph-rsid="009c7a28"/>
    </style:style>
    <style:style style:name="P118" style:family="paragraph" style:parent-style-name="Text_20_body">
      <style:paragraph-properties fo:margin-top="0in" fo:margin-bottom="0in" style:contextual-spacing="true"/>
      <style:text-properties officeooo:paragraph-rsid="009c7a28"/>
    </style:style>
    <style:style style:name="P119" style:family="paragraph" style:parent-style-name="Preformatted_20_Text">
      <style:text-properties officeooo:paragraph-rsid="009cca52"/>
    </style:style>
    <style:style style:name="P120" style:family="paragraph" style:parent-style-name="Preformatted_20_Text">
      <style:paragraph-properties fo:margin-top="0in" fo:margin-bottom="0.1965in" style:contextual-spacing="false"/>
      <style:text-properties officeooo:paragraph-rsid="009cca52"/>
    </style:style>
    <style:style style:name="P121" style:family="paragraph" style:parent-style-name="Table_20_Contents">
      <style:paragraph-properties fo:margin-top="0in" fo:margin-bottom="0.1965in" style:contextual-spacing="false"/>
      <style:text-properties officeooo:paragraph-rsid="009cca52"/>
    </style:style>
    <style:style style:name="P122" style:family="paragraph" style:parent-style-name="Table_20_Heading">
      <style:paragraph-properties fo:margin-top="0in" fo:margin-bottom="0.1965in" style:contextual-spacing="false"/>
      <style:text-properties officeooo:paragraph-rsid="009cca52"/>
    </style:style>
    <style:style style:name="P123" style:family="paragraph" style:parent-style-name="Preformatted_20_Text">
      <style:paragraph-properties fo:margin-top="0in" fo:margin-bottom="0in" style:contextual-spacing="true"/>
      <style:text-properties officeooo:paragraph-rsid="009cca52"/>
    </style:style>
    <style:style style:name="P124" style:family="paragraph" style:parent-style-name="Text_20_body">
      <style:text-properties officeooo:paragraph-rsid="009cca52"/>
    </style:style>
    <style:style style:name="P125" style:family="paragraph" style:parent-style-name="Preformatted_20_Text">
      <style:text-properties officeooo:paragraph-rsid="009d243c"/>
    </style:style>
    <style:style style:name="P126" style:family="paragraph" style:parent-style-name="Preformatted_20_Text">
      <style:paragraph-properties fo:margin-top="0in" fo:margin-bottom="0.1965in" style:contextual-spacing="false"/>
      <style:text-properties officeooo:paragraph-rsid="009d243c"/>
    </style:style>
    <style:style style:name="P127" style:family="paragraph" style:parent-style-name="Table_20_Contents">
      <style:paragraph-properties fo:margin-top="0in" fo:margin-bottom="0.1965in" style:contextual-spacing="false"/>
      <style:text-properties officeooo:paragraph-rsid="009d243c"/>
    </style:style>
    <style:style style:name="P128" style:family="paragraph" style:parent-style-name="Table_20_Heading">
      <style:paragraph-properties fo:margin-top="0in" fo:margin-bottom="0.1965in" style:contextual-spacing="false"/>
      <style:text-properties officeooo:paragraph-rsid="009d243c"/>
    </style:style>
    <style:style style:name="P129" style:family="paragraph" style:parent-style-name="Text_20_body">
      <style:text-properties officeooo:paragraph-rsid="009d243c"/>
    </style:style>
    <style:style style:name="P130" style:family="paragraph" style:parent-style-name="Preformatted_20_Text">
      <style:text-properties officeooo:paragraph-rsid="009d9a6a"/>
    </style:style>
    <style:style style:name="P131" style:family="paragraph" style:parent-style-name="Preformatted_20_Text">
      <style:paragraph-properties fo:margin-top="0in" fo:margin-bottom="0.1965in" style:contextual-spacing="false"/>
      <style:text-properties officeooo:paragraph-rsid="009d9a6a"/>
    </style:style>
    <style:style style:name="P132" style:family="paragraph" style:parent-style-name="Table_20_Contents">
      <style:paragraph-properties fo:margin-top="0in" fo:margin-bottom="0.1965in" style:contextual-spacing="false"/>
      <style:text-properties officeooo:paragraph-rsid="009d9a6a"/>
    </style:style>
    <style:style style:name="P133" style:family="paragraph" style:parent-style-name="Table_20_Heading">
      <style:paragraph-properties fo:margin-top="0in" fo:margin-bottom="0.1965in" style:contextual-spacing="false"/>
      <style:text-properties officeooo:paragraph-rsid="009d9a6a"/>
    </style:style>
    <style:style style:name="P134" style:family="paragraph" style:parent-style-name="Text_20_body">
      <style:text-properties officeooo:paragraph-rsid="009d9a6a"/>
    </style:style>
    <style:style style:name="P135" style:family="paragraph" style:parent-style-name="Heading_20_5">
      <style:text-properties officeooo:paragraph-rsid="0094afd3"/>
    </style:style>
    <style:style style:name="P136" style:family="paragraph" style:parent-style-name="Text_20_body">
      <style:text-properties officeooo:paragraph-rsid="0094afd3"/>
    </style:style>
    <style:style style:name="P137" style:family="paragraph" style:parent-style-name="Heading_20_5">
      <style:text-properties officeooo:paragraph-rsid="0094e6cf"/>
    </style:style>
    <style:style style:name="P138" style:family="paragraph" style:parent-style-name="Text_20_body">
      <style:text-properties officeooo:paragraph-rsid="0094e6cf"/>
    </style:style>
    <style:style style:name="P139" style:family="paragraph" style:parent-style-name="Heading_20_5">
      <style:paragraph-properties fo:margin-top="0in" fo:margin-bottom="0in" style:contextual-spacing="true"/>
      <style:text-properties officeooo:paragraph-rsid="0099877e"/>
    </style:style>
    <style:style style:name="P140" style:family="paragraph" style:parent-style-name="Heading_20_5">
      <style:text-properties officeooo:paragraph-rsid="0099877e"/>
    </style:style>
    <style:style style:name="P141" style:family="paragraph" style:parent-style-name="Preformatted_20_Text">
      <style:text-properties officeooo:paragraph-rsid="0099877e"/>
    </style:style>
    <style:style style:name="P142" style:family="paragraph" style:parent-style-name="Text_20_body">
      <style:text-properties officeooo:paragraph-rsid="0099877e"/>
    </style:style>
    <style:style style:name="P14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14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officeooo:paragraph-rsid="0096f8fc"/>
    </style:style>
    <style:style style:name="P145" style:family="paragraph" style:parent-style-name="Text_20_body">
      <style:paragraph-properties fo:margin-left="0in" fo:margin-right="0in" fo:margin-top="0in" fo:margin-bottom="0in" style:contextual-spacing="true" fo:line-height="114%" fo:text-indent="0in" style:auto-text-indent="false" fo:padding="0in" fo:border="none"/>
      <style:text-properties officeooo:paragraph-rsid="0091b763"/>
    </style:style>
    <style:style style:name="P146" style:family="paragraph" style:parent-style-name="Text_20_body">
      <style:paragraph-properties fo:margin-left="0in" fo:margin-right="0in" fo:margin-top="0in" fo:margin-bottom="0in" style:contextual-spacing="true" fo:line-height="114%" fo:text-indent="0in" style:auto-text-indent="false" fo:padding="0in" fo:border="none"/>
      <style:text-properties style:font-name="Google Sans Text" fo:font-weight="normal" officeooo:paragraph-rsid="008fcf71" style:font-weight-asian="normal" style:font-weight-complex="normal"/>
    </style:style>
    <style:style style:name="P147" style:family="paragraph" style:parent-style-name="Text_20_body">
      <style:paragraph-properties fo:margin-left="0in" fo:margin-right="0in" fo:margin-top="0in" fo:margin-bottom="0in" style:contextual-spacing="true" fo:line-height="114%" fo:text-indent="0in" style:auto-text-indent="false" fo:padding="0in" fo:border="none"/>
      <style:text-properties style:font-name="Google Sans Text" fo:font-weight="normal" officeooo:paragraph-rsid="0091b763" style:font-weight-asian="normal" style:font-weight-complex="normal"/>
    </style:style>
    <style:style style:name="P148"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49" style:family="paragraph" style:parent-style-name="Text_20_body">
      <style:paragraph-properties fo:margin-top="0in" fo:margin-bottom="0in" style:contextual-spacing="true"/>
      <style:text-properties style:font-name="Google Sans Text" officeooo:rsid="0093d52a" officeooo:paragraph-rsid="0093d52a"/>
    </style:style>
    <style:style style:name="P150" style:family="paragraph" style:parent-style-name="Text_20_body">
      <style:text-properties officeooo:paragraph-rsid="00955452"/>
    </style:style>
    <style:style style:name="P151" style:family="paragraph" style:parent-style-name="Heading_20_5">
      <style:text-properties officeooo:paragraph-rsid="00a22fd5"/>
    </style:style>
    <style:style style:name="P152" style:family="paragraph" style:parent-style-name="Text_20_body">
      <style:text-properties officeooo:paragraph-rsid="00a22fd5"/>
    </style:style>
    <style:style style:name="P153" style:family="paragraph" style:parent-style-name="Text_20_body">
      <style:text-properties officeooo:paragraph-rsid="00a349ab"/>
    </style:style>
    <style:style style:name="P154" style:family="paragraph" style:parent-style-name="Text_20_body">
      <style:text-properties officeooo:paragraph-rsid="00b04970"/>
    </style:style>
    <style:style style:name="P155" style:family="paragraph" style:parent-style-name="Heading_20_4">
      <style:text-properties officeooo:paragraph-rsid="00b04970"/>
    </style:style>
    <style:style style:name="P156" style:family="paragraph" style:parent-style-name="Heading_20_5">
      <style:text-properties officeooo:rsid="00baa3d9" officeooo:paragraph-rsid="00f82f31"/>
    </style:style>
    <style:style style:name="P157" style:family="paragraph" style:parent-style-name="Contents_20_1">
      <style:paragraph-properties>
        <style:tab-stops>
          <style:tab-stop style:position="6.9244in" style:type="right" style:leader-style="dotted" style:leader-text="."/>
        </style:tab-stops>
      </style:paragraph-properties>
    </style:style>
    <style:style style:name="P158" style:family="paragraph" style:parent-style-name="Contents_20_2">
      <style:paragraph-properties>
        <style:tab-stops>
          <style:tab-stop style:position="6.728in" style:type="right" style:leader-style="dotted" style:leader-text="."/>
        </style:tab-stops>
      </style:paragraph-properties>
    </style:style>
    <style:style style:name="P159" style:family="paragraph" style:parent-style-name="Contents_20_3">
      <style:paragraph-properties>
        <style:tab-stops>
          <style:tab-stop style:position="6.5307in" style:type="right" style:leader-style="dotted" style:leader-text="."/>
        </style:tab-stops>
      </style:paragraph-properties>
    </style:style>
    <style:style style:name="P160" style:family="paragraph" style:parent-style-name="Contents_20_4">
      <style:paragraph-properties>
        <style:tab-stops>
          <style:tab-stop style:position="6.3339in" style:type="right" style:leader-style="dotted" style:leader-text="."/>
        </style:tab-stops>
      </style:paragraph-properties>
    </style:style>
    <style:style style:name="P161" style:family="paragraph" style:parent-style-name="Contents_20_5">
      <style:paragraph-properties>
        <style:tab-stops>
          <style:tab-stop style:position="6.1366in" style:type="right" style:leader-style="dotted" style:leader-text="."/>
        </style:tab-stops>
      </style:paragraph-properties>
    </style:style>
    <style:style style:name="P162" style:family="paragraph" style:parent-style-name="Contents_20_6">
      <style:paragraph-properties>
        <style:tab-stops>
          <style:tab-stop style:position="5.9402in" style:type="right" style:leader-style="dotted" style:leader-text="."/>
        </style:tab-stops>
      </style:paragraph-properties>
    </style:style>
    <style:style style:name="P163" style:family="paragraph" style:parent-style-name="Heading_20_4">
      <style:text-properties officeooo:paragraph-rsid="00cacd0b"/>
    </style:style>
    <style:style style:name="P164" style:family="paragraph" style:parent-style-name="Text_20_body">
      <style:text-properties officeooo:paragraph-rsid="00cacd0b"/>
    </style:style>
    <style:style style:name="P165" style:family="paragraph" style:parent-style-name="Heading_20_4">
      <style:text-properties officeooo:paragraph-rsid="00ccf0d7"/>
    </style:style>
    <style:style style:name="P166" style:family="paragraph" style:parent-style-name="Text_20_body">
      <style:text-properties officeooo:paragraph-rsid="00ccf0d7"/>
    </style:style>
    <style:style style:name="P167" style:family="paragraph" style:parent-style-name="Table_20_Contents">
      <style:paragraph-properties fo:margin-top="0in" fo:margin-bottom="0.1965in" style:contextual-spacing="false"/>
      <style:text-properties officeooo:rsid="00cacd0b" officeooo:paragraph-rsid="00cacd0b"/>
    </style:style>
    <style:style style:name="P168" style:family="paragraph" style:parent-style-name="Table_20_Contents">
      <style:paragraph-properties fo:margin-top="0in" fo:margin-bottom="0.1965in" style:contextual-spacing="false"/>
      <style:text-properties officeooo:paragraph-rsid="000c6d71"/>
    </style:style>
    <style:style style:name="P169" style:family="paragraph" style:parent-style-name="Text_20_body">
      <style:text-properties officeooo:paragraph-rsid="00d67589"/>
    </style:style>
    <style:style style:name="P170" style:family="paragraph" style:parent-style-name="Heading_20_4">
      <style:text-properties officeooo:paragraph-rsid="00d67589"/>
    </style:style>
    <style:style style:name="P171" style:family="paragraph" style:parent-style-name="Heading_20_3">
      <style:text-properties officeooo:rsid="003b463f" officeooo:paragraph-rsid="0005af04"/>
    </style:style>
    <style:style style:name="P172" style:family="paragraph" style:parent-style-name="Heading_20_4">
      <style:text-properties officeooo:paragraph-rsid="00ccbf1b"/>
    </style:style>
    <style:style style:name="P173" style:family="paragraph" style:parent-style-name="Text_20_body">
      <style:text-properties officeooo:paragraph-rsid="00ccbf1b"/>
    </style:style>
    <style:style style:name="P174" style:family="paragraph" style:parent-style-name="Heading_20_5">
      <style:text-properties officeooo:paragraph-rsid="00f82f31"/>
    </style:style>
    <style:style style:name="P175" style:family="paragraph" style:parent-style-name="Heading_20_6">
      <style:text-properties officeooo:paragraph-rsid="00f82f31"/>
    </style:style>
    <style:style style:name="P176" style:family="paragraph" style:parent-style-name="Table_20_Contents">
      <style:paragraph-properties fo:margin-top="0in" fo:margin-bottom="0.1965in" style:contextual-spacing="false"/>
      <style:text-properties officeooo:paragraph-rsid="00f82f31"/>
    </style:style>
    <style:style style:name="P177" style:family="paragraph" style:parent-style-name="Table_20_Heading">
      <style:paragraph-properties fo:margin-top="0in" fo:margin-bottom="0.1965in" style:contextual-spacing="false"/>
      <style:text-properties officeooo:paragraph-rsid="00f82f31"/>
    </style:style>
    <style:style style:name="P178" style:family="paragraph" style:parent-style-name="Text_20_body">
      <style:text-properties officeooo:paragraph-rsid="00f82f31"/>
    </style:style>
    <style:style style:name="P179" style:family="paragraph" style:parent-style-name="Table_20_Contents">
      <style:paragraph-properties fo:margin-top="0in" fo:margin-bottom="0.1965in" style:contextual-spacing="false"/>
      <style:text-properties officeooo:rsid="00f31413" officeooo:paragraph-rsid="00f31413"/>
    </style:style>
    <style:style style:name="P180" style:family="paragraph" style:parent-style-name="Table_20_Contents">
      <style:paragraph-properties fo:margin-top="0in" fo:margin-bottom="0.1965in" style:contextual-spacing="false"/>
      <style:text-properties officeooo:paragraph-rsid="00f31413"/>
    </style:style>
    <style:style style:name="P181" style:family="paragraph" style:parent-style-name="Table_20_Contents">
      <style:paragraph-properties fo:margin-top="0in" fo:margin-bottom="0.1965in" style:contextual-spacing="false"/>
      <style:text-properties officeooo:paragraph-rsid="00f4864b"/>
    </style:style>
    <style:style style:name="P182" style:family="paragraph" style:parent-style-name="Table_20_Contents">
      <style:paragraph-properties fo:margin-top="0in" fo:margin-bottom="0.1965in" style:contextual-spacing="false"/>
      <style:text-properties officeooo:rsid="00f4864b" officeooo:paragraph-rsid="00f4864b"/>
    </style:style>
    <style:style style:name="P183" style:family="paragraph" style:parent-style-name="Heading_20_5">
      <style:text-properties officeooo:paragraph-rsid="00ffe857"/>
    </style:style>
    <style:style style:name="P184" style:family="paragraph" style:parent-style-name="Heading_20_3">
      <style:text-properties officeooo:paragraph-rsid="006597ac"/>
    </style:style>
    <style:style style:name="P185" style:family="paragraph" style:parent-style-name="Contents_20_1">
      <style:paragraph-properties>
        <style:tab-stops>
          <style:tab-stop style:position="6.9244in" style:type="right" style:leader-style="dotted" style:leader-text="."/>
        </style:tab-stops>
      </style:paragraph-properties>
    </style:style>
    <style:style style:name="P186" style:family="paragraph" style:parent-style-name="Contents_20_2">
      <style:paragraph-properties>
        <style:tab-stops>
          <style:tab-stop style:position="6.728in" style:type="right" style:leader-style="dotted" style:leader-text="."/>
        </style:tab-stops>
      </style:paragraph-properties>
    </style:style>
    <style:style style:name="P187" style:family="paragraph" style:parent-style-name="Contents_20_3">
      <style:paragraph-properties>
        <style:tab-stops>
          <style:tab-stop style:position="6.5307in" style:type="right" style:leader-style="dotted" style:leader-text="."/>
        </style:tab-stops>
      </style:paragraph-properties>
    </style:style>
    <style:style style:name="P188" style:family="paragraph" style:parent-style-name="Contents_20_4">
      <style:paragraph-properties>
        <style:tab-stops>
          <style:tab-stop style:position="6.3339in" style:type="right" style:leader-style="dotted" style:leader-text="."/>
        </style:tab-stops>
      </style:paragraph-properties>
    </style:style>
    <style:style style:name="P189" style:family="paragraph" style:parent-style-name="Contents_20_5">
      <style:paragraph-properties>
        <style:tab-stops>
          <style:tab-stop style:position="6.1366in" style:type="right" style:leader-style="dotted" style:leader-text="."/>
        </style:tab-stops>
      </style:paragraph-properties>
    </style:style>
    <style:style style:name="P190" style:family="paragraph" style:parent-style-name="Contents_20_6">
      <style:paragraph-properties>
        <style:tab-stops>
          <style:tab-stop style:position="5.9402in" style:type="right" style:leader-style="dotted" style:leader-text="."/>
        </style:tab-stops>
      </style:paragraph-properties>
    </style:style>
    <style:style style:name="P191" style:family="paragraph" style:parent-style-name="Heading_20_5" style:list-style-name="L69">
      <style:paragraph-properties fo:margin-top="0in" fo:margin-bottom="0in" style:contextual-spacing="true"/>
      <style:text-properties officeooo:paragraph-rsid="0099877e"/>
    </style:style>
    <style:style style:name="P192" style:family="paragraph" style:parent-style-name="Preformatted_20_Text" style:list-style-name="L24">
      <style:paragraph-properties fo:margin-top="0in" fo:margin-bottom="0.1965in" style:contextual-spacing="false"/>
      <style:text-properties officeooo:paragraph-rsid="006597ac"/>
    </style:style>
    <style:style style:name="P193" style:family="paragraph" style:parent-style-name="Preformatted_20_Text" style:list-style-name="L80">
      <style:text-properties officeooo:paragraph-rsid="0101c821"/>
    </style:style>
    <style:style style:name="P194" style:family="paragraph" style:parent-style-name="Preformatted_20_Text" style:list-style-name="L100">
      <style:text-properties officeooo:paragraph-rsid="006597ac"/>
    </style:style>
    <style:style style:name="P195" style:family="paragraph" style:parent-style-name="Preformatted_20_Text" style:list-style-name="L100">
      <style:paragraph-properties fo:margin-top="0in" fo:margin-bottom="0.1965in" style:contextual-spacing="false"/>
      <style:text-properties officeooo:paragraph-rsid="006597ac"/>
    </style:style>
    <style:style style:name="P196" style:family="paragraph" style:parent-style-name="Preformatted_20_Text">
      <style:paragraph-properties fo:margin-top="0in" fo:margin-bottom="0in" style:contextual-spacing="true"/>
      <style:text-properties officeooo:rsid="010cc767" officeooo:paragraph-rsid="010cc767"/>
    </style:style>
    <style:style style:name="P197" style:family="paragraph" style:parent-style-name="Text_20_body" style:list-style-name="L1">
      <style:text-properties officeooo:paragraph-rsid="006597ac"/>
    </style:style>
    <style:style style:name="P198" style:family="paragraph" style:parent-style-name="Text_20_body" style:list-style-name="L2">
      <style:text-properties officeooo:paragraph-rsid="006597ac"/>
    </style:style>
    <style:style style:name="P199" style:family="paragraph" style:parent-style-name="Text_20_body" style:list-style-name="L2">
      <style:text-properties officeooo:rsid="002cf76c" officeooo:paragraph-rsid="006597ac"/>
    </style:style>
    <style:style style:name="P200" style:family="paragraph" style:parent-style-name="Text_20_body" style:list-style-name="L3">
      <style:paragraph-properties fo:margin-top="0in" fo:margin-bottom="0in" style:contextual-spacing="true"/>
      <style:text-properties style:font-name="roboto" officeooo:rsid="00b49ca5" officeooo:paragraph-rsid="006597ac"/>
    </style:style>
    <style:style style:name="P201" style:family="paragraph" style:parent-style-name="Text_20_body" style:list-style-name="L3">
      <style:paragraph-properties fo:margin-top="0in" fo:margin-bottom="0in" style:contextual-spacing="true"/>
      <style:text-properties style:font-name="roboto" fo:font-weight="bold" officeooo:rsid="006f5baa" officeooo:paragraph-rsid="006f5baa" style:font-weight-asian="bold" style:font-weight-complex="bold"/>
    </style:style>
    <style:style style:name="P202"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weight="bold" officeooo:rsid="00300db1" officeooo:paragraph-rsid="006597ac" style:font-weight-asian="bold" style:font-weight-complex="bold"/>
    </style:style>
    <style:style style:name="P203" style:family="paragraph" style:parent-style-name="Text_20_body" style:list-style-name="L4" style:master-page-name="">
      <loext:graphic-properties draw:fill="none"/>
      <style:paragraph-properties fo:margin-left="-0.3118in" fo:margin-right="0in" fo:margin-top="0in" fo:margin-bottom="0in" style:contextual-spacing="false" fo:line-height="115%" fo:text-indent="0in" style:auto-text-indent="false" style:page-number="auto" fo:background-color="transparent"/>
      <style:text-properties style:font-name="roboto" officeooo:paragraph-rsid="006597ac"/>
    </style:style>
    <style:style style:name="P204"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paragraph-rsid="006597ac"/>
    </style:style>
    <style:style style:name="P205"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300db1" officeooo:paragraph-rsid="006597ac"/>
    </style:style>
    <style:style style:name="P206"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cfad9e" officeooo:paragraph-rsid="006597ac"/>
    </style:style>
    <style:style style:name="P207"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1816f1" officeooo:paragraph-rsid="006597ac" style:font-size-asian="12pt" style:font-size-complex="12pt"/>
    </style:style>
    <style:style style:name="P208"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paragraph-rsid="006597ac" style:font-size-asian="12pt" style:font-size-complex="12pt"/>
    </style:style>
    <style:style style:name="P209"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cfad9e" officeooo:paragraph-rsid="006597ac" style:font-size-asian="12pt" style:font-size-complex="12pt"/>
    </style:style>
    <style:style style:name="P210"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a67c3" officeooo:paragraph-rsid="006597ac" style:font-size-asian="12pt" style:font-weight-asian="bold" style:font-size-complex="12pt" style:font-weight-complex="bold"/>
    </style:style>
    <style:style style:name="P211"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b64c2" officeooo:paragraph-rsid="006597ac" style:font-size-asian="12pt" style:font-weight-asian="bold" style:font-size-complex="12pt" style:font-weight-complex="bold"/>
    </style:style>
    <style:style style:name="P212" style:family="paragraph" style:parent-style-name="Text_20_body" style:list-style-name="L64">
      <style:paragraph-properties fo:margin-top="0in" fo:margin-bottom="0in" style:contextual-spacing="true"/>
      <style:text-properties style:font-name="roboto" officeooo:paragraph-rsid="0099877e"/>
    </style:style>
    <style:style style:name="P213" style:family="paragraph" style:parent-style-name="Text_20_body" style:list-style-name="L65">
      <style:paragraph-properties fo:margin-top="0in" fo:margin-bottom="0in" style:contextual-spacing="true"/>
      <style:text-properties style:font-name="roboto" officeooo:paragraph-rsid="0099877e"/>
    </style:style>
    <style:style style:name="P214"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6597ac"/>
    </style:style>
    <style:style style:name="P215" style:family="paragraph" style:parent-style-name="Text_20_body" style:list-style-name="L5">
      <style:text-properties officeooo:paragraph-rsid="006597ac"/>
    </style:style>
    <style:style style:name="P216" style:family="paragraph" style:parent-style-name="Text_20_body" style:list-style-name="L6">
      <style:text-properties officeooo:paragraph-rsid="006597ac"/>
    </style:style>
    <style:style style:name="P217" style:family="paragraph" style:parent-style-name="Text_20_body" style:list-style-name="L7">
      <style:text-properties officeooo:paragraph-rsid="006597ac"/>
    </style:style>
    <style:style style:name="P218" style:family="paragraph" style:parent-style-name="Text_20_body" style:list-style-name="L8">
      <style:text-properties officeooo:paragraph-rsid="006597ac"/>
    </style:style>
    <style:style style:name="P219" style:family="paragraph" style:parent-style-name="Text_20_body" style:list-style-name="L9">
      <style:text-properties officeooo:paragraph-rsid="006597ac"/>
    </style:style>
    <style:style style:name="P220" style:family="paragraph" style:parent-style-name="Text_20_body" style:list-style-name="L10">
      <style:text-properties officeooo:paragraph-rsid="006597ac"/>
    </style:style>
    <style:style style:name="P221" style:family="paragraph" style:parent-style-name="Text_20_body" style:list-style-name="L11"/>
    <style:style style:name="P222" style:family="paragraph" style:parent-style-name="Text_20_body" style:list-style-name="L12">
      <style:text-properties officeooo:paragraph-rsid="006597ac"/>
    </style:style>
    <style:style style:name="P223" style:family="paragraph" style:parent-style-name="Text_20_body" style:list-style-name="L13">
      <style:text-properties officeooo:paragraph-rsid="006597ac"/>
    </style:style>
    <style:style style:name="P224" style:family="paragraph" style:parent-style-name="Text_20_body" style:list-style-name="L14">
      <style:text-properties officeooo:paragraph-rsid="006597ac"/>
    </style:style>
    <style:style style:name="P225" style:family="paragraph" style:parent-style-name="Text_20_body" style:list-style-name="L15">
      <style:text-properties officeooo:paragraph-rsid="006597ac"/>
    </style:style>
    <style:style style:name="P226" style:family="paragraph" style:parent-style-name="Text_20_body" style:list-style-name="L16">
      <style:text-properties officeooo:paragraph-rsid="006597ac"/>
    </style:style>
    <style:style style:name="P227" style:family="paragraph" style:parent-style-name="Text_20_body" style:list-style-name="L17">
      <style:text-properties officeooo:paragraph-rsid="0094e6cf"/>
    </style:style>
    <style:style style:name="P228" style:family="paragraph" style:parent-style-name="Text_20_body" style:list-style-name="L17">
      <style:text-properties officeooo:paragraph-rsid="00955452"/>
    </style:style>
    <style:style style:name="P229" style:family="paragraph" style:parent-style-name="Text_20_body" style:list-style-name="L18">
      <style:text-properties officeooo:paragraph-rsid="0094afd3"/>
    </style:style>
    <style:style style:name="P230" style:family="paragraph" style:parent-style-name="Text_20_body" style:list-style-name="L19">
      <style:text-properties officeooo:paragraph-rsid="0094afd3"/>
    </style:style>
    <style:style style:name="P231" style:family="paragraph" style:parent-style-name="Text_20_body" style:list-style-name="L20">
      <style:text-properties officeooo:paragraph-rsid="006597ac"/>
    </style:style>
    <style:style style:name="P232" style:family="paragraph" style:parent-style-name="Text_20_body" style:list-style-name="L21">
      <style:text-properties officeooo:paragraph-rsid="006597ac"/>
    </style:style>
    <style:style style:name="P233" style:family="paragraph" style:parent-style-name="Text_20_body" style:list-style-name="L22">
      <style:text-properties officeooo:paragraph-rsid="006597ac"/>
    </style:style>
    <style:style style:name="P234" style:family="paragraph" style:parent-style-name="Text_20_body" style:list-style-name="L23">
      <style:text-properties officeooo:paragraph-rsid="006597ac"/>
    </style:style>
    <style:style style:name="P235" style:family="paragraph" style:parent-style-name="Text_20_body" style:list-style-name="L24">
      <style:text-properties officeooo:paragraph-rsid="006597ac"/>
    </style:style>
    <style:style style:name="P236" style:family="paragraph" style:parent-style-name="Text_20_body" style:list-style-name="L25">
      <style:text-properties officeooo:paragraph-rsid="006597ac"/>
    </style:style>
    <style:style style:name="P237" style:family="paragraph" style:parent-style-name="Text_20_body" style:list-style-name="L26">
      <style:text-properties officeooo:paragraph-rsid="006597ac"/>
    </style:style>
    <style:style style:name="P238" style:family="paragraph" style:parent-style-name="Text_20_body" style:list-style-name="L27">
      <style:text-properties officeooo:paragraph-rsid="006597ac"/>
    </style:style>
    <style:style style:name="P239" style:family="paragraph" style:parent-style-name="Text_20_body" style:list-style-name="L27">
      <style:text-properties officeooo:paragraph-rsid="007c78b2"/>
    </style:style>
    <style:style style:name="P240" style:family="paragraph" style:parent-style-name="Text_20_body" style:list-style-name="L28">
      <style:text-properties officeooo:paragraph-rsid="006597ac"/>
    </style:style>
    <style:style style:name="P241" style:family="paragraph" style:parent-style-name="Text_20_body" style:list-style-name="L29">
      <style:text-properties officeooo:paragraph-rsid="006597ac"/>
    </style:style>
    <style:style style:name="P242" style:family="paragraph" style:parent-style-name="Text_20_body" style:list-style-name="L30">
      <style:text-properties officeooo:paragraph-rsid="006597ac"/>
    </style:style>
    <style:style style:name="P243" style:family="paragraph" style:parent-style-name="Text_20_body" style:list-style-name="L31">
      <style:text-properties officeooo:paragraph-rsid="006597ac"/>
    </style:style>
    <style:style style:name="P244" style:family="paragraph" style:parent-style-name="Text_20_body" style:list-style-name="L32">
      <style:text-properties officeooo:paragraph-rsid="006597ac"/>
    </style:style>
    <style:style style:name="P245" style:family="paragraph" style:parent-style-name="Text_20_body" style:list-style-name="L33">
      <style:text-properties officeooo:paragraph-rsid="006597ac"/>
    </style:style>
    <style:style style:name="P246" style:family="paragraph" style:parent-style-name="Text_20_body" style:list-style-name="L34">
      <style:text-properties officeooo:paragraph-rsid="006597ac"/>
    </style:style>
    <style:style style:name="P247" style:family="paragraph" style:parent-style-name="Text_20_body" style:list-style-name="L35">
      <style:text-properties officeooo:paragraph-rsid="006597ac"/>
    </style:style>
    <style:style style:name="P248" style:family="paragraph" style:parent-style-name="Text_20_body" style:list-style-name="L36">
      <style:text-properties officeooo:paragraph-rsid="006597ac"/>
    </style:style>
    <style:style style:name="P249" style:family="paragraph" style:parent-style-name="Text_20_body" style:list-style-name="L37">
      <style:text-properties officeooo:paragraph-rsid="006597ac"/>
    </style:style>
    <style:style style:name="P250" style:family="paragraph" style:parent-style-name="Text_20_body" style:list-style-name="L38">
      <style:text-properties officeooo:paragraph-rsid="006597ac"/>
    </style:style>
    <style:style style:name="P251" style:family="paragraph" style:parent-style-name="Text_20_body" style:list-style-name="L39">
      <style:paragraph-properties fo:margin-left="0in" fo:margin-right="0in" fo:text-indent="0in" style:auto-text-indent="false"/>
    </style:style>
    <style:style style:name="P252" style:family="paragraph" style:parent-style-name="Text_20_body" style:list-style-name="L40">
      <style:paragraph-properties fo:margin-left="0in" fo:margin-right="0in" fo:text-indent="0in" style:auto-text-indent="false"/>
    </style:style>
    <style:style style:name="P253" style:family="paragraph" style:parent-style-name="Text_20_body" style:list-style-name="L41">
      <style:paragraph-properties fo:margin-left="0in" fo:margin-right="0in" fo:text-indent="0in" style:auto-text-indent="false"/>
    </style:style>
    <style:style style:name="P254" style:family="paragraph" style:parent-style-name="Text_20_body" style:list-style-name="L42">
      <style:paragraph-properties fo:margin-left="0in" fo:margin-right="0in" fo:text-indent="0in" style:auto-text-indent="false"/>
    </style:style>
    <style:style style:name="P255" style:family="paragraph" style:parent-style-name="Text_20_body" style:list-style-name="L43">
      <style:paragraph-properties fo:margin-left="0in" fo:margin-right="0in" fo:text-indent="0in" style:auto-text-indent="false"/>
    </style:style>
    <style:style style:name="P256" style:family="paragraph" style:parent-style-name="Text_20_body" style:list-style-name="L44">
      <style:paragraph-properties fo:margin-left="0in" fo:margin-right="0in" fo:text-indent="0in" style:auto-text-indent="false"/>
    </style:style>
    <style:style style:name="P257" style:family="paragraph" style:parent-style-name="Text_20_body" style:list-style-name="L45">
      <style:paragraph-properties fo:margin-left="0in" fo:margin-right="0in" fo:text-indent="0in" style:auto-text-indent="false"/>
    </style:style>
    <style:style style:name="P258" style:family="paragraph" style:parent-style-name="Text_20_body" style:list-style-name="L46">
      <style:paragraph-properties fo:margin-left="0in" fo:margin-right="0in" fo:text-indent="0in" style:auto-text-indent="false"/>
    </style:style>
    <style:style style:name="P259" style:family="paragraph" style:parent-style-name="Text_20_body" style:list-style-name="L47">
      <style:paragraph-properties fo:margin-left="0in" fo:margin-right="0in" fo:text-indent="0in" style:auto-text-indent="false"/>
    </style:style>
    <style:style style:name="P260" style:family="paragraph" style:parent-style-name="Text_20_body" style:list-style-name="L48">
      <style:paragraph-properties fo:margin-left="0in" fo:margin-right="0in" fo:text-indent="0in" style:auto-text-indent="false"/>
    </style:style>
    <style:style style:name="P261" style:family="paragraph" style:parent-style-name="Text_20_body" style:list-style-name="L49">
      <style:paragraph-properties fo:margin-left="0in" fo:margin-right="0in" fo:text-indent="0in" style:auto-text-indent="false"/>
    </style:style>
    <style:style style:name="P262" style:family="paragraph" style:parent-style-name="Text_20_body" style:list-style-name="L50">
      <style:paragraph-properties fo:margin-left="0in" fo:margin-right="0in" fo:text-indent="0in" style:auto-text-indent="false"/>
    </style:style>
    <style:style style:name="P263" style:family="paragraph" style:parent-style-name="Text_20_body" style:list-style-name="L51">
      <style:paragraph-properties fo:margin-left="0in" fo:margin-right="0in" fo:text-indent="0in" style:auto-text-indent="false"/>
    </style:style>
    <style:style style:name="P264" style:family="paragraph" style:parent-style-name="Text_20_body" style:list-style-name="L52">
      <style:paragraph-properties fo:margin-left="0in" fo:margin-right="0in" fo:text-indent="0in" style:auto-text-indent="false"/>
    </style:style>
    <style:style style:name="P265" style:family="paragraph" style:parent-style-name="Text_20_body" style:list-style-name="L53">
      <style:paragraph-properties fo:margin-left="0in" fo:margin-right="0in" fo:text-indent="0in" style:auto-text-indent="false"/>
    </style:style>
    <style:style style:name="P266" style:family="paragraph" style:parent-style-name="Text_20_body" style:list-style-name="L54">
      <style:paragraph-properties fo:margin-left="0in" fo:margin-right="0in" fo:text-indent="0in" style:auto-text-indent="false"/>
    </style:style>
    <style:style style:name="P267" style:family="paragraph" style:parent-style-name="Text_20_body" style:list-style-name="L55">
      <style:paragraph-properties fo:margin-left="0in" fo:margin-right="0in" fo:text-indent="0in" style:auto-text-indent="false"/>
    </style:style>
    <style:style style:name="P268" style:family="paragraph" style:parent-style-name="Text_20_body" style:list-style-name="L56">
      <style:paragraph-properties fo:margin-left="0in" fo:margin-right="0in" fo:text-indent="0in" style:auto-text-indent="false"/>
    </style:style>
    <style:style style:name="P269" style:family="paragraph" style:parent-style-name="Text_20_body" style:list-style-name="L57">
      <style:paragraph-properties fo:margin-left="0in" fo:margin-right="0in" fo:text-indent="0in" style:auto-text-indent="false"/>
    </style:style>
    <style:style style:name="P270" style:family="paragraph" style:parent-style-name="Text_20_body" style:list-style-name="L58">
      <style:paragraph-properties fo:margin-left="0in" fo:margin-right="0in" fo:text-indent="0in" style:auto-text-indent="false"/>
    </style:style>
    <style:style style:name="P271" style:family="paragraph" style:parent-style-name="Text_20_body" style:list-style-name="L59">
      <style:paragraph-properties fo:margin-left="0in" fo:margin-right="0in" fo:text-indent="0in" style:auto-text-indent="false"/>
    </style:style>
    <style:style style:name="P272" style:family="paragraph" style:parent-style-name="Text_20_body" style:list-style-name="L60">
      <style:paragraph-properties fo:margin-left="0in" fo:margin-right="0in" fo:text-indent="0in" style:auto-text-indent="false"/>
    </style:style>
    <style:style style:name="P273" style:family="paragraph" style:parent-style-name="Text_20_body" style:list-style-name="L61">
      <style:paragraph-properties fo:margin-left="0in" fo:margin-right="0in" fo:text-indent="0in" style:auto-text-indent="false"/>
    </style:style>
    <style:style style:name="P274" style:family="paragraph" style:parent-style-name="Text_20_body" style:list-style-name="L62">
      <style:paragraph-properties fo:margin-left="0in" fo:margin-right="0in" fo:text-indent="0in" style:auto-text-indent="false"/>
    </style:style>
    <style:style style:name="P275" style:family="paragraph" style:parent-style-name="Text_20_body" style:list-style-name="L6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6" style:family="paragraph" style:parent-style-name="Text_20_body" style:list-style-name="L63">
      <style:paragraph-properties fo:margin-left="0in" fo:margin-right="0in" fo:margin-top="0in" fo:margin-bottom="0.0972in" style:contextual-spacing="false" fo:line-height="114%" fo:text-indent="0in" style:auto-text-indent="false" fo:padding="0in" fo:border="none"/>
    </style:style>
    <style:style style:name="P277" style:family="paragraph" style:parent-style-name="Text_20_body" style:list-style-name="L64">
      <style:paragraph-properties fo:margin-top="0in" fo:margin-bottom="0in" style:contextual-spacing="true"/>
      <style:text-properties officeooo:paragraph-rsid="0099877e"/>
    </style:style>
    <style:style style:name="P278" style:family="paragraph" style:parent-style-name="Text_20_body" style:list-style-name="L66">
      <style:text-properties officeooo:paragraph-rsid="006597ac"/>
    </style:style>
    <style:style style:name="P279" style:family="paragraph" style:parent-style-name="Text_20_body" style:list-style-name="L67">
      <style:text-properties officeooo:paragraph-rsid="006597ac"/>
    </style:style>
    <style:style style:name="P280" style:family="paragraph" style:parent-style-name="Text_20_body" style:list-style-name="L68">
      <style:text-properties officeooo:paragraph-rsid="00ffe857"/>
    </style:style>
    <style:style style:name="P281" style:family="paragraph" style:parent-style-name="Text_20_body" style:list-style-name="L69">
      <style:paragraph-properties fo:margin-top="0in" fo:margin-bottom="0in" style:contextual-spacing="true"/>
      <style:text-properties officeooo:paragraph-rsid="0099877e"/>
    </style:style>
    <style:style style:name="P282" style:family="paragraph" style:parent-style-name="Text_20_body" style:list-style-name="L70">
      <style:text-properties officeooo:paragraph-rsid="006597ac"/>
    </style:style>
    <style:style style:name="P283" style:family="paragraph" style:parent-style-name="Text_20_body" style:list-style-name="L71">
      <style:text-properties officeooo:paragraph-rsid="006597ac"/>
    </style:style>
    <style:style style:name="P284" style:family="paragraph" style:parent-style-name="Text_20_body" style:list-style-name="L72">
      <style:text-properties officeooo:paragraph-rsid="006597ac"/>
    </style:style>
    <style:style style:name="P285" style:family="paragraph" style:parent-style-name="Text_20_body" style:list-style-name="L73">
      <style:text-properties officeooo:paragraph-rsid="006597ac"/>
    </style:style>
    <style:style style:name="P286" style:family="paragraph" style:parent-style-name="Text_20_body" style:list-style-name="L74">
      <style:text-properties officeooo:paragraph-rsid="009ae0ac"/>
    </style:style>
    <style:style style:name="P287" style:family="paragraph" style:parent-style-name="Text_20_body" style:list-style-name="L75">
      <style:text-properties officeooo:paragraph-rsid="009ae0ac"/>
    </style:style>
    <style:style style:name="P288" style:family="paragraph" style:parent-style-name="Text_20_body" style:list-style-name="L76">
      <style:text-properties officeooo:paragraph-rsid="009ae0ac"/>
    </style:style>
    <style:style style:name="P289" style:family="paragraph" style:parent-style-name="Text_20_body" style:list-style-name="L77">
      <style:text-properties officeooo:paragraph-rsid="009ae0ac"/>
    </style:style>
    <style:style style:name="P290" style:family="paragraph" style:parent-style-name="Text_20_body" style:list-style-name="L78">
      <style:text-properties officeooo:paragraph-rsid="009ba52b"/>
    </style:style>
    <style:style style:name="P291" style:family="paragraph" style:parent-style-name="Text_20_body" style:list-style-name="L79">
      <style:text-properties officeooo:paragraph-rsid="009ba52b"/>
    </style:style>
    <style:style style:name="P292" style:family="paragraph" style:parent-style-name="Text_20_body" style:list-style-name="L80">
      <style:text-properties officeooo:paragraph-rsid="009ba52b"/>
    </style:style>
    <style:style style:name="P293" style:family="paragraph" style:parent-style-name="Text_20_body" style:list-style-name="L81">
      <style:text-properties officeooo:paragraph-rsid="009ba52b"/>
    </style:style>
    <style:style style:name="P294" style:family="paragraph" style:parent-style-name="Text_20_body" style:list-style-name="L82">
      <style:text-properties officeooo:paragraph-rsid="009ba52b"/>
    </style:style>
    <style:style style:name="P295" style:family="paragraph" style:parent-style-name="Text_20_body" style:list-style-name="L83">
      <style:text-properties officeooo:paragraph-rsid="009c7a28"/>
    </style:style>
    <style:style style:name="P296" style:family="paragraph" style:parent-style-name="Text_20_body" style:list-style-name="L84">
      <style:text-properties officeooo:paragraph-rsid="009c7a28"/>
    </style:style>
    <style:style style:name="P297" style:family="paragraph" style:parent-style-name="Text_20_body" style:list-style-name="L85">
      <style:text-properties officeooo:paragraph-rsid="009c7a28"/>
    </style:style>
    <style:style style:name="P298" style:family="paragraph" style:parent-style-name="Text_20_body" style:list-style-name="L86">
      <style:text-properties officeooo:paragraph-rsid="009c7a28"/>
    </style:style>
    <style:style style:name="P299" style:family="paragraph" style:parent-style-name="Text_20_body" style:list-style-name="L87">
      <style:text-properties officeooo:paragraph-rsid="009cca52"/>
    </style:style>
    <style:style style:name="P300" style:family="paragraph" style:parent-style-name="Text_20_body" style:list-style-name="L88">
      <style:text-properties officeooo:paragraph-rsid="009cca52"/>
    </style:style>
    <style:style style:name="P301" style:family="paragraph" style:parent-style-name="Text_20_body" style:list-style-name="L89">
      <style:text-properties officeooo:paragraph-rsid="009cca52"/>
    </style:style>
    <style:style style:name="P302" style:family="paragraph" style:parent-style-name="Text_20_body" style:list-style-name="L90"/>
    <style:style style:name="P303" style:family="paragraph" style:parent-style-name="Text_20_body" style:list-style-name="L91">
      <style:text-properties officeooo:paragraph-rsid="009d243c"/>
    </style:style>
    <style:style style:name="P304" style:family="paragraph" style:parent-style-name="Text_20_body" style:list-style-name="L92">
      <style:text-properties officeooo:paragraph-rsid="009d243c"/>
    </style:style>
    <style:style style:name="P305" style:family="paragraph" style:parent-style-name="Text_20_body" style:list-style-name="L93">
      <style:text-properties officeooo:paragraph-rsid="009d243c"/>
    </style:style>
    <style:style style:name="P306" style:family="paragraph" style:parent-style-name="Text_20_body" style:list-style-name="L94">
      <style:text-properties officeooo:paragraph-rsid="009d243c"/>
    </style:style>
    <style:style style:name="P307" style:family="paragraph" style:parent-style-name="Text_20_body" style:list-style-name="L95">
      <style:text-properties officeooo:paragraph-rsid="009d243c"/>
    </style:style>
    <style:style style:name="P308" style:family="paragraph" style:parent-style-name="Text_20_body" style:list-style-name="L96">
      <style:text-properties officeooo:paragraph-rsid="009d243c"/>
    </style:style>
    <style:style style:name="P309" style:family="paragraph" style:parent-style-name="Text_20_body" style:list-style-name="L97">
      <style:text-properties officeooo:paragraph-rsid="009d243c"/>
    </style:style>
    <style:style style:name="P310" style:family="paragraph" style:parent-style-name="Text_20_body" style:list-style-name="L98">
      <style:text-properties officeooo:paragraph-rsid="009d243c"/>
    </style:style>
    <style:style style:name="P311" style:family="paragraph" style:parent-style-name="Text_20_body" style:list-style-name="L99">
      <style:text-properties officeooo:paragraph-rsid="009d243c"/>
    </style:style>
    <style:style style:name="P312" style:family="paragraph" style:parent-style-name="Text_20_body" style:list-style-name="L100">
      <style:text-properties officeooo:paragraph-rsid="006597ac"/>
    </style:style>
    <style:style style:name="P313" style:family="paragraph" style:parent-style-name="Text_20_body" style:list-style-name="L101">
      <style:text-properties officeooo:paragraph-rsid="009d243c"/>
    </style:style>
    <style:style style:name="P314" style:family="paragraph" style:parent-style-name="Text_20_body" style:list-style-name="L102">
      <style:text-properties officeooo:paragraph-rsid="009d243c"/>
    </style:style>
    <style:style style:name="P315" style:family="paragraph" style:parent-style-name="Text_20_body" style:list-style-name="L103">
      <style:text-properties officeooo:paragraph-rsid="009d243c"/>
    </style:style>
    <style:style style:name="P316" style:family="paragraph" style:parent-style-name="Text_20_body" style:list-style-name="L104">
      <style:text-properties officeooo:paragraph-rsid="009d243c"/>
    </style:style>
    <style:style style:name="P317" style:family="paragraph" style:parent-style-name="Text_20_body" style:list-style-name="L105">
      <style:text-properties officeooo:paragraph-rsid="009d243c"/>
    </style:style>
    <style:style style:name="P318" style:family="paragraph" style:parent-style-name="Text_20_body" style:list-style-name="L106">
      <style:text-properties officeooo:paragraph-rsid="009d243c"/>
    </style:style>
    <style:style style:name="P319" style:family="paragraph" style:parent-style-name="Text_20_body" style:list-style-name="L107">
      <style:text-properties officeooo:paragraph-rsid="009d9a6a"/>
    </style:style>
    <style:style style:name="P320" style:family="paragraph" style:parent-style-name="Text_20_body" style:list-style-name="L108">
      <style:text-properties officeooo:paragraph-rsid="009d9a6a"/>
    </style:style>
    <style:style style:name="P321" style:family="paragraph" style:parent-style-name="Text_20_body" style:list-style-name="L109">
      <style:text-properties officeooo:paragraph-rsid="009d9a6a"/>
    </style:style>
    <style:style style:name="P322" style:family="paragraph" style:parent-style-name="Text_20_body" style:list-style-name="L110">
      <style:text-properties officeooo:paragraph-rsid="009d9a6a"/>
    </style:style>
    <style:style style:name="P323" style:family="paragraph" style:parent-style-name="Text_20_body" style:list-style-name="L111">
      <style:text-properties officeooo:paragraph-rsid="009d9a6a"/>
    </style:style>
    <style:style style:name="P324" style:family="paragraph" style:parent-style-name="Text_20_body" style:list-style-name="L112">
      <style:text-properties officeooo:paragraph-rsid="009d9a6a"/>
    </style:style>
    <style:style style:name="P325" style:family="paragraph" style:parent-style-name="Text_20_body" style:list-style-name="L113">
      <style:text-properties officeooo:paragraph-rsid="009d9a6a"/>
    </style:style>
    <style:style style:name="P326" style:family="paragraph" style:parent-style-name="Text_20_body" style:list-style-name="L114">
      <style:text-properties officeooo:paragraph-rsid="009d9a6a"/>
    </style:style>
    <style:style style:name="P327" style:family="paragraph" style:parent-style-name="Text_20_body" style:list-style-name="L115">
      <style:text-properties officeooo:paragraph-rsid="006597ac"/>
    </style:style>
    <style:style style:name="P328" style:family="paragraph" style:parent-style-name="Text_20_body" style:list-style-name="L116">
      <style:text-properties officeooo:paragraph-rsid="006597ac"/>
    </style:style>
    <style:style style:name="P329" style:family="paragraph" style:parent-style-name="Text_20_body" style:list-style-name="L117">
      <style:text-properties officeooo:paragraph-rsid="006597ac"/>
    </style:style>
    <style:style style:name="P330" style:family="paragraph" style:parent-style-name="Text_20_body" style:list-style-name="L118"/>
    <style:style style:name="P331" style:family="paragraph" style:parent-style-name="Text_20_body" style:list-style-name="L119"/>
    <style:style style:name="P332" style:family="paragraph" style:parent-style-name="Text_20_body" style:list-style-name="L120"/>
    <style:style style:name="P333" style:family="paragraph" style:parent-style-name="Text_20_body" style:list-style-name="L121"/>
    <style:style style:name="P334" style:family="paragraph" style:parent-style-name="Text_20_body" style:list-style-name="L122"/>
    <style:style style:name="P335" style:family="paragraph" style:parent-style-name="Text_20_body" style:list-style-name="L123"/>
    <style:style style:name="P336" style:family="paragraph" style:parent-style-name="Text_20_body" style:list-style-name="L124"/>
    <style:style style:name="P337" style:family="paragraph" style:parent-style-name="Text_20_body" style:list-style-name="L125"/>
    <style:style style:name="P338" style:family="paragraph" style:parent-style-name="Text_20_body" style:list-style-name="L126"/>
    <style:style style:name="P339" style:family="paragraph" style:parent-style-name="Text_20_body" style:list-style-name="L127"/>
    <style:style style:name="P340" style:family="paragraph" style:parent-style-name="Text_20_body" style:list-style-name="L128"/>
    <style:style style:name="P341" style:family="paragraph" style:parent-style-name="Text_20_body" style:list-style-name="L129">
      <style:text-properties officeooo:paragraph-rsid="00f82f31"/>
    </style:style>
    <style:style style:name="P342" style:family="paragraph" style:parent-style-name="Text_20_body" style:list-style-name="L130">
      <style:text-properties officeooo:paragraph-rsid="00f82f31"/>
    </style:style>
    <style:style style:name="P343" style:family="paragraph" style:parent-style-name="Text_20_body" style:list-style-name="L131">
      <style:text-properties officeooo:paragraph-rsid="00f82f31"/>
    </style:style>
    <style:style style:name="P344" style:family="paragraph" style:parent-style-name="Text_20_body" style:list-style-name="L132">
      <style:text-properties officeooo:paragraph-rsid="00f82f31"/>
    </style:style>
    <style:style style:name="P345" style:family="paragraph" style:parent-style-name="Text_20_body" style:list-style-name="L133">
      <style:text-properties officeooo:paragraph-rsid="00f82f31"/>
    </style:style>
    <style:style style:name="P346" style:family="paragraph" style:parent-style-name="Text_20_body" style:list-style-name="L134"/>
    <style:style style:name="P347" style:family="paragraph" style:parent-style-name="Text_20_body" style:list-style-name="L135"/>
    <style:style style:name="P348" style:family="paragraph" style:parent-style-name="Text_20_body" style:list-style-name="L136"/>
    <style:style style:name="P349" style:family="paragraph" style:parent-style-name="Text_20_body" style:list-style-name="L137"/>
    <style:style style:name="P350" style:family="paragraph" style:parent-style-name="Text_20_body" style:list-style-name="L138"/>
    <style:style style:name="P351" style:family="paragraph" style:parent-style-name="Text_20_body" style:list-style-name="L139"/>
    <style:style style:name="P352" style:family="paragraph" style:parent-style-name="Text_20_body" style:list-style-name="L140"/>
    <style:style style:name="P353" style:family="paragraph" style:parent-style-name="Text_20_body" style:list-style-name="L141"/>
    <style:style style:name="P354" style:family="paragraph" style:parent-style-name="Text_20_body" style:list-style-name="L142"/>
    <style:style style:name="P355" style:family="paragraph" style:parent-style-name="Text_20_body" style:list-style-name="L143"/>
    <style:style style:name="P356" style:family="paragraph" style:parent-style-name="Text_20_body" style:list-style-name="L144"/>
    <style:style style:name="P357" style:family="paragraph" style:parent-style-name="Text_20_body" style:list-style-name="L145"/>
    <style:style style:name="P358" style:family="paragraph" style:parent-style-name="Text_20_body" style:list-style-name="L146"/>
    <style:style style:name="P359" style:family="paragraph" style:parent-style-name="Text_20_body" style:list-style-name="L147"/>
    <style:style style:name="P360" style:family="paragraph" style:parent-style-name="Text_20_body" style:list-style-name="L148"/>
    <style:style style:name="P361" style:family="paragraph" style:parent-style-name="Text_20_body" style:list-style-name="L149"/>
    <style:style style:name="P362" style:family="paragraph" style:parent-style-name="Text_20_body" style:list-style-name="L150"/>
    <style:style style:name="P363" style:family="paragraph" style:parent-style-name="Text_20_body" style:list-style-name="L151"/>
    <style:style style:name="P364" style:family="paragraph" style:parent-style-name="Text_20_body" style:list-style-name="L152"/>
    <style:style style:name="P365" style:family="paragraph" style:parent-style-name="Text_20_body" style:list-style-name="L153"/>
    <style:style style:name="P366" style:family="paragraph" style:parent-style-name="Text_20_body" style:list-style-name="L154"/>
    <style:style style:name="P367" style:family="paragraph" style:parent-style-name="Text_20_body" style:list-style-name="L155"/>
    <style:style style:name="P368" style:family="paragraph" style:parent-style-name="Text_20_body" style:list-style-name="L156"/>
    <style:style style:name="P369" style:family="paragraph" style:parent-style-name="Text_20_body" style:list-style-name="L157"/>
    <style:style style:name="P370" style:family="paragraph" style:parent-style-name="Text_20_body" style:list-style-name="L158"/>
    <style:style style:name="P371" style:family="paragraph" style:parent-style-name="Text_20_body" style:list-style-name="L159"/>
    <style:style style:name="P372" style:family="paragraph" style:parent-style-name="Text_20_body" style:list-style-name="L160"/>
    <style:style style:name="P373" style:family="paragraph" style:parent-style-name="Text_20_body" style:list-style-name="L161"/>
    <style:style style:name="P374" style:family="paragraph" style:parent-style-name="Text_20_body" style:list-style-name="L162"/>
    <style:style style:name="P375" style:family="paragraph" style:parent-style-name="Text_20_body" style:list-style-name="L163"/>
    <style:style style:name="P376" style:family="paragraph" style:parent-style-name="Text_20_body" style:list-style-name="L164"/>
    <style:style style:name="P377" style:family="paragraph" style:parent-style-name="Text_20_body" style:list-style-name="L165"/>
    <style:style style:name="P378" style:family="paragraph" style:parent-style-name="Text_20_body" style:list-style-name="L166"/>
    <style:style style:name="P379" style:family="paragraph" style:parent-style-name="Text_20_body" style:list-style-name="L167"/>
    <style:style style:name="P380" style:family="paragraph" style:parent-style-name="Text_20_body" style:list-style-name="L168"/>
    <style:style style:name="P381" style:family="paragraph" style:parent-style-name="Text_20_body" style:list-style-name="L169"/>
    <style:style style:name="P382" style:family="paragraph" style:parent-style-name="Text_20_body" style:list-style-name="L170"/>
    <style:style style:name="P383" style:family="paragraph" style:parent-style-name="Text_20_body" style:list-style-name="L171"/>
    <style:style style:name="P384" style:family="paragraph" style:parent-style-name="Text_20_body" style:list-style-name="L172"/>
    <style:style style:name="P385" style:family="paragraph" style:parent-style-name="Text_20_body" style:list-style-name="L173"/>
    <style:style style:name="P386" style:family="paragraph" style:parent-style-name="Text_20_body" style:list-style-name="L174">
      <style:text-properties officeooo:paragraph-rsid="00ccf0d7"/>
    </style:style>
    <style:style style:name="P387" style:family="paragraph" style:parent-style-name="Text_20_body" style:list-style-name="L175">
      <style:text-properties officeooo:paragraph-rsid="006a3d02"/>
    </style:style>
    <style:style style:name="P388" style:family="paragraph" style:parent-style-name="Text_20_body" style:list-style-name="L176">
      <style:text-properties officeooo:paragraph-rsid="006a3d02"/>
    </style:style>
    <style:style style:name="P389" style:family="paragraph" style:parent-style-name="Text_20_body" style:list-style-name="L177">
      <style:text-properties officeooo:paragraph-rsid="006a3d02"/>
    </style:style>
    <style:style style:name="P390" style:family="paragraph" style:parent-style-name="Text_20_body" style:list-style-name="L178">
      <style:text-properties officeooo:paragraph-rsid="006a3d02"/>
    </style:style>
    <style:style style:name="P391" style:family="paragraph" style:parent-style-name="Text_20_body" style:list-style-name="L179">
      <style:text-properties officeooo:paragraph-rsid="006a3d02"/>
    </style:style>
    <style:style style:name="P392" style:family="paragraph" style:parent-style-name="Text_20_body" style:list-style-name="L180">
      <style:text-properties officeooo:paragraph-rsid="0083fb85"/>
    </style:style>
    <style:style style:name="P393" style:family="paragraph" style:parent-style-name="Text_20_body" style:list-style-name="L180">
      <style:text-properties officeooo:paragraph-rsid="006a3d02"/>
    </style:style>
    <style:style style:name="P394" style:family="paragraph" style:parent-style-name="Text_20_body" style:list-style-name="L180">
      <style:text-properties fo:font-weight="normal" officeooo:rsid="00076f4f" officeooo:paragraph-rsid="006a3d02" style:font-weight-asian="normal" style:font-weight-complex="normal"/>
    </style:style>
    <style:style style:name="P395" style:family="paragraph" style:parent-style-name="Text_20_body" style:list-style-name="L236">
      <style:text-properties fo:font-weight="normal" officeooo:paragraph-rsid="0005af04" style:font-weight-asian="normal" style:font-weight-complex="normal"/>
    </style:style>
    <style:style style:name="P396" style:family="paragraph" style:parent-style-name="Text_20_body" style:list-style-name="L252">
      <style:text-properties fo:font-weight="normal" officeooo:paragraph-rsid="004dd269" style:font-weight-asian="normal" style:font-weight-complex="normal"/>
    </style:style>
    <style:style style:name="P397" style:family="paragraph" style:parent-style-name="Text_20_body" style:list-style-name="L269">
      <style:text-properties fo:font-weight="normal" officeooo:paragraph-rsid="003e5ca5" style:font-weight-asian="normal" style:font-weight-complex="normal"/>
    </style:style>
    <style:style style:name="P398" style:family="paragraph" style:parent-style-name="Text_20_body" style:list-style-name="L275">
      <style:text-properties fo:font-weight="normal" officeooo:paragraph-rsid="0053ebaf" style:font-weight-asian="normal" style:font-weight-complex="normal"/>
    </style:style>
    <style:style style:name="P399" style:family="paragraph" style:parent-style-name="Text_20_body" style:list-style-name="L181">
      <style:text-properties officeooo:paragraph-rsid="006a3d02"/>
    </style:style>
    <style:style style:name="P400" style:family="paragraph" style:parent-style-name="Text_20_body" style:list-style-name="L182">
      <style:text-properties officeooo:paragraph-rsid="006597ac"/>
    </style:style>
    <style:style style:name="P401" style:family="paragraph" style:parent-style-name="Text_20_body" style:list-style-name="L183">
      <style:text-properties officeooo:paragraph-rsid="006597ac"/>
    </style:style>
    <style:style style:name="P402" style:family="paragraph" style:parent-style-name="Text_20_body" style:list-style-name="L184">
      <style:text-properties officeooo:paragraph-rsid="006597ac"/>
    </style:style>
    <style:style style:name="P403" style:family="paragraph" style:parent-style-name="Text_20_body" style:list-style-name="L185">
      <style:text-properties officeooo:paragraph-rsid="006597ac"/>
    </style:style>
    <style:style style:name="P404" style:family="paragraph" style:parent-style-name="Text_20_body" style:list-style-name="L186">
      <style:text-properties officeooo:paragraph-rsid="006597ac"/>
    </style:style>
    <style:style style:name="P405" style:family="paragraph" style:parent-style-name="Text_20_body" style:list-style-name="L187">
      <style:text-properties officeooo:paragraph-rsid="006597ac"/>
    </style:style>
    <style:style style:name="P406" style:family="paragraph" style:parent-style-name="Text_20_body" style:list-style-name="L188">
      <style:text-properties officeooo:paragraph-rsid="006597ac"/>
    </style:style>
    <style:style style:name="P407" style:family="paragraph" style:parent-style-name="Text_20_body" style:list-style-name="L189">
      <style:text-properties officeooo:paragraph-rsid="006597ac"/>
    </style:style>
    <style:style style:name="P408" style:family="paragraph" style:parent-style-name="Text_20_body" style:list-style-name="L190">
      <style:text-properties officeooo:paragraph-rsid="006597ac"/>
    </style:style>
    <style:style style:name="P409" style:family="paragraph" style:parent-style-name="Text_20_body" style:list-style-name="L191">
      <style:text-properties officeooo:paragraph-rsid="006597ac"/>
    </style:style>
    <style:style style:name="P410" style:family="paragraph" style:parent-style-name="Text_20_body" style:list-style-name="L192">
      <style:text-properties officeooo:paragraph-rsid="006597ac"/>
    </style:style>
    <style:style style:name="P411" style:family="paragraph" style:parent-style-name="Text_20_body" style:list-style-name="L193">
      <style:text-properties officeooo:paragraph-rsid="006597ac"/>
    </style:style>
    <style:style style:name="P412" style:family="paragraph" style:parent-style-name="Text_20_body" style:list-style-name="L194">
      <style:text-properties officeooo:paragraph-rsid="006597ac"/>
    </style:style>
    <style:style style:name="P413" style:family="paragraph" style:parent-style-name="Text_20_body" style:list-style-name="L195">
      <style:text-properties officeooo:paragraph-rsid="006597ac"/>
    </style:style>
    <style:style style:name="P414" style:family="paragraph" style:parent-style-name="Text_20_body" style:list-style-name="L196">
      <style:text-properties officeooo:paragraph-rsid="006597ac"/>
    </style:style>
    <style:style style:name="P415" style:family="paragraph" style:parent-style-name="Text_20_body" style:list-style-name="L197">
      <style:paragraph-properties fo:margin-top="0in" fo:margin-bottom="0in" style:contextual-spacing="true"/>
      <style:text-properties officeooo:paragraph-rsid="006597ac"/>
    </style:style>
    <style:style style:name="P416" style:family="paragraph" style:parent-style-name="Text_20_body" style:list-style-name="L198">
      <style:text-properties officeooo:paragraph-rsid="006597ac"/>
    </style:style>
    <style:style style:name="P417" style:family="paragraph" style:parent-style-name="Text_20_body" style:list-style-name="L199">
      <style:text-properties officeooo:paragraph-rsid="006597ac"/>
    </style:style>
    <style:style style:name="P418" style:family="paragraph" style:parent-style-name="Text_20_body" style:list-style-name="L200">
      <style:text-properties officeooo:paragraph-rsid="006597ac"/>
    </style:style>
    <style:style style:name="P419" style:family="paragraph" style:parent-style-name="Text_20_body" style:list-style-name="L201">
      <style:text-properties officeooo:paragraph-rsid="006597ac"/>
    </style:style>
    <style:style style:name="P420" style:family="paragraph" style:parent-style-name="Text_20_body" style:list-style-name="L202">
      <style:text-properties officeooo:paragraph-rsid="006597ac"/>
    </style:style>
    <style:style style:name="P421" style:family="paragraph" style:parent-style-name="Text_20_body" style:list-style-name="L203">
      <style:text-properties officeooo:paragraph-rsid="006597ac"/>
    </style:style>
    <style:style style:name="P422" style:family="paragraph" style:parent-style-name="Text_20_body" style:list-style-name="L204">
      <style:text-properties officeooo:paragraph-rsid="006597ac"/>
    </style:style>
    <style:style style:name="P423" style:family="paragraph" style:parent-style-name="Text_20_body" style:list-style-name="L205">
      <style:text-properties officeooo:paragraph-rsid="006597ac"/>
    </style:style>
    <style:style style:name="P424" style:family="paragraph" style:parent-style-name="Text_20_body" style:list-style-name="L206">
      <style:text-properties officeooo:paragraph-rsid="006597ac"/>
    </style:style>
    <style:style style:name="P425" style:family="paragraph" style:parent-style-name="Text_20_body" style:list-style-name="L207">
      <style:text-properties officeooo:paragraph-rsid="006597ac"/>
    </style:style>
    <style:style style:name="P426" style:family="paragraph" style:parent-style-name="Text_20_body" style:list-style-name="L208">
      <style:text-properties officeooo:paragraph-rsid="006597ac"/>
    </style:style>
    <style:style style:name="P427" style:family="paragraph" style:parent-style-name="Text_20_body" style:list-style-name="L209">
      <style:text-properties officeooo:paragraph-rsid="006597ac"/>
    </style:style>
    <style:style style:name="P428" style:family="paragraph" style:parent-style-name="Text_20_body" style:list-style-name="L210">
      <style:text-properties officeooo:paragraph-rsid="006597ac"/>
    </style:style>
    <style:style style:name="P429" style:family="paragraph" style:parent-style-name="Text_20_body" style:list-style-name="L211">
      <style:text-properties officeooo:paragraph-rsid="006597ac"/>
    </style:style>
    <style:style style:name="P430" style:family="paragraph" style:parent-style-name="Text_20_body" style:list-style-name="L212">
      <style:text-properties officeooo:paragraph-rsid="006597ac"/>
    </style:style>
    <style:style style:name="P431" style:family="paragraph" style:parent-style-name="Text_20_body" style:list-style-name="L213">
      <style:text-properties officeooo:paragraph-rsid="006597ac"/>
    </style:style>
    <style:style style:name="P432" style:family="paragraph" style:parent-style-name="Text_20_body" style:list-style-name="L214">
      <style:text-properties officeooo:paragraph-rsid="006597ac"/>
    </style:style>
    <style:style style:name="P433" style:family="paragraph" style:parent-style-name="Text_20_body" style:list-style-name="L215">
      <style:text-properties officeooo:paragraph-rsid="006597ac"/>
    </style:style>
    <style:style style:name="P434" style:family="paragraph" style:parent-style-name="Text_20_body" style:list-style-name="L216">
      <style:text-properties officeooo:paragraph-rsid="006597ac"/>
    </style:style>
    <style:style style:name="P435" style:family="paragraph" style:parent-style-name="Text_20_body" style:list-style-name="L217">
      <style:text-properties officeooo:paragraph-rsid="006597ac"/>
    </style:style>
    <style:style style:name="P436" style:family="paragraph" style:parent-style-name="Text_20_body" style:list-style-name="L218">
      <style:text-properties officeooo:paragraph-rsid="006597ac"/>
    </style:style>
    <style:style style:name="P437" style:family="paragraph" style:parent-style-name="Text_20_body" style:list-style-name="L219">
      <style:text-properties officeooo:paragraph-rsid="006597ac"/>
    </style:style>
    <style:style style:name="P438" style:family="paragraph" style:parent-style-name="Text_20_body" style:list-style-name="L220">
      <style:text-properties officeooo:paragraph-rsid="006597ac"/>
    </style:style>
    <style:style style:name="P439" style:family="paragraph" style:parent-style-name="Text_20_body" style:list-style-name="L221">
      <style:text-properties officeooo:paragraph-rsid="006597ac"/>
    </style:style>
    <style:style style:name="P440" style:family="paragraph" style:parent-style-name="Text_20_body" style:list-style-name="L222">
      <style:text-properties officeooo:paragraph-rsid="0005af04"/>
    </style:style>
    <style:style style:name="P441" style:family="paragraph" style:parent-style-name="Text_20_body" style:list-style-name="L222">
      <style:text-properties officeooo:rsid="009f293c" officeooo:paragraph-rsid="0005af04"/>
    </style:style>
    <style:style style:name="P442" style:family="paragraph" style:parent-style-name="Text_20_body" style:list-style-name="L223">
      <style:text-properties officeooo:paragraph-rsid="0005af04"/>
    </style:style>
    <style:style style:name="P443" style:family="paragraph" style:parent-style-name="Text_20_body" style:list-style-name="L223">
      <style:text-properties fo:font-style="normal" officeooo:paragraph-rsid="0005af04" style:font-style-asian="normal" style:font-style-complex="normal"/>
    </style:style>
    <style:style style:name="P444" style:family="paragraph" style:parent-style-name="Text_20_body" style:list-style-name="L256">
      <style:text-properties fo:font-style="normal" officeooo:paragraph-rsid="004ecc5a" style:font-style-asian="normal" style:font-style-complex="normal"/>
    </style:style>
    <style:style style:name="P445" style:family="paragraph" style:parent-style-name="Text_20_body" style:list-style-name="L269">
      <style:text-properties fo:font-style="normal" officeooo:paragraph-rsid="003dafe3" style:font-style-asian="normal" style:font-style-complex="normal"/>
    </style:style>
    <style:style style:name="P446" style:family="paragraph" style:parent-style-name="Text_20_body" style:list-style-name="L224">
      <style:text-properties officeooo:paragraph-rsid="0005af04"/>
    </style:style>
    <style:style style:name="P447" style:family="paragraph" style:parent-style-name="Text_20_body" style:list-style-name="L225">
      <style:text-properties officeooo:paragraph-rsid="0005af04"/>
    </style:style>
    <style:style style:name="P448" style:family="paragraph" style:parent-style-name="Text_20_body" style:list-style-name="L225">
      <style:text-properties officeooo:rsid="00340650" officeooo:paragraph-rsid="0005af04"/>
    </style:style>
    <style:style style:name="P449" style:family="paragraph" style:parent-style-name="Text_20_body" style:list-style-name="L226">
      <style:text-properties officeooo:paragraph-rsid="0005af04"/>
    </style:style>
    <style:style style:name="P450" style:family="paragraph" style:parent-style-name="Text_20_body" style:list-style-name="L227">
      <style:text-properties officeooo:paragraph-rsid="0005af04"/>
    </style:style>
    <style:style style:name="P451" style:family="paragraph" style:parent-style-name="Text_20_body" style:list-style-name="L228">
      <style:text-properties officeooo:paragraph-rsid="0005af04"/>
    </style:style>
    <style:style style:name="P452" style:family="paragraph" style:parent-style-name="Text_20_body" style:list-style-name="L229">
      <style:text-properties officeooo:paragraph-rsid="0005af04"/>
    </style:style>
    <style:style style:name="P453" style:family="paragraph" style:parent-style-name="Text_20_body" style:list-style-name="L229">
      <style:text-properties fo:font-style="italic" fo:font-weight="bold" officeooo:rsid="00a962ba" officeooo:paragraph-rsid="0005af04"/>
    </style:style>
    <style:style style:name="P454" style:family="paragraph" style:parent-style-name="Text_20_body" style:list-style-name="L229">
      <style:text-properties fo:font-style="italic" fo:font-weight="bold" officeooo:paragraph-rsid="0005af04"/>
    </style:style>
    <style:style style:name="P455" style:family="paragraph" style:parent-style-name="Text_20_body" style:list-style-name="L229">
      <style:text-properties fo:font-style="italic" officeooo:paragraph-rsid="0005af04"/>
    </style:style>
    <style:style style:name="P456" style:family="paragraph" style:parent-style-name="Text_20_body" style:list-style-name="L256">
      <style:text-properties fo:font-style="italic" officeooo:paragraph-rsid="004ecc5a"/>
    </style:style>
    <style:style style:name="P457" style:family="paragraph" style:parent-style-name="Text_20_body" style:list-style-name="L230">
      <style:text-properties officeooo:paragraph-rsid="0005af04"/>
    </style:style>
    <style:style style:name="P458" style:family="paragraph" style:parent-style-name="Text_20_body" style:list-style-name="L230">
      <style:text-properties officeooo:paragraph-rsid="00435a12"/>
    </style:style>
    <style:style style:name="P459" style:family="paragraph" style:parent-style-name="Text_20_body" style:list-style-name="L231">
      <style:text-properties officeooo:paragraph-rsid="0005af04"/>
    </style:style>
    <style:style style:name="P460" style:family="paragraph" style:parent-style-name="Text_20_body" style:list-style-name="L232">
      <style:text-properties officeooo:paragraph-rsid="0005af04"/>
    </style:style>
    <style:style style:name="P461" style:family="paragraph" style:parent-style-name="Text_20_body" style:list-style-name="L233">
      <style:text-properties officeooo:paragraph-rsid="0005af04"/>
    </style:style>
    <style:style style:name="P462" style:family="paragraph" style:parent-style-name="Text_20_body" style:list-style-name="L234">
      <style:text-properties officeooo:paragraph-rsid="0005af04"/>
    </style:style>
    <style:style style:name="P463" style:family="paragraph" style:parent-style-name="Text_20_body" style:list-style-name="L235">
      <style:text-properties officeooo:paragraph-rsid="0005af04"/>
    </style:style>
    <style:style style:name="P464" style:family="paragraph" style:parent-style-name="Text_20_body" style:list-style-name="L236">
      <style:text-properties officeooo:paragraph-rsid="0005af04"/>
    </style:style>
    <style:style style:name="P465" style:family="paragraph" style:parent-style-name="Text_20_body" style:list-style-name="L236">
      <style:text-properties fo:font-weight="bold" officeooo:paragraph-rsid="0005af04" style:font-weight-asian="bold" style:font-weight-complex="bold"/>
    </style:style>
    <style:style style:name="P466" style:family="paragraph" style:parent-style-name="Text_20_body" style:list-style-name="L243">
      <style:text-properties fo:font-weight="bold" officeooo:paragraph-rsid="0005af04" style:font-weight-asian="bold" style:font-weight-complex="bold"/>
    </style:style>
    <style:style style:name="P467" style:family="paragraph" style:parent-style-name="Text_20_body" style:list-style-name="L250">
      <style:text-properties fo:font-weight="bold" officeooo:paragraph-rsid="00469c41" style:font-weight-asian="bold" style:font-weight-complex="bold"/>
    </style:style>
    <style:style style:name="P468" style:family="paragraph" style:parent-style-name="Text_20_body" style:list-style-name="L256">
      <style:text-properties fo:font-weight="bold" officeooo:paragraph-rsid="004ecc5a" style:font-weight-asian="bold" style:font-weight-complex="bold"/>
    </style:style>
    <style:style style:name="P469" style:family="paragraph" style:parent-style-name="Text_20_body" style:list-style-name="L259">
      <style:text-properties fo:font-weight="bold" officeooo:paragraph-rsid="0005af04" style:font-weight-asian="bold" style:font-weight-complex="bold"/>
    </style:style>
    <style:style style:name="P470" style:family="paragraph" style:parent-style-name="Text_20_body" style:list-style-name="L267">
      <style:text-properties fo:font-weight="bold" officeooo:paragraph-rsid="003e5ca5" style:font-weight-asian="bold" style:font-weight-complex="bold"/>
    </style:style>
    <style:style style:name="P471" style:family="paragraph" style:parent-style-name="Text_20_body" style:list-style-name="L272">
      <style:text-properties fo:font-weight="bold" officeooo:paragraph-rsid="00536f0f" style:font-weight-asian="bold" style:font-weight-complex="bold"/>
    </style:style>
    <style:style style:name="P472" style:family="paragraph" style:parent-style-name="Text_20_body" style:list-style-name="L272">
      <style:text-properties fo:font-weight="bold" officeooo:paragraph-rsid="0005af04" style:font-weight-asian="bold" style:font-weight-complex="bold"/>
    </style:style>
    <style:style style:name="P473" style:family="paragraph" style:parent-style-name="Text_20_body" style:list-style-name="L278">
      <style:text-properties fo:font-weight="bold" officeooo:paragraph-rsid="0005af04" style:font-weight-asian="bold" style:font-weight-complex="bold"/>
    </style:style>
    <style:style style:name="P474" style:family="paragraph" style:parent-style-name="Text_20_body" style:list-style-name="L279">
      <style:text-properties fo:font-weight="bold" officeooo:paragraph-rsid="0005af04" style:font-weight-asian="bold" style:font-weight-complex="bold"/>
    </style:style>
    <style:style style:name="P475" style:family="paragraph" style:parent-style-name="Text_20_body" style:list-style-name="L280">
      <style:text-properties fo:font-weight="bold" officeooo:paragraph-rsid="003dafe3" style:font-weight-asian="bold" style:font-weight-complex="bold"/>
    </style:style>
    <style:style style:name="P476" style:family="paragraph" style:parent-style-name="Text_20_body" style:list-style-name="L282">
      <style:text-properties fo:font-weight="bold" officeooo:paragraph-rsid="0005af04" style:font-weight-asian="bold" style:font-weight-complex="bold"/>
    </style:style>
    <style:style style:name="P477" style:family="paragraph" style:parent-style-name="Text_20_body" style:list-style-name="L282">
      <style:text-properties fo:font-weight="bold" officeooo:paragraph-rsid="005fb8a3" style:font-weight-asian="bold" style:font-weight-complex="bold"/>
    </style:style>
    <style:style style:name="P478" style:family="paragraph" style:parent-style-name="Text_20_body">
      <style:text-properties fo:font-weight="bold" officeooo:paragraph-rsid="006a3d02" style:font-weight-asian="bold" style:font-weight-complex="bold"/>
    </style:style>
    <style:style style:name="P479" style:family="paragraph" style:parent-style-name="Text_20_body" style:list-style-name="L247">
      <style:text-properties fo:font-weight="bold" officeooo:rsid="003c44a3" officeooo:paragraph-rsid="003c44a3"/>
    </style:style>
    <style:style style:name="P480" style:family="paragraph" style:parent-style-name="Text_20_body" style:list-style-name="L237">
      <style:text-properties officeooo:paragraph-rsid="0005af04"/>
    </style:style>
    <style:style style:name="P481" style:family="paragraph" style:parent-style-name="Text_20_body" style:list-style-name="L238">
      <style:text-properties officeooo:paragraph-rsid="0005af04"/>
    </style:style>
    <style:style style:name="P482" style:family="paragraph" style:parent-style-name="Text_20_body" style:list-style-name="L239">
      <style:text-properties officeooo:paragraph-rsid="0005af04"/>
    </style:style>
    <style:style style:name="P483" style:family="paragraph" style:parent-style-name="Text_20_body" style:list-style-name="L239">
      <style:text-properties officeooo:paragraph-rsid="0041d13b"/>
    </style:style>
    <style:style style:name="P484" style:family="paragraph" style:parent-style-name="Text_20_body" style:list-style-name="L240">
      <style:text-properties officeooo:paragraph-rsid="0005af04"/>
    </style:style>
    <style:style style:name="P485" style:family="paragraph" style:parent-style-name="Text_20_body" style:list-style-name="L241">
      <style:text-properties officeooo:paragraph-rsid="0005af04"/>
    </style:style>
    <style:style style:name="P486" style:family="paragraph" style:parent-style-name="Text_20_body" style:list-style-name="L242">
      <style:text-properties officeooo:paragraph-rsid="0005af04"/>
    </style:style>
    <style:style style:name="P487" style:family="paragraph" style:parent-style-name="Text_20_body" style:list-style-name="L243">
      <style:text-properties officeooo:paragraph-rsid="0005af04"/>
    </style:style>
    <style:style style:name="P488" style:family="paragraph" style:parent-style-name="Text_20_body" style:list-style-name="L244">
      <style:text-properties officeooo:paragraph-rsid="0005af04"/>
    </style:style>
    <style:style style:name="P489" style:family="paragraph" style:parent-style-name="Text_20_body" style:list-style-name="L245">
      <style:text-properties officeooo:paragraph-rsid="0005af04"/>
    </style:style>
    <style:style style:name="P490" style:family="paragraph" style:parent-style-name="Text_20_body" style:list-style-name="L246">
      <style:text-properties officeooo:paragraph-rsid="003eafef"/>
    </style:style>
    <style:style style:name="P491" style:family="paragraph" style:parent-style-name="Text_20_body" style:list-style-name="L246">
      <style:text-properties officeooo:paragraph-rsid="0005af04"/>
    </style:style>
    <style:style style:name="P492" style:family="paragraph" style:parent-style-name="Text_20_body" style:list-style-name="L246">
      <style:text-properties officeooo:paragraph-rsid="003f76cc"/>
    </style:style>
    <style:style style:name="P493" style:family="paragraph" style:parent-style-name="Text_20_body" style:list-style-name="L247">
      <style:text-properties officeooo:paragraph-rsid="0005af04"/>
    </style:style>
    <style:style style:name="P494" style:family="paragraph" style:parent-style-name="Text_20_body" style:list-style-name="L247">
      <style:text-properties officeooo:paragraph-rsid="003c44a3"/>
    </style:style>
    <style:style style:name="P495" style:family="paragraph" style:parent-style-name="Text_20_body" style:list-style-name="L248">
      <style:text-properties officeooo:paragraph-rsid="003c44a3"/>
    </style:style>
    <style:style style:name="P496" style:family="paragraph" style:parent-style-name="Text_20_body" style:list-style-name="L249">
      <style:text-properties officeooo:paragraph-rsid="0005af04"/>
    </style:style>
    <style:style style:name="P497" style:family="paragraph" style:parent-style-name="Text_20_body" style:list-style-name="L250">
      <style:text-properties officeooo:paragraph-rsid="004575c4"/>
    </style:style>
    <style:style style:name="P498" style:family="paragraph" style:parent-style-name="Text_20_body" style:list-style-name="L250">
      <style:text-properties officeooo:paragraph-rsid="00469c41"/>
    </style:style>
    <style:style style:name="P499" style:family="paragraph" style:parent-style-name="Text_20_body" style:list-style-name="L250">
      <style:text-properties officeooo:paragraph-rsid="004dacf9"/>
    </style:style>
    <style:style style:name="P500" style:family="paragraph" style:parent-style-name="Text_20_body" style:list-style-name="L251">
      <style:text-properties officeooo:paragraph-rsid="0005af04"/>
    </style:style>
    <style:style style:name="P501" style:family="paragraph" style:parent-style-name="Text_20_body" style:list-style-name="L252">
      <style:text-properties officeooo:paragraph-rsid="004dd269"/>
    </style:style>
    <style:style style:name="P502" style:family="paragraph" style:parent-style-name="Text_20_body" style:list-style-name="L253">
      <style:text-properties officeooo:paragraph-rsid="0005af04"/>
    </style:style>
    <style:style style:name="P503" style:family="paragraph" style:parent-style-name="Text_20_body" style:list-style-name="L254">
      <style:text-properties officeooo:paragraph-rsid="003eafef"/>
    </style:style>
    <style:style style:name="P504" style:family="paragraph" style:parent-style-name="Text_20_body" style:list-style-name="L254">
      <style:text-properties officeooo:paragraph-rsid="004dd269"/>
    </style:style>
    <style:style style:name="P505" style:family="paragraph" style:parent-style-name="Text_20_body" style:list-style-name="L255">
      <style:text-properties officeooo:paragraph-rsid="0005af04"/>
    </style:style>
    <style:style style:name="P506" style:family="paragraph" style:parent-style-name="Text_20_body" style:list-style-name="L256">
      <style:text-properties officeooo:paragraph-rsid="004ecc5a"/>
    </style:style>
    <style:style style:name="P507" style:family="paragraph" style:parent-style-name="Text_20_body" style:list-style-name="L256">
      <style:text-properties officeooo:paragraph-rsid="003dafe3"/>
    </style:style>
    <style:style style:name="P508" style:family="paragraph" style:parent-style-name="Text_20_body" style:list-style-name="L257">
      <style:text-properties officeooo:paragraph-rsid="0005af04"/>
    </style:style>
    <style:style style:name="P509" style:family="paragraph" style:parent-style-name="Text_20_body" style:list-style-name="L258">
      <style:text-properties officeooo:paragraph-rsid="0005af04"/>
    </style:style>
    <style:style style:name="P510" style:family="paragraph" style:parent-style-name="Text_20_body" style:list-style-name="L259">
      <style:text-properties officeooo:paragraph-rsid="0005af04"/>
    </style:style>
    <style:style style:name="P511" style:family="paragraph" style:parent-style-name="Text_20_body" style:list-style-name="L259">
      <style:text-properties officeooo:paragraph-rsid="00502e65"/>
    </style:style>
    <style:style style:name="P512" style:family="paragraph" style:parent-style-name="Text_20_body" style:list-style-name="L259">
      <style:text-properties officeooo:paragraph-rsid="004ecc5a"/>
    </style:style>
    <style:style style:name="P513" style:family="paragraph" style:parent-style-name="Text_20_body" style:list-style-name="L260">
      <style:text-properties officeooo:paragraph-rsid="0005af04"/>
    </style:style>
    <style:style style:name="P514" style:family="paragraph" style:parent-style-name="Text_20_body" style:list-style-name="L261">
      <style:text-properties officeooo:paragraph-rsid="0005af04"/>
    </style:style>
    <style:style style:name="P515" style:family="paragraph" style:parent-style-name="Text_20_body" style:list-style-name="L262">
      <style:text-properties officeooo:paragraph-rsid="00502e65"/>
    </style:style>
    <style:style style:name="P516" style:family="paragraph" style:parent-style-name="Text_20_body" style:list-style-name="L262">
      <style:text-properties officeooo:paragraph-rsid="003dafe3"/>
    </style:style>
    <style:style style:name="P517" style:family="paragraph" style:parent-style-name="Text_20_body" style:list-style-name="L263">
      <style:text-properties officeooo:paragraph-rsid="0005af04"/>
    </style:style>
    <style:style style:name="P518" style:family="paragraph" style:parent-style-name="Text_20_body" style:list-style-name="L264">
      <style:text-properties officeooo:paragraph-rsid="003eafef"/>
    </style:style>
    <style:style style:name="P519" style:family="paragraph" style:parent-style-name="Text_20_body" style:list-style-name="L264">
      <style:text-properties officeooo:paragraph-rsid="0050ed2b"/>
    </style:style>
    <style:style style:name="P520" style:family="paragraph" style:parent-style-name="Text_20_body" style:list-style-name="L265">
      <style:text-properties officeooo:paragraph-rsid="0005af04"/>
    </style:style>
    <style:style style:name="P521" style:family="paragraph" style:parent-style-name="Text_20_body" style:list-style-name="L266">
      <style:text-properties officeooo:paragraph-rsid="0005af04"/>
    </style:style>
    <style:style style:name="P522" style:family="paragraph" style:parent-style-name="Text_20_body" style:list-style-name="L267">
      <style:text-properties officeooo:paragraph-rsid="003dafe3"/>
    </style:style>
    <style:style style:name="P523" style:family="paragraph" style:parent-style-name="Text_20_body" style:list-style-name="L267">
      <style:text-properties officeooo:paragraph-rsid="003e5ca5"/>
    </style:style>
    <style:style style:name="P524" style:family="paragraph" style:parent-style-name="Text_20_body" style:list-style-name="L268">
      <style:text-properties officeooo:paragraph-rsid="0005af04"/>
    </style:style>
    <style:style style:name="P525" style:family="paragraph" style:parent-style-name="Text_20_body" style:list-style-name="L269">
      <style:text-properties officeooo:paragraph-rsid="003eafef"/>
    </style:style>
    <style:style style:name="P526" style:family="paragraph" style:parent-style-name="Text_20_body" style:list-style-name="L269">
      <style:text-properties officeooo:paragraph-rsid="003e5ca5"/>
    </style:style>
    <style:style style:name="P527" style:family="paragraph" style:parent-style-name="Text_20_body" style:list-style-name="L269">
      <style:text-properties officeooo:paragraph-rsid="0005af04"/>
    </style:style>
    <style:style style:name="P528" style:family="paragraph" style:parent-style-name="Text_20_body" style:list-style-name="L269">
      <style:text-properties officeooo:paragraph-rsid="003dafe3"/>
    </style:style>
    <style:style style:name="P529" style:family="paragraph" style:parent-style-name="Text_20_body" style:list-style-name="L269">
      <style:text-properties style:text-underline-style="none" fo:font-weight="bold" officeooo:paragraph-rsid="003dafe3" style:font-weight-asian="bold" style:font-weight-complex="bold"/>
    </style:style>
    <style:style style:name="P530" style:family="paragraph" style:parent-style-name="Text_20_body" style:list-style-name="L270">
      <style:text-properties officeooo:paragraph-rsid="0005af04"/>
    </style:style>
    <style:style style:name="P531" style:family="paragraph" style:parent-style-name="Text_20_body" style:list-style-name="L271">
      <style:text-properties officeooo:paragraph-rsid="0005af04"/>
    </style:style>
    <style:style style:name="P532" style:family="paragraph" style:parent-style-name="Text_20_body" style:list-style-name="L272">
      <style:text-properties officeooo:paragraph-rsid="00536f0f"/>
    </style:style>
    <style:style style:name="P533" style:family="paragraph" style:parent-style-name="Text_20_body" style:list-style-name="L272">
      <style:text-properties officeooo:paragraph-rsid="00519ef2"/>
    </style:style>
    <style:style style:name="P534" style:family="paragraph" style:parent-style-name="Text_20_body" style:list-style-name="L272">
      <style:text-properties officeooo:paragraph-rsid="0005af04"/>
    </style:style>
    <style:style style:name="P535" style:family="paragraph" style:parent-style-name="Text_20_body" style:list-style-name="L273">
      <style:text-properties officeooo:paragraph-rsid="0005af04"/>
    </style:style>
    <style:style style:name="P536" style:family="paragraph" style:parent-style-name="Text_20_body" style:list-style-name="L274">
      <style:text-properties officeooo:paragraph-rsid="0005af04"/>
    </style:style>
    <style:style style:name="P537" style:family="paragraph" style:parent-style-name="Text_20_body" style:list-style-name="L274">
      <style:text-properties officeooo:paragraph-rsid="00ed35e0"/>
    </style:style>
    <style:style style:name="P538" style:family="paragraph" style:parent-style-name="Text_20_body" style:list-style-name="L275">
      <style:text-properties officeooo:paragraph-rsid="00536f0f"/>
    </style:style>
    <style:style style:name="P539" style:family="paragraph" style:parent-style-name="Text_20_body" style:list-style-name="L275">
      <style:text-properties officeooo:paragraph-rsid="0053ebaf"/>
    </style:style>
    <style:style style:name="P540" style:family="paragraph" style:parent-style-name="Text_20_body" style:list-style-name="L276">
      <style:text-properties officeooo:paragraph-rsid="0005af04"/>
    </style:style>
    <style:style style:name="P541" style:family="paragraph" style:parent-style-name="Text_20_body" style:list-style-name="L277">
      <style:text-properties officeooo:paragraph-rsid="0005af04"/>
    </style:style>
    <style:style style:name="P542" style:family="paragraph" style:parent-style-name="Text_20_body" style:list-style-name="L277">
      <style:text-properties officeooo:paragraph-rsid="005cb5df"/>
    </style:style>
    <style:style style:name="P543" style:family="paragraph" style:parent-style-name="Text_20_body" style:list-style-name="L278">
      <style:text-properties officeooo:paragraph-rsid="0005af04"/>
    </style:style>
    <style:style style:name="P544" style:family="paragraph" style:parent-style-name="Text_20_body" style:list-style-name="L278">
      <style:text-properties officeooo:paragraph-rsid="003dafe3"/>
    </style:style>
    <style:style style:name="P545" style:family="paragraph" style:parent-style-name="Text_20_body" style:list-style-name="L279">
      <style:text-properties officeooo:paragraph-rsid="0005af04"/>
    </style:style>
    <style:style style:name="P546" style:family="paragraph" style:parent-style-name="Text_20_body" style:list-style-name="L280">
      <style:text-properties officeooo:paragraph-rsid="0005af04"/>
    </style:style>
    <style:style style:name="P547" style:family="paragraph" style:parent-style-name="Text_20_body" style:list-style-name="L280">
      <style:text-properties officeooo:paragraph-rsid="003dafe3"/>
    </style:style>
    <style:style style:name="P548" style:family="paragraph" style:parent-style-name="Text_20_body" style:list-style-name="L281">
      <style:text-properties officeooo:paragraph-rsid="0005af04"/>
    </style:style>
    <style:style style:name="P549" style:family="paragraph" style:parent-style-name="Text_20_body" style:list-style-name="L282">
      <style:text-properties officeooo:paragraph-rsid="003dafe3"/>
    </style:style>
    <style:style style:name="P550" style:family="paragraph" style:parent-style-name="Text_20_body" style:list-style-name="L282">
      <style:text-properties officeooo:paragraph-rsid="004877f4"/>
    </style:style>
    <style:style style:name="P551" style:family="paragraph" style:parent-style-name="Text_20_body" style:list-style-name="L282">
      <style:text-properties officeooo:paragraph-rsid="004bafa8"/>
    </style:style>
    <style:style style:name="P552" style:family="paragraph" style:parent-style-name="Text_20_body" style:list-style-name="L283"/>
    <style:style style:name="P553" style:family="paragraph" style:parent-style-name="Text_20_body" style:list-style-name="L284"/>
    <style:style style:name="P554" style:family="paragraph" style:parent-style-name="Text_20_body" style:list-style-name="L285"/>
    <style:style style:name="P555" style:family="paragraph" style:parent-style-name="Text_20_body" style:list-style-name="L286"/>
    <style:style style:name="P556" style:family="paragraph" style:parent-style-name="Text_20_body" style:list-style-name="L287"/>
    <style:style style:name="P557" style:family="paragraph" style:parent-style-name="Text_20_body" style:list-style-name="L288"/>
    <style:style style:name="P558" style:family="paragraph" style:parent-style-name="Text_20_body">
      <style:text-properties officeooo:paragraph-rsid="006597ac"/>
    </style:style>
    <style:style style:name="P559" style:family="paragraph" style:parent-style-name="Text_20_body">
      <style:text-properties officeooo:paragraph-rsid="006a3d0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bd3a07" style:font-weight-asian="bold" style:font-weight-complex="bold"/>
    </style:style>
    <style:style style:name="T4" style:family="text">
      <style:text-properties fo:font-weight="bold" officeooo:rsid="00d2610f" style:font-weight-asian="bold" style:font-weight-complex="bold"/>
    </style:style>
    <style:style style:name="T5" style:family="text">
      <style:text-properties fo:font-weight="bold" officeooo:rsid="00d4ac98" style:font-weight-asian="bold" style:font-weight-complex="bold"/>
    </style:style>
    <style:style style:name="T6" style:family="text">
      <style:text-properties fo:font-weight="bold" officeooo:rsid="00267b30" style:font-weight-asian="bold" style:font-weight-complex="bold"/>
    </style:style>
    <style:style style:name="T7" style:family="text">
      <style:text-properties fo:font-weight="bold" officeooo:rsid="00545f58" style:font-weight-asian="bold" style:font-weight-complex="bold"/>
    </style:style>
    <style:style style:name="T8" style:family="text">
      <style:text-properties fo:font-weight="bold" officeooo:rsid="002f2a7a" style:font-weight-asian="bold" style:font-weight-complex="bold"/>
    </style:style>
    <style:style style:name="T9" style:family="text">
      <style:text-properties fo:font-weight="bold" officeooo:rsid="000e2fcf" style:font-weight-asian="bold" style:font-weight-complex="bold"/>
    </style:style>
    <style:style style:name="T10" style:family="text">
      <style:text-properties fo:font-weight="bold" officeooo:rsid="0011f317" style:font-weight-asian="bold" style:font-weight-complex="bold"/>
    </style:style>
    <style:style style:name="T11" style:family="text">
      <style:text-properties fo:font-weight="bold" officeooo:rsid="00126893" style:font-weight-asian="bold" style:font-weight-complex="bold"/>
    </style:style>
    <style:style style:name="T12" style:family="text">
      <style:text-properties fo:font-weight="bold" officeooo:rsid="001a158f" style:font-weight-asian="bold" style:font-weight-complex="bold"/>
    </style:style>
    <style:style style:name="T13" style:family="text">
      <style:text-properties fo:font-weight="bold" officeooo:rsid="001b64c2" style:font-weight-asian="bold" style:font-weight-complex="bold"/>
    </style:style>
    <style:style style:name="T14" style:family="text">
      <style:text-properties fo:font-weight="bold" officeooo:rsid="001816f1" style:font-weight-asian="bold" style:font-weight-complex="bold"/>
    </style:style>
    <style:style style:name="T15" style:family="text">
      <style:text-properties fo:font-weight="bold" officeooo:rsid="003e5ca5" style:font-weight-asian="bold" style:font-weight-complex="bold"/>
    </style:style>
    <style:style style:name="T16" style:family="text">
      <style:text-properties fo:font-weight="bold" officeooo:rsid="005e06ff" style:font-weight-asian="bold" style:font-weight-complex="bold"/>
    </style:style>
    <style:style style:name="T17" style:family="text">
      <style:text-properties fo:font-weight="bold" officeooo:rsid="000d1f51" style:font-weight-asian="bold" style:font-weight-complex="bold"/>
    </style:style>
    <style:style style:name="T18" style:family="text">
      <style:text-properties fo:font-weight="bold" officeooo:rsid="006a3d02" style:font-weight-asian="bold" style:font-weight-complex="bold"/>
    </style:style>
    <style:style style:name="T19" style:family="text">
      <style:text-properties fo:font-weight="bold" officeooo:rsid="0081fe67" style:font-weight-asian="bold" style:font-weight-complex="bold"/>
    </style:style>
    <style:style style:name="T20" style:family="text">
      <style:text-properties fo:font-weight="bold" officeooo:rsid="0083fb85" style:font-weight-asian="bold" style:font-weight-complex="bold"/>
    </style:style>
    <style:style style:name="T21" style:family="text">
      <style:text-properties fo:font-weight="bold" officeooo:rsid="0085f1bc" style:font-weight-asian="bold" style:font-weight-complex="bold"/>
    </style:style>
    <style:style style:name="T22" style:family="text">
      <style:text-properties fo:font-weight="bold" officeooo:rsid="00baa3d9" style:font-weight-asian="bold" style:font-weight-complex="bold"/>
    </style:style>
    <style:style style:name="T23" style:family="text">
      <style:text-properties fo:font-weight="bold" officeooo:rsid="00c77e5b" style:font-weight-asian="bold" style:font-weight-complex="bold"/>
    </style:style>
    <style:style style:name="T24" style:family="text">
      <style:text-properties fo:font-weight="bold" officeooo:rsid="00ca9b30" style:font-weight-asian="bold" style:font-weight-complex="bold"/>
    </style:style>
    <style:style style:name="T25" style:family="text">
      <style:text-properties fo:font-weight="bold" officeooo:rsid="00f2468c" style:font-weight-asian="bold" style:font-weight-complex="bold"/>
    </style:style>
    <style:style style:name="T26" style:family="text">
      <style:text-properties fo:font-weight="bold" officeooo:rsid="00f31413" style:font-weight-asian="bold" style:font-weight-complex="bold"/>
    </style:style>
    <style:style style:name="T27" style:family="text">
      <style:text-properties fo:font-weight="bold" officeooo:rsid="00f82f31" style:font-weight-asian="bold" style:font-weight-complex="bold"/>
    </style:style>
    <style:style style:name="T28" style:family="text">
      <style:text-properties fo:font-weight="bold" officeooo:rsid="00cc0014"/>
    </style:style>
    <style:style style:name="T29" style:family="text">
      <style:text-properties fo:font-weight="bold" officeooo:rsid="00a24247"/>
    </style:style>
    <style:style style:name="T30" style:family="text">
      <style:text-properties fo:font-weight="bold" officeooo:rsid="00aa585e"/>
    </style:style>
    <style:style style:name="T31" style:family="text">
      <style:text-properties fo:font-weight="bold" style:font-weight-asian="normal" style:font-weight-complex="normal"/>
    </style:style>
    <style:style style:name="T32" style:family="text">
      <style:text-properties fo:font-weight="bold" officeooo:rsid="00ed35e0" style:font-weight-asian="normal" style:font-weight-complex="normal"/>
    </style:style>
    <style:style style:name="T33" style:family="text">
      <style:text-properties fo:font-weight="bold" officeooo:rsid="0053ebaf"/>
    </style:style>
    <style:style style:name="T34" style:family="text">
      <style:text-properties fo:font-weight="bold" officeooo:rsid="00565841"/>
    </style:style>
    <style:style style:name="T35" style:family="text">
      <style:text-properties fo:font-weight="bold" officeooo:rsid="0099877e"/>
    </style:style>
    <style:style style:name="T36" style:family="text">
      <style:text-properties fo:font-weight="bold" officeooo:rsid="00f2468c"/>
    </style:style>
    <style:style style:name="T37" style:family="text">
      <style:text-properties officeooo:rsid="00b80a17"/>
    </style:style>
    <style:style style:name="T38" style:family="text">
      <style:text-properties style:font-name="roboto"/>
    </style:style>
    <style:style style:name="T39" style:family="text">
      <style:text-properties style:font-name="roboto" officeooo:rsid="00b0c85c"/>
    </style:style>
    <style:style style:name="T40" style:family="text">
      <style:text-properties style:font-name="roboto" officeooo:rsid="00e82514"/>
    </style:style>
    <style:style style:name="T41" style:family="text">
      <style:text-properties style:font-name="roboto" fo:font-weight="normal"/>
    </style:style>
    <style:style style:name="T42" style:family="text">
      <style:text-properties style:font-name="roboto" fo:font-weight="normal" style:font-weight-asian="normal" style:font-weight-complex="normal"/>
    </style:style>
    <style:style style:name="T43" style:family="text">
      <style:text-properties style:font-name="roboto" fo:font-weight="normal" officeooo:rsid="0013ab3e" style:font-weight-asian="normal" style:font-weight-complex="normal"/>
    </style:style>
    <style:style style:name="T44" style:family="text">
      <style:text-properties style:font-name="roboto" fo:font-weight="normal" officeooo:rsid="0036293b" style:font-weight-asian="normal" style:font-weight-complex="normal"/>
    </style:style>
    <style:style style:name="T45" style:family="text">
      <style:text-properties style:font-name="roboto" fo:font-weight="normal" officeooo:rsid="00cefb91" style:font-weight-asian="normal" style:font-weight-complex="normal"/>
    </style:style>
    <style:style style:name="T46" style:family="text">
      <style:text-properties style:font-name="roboto" fo:font-weight="normal" officeooo:rsid="00bafbbd" style:font-weight-asian="normal" style:font-weight-complex="normal"/>
    </style:style>
    <style:style style:name="T47" style:family="text">
      <style:text-properties style:font-name="roboto" fo:font-weight="normal" officeooo:rsid="00d4ac98" style:font-weight-asian="normal" style:font-weight-complex="normal"/>
    </style:style>
    <style:style style:name="T48" style:family="text">
      <style:text-properties style:font-name="roboto" fo:font-weight="normal" officeooo:rsid="0011f317" style:font-weight-asian="normal" style:font-weight-complex="normal"/>
    </style:style>
    <style:style style:name="T49" style:family="text">
      <style:text-properties style:font-name="roboto" fo:font-weight="normal" officeooo:rsid="000b32ed" style:font-weight-asian="normal" style:font-weight-complex="normal"/>
    </style:style>
    <style:style style:name="T50" style:family="text">
      <style:text-properties style:font-name="roboto" fo:font-weight="normal" officeooo:rsid="000cf396" style:font-weight-asian="normal" style:font-weight-complex="normal"/>
    </style:style>
    <style:style style:name="T51" style:family="text">
      <style:text-properties style:font-name="roboto" fo:font-weight="normal" officeooo:rsid="001b822c" style:font-weight-asian="normal" style:font-weight-complex="normal"/>
    </style:style>
    <style:style style:name="T52" style:family="text">
      <style:text-properties style:font-name="roboto" fo:font-weight="normal" officeooo:rsid="001c39df" style:font-weight-asian="normal" style:font-weight-complex="normal"/>
    </style:style>
    <style:style style:name="T53" style:family="text">
      <style:text-properties style:font-name="roboto" fo:font-weight="normal" officeooo:rsid="001e239c" style:font-weight-asian="normal" style:font-weight-complex="normal"/>
    </style:style>
    <style:style style:name="T54" style:family="text">
      <style:text-properties style:font-name="roboto" fo:font-weight="normal" officeooo:rsid="001ebff7" style:font-weight-asian="normal" style:font-weight-complex="normal"/>
    </style:style>
    <style:style style:name="T55" style:family="text">
      <style:text-properties style:font-name="roboto" fo:font-weight="normal" officeooo:rsid="00074483" style:font-weight-asian="normal" style:font-weight-complex="normal"/>
    </style:style>
    <style:style style:name="T56" style:family="text">
      <style:text-properties style:font-name="roboto" fo:font-weight="normal" officeooo:rsid="00093f17" style:font-weight-asian="normal" style:font-weight-complex="normal"/>
    </style:style>
    <style:style style:name="T57" style:family="text">
      <style:text-properties style:font-name="roboto" fo:font-weight="normal" officeooo:rsid="00cfad9e" style:font-weight-asian="normal" style:font-weight-complex="normal"/>
    </style:style>
    <style:style style:name="T58" style:family="text">
      <style:text-properties style:font-name="roboto" fo:font-weight="normal" officeooo:rsid="001a158f" style:font-weight-asian="normal" style:font-weight-complex="normal"/>
    </style:style>
    <style:style style:name="T59" style:family="text">
      <style:text-properties style:font-name="roboto" fo:font-weight="normal" officeooo:rsid="001a67c3" style:font-weight-asian="normal" style:font-weight-complex="normal"/>
    </style:style>
    <style:style style:name="T60" style:family="text">
      <style:text-properties style:font-name="roboto" fo:font-weight="normal" officeooo:rsid="00205e0e" style:font-weight-asian="normal" style:font-weight-complex="normal"/>
    </style:style>
    <style:style style:name="T61" style:family="text">
      <style:text-properties style:font-name="roboto" fo:font-weight="normal" officeooo:rsid="00207840" style:font-weight-asian="normal" style:font-weight-complex="normal"/>
    </style:style>
    <style:style style:name="T62" style:family="text">
      <style:text-properties style:font-name="roboto" fo:font-weight="normal" officeooo:rsid="0034689f" style:font-weight-asian="normal" style:font-weight-complex="normal"/>
    </style:style>
    <style:style style:name="T63" style:family="text">
      <style:text-properties style:font-name="roboto" fo:font-weight="normal" officeooo:rsid="00376014" style:font-weight-asian="normal" style:font-weight-complex="normal"/>
    </style:style>
    <style:style style:name="T64" style:family="text">
      <style:text-properties style:font-name="roboto" fo:font-weight="normal" officeooo:rsid="00397eda" style:font-weight-asian="normal" style:font-weight-complex="normal"/>
    </style:style>
    <style:style style:name="T65" style:family="text">
      <style:text-properties style:font-name="roboto" fo:font-weight="normal" officeooo:rsid="00891e88" style:font-weight-asian="normal" style:font-weight-complex="normal"/>
    </style:style>
    <style:style style:name="T66" style:family="text">
      <style:text-properties style:font-name="roboto" fo:font-weight="normal" officeooo:rsid="00cfad9e"/>
    </style:style>
    <style:style style:name="T67" style:family="text">
      <style:text-properties style:font-name="roboto" fo:font-weight="normal" officeooo:rsid="001b64c2"/>
    </style:style>
    <style:style style:name="T68" style:family="text">
      <style:text-properties style:font-name="roboto" fo:font-weight="normal" officeooo:rsid="00126893"/>
    </style:style>
    <style:style style:name="T69" style:family="text">
      <style:text-properties style:font-name="roboto" fo:font-weight="bold"/>
    </style:style>
    <style:style style:name="T70" style:family="text">
      <style:text-properties style:font-name="roboto" fo:font-weight="bold" style:font-weight-asian="bold" style:font-weight-complex="bold"/>
    </style:style>
    <style:style style:name="T71" style:family="text">
      <style:text-properties style:font-name="roboto" fo:font-weight="bold" officeooo:rsid="0013ab3e" style:font-weight-asian="bold" style:font-weight-complex="bold"/>
    </style:style>
    <style:style style:name="T72" style:family="text">
      <style:text-properties style:font-name="roboto" fo:font-weight="bold" officeooo:rsid="001633e1" style:font-weight-asian="bold" style:font-weight-complex="bold"/>
    </style:style>
    <style:style style:name="T73" style:family="text">
      <style:text-properties style:font-name="roboto" fo:font-weight="bold" officeooo:rsid="00b0c85c" style:font-weight-asian="bold" style:font-weight-complex="bold"/>
    </style:style>
    <style:style style:name="T74" style:family="text">
      <style:text-properties style:font-name="roboto" fo:font-weight="bold" officeooo:rsid="00b29438" style:font-weight-asian="bold" style:font-weight-complex="bold"/>
    </style:style>
    <style:style style:name="T75" style:family="text">
      <style:text-properties style:font-name="roboto" fo:font-weight="bold" officeooo:rsid="00bafbbd" style:font-weight-asian="bold" style:font-weight-complex="bold"/>
    </style:style>
    <style:style style:name="T76" style:family="text">
      <style:text-properties style:font-name="roboto" fo:font-weight="bold" officeooo:rsid="0010bb08" style:font-weight-asian="bold" style:font-weight-complex="bold"/>
    </style:style>
    <style:style style:name="T77" style:family="text">
      <style:text-properties style:font-name="roboto" fo:font-weight="bold" officeooo:rsid="0011f317" style:font-weight-asian="bold" style:font-weight-complex="bold"/>
    </style:style>
    <style:style style:name="T78" style:family="text">
      <style:text-properties style:font-name="roboto" fo:font-weight="bold" officeooo:rsid="000b32ed" style:font-weight-asian="bold" style:font-weight-complex="bold"/>
    </style:style>
    <style:style style:name="T79" style:family="text">
      <style:text-properties style:font-name="roboto" fo:font-weight="bold" officeooo:rsid="000cf396" style:font-weight-asian="bold" style:font-weight-complex="bold"/>
    </style:style>
    <style:style style:name="T80" style:family="text">
      <style:text-properties style:font-name="roboto" fo:font-weight="bold" officeooo:rsid="00093f17" style:font-weight-asian="bold" style:font-weight-complex="bold"/>
    </style:style>
    <style:style style:name="T81" style:family="text">
      <style:text-properties style:font-name="roboto" fo:font-weight="bold" officeooo:rsid="00315ace" style:font-weight-asian="bold" style:font-weight-complex="bold"/>
    </style:style>
    <style:style style:name="T82" style:family="text">
      <style:text-properties style:font-name="roboto" fo:font-weight="bold" officeooo:rsid="0036293b" style:font-weight-asian="bold" style:font-weight-complex="bold"/>
    </style:style>
    <style:style style:name="T83" style:family="text">
      <style:text-properties style:font-name="roboto" fo:font-weight="bold" officeooo:rsid="002ff849" style:font-weight-asian="bold" style:font-weight-complex="bold"/>
    </style:style>
    <style:style style:name="T84" style:family="text">
      <style:text-properties style:font-name="roboto" fo:font-weight="bold" officeooo:rsid="0034ca31" style:font-weight-asian="bold" style:font-weight-complex="bold"/>
    </style:style>
    <style:style style:name="T85" style:family="text">
      <style:text-properties style:font-name="roboto" fo:font-weight="bold" officeooo:rsid="00c8996f" style:font-weight-asian="bold" style:font-weight-complex="bold"/>
    </style:style>
    <style:style style:name="T86" style:family="text">
      <style:text-properties style:font-name="roboto" fo:font-weight="bold" officeooo:rsid="001b822c" style:font-weight-asian="bold" style:font-weight-complex="bold"/>
    </style:style>
    <style:style style:name="T87" style:family="text">
      <style:text-properties style:font-name="roboto" fo:font-weight="bold" officeooo:rsid="00300db1" style:font-weight-asian="bold" style:font-weight-complex="bold"/>
    </style:style>
    <style:style style:name="T88" style:family="text">
      <style:text-properties style:font-name="roboto" fo:font-weight="bold" officeooo:rsid="0034cd67" style:font-weight-asian="bold" style:font-weight-complex="bold"/>
    </style:style>
    <style:style style:name="T89" style:family="text">
      <style:text-properties style:font-name="roboto" fo:font-weight="bold" officeooo:rsid="00376014" style:font-weight-asian="bold" style:font-weight-complex="bold"/>
    </style:style>
    <style:style style:name="T90" style:family="text">
      <style:text-properties style:font-name="roboto" fo:font-weight="bold" officeooo:rsid="00397eda" style:font-weight-asian="bold" style:font-weight-complex="bold"/>
    </style:style>
    <style:style style:name="T91" style:family="text">
      <style:text-properties style:font-name="roboto" fo:font-weight="bold" officeooo:rsid="004b7dd7" style:font-weight-asian="bold" style:font-weight-complex="bold"/>
    </style:style>
    <style:style style:name="T92" style:family="text">
      <style:text-properties style:font-name="roboto" fo:font-weight="bold" officeooo:rsid="0093d52a" style:font-weight-asian="bold" style:font-weight-complex="bold"/>
    </style:style>
    <style:style style:name="T93" style:family="text">
      <style:text-properties style:font-name="roboto" fo:font-weight="bold" officeooo:rsid="0096f8fc" style:font-weight-asian="bold" style:font-weight-complex="bold"/>
    </style:style>
    <style:style style:name="T94" style:family="text">
      <style:text-properties style:font-name="roboto" fo:font-weight="bold" style:font-weight-asian="normal" style:font-weight-complex="normal"/>
    </style:style>
    <style:style style:name="T95" style:family="text">
      <style:text-properties style:font-name="roboto" fo:font-weight="bold" officeooo:rsid="0068af0b"/>
    </style:style>
    <style:style style:name="T96" style:family="text">
      <style:text-properties style:font-name="roboto" officeooo:rsid="002f2e87"/>
    </style:style>
    <style:style style:name="T97" style:family="text">
      <style:text-properties style:font-name="roboto" officeooo:rsid="00376df0"/>
    </style:style>
    <style:style style:name="T98" style:family="text">
      <style:text-properties style:font-name="roboto" officeooo:rsid="0013ab3e"/>
    </style:style>
    <style:style style:name="T99" style:family="text">
      <style:text-properties style:font-name="roboto" officeooo:rsid="001633e1"/>
    </style:style>
    <style:style style:name="T100" style:family="text">
      <style:text-properties style:font-name="roboto" officeooo:rsid="002b64a8"/>
    </style:style>
    <style:style style:name="T101" style:family="text">
      <style:text-properties style:font-name="roboto" officeooo:rsid="001f578e"/>
    </style:style>
    <style:style style:name="T102" style:family="text">
      <style:text-properties style:font-name="roboto" officeooo:rsid="00b29438"/>
    </style:style>
    <style:style style:name="T103" style:family="text">
      <style:text-properties style:font-name="roboto" officeooo:rsid="00b49ca5"/>
    </style:style>
    <style:style style:name="T104" style:family="text">
      <style:text-properties style:font-name="roboto" officeooo:rsid="005a98e8"/>
    </style:style>
    <style:style style:name="T105" style:family="text">
      <style:text-properties style:font-name="roboto" officeooo:rsid="00038e07"/>
    </style:style>
    <style:style style:name="T106" style:family="text">
      <style:text-properties style:font-name="roboto" officeooo:rsid="00ccc37f"/>
    </style:style>
    <style:style style:name="T107" style:family="text">
      <style:text-properties style:font-name="roboto" officeooo:rsid="0093d22f"/>
    </style:style>
    <style:style style:name="T108" style:family="text">
      <style:text-properties style:font-name="roboto" officeooo:rsid="00cfad9e"/>
    </style:style>
    <style:style style:name="T109" style:family="text">
      <style:text-properties style:font-name="roboto" officeooo:rsid="00cefb91"/>
    </style:style>
    <style:style style:name="T110" style:family="text">
      <style:text-properties style:font-name="roboto" officeooo:rsid="00140bfe"/>
    </style:style>
    <style:style style:name="T111" style:family="text">
      <style:text-properties style:font-name="roboto" officeooo:rsid="00175002"/>
    </style:style>
    <style:style style:name="T112" style:family="text">
      <style:text-properties style:font-name="roboto" officeooo:rsid="00763b95"/>
    </style:style>
    <style:style style:name="T113" style:family="text">
      <style:text-properties style:font-name="roboto" officeooo:rsid="003d2e34"/>
    </style:style>
    <style:style style:name="T114" style:family="text">
      <style:text-properties style:font-name="roboto" fo:font-size="12pt" style:font-size-asian="12pt" style:font-size-complex="12pt"/>
    </style:style>
    <style:style style:name="T115" style:family="text">
      <style:text-properties style:font-name="roboto" fo:font-size="12pt" officeooo:rsid="00bdc1ed" style:font-size-asian="12pt" style:font-size-complex="12pt"/>
    </style:style>
    <style:style style:name="T116" style:family="text">
      <style:text-properties style:font-name="roboto" fo:font-size="12pt" officeooo:rsid="00b91fdd" style:font-size-asian="12pt" style:font-size-complex="12pt"/>
    </style:style>
    <style:style style:name="T117" style:family="text">
      <style:text-properties style:font-name="roboto" fo:font-size="12pt" officeooo:rsid="00bf3c0a" style:font-size-asian="12pt" style:font-size-complex="12pt"/>
    </style:style>
    <style:style style:name="T118" style:family="text">
      <style:text-properties style:font-name="roboto" fo:font-size="12pt" officeooo:rsid="001579a0" style:font-size-asian="12pt" style:font-size-complex="12pt"/>
    </style:style>
    <style:style style:name="T119" style:family="text">
      <style:text-properties style:font-name="roboto" fo:font-size="12pt" officeooo:rsid="00135f1e" style:font-size-asian="12pt" style:font-size-complex="12pt"/>
    </style:style>
    <style:style style:name="T120" style:family="text">
      <style:text-properties style:font-name="roboto" fo:font-size="12pt" officeooo:rsid="00326e0f" style:font-size-asian="12pt" style:font-size-complex="12pt"/>
    </style:style>
    <style:style style:name="T121" style:family="text">
      <style:text-properties style:font-name="roboto" fo:font-size="12pt" officeooo:rsid="0094afd3" style:font-size-asian="12pt" style:font-size-complex="12pt"/>
    </style:style>
    <style:style style:name="T122" style:family="text">
      <style:text-properties style:font-name="roboto" fo:font-size="12pt" officeooo:rsid="0094e6cf" style:font-size-asian="12pt" style:font-size-complex="12pt"/>
    </style:style>
    <style:style style:name="T123" style:family="text">
      <style:text-properties style:font-name="roboto" fo:font-size="12pt" officeooo:rsid="00955452" style:font-size-asian="12pt" style:font-size-complex="12pt"/>
    </style:style>
    <style:style style:name="T124" style:family="text">
      <style:text-properties style:font-name="roboto" fo:font-size="12pt" fo:font-weight="normal" style:font-size-asian="12pt" style:font-weight-asian="normal" style:font-size-complex="12pt" style:font-weight-complex="normal"/>
    </style:style>
    <style:style style:name="T125" style:family="text">
      <style:text-properties style:font-name="roboto" fo:font-size="12pt" fo:font-weight="normal" officeooo:rsid="00b91fdd" style:font-size-asian="12pt" style:font-weight-asian="normal" style:font-size-complex="12pt" style:font-weight-complex="normal"/>
    </style:style>
    <style:style style:name="T126" style:family="text">
      <style:text-properties style:font-name="roboto" fo:font-size="12pt" fo:font-weight="normal" officeooo:rsid="001433cf" style:font-size-asian="12pt" style:font-weight-asian="normal" style:font-size-complex="12pt" style:font-weight-complex="normal"/>
    </style:style>
    <style:style style:name="T127" style:family="text">
      <style:text-properties style:font-name="roboto" fo:font-size="12pt" fo:font-weight="bold" officeooo:rsid="00b91fdd" style:font-size-asian="12pt" style:font-weight-asian="bold" style:font-size-complex="12pt" style:font-weight-complex="bold"/>
    </style:style>
    <style:style style:name="T128" style:family="text">
      <style:text-properties style:font-name="roboto" fo:font-size="12pt" fo:font-style="normal" fo:font-weight="normal" officeooo:rsid="00bd3a07" style:font-size-asian="12pt" style:font-style-asian="normal" style:font-weight-asian="normal" style:font-size-complex="12pt" style:font-style-complex="normal" style:font-weight-complex="normal"/>
    </style:style>
    <style:style style:name="T129" style:family="text">
      <style:text-properties style:font-name="roboto" fo:font-size="12pt" fo:font-style="normal" officeooo:rsid="00bd3a07" style:font-size-asian="12pt" style:font-style-asian="normal" style:font-size-complex="12pt" style:font-style-complex="normal"/>
    </style:style>
    <style:style style:name="T130" style:family="text">
      <style:text-properties style:font-name="roboto" fo:font-size="12pt" fo:font-style="normal" fo:font-weight="bold" officeooo:rsid="00bd3a07" style:font-size-asian="12pt" style:font-style-asian="normal" style:font-weight-asian="bold" style:font-size-complex="12pt" style:font-style-complex="normal" style:font-weight-complex="bold"/>
    </style:style>
    <style:style style:name="T131" style:family="text">
      <style:text-properties style:font-name="roboto" fo:font-size="12pt" fo:font-style="normal" fo:font-weight="bold" officeooo:rsid="00d2610f" style:font-size-asian="12pt" style:font-style-asian="normal" style:font-weight-asian="bold" style:font-size-complex="12pt" style:font-style-complex="normal" style:font-weight-complex="bold"/>
    </style:style>
    <style:style style:name="T132" style:family="text">
      <style:text-properties style:font-name="roboto" fo:font-size="12pt" fo:font-style="normal" fo:font-weight="bold" officeooo:rsid="00381652" style:font-size-asian="12pt" style:font-style-asian="normal" style:font-weight-asian="bold" style:font-size-complex="12pt" style:font-style-complex="normal" style:font-weight-complex="bold"/>
    </style:style>
    <style:style style:name="T133" style:family="text">
      <style:text-properties style:font-name="roboto" fo:font-size="12pt" fo:font-style="normal" fo:font-weight="bold" officeooo:rsid="003478e0" style:font-size-asian="12pt" style:font-style-asian="normal" style:font-weight-asian="bold" style:font-size-complex="12pt" style:font-style-complex="normal" style:font-weight-complex="bold"/>
    </style:style>
    <style:style style:name="T134" style:family="text">
      <style:text-properties style:font-name="roboto" officeooo:rsid="00bdc1ed"/>
    </style:style>
    <style:style style:name="T135" style:family="text">
      <style:text-properties style:font-name="roboto" officeooo:rsid="00b86f48"/>
    </style:style>
    <style:style style:name="T136" style:family="text">
      <style:text-properties style:font-name="roboto" officeooo:rsid="00bafbbd"/>
    </style:style>
    <style:style style:name="T137" style:family="text">
      <style:text-properties style:font-name="roboto" officeooo:rsid="00bcba77"/>
    </style:style>
    <style:style style:name="T138" style:family="text">
      <style:text-properties style:font-name="roboto" officeooo:rsid="00bf3c0a"/>
    </style:style>
    <style:style style:name="T139" style:family="text">
      <style:text-properties style:font-name="roboto" fo:font-style="normal" style:font-style-asian="normal" style:font-style-complex="normal"/>
    </style:style>
    <style:style style:name="T140" style:family="text">
      <style:text-properties style:font-name="roboto" fo:font-style="normal" officeooo:rsid="00891e88" style:font-style-asian="normal" style:font-style-complex="normal"/>
    </style:style>
    <style:style style:name="T141" style:family="text">
      <style:text-properties style:font-name="roboto" fo:font-style="normal" officeooo:rsid="008929e3" style:font-style-asian="normal" style:font-style-complex="normal"/>
    </style:style>
    <style:style style:name="T142" style:family="text">
      <style:text-properties style:font-name="roboto" fo:font-style="normal" officeooo:rsid="0089d465" style:font-style-asian="normal" style:font-style-complex="normal"/>
    </style:style>
    <style:style style:name="T143" style:family="text">
      <style:text-properties style:font-name="roboto" officeooo:rsid="00c2ea17"/>
    </style:style>
    <style:style style:name="T144" style:family="text">
      <style:text-properties style:font-name="roboto" officeooo:rsid="00c4eae2"/>
    </style:style>
    <style:style style:name="T145" style:family="text">
      <style:text-properties style:font-name="roboto" officeooo:rsid="00c6fe38"/>
    </style:style>
    <style:style style:name="T146" style:family="text">
      <style:text-properties style:font-name="roboto" officeooo:rsid="00d4ac98"/>
    </style:style>
    <style:style style:name="T147" style:family="text">
      <style:text-properties style:font-name="roboto" officeooo:rsid="00dbbbca"/>
    </style:style>
    <style:style style:name="T148" style:family="text">
      <style:text-properties style:font-name="roboto" officeooo:rsid="001b21cf"/>
    </style:style>
    <style:style style:name="T149" style:family="text">
      <style:text-properties style:font-name="roboto" officeooo:rsid="005163ca"/>
    </style:style>
    <style:style style:name="T150" style:family="text">
      <style:text-properties style:font-name="roboto" officeooo:rsid="002de66f"/>
    </style:style>
    <style:style style:name="T151" style:family="text">
      <style:text-properties style:font-name="roboto" officeooo:rsid="00405a7f"/>
    </style:style>
    <style:style style:name="T152" style:family="text">
      <style:text-properties style:font-name="roboto" officeooo:rsid="0010bb08"/>
    </style:style>
    <style:style style:name="T153" style:family="text">
      <style:text-properties style:font-name="roboto" officeooo:rsid="0011f317"/>
    </style:style>
    <style:style style:name="T154" style:family="text">
      <style:text-properties style:font-name="roboto" officeooo:rsid="00093f17"/>
    </style:style>
    <style:style style:name="T155" style:family="text">
      <style:text-properties style:font-name="roboto" officeooo:rsid="000b32ed"/>
    </style:style>
    <style:style style:name="T156" style:family="text">
      <style:text-properties style:font-name="roboto" officeooo:rsid="000cf396"/>
    </style:style>
    <style:style style:name="T157" style:family="text">
      <style:text-properties style:font-name="roboto" officeooo:rsid="00135f1e"/>
    </style:style>
    <style:style style:name="T158" style:family="text">
      <style:text-properties style:font-name="roboto" officeooo:rsid="00150bbd"/>
    </style:style>
    <style:style style:name="T159" style:family="text">
      <style:text-properties style:font-name="roboto" officeooo:rsid="0016f7c6"/>
    </style:style>
    <style:style style:name="T160" style:family="text">
      <style:text-properties style:font-name="roboto" officeooo:rsid="001b64c2"/>
    </style:style>
    <style:style style:name="T161" style:family="text">
      <style:text-properties style:font-name="roboto" officeooo:rsid="00315ace"/>
    </style:style>
    <style:style style:name="T162" style:family="text">
      <style:text-properties style:font-name="roboto" officeooo:rsid="0036293b"/>
    </style:style>
    <style:style style:name="T163" style:family="text">
      <style:text-properties style:font-name="roboto" officeooo:rsid="001b822c"/>
    </style:style>
    <style:style style:name="T164" style:family="text">
      <style:text-properties style:font-name="roboto" officeooo:rsid="001c39df"/>
    </style:style>
    <style:style style:name="T165" style:family="text">
      <style:text-properties style:font-name="roboto" officeooo:rsid="002ff849"/>
    </style:style>
    <style:style style:name="T166" style:family="text">
      <style:text-properties style:font-name="roboto" officeooo:rsid="00074483"/>
    </style:style>
    <style:style style:name="T167" style:family="text">
      <style:text-properties style:font-name="roboto" officeooo:rsid="00b80a17"/>
    </style:style>
    <style:style style:name="T168" style:family="text">
      <style:text-properties style:font-name="roboto" officeooo:rsid="001a158f"/>
    </style:style>
    <style:style style:name="T169" style:family="text">
      <style:text-properties style:font-name="roboto" officeooo:rsid="001a67c3"/>
    </style:style>
    <style:style style:name="T170" style:family="text">
      <style:text-properties style:font-name="roboto" officeooo:rsid="0021268e"/>
    </style:style>
    <style:style style:name="T171" style:family="text">
      <style:text-properties style:font-name="roboto" officeooo:rsid="0027e6d3"/>
    </style:style>
    <style:style style:name="T172" style:family="text">
      <style:text-properties style:font-name="roboto" officeooo:rsid="00300db1"/>
    </style:style>
    <style:style style:name="T173" style:family="text">
      <style:text-properties style:font-name="roboto" officeooo:rsid="0034cd67"/>
    </style:style>
    <style:style style:name="T174" style:family="text">
      <style:text-properties style:font-name="roboto" officeooo:rsid="00397eda"/>
    </style:style>
    <style:style style:name="T175" style:family="text">
      <style:text-properties style:font-name="roboto" officeooo:rsid="004b7dd7"/>
    </style:style>
    <style:style style:name="T176" style:family="text">
      <style:text-properties style:font-name="roboto" officeooo:rsid="0068af0b"/>
    </style:style>
    <style:style style:name="T177" style:family="text">
      <style:text-properties style:font-name="roboto" officeooo:rsid="0067d144"/>
    </style:style>
    <style:style style:name="T178" style:family="text">
      <style:text-properties style:font-name="roboto" officeooo:rsid="00692944"/>
    </style:style>
    <style:style style:name="T179" style:family="text">
      <style:text-properties style:font-name="roboto" officeooo:rsid="006b5f71"/>
    </style:style>
    <style:style style:name="T180" style:family="text">
      <style:text-properties style:font-name="roboto" officeooo:rsid="001e239c"/>
    </style:style>
    <style:style style:name="T181" style:family="text">
      <style:text-properties style:font-name="roboto" officeooo:rsid="00891e88"/>
    </style:style>
    <style:style style:name="T182" style:family="text">
      <style:text-properties style:font-name="roboto" officeooo:rsid="008929e3"/>
    </style:style>
    <style:style style:name="T183" style:family="text">
      <style:text-properties style:font-name="roboto" officeooo:rsid="0089d465"/>
    </style:style>
    <style:style style:name="T184" style:family="text">
      <style:text-properties style:font-name="roboto" officeooo:rsid="0093d98a"/>
    </style:style>
    <style:style style:name="T185" style:family="text">
      <style:text-properties style:font-name="roboto" officeooo:rsid="0099877e"/>
    </style:style>
    <style:style style:name="T186" style:family="text">
      <style:text-properties style:font-name="roboto" officeooo:rsid="00381652"/>
    </style:style>
    <style:style style:name="T187" style:family="text">
      <style:text-properties style:font-name="roboto" officeooo:rsid="0035429b"/>
    </style:style>
    <style:style style:name="T188" style:family="text">
      <style:text-properties style:font-name="roboto" officeooo:rsid="0026fba0"/>
    </style:style>
    <style:style style:name="T189" style:family="text">
      <style:text-properties style:font-name="roboto" officeooo:rsid="00b04970"/>
    </style:style>
    <style:style style:name="T190" style:family="text">
      <style:text-properties style:font-name="roboto" officeooo:rsid="00c96c4b"/>
    </style:style>
    <style:style style:name="T191" style:family="text">
      <style:text-properties style:font-name="roboto" officeooo:rsid="00ccf0d7"/>
    </style:style>
    <style:style style:name="T192" style:family="text">
      <style:text-properties style:font-name="roboto" officeooo:rsid="00ed35e0"/>
    </style:style>
    <style:style style:name="T193" style:family="text">
      <style:text-properties style:font-name="roboto" officeooo:rsid="00fd0093"/>
    </style:style>
    <style:style style:name="T194" style:family="text">
      <style:text-properties fo:font-weight="normal"/>
    </style:style>
    <style:style style:name="T195" style:family="text">
      <style:text-properties fo:font-weight="normal" style:font-weight-asian="normal" style:font-weight-complex="normal"/>
    </style:style>
    <style:style style:name="T196" style:family="text">
      <style:text-properties fo:font-weight="normal" officeooo:rsid="00c3b655" style:font-weight-asian="normal" style:font-weight-complex="normal"/>
    </style:style>
    <style:style style:name="T197" style:family="text">
      <style:text-properties fo:font-weight="normal" officeooo:rsid="00cefb91" style:font-weight-asian="normal" style:font-weight-complex="normal"/>
    </style:style>
    <style:style style:name="T198" style:family="text">
      <style:text-properties fo:font-weight="normal" officeooo:rsid="00bd3a07" style:font-weight-asian="normal" style:font-weight-complex="normal"/>
    </style:style>
    <style:style style:name="T199" style:family="text">
      <style:text-properties fo:font-weight="normal" officeooo:rsid="00c4eae2" style:font-weight-asian="normal" style:font-weight-complex="normal"/>
    </style:style>
    <style:style style:name="T200" style:family="text">
      <style:text-properties fo:font-weight="normal" officeooo:rsid="004436b9" style:font-weight-asian="normal" style:font-weight-complex="normal"/>
    </style:style>
    <style:style style:name="T201" style:family="text">
      <style:text-properties fo:font-weight="normal" officeooo:rsid="004a09db" style:font-weight-asian="normal" style:font-weight-complex="normal"/>
    </style:style>
    <style:style style:name="T202" style:family="text">
      <style:text-properties fo:font-weight="normal" officeooo:rsid="004a1e6a" style:font-weight-asian="normal" style:font-weight-complex="normal"/>
    </style:style>
    <style:style style:name="T203" style:family="text">
      <style:text-properties fo:font-weight="normal" officeooo:rsid="00545f58" style:font-weight-asian="normal" style:font-weight-complex="normal"/>
    </style:style>
    <style:style style:name="T204" style:family="text">
      <style:text-properties fo:font-weight="normal" officeooo:rsid="004ffc67" style:font-weight-asian="normal" style:font-weight-complex="normal"/>
    </style:style>
    <style:style style:name="T205" style:family="text">
      <style:text-properties fo:font-weight="normal" officeooo:rsid="00558580" style:font-weight-asian="normal" style:font-weight-complex="normal"/>
    </style:style>
    <style:style style:name="T206" style:family="text">
      <style:text-properties fo:font-weight="normal" officeooo:rsid="00572703" style:font-weight-asian="normal" style:font-weight-complex="normal"/>
    </style:style>
    <style:style style:name="T207" style:family="text">
      <style:text-properties fo:font-weight="normal" officeooo:rsid="004140f0" style:font-weight-asian="normal" style:font-weight-complex="normal"/>
    </style:style>
    <style:style style:name="T208" style:family="text">
      <style:text-properties fo:font-weight="normal" officeooo:rsid="00376014" style:font-weight-asian="normal" style:font-weight-complex="normal"/>
    </style:style>
    <style:style style:name="T209" style:family="text">
      <style:text-properties fo:font-weight="normal" officeooo:rsid="0038e184" style:font-weight-asian="normal" style:font-weight-complex="normal"/>
    </style:style>
    <style:style style:name="T210" style:family="text">
      <style:text-properties fo:font-weight="normal" officeooo:rsid="00397eda" style:font-weight-asian="normal" style:font-weight-complex="normal"/>
    </style:style>
    <style:style style:name="T211" style:family="text">
      <style:text-properties fo:font-weight="normal" officeooo:rsid="00502e65" style:font-weight-asian="normal" style:font-weight-complex="normal"/>
    </style:style>
    <style:style style:name="T212" style:family="text">
      <style:text-properties fo:font-weight="normal" officeooo:rsid="005bd38d" style:font-weight-asian="normal" style:font-weight-complex="normal"/>
    </style:style>
    <style:style style:name="T213" style:family="text">
      <style:text-properties fo:font-weight="normal" officeooo:rsid="005cb5df" style:font-weight-asian="normal" style:font-weight-complex="normal"/>
    </style:style>
    <style:style style:name="T214" style:family="text">
      <style:text-properties fo:font-weight="normal" officeooo:rsid="005e0dcc" style:font-weight-asian="normal" style:font-weight-complex="normal"/>
    </style:style>
    <style:style style:name="T215" style:family="text">
      <style:text-properties fo:font-weight="normal" officeooo:rsid="000adb5e" style:font-weight-asian="normal" style:font-weight-complex="normal"/>
    </style:style>
    <style:style style:name="T216" style:family="text">
      <style:text-properties fo:font-weight="normal" officeooo:rsid="000cbe41" style:font-weight-asian="normal" style:font-weight-complex="normal"/>
    </style:style>
    <style:style style:name="T217" style:family="text">
      <style:text-properties fo:font-weight="normal" officeooo:rsid="000b51fd" style:font-weight-asian="normal" style:font-weight-complex="normal"/>
    </style:style>
    <style:style style:name="T218" style:family="text">
      <style:text-properties fo:font-weight="normal" officeooo:rsid="000d1f51" style:font-weight-asian="normal" style:font-weight-complex="normal"/>
    </style:style>
    <style:style style:name="T219" style:family="text">
      <style:text-properties fo:font-weight="normal" officeooo:rsid="007c78b2" style:font-weight-asian="normal" style:font-weight-complex="normal"/>
    </style:style>
    <style:style style:name="T220" style:family="text">
      <style:text-properties fo:font-weight="normal" officeooo:rsid="00811bfa" style:font-weight-asian="normal" style:font-weight-complex="normal"/>
    </style:style>
    <style:style style:name="T221" style:family="text">
      <style:text-properties fo:font-weight="normal" officeooo:rsid="0083bfae" style:font-weight-asian="normal" style:font-weight-complex="normal"/>
    </style:style>
    <style:style style:name="T222" style:family="text">
      <style:text-properties fo:font-weight="normal" officeooo:rsid="0083fb85" style:font-weight-asian="normal" style:font-weight-complex="normal"/>
    </style:style>
    <style:style style:name="T223" style:family="text">
      <style:text-properties fo:font-weight="normal" officeooo:rsid="0085f1bc" style:font-weight-asian="normal" style:font-weight-complex="normal"/>
    </style:style>
    <style:style style:name="T224" style:family="text">
      <style:text-properties fo:font-weight="normal" officeooo:rsid="0087e3de" style:font-weight-asian="normal" style:font-weight-complex="normal"/>
    </style:style>
    <style:style style:name="T225" style:family="text">
      <style:text-properties fo:font-weight="normal" officeooo:rsid="0089f2d8" style:font-weight-asian="normal" style:font-weight-complex="normal"/>
    </style:style>
    <style:style style:name="T226" style:family="text">
      <style:text-properties fo:font-weight="normal" officeooo:rsid="008b47e2" style:font-weight-asian="normal" style:font-weight-complex="normal"/>
    </style:style>
    <style:style style:name="T227" style:family="text">
      <style:text-properties fo:font-weight="normal" officeooo:rsid="00bdc1ed" style:font-weight-asian="normal" style:font-weight-complex="normal"/>
    </style:style>
    <style:style style:name="T228" style:family="text">
      <style:text-properties fo:font-weight="normal" officeooo:rsid="00955452" style:font-weight-asian="normal" style:font-weight-complex="normal"/>
    </style:style>
    <style:style style:name="T229" style:family="text">
      <style:text-properties fo:font-weight="normal" officeooo:rsid="00ed35e0" style:font-weight-asian="normal" style:font-weight-complex="normal"/>
    </style:style>
    <style:style style:name="T230" style:family="text">
      <style:text-properties fo:font-weight="normal" officeooo:rsid="00f31413" style:font-weight-asian="normal" style:font-weight-complex="normal"/>
    </style:style>
    <style:style style:name="T231" style:family="text">
      <style:text-properties fo:font-weight="normal" officeooo:rsid="00f54bf8" style:font-weight-asian="normal" style:font-weight-complex="normal"/>
    </style:style>
    <style:style style:name="T232" style:family="text">
      <style:text-properties fo:font-weight="normal" officeooo:rsid="00ffe857" style:font-weight-asian="normal" style:font-weight-complex="normal"/>
    </style:style>
    <style:style style:name="T233" style:family="text">
      <style:text-properties fo:font-weight="normal" officeooo:rsid="002d3378" style:font-weight-asian="normal" style:font-weight-complex="normal"/>
    </style:style>
    <style:style style:name="T234" style:family="text">
      <style:text-properties fo:font-weight="normal" officeooo:rsid="00cfad9e"/>
    </style:style>
    <style:style style:name="T235" style:family="text">
      <style:text-properties officeooo:rsid="00b4761b"/>
    </style:style>
    <style:style style:name="T236" style:family="text">
      <style:text-properties officeooo:rsid="002b64a8"/>
    </style:style>
    <style:style style:name="T237" style:family="text">
      <style:text-properties officeooo:rsid="002bbb88"/>
    </style:style>
    <style:style style:name="T238" style:family="text">
      <style:text-properties officeooo:rsid="002d2181"/>
    </style:style>
    <style:style style:name="T239" style:family="text">
      <style:text-properties officeooo:rsid="005a98e8"/>
    </style:style>
    <style:style style:name="T240" style:family="text">
      <style:text-properties officeooo:rsid="00ca2511"/>
    </style:style>
    <style:style style:name="T241" style:family="text">
      <style:text-properties officeooo:rsid="00e909f9"/>
    </style:style>
    <style:style style:name="T242" style:family="text">
      <style:text-properties officeooo:rsid="00cc0014"/>
    </style:style>
    <style:style style:name="T243" style:family="text">
      <style:text-properties officeooo:rsid="00cfad9e"/>
    </style:style>
    <style:style style:name="T244" style:family="text">
      <style:text-properties officeooo:rsid="007aa278"/>
    </style:style>
    <style:style style:name="T245" style:family="text">
      <style:text-properties officeooo:rsid="007c0091"/>
    </style:style>
    <style:style style:name="T246" style:family="text">
      <style:text-properties officeooo:rsid="0014e929"/>
    </style:style>
    <style:style style:name="T247" style:family="text">
      <style:text-properties officeooo:rsid="00bdc1ed"/>
    </style:style>
    <style:style style:name="T248" style:family="text">
      <style:text-properties officeooo:rsid="00c4eae2"/>
    </style:style>
    <style:style style:name="T249" style:family="text">
      <style:text-properties officeooo:rsid="00c3b655"/>
    </style:style>
    <style:style style:name="T250" style:family="text">
      <style:text-properties officeooo:rsid="00ce53b0"/>
    </style:style>
    <style:style style:name="T251" style:family="text">
      <style:text-properties officeooo:rsid="00cefb91"/>
    </style:style>
    <style:style style:name="T252" style:family="text">
      <style:text-properties fo:font-size="12pt" fo:font-weight="normal" officeooo:rsid="00b91fdd" style:font-size-asian="12pt" style:font-weight-asian="normal" style:font-size-complex="12pt" style:font-weight-complex="normal"/>
    </style:style>
    <style:style style:name="T253" style:family="text">
      <style:text-properties fo:font-size="12pt" officeooo:rsid="00b86f48" style:font-size-asian="12pt" style:font-size-complex="12pt"/>
    </style:style>
    <style:style style:name="T254" style:family="text">
      <style:text-properties officeooo:rsid="00bf3c0a"/>
    </style:style>
    <style:style style:name="T255" style:family="text">
      <style:text-properties officeooo:rsid="00bd3a07"/>
    </style:style>
    <style:style style:name="T256" style:family="text">
      <style:text-properties officeooo:rsid="00c2ea17"/>
    </style:style>
    <style:style style:name="T257" style:family="text">
      <style:text-properties officeooo:rsid="00d118b1"/>
    </style:style>
    <style:style style:name="T258" style:family="text">
      <style:text-properties officeooo:rsid="0014c2d9"/>
    </style:style>
    <style:style style:name="T259" style:family="text">
      <style:text-properties officeooo:rsid="00d2610f"/>
    </style:style>
    <style:style style:name="T260" style:family="text">
      <style:text-properties officeooo:rsid="00de0ccc"/>
    </style:style>
    <style:style style:name="T261" style:family="text">
      <style:text-properties officeooo:rsid="00d4ac98"/>
    </style:style>
    <style:style style:name="T262" style:family="text">
      <style:text-properties officeooo:rsid="001b21cf"/>
    </style:style>
    <style:style style:name="T263" style:family="text">
      <style:text-properties officeooo:rsid="007d3e2a"/>
    </style:style>
    <style:style style:name="T264" style:family="text">
      <style:text-properties officeooo:rsid="00835a70"/>
    </style:style>
    <style:style style:name="T265" style:family="text">
      <style:text-properties officeooo:rsid="00941f03"/>
    </style:style>
    <style:style style:name="T266" style:family="text">
      <style:text-properties officeooo:rsid="003d2e34"/>
    </style:style>
    <style:style style:name="T267" style:family="text">
      <style:text-properties officeooo:rsid="001785ff"/>
    </style:style>
    <style:style style:name="T268" style:family="text">
      <style:text-properties officeooo:rsid="00595711"/>
    </style:style>
    <style:style style:name="T269" style:family="text">
      <style:text-properties officeooo:rsid="0051b0c0"/>
    </style:style>
    <style:style style:name="T270" style:family="text">
      <style:text-properties officeooo:rsid="0041397b"/>
    </style:style>
    <style:style style:name="T271" style:family="text">
      <style:text-properties officeooo:rsid="0042e23b"/>
    </style:style>
    <style:style style:name="T272" style:family="text">
      <style:text-properties officeooo:rsid="009ea75a"/>
    </style:style>
    <style:style style:name="T273" style:family="text">
      <style:text-properties officeooo:rsid="0037a0a8"/>
    </style:style>
    <style:style style:name="T274" style:family="text">
      <style:text-properties officeooo:rsid="0029e1d3"/>
    </style:style>
    <style:style style:name="T275" style:family="text">
      <style:text-properties officeooo:rsid="004c8443"/>
    </style:style>
    <style:style style:name="T276" style:family="text">
      <style:text-properties officeooo:rsid="002bb479"/>
    </style:style>
    <style:style style:name="T277" style:family="text">
      <style:text-properties officeooo:rsid="002f69d6"/>
    </style:style>
    <style:style style:name="T278" style:family="text">
      <style:text-properties officeooo:rsid="002bebeb"/>
    </style:style>
    <style:style style:name="T279" style:family="text">
      <style:text-properties officeooo:rsid="002784a4"/>
    </style:style>
    <style:style style:name="T280" style:family="text">
      <style:text-properties officeooo:rsid="00a072b8"/>
    </style:style>
    <style:style style:name="T281" style:family="text">
      <style:text-properties officeooo:rsid="009f293c"/>
    </style:style>
    <style:style style:name="T282" style:family="text">
      <style:text-properties officeooo:rsid="002f2a7a"/>
    </style:style>
    <style:style style:name="T283" style:family="text">
      <style:text-properties officeooo:rsid="004acc61"/>
    </style:style>
    <style:style style:name="T284" style:family="text">
      <style:text-properties officeooo:rsid="004f79c8"/>
    </style:style>
    <style:style style:name="T285" style:family="text">
      <style:text-properties officeooo:rsid="004f839d"/>
    </style:style>
    <style:style style:name="T286" style:family="text">
      <style:text-properties officeooo:rsid="0051528d"/>
    </style:style>
    <style:style style:name="T287" style:family="text">
      <style:text-properties fo:font-style="italic"/>
    </style:style>
    <style:style style:name="T288" style:family="text">
      <style:text-properties fo:font-style="italic" officeooo:rsid="0044fc34"/>
    </style:style>
    <style:style style:name="T289" style:family="text">
      <style:text-properties fo:font-style="italic" fo:font-weight="bold" style:font-weight-asian="bold" style:font-weight-complex="bold"/>
    </style:style>
    <style:style style:name="T290" style:family="text">
      <style:text-properties fo:font-style="italic" fo:font-weight="bold" officeooo:rsid="00a394e3" style:font-weight-asian="bold" style:font-weight-complex="bold"/>
    </style:style>
    <style:style style:name="T291" style:family="text">
      <style:text-properties fo:font-style="italic" fo:font-weight="bold" officeooo:rsid="003c44a3"/>
    </style:style>
    <style:style style:name="T292" style:family="text">
      <style:text-properties fo:font-style="italic" officeooo:rsid="00aa585e"/>
    </style:style>
    <style:style style:name="T293" style:family="text">
      <style:text-properties fo:font-style="italic" officeooo:rsid="004a1e6a"/>
    </style:style>
    <style:style style:name="T294" style:family="text">
      <style:text-properties fo:font-style="italic" style:font-style-asian="italic" style:font-style-complex="italic"/>
    </style:style>
    <style:style style:name="T295" style:family="text">
      <style:text-properties fo:font-style="italic" officeooo:rsid="003c44a3"/>
    </style:style>
    <style:style style:name="T296" style:family="text">
      <style:text-properties fo:font-style="italic" fo:font-weight="normal" style:font-weight-asian="normal" style:font-weight-complex="normal"/>
    </style:style>
    <style:style style:name="T297" style:family="text">
      <style:text-properties officeooo:rsid="0050e21c"/>
    </style:style>
    <style:style style:name="T298" style:family="text">
      <style:text-properties fo:font-style="normal" fo:font-weight="normal" officeooo:rsid="0044fc34" style:font-style-asian="normal" style:font-weight-asian="normal" style:font-style-complex="normal" style:font-weight-complex="normal"/>
    </style:style>
    <style:style style:name="T299" style:family="text">
      <style:text-properties fo:font-style="normal" fo:font-weight="normal" officeooo:rsid="0048df21" style:font-style-asian="normal" style:font-weight-asian="normal" style:font-style-complex="normal" style:font-weight-complex="normal"/>
    </style:style>
    <style:style style:name="T300" style:family="text">
      <style:text-properties fo:font-style="normal" style:font-style-asian="normal" style:font-style-complex="normal"/>
    </style:style>
    <style:style style:name="T301" style:family="text">
      <style:text-properties fo:font-style="normal" officeooo:rsid="004ed02c" style:font-style-asian="normal" style:font-style-complex="normal"/>
    </style:style>
    <style:style style:name="T302" style:family="text">
      <style:text-properties fo:font-style="normal" officeooo:rsid="00129159" style:font-style-asian="normal" style:font-style-complex="normal"/>
    </style:style>
    <style:style style:name="T303" style:family="text">
      <style:text-properties fo:font-style="normal" officeooo:rsid="000adb5e" style:font-style-asian="normal" style:font-style-complex="normal"/>
    </style:style>
    <style:style style:name="T304" style:family="text">
      <style:text-properties fo:font-style="normal" officeooo:rsid="0070637f" style:font-style-asian="normal" style:font-style-complex="normal"/>
    </style:style>
    <style:style style:name="T305" style:family="text">
      <style:text-properties fo:font-style="normal" officeooo:rsid="0081fe67" style:font-style-asian="normal" style:font-style-complex="normal"/>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fo:font-style="normal" fo:font-weight="bold" officeooo:rsid="000cbe41" style:font-style-asian="normal" style:font-weight-asian="bold" style:font-style-complex="normal" style:font-weight-complex="bold"/>
    </style:style>
    <style:style style:name="T308" style:family="text">
      <style:text-properties fo:font-style="normal" fo:font-weight="bold" officeooo:rsid="00129159" style:font-style-asian="normal" style:font-weight-asian="bold" style:font-style-complex="normal" style:font-weight-complex="bold"/>
    </style:style>
    <style:style style:name="T309" style:family="text">
      <style:text-properties fo:font-style="normal" fo:font-weight="bold" style:font-style-asian="normal" style:font-style-complex="normal"/>
    </style:style>
    <style:style style:name="T310" style:family="text">
      <style:text-properties officeooo:rsid="0044fc34"/>
    </style:style>
    <style:style style:name="T311" style:family="text">
      <style:text-properties officeooo:rsid="00a24247"/>
    </style:style>
    <style:style style:name="T312" style:family="text">
      <style:text-properties officeooo:rsid="0049e73b"/>
    </style:style>
    <style:style style:name="T313" style:family="text">
      <style:text-properties officeooo:rsid="00451e1d"/>
    </style:style>
    <style:style style:name="T314" style:family="text">
      <style:text-properties officeooo:rsid="0051ca48"/>
    </style:style>
    <style:style style:name="T315" style:family="text">
      <style:text-properties officeooo:rsid="004902f3"/>
    </style:style>
    <style:style style:name="T316" style:family="text">
      <style:text-properties officeooo:rsid="004643ef"/>
    </style:style>
    <style:style style:name="T317" style:family="text">
      <style:text-properties officeooo:rsid="0048254e"/>
    </style:style>
    <style:style style:name="T318" style:family="text">
      <style:text-properties officeooo:rsid="0046e7fa"/>
    </style:style>
    <style:style style:name="T319" style:family="text">
      <style:text-properties officeooo:rsid="0046f2f1"/>
    </style:style>
    <style:style style:name="T320" style:family="text">
      <style:text-properties officeooo:rsid="00499fcb"/>
    </style:style>
    <style:style style:name="T321" style:family="text">
      <style:text-properties officeooo:rsid="0052ed98"/>
    </style:style>
    <style:style style:name="T322" style:family="text">
      <style:text-properties officeooo:rsid="00488b7f"/>
    </style:style>
    <style:style style:name="T323" style:family="text">
      <style:text-properties officeooo:rsid="00340650"/>
    </style:style>
    <style:style style:name="T324" style:family="text">
      <style:text-properties fo:font-variant="normal" fo:text-transform="none" fo:color="#181818" loext:opacity="100%" fo:letter-spacing="normal"/>
    </style:style>
    <style:style style:name="T325" style:family="text">
      <style:text-properties fo:font-variant="normal" fo:text-transform="none" fo:color="#181818" loext:opacity="100%" style:font-name="Merriweather" fo:font-size="10.5pt" fo:letter-spacing="normal" fo:font-style="normal" fo:font-weight="normal"/>
    </style:style>
    <style:style style:name="T326" style:family="text">
      <style:text-properties fo:font-variant="normal" fo:text-transform="none" fo:color="#181818" loext:opacity="100%" fo:font-size="10.5pt" fo:letter-spacing="normal" fo:font-style="normal" fo:font-weight="normal"/>
    </style:style>
    <style:style style:name="T327" style:family="text">
      <style:text-properties fo:font-variant="normal" fo:text-transform="none" fo:color="#181818" loext:opacity="100%" fo:font-size="10.5pt" fo:letter-spacing="normal" fo:font-style="normal" fo:font-weight="normal" officeooo:rsid="00340650"/>
    </style:style>
    <style:style style:name="T328" style:family="text">
      <style:text-properties fo:font-variant="normal" fo:text-transform="none" fo:color="#333333" loext:opacity="100%" style:font-name="Lato" fo:font-size="10.5pt" fo:letter-spacing="normal" fo:font-style="normal" fo:font-weight="normal"/>
    </style:style>
    <style:style style:name="T329" style:family="text">
      <style:text-properties fo:font-variant="normal" fo:text-transform="none" fo:color="#333333" loext:opacity="100%" style:text-line-through-style="none" style:text-line-through-type="none" style:font-name="Lato" fo:font-size="10.5pt" fo:letter-spacing="normal" fo:font-style="normal" style:text-underline-style="none" fo:font-weight="bold" style:text-blinking="false"/>
    </style:style>
    <style:style style:name="T330" style:family="text">
      <style:text-properties officeooo:rsid="0048df21"/>
    </style:style>
    <style:style style:name="T331" style:family="text">
      <style:text-properties officeooo:rsid="00a394e3"/>
    </style:style>
    <style:style style:name="T332" style:family="text">
      <style:text-properties officeooo:rsid="0025c730"/>
    </style:style>
    <style:style style:name="T333" style:family="text">
      <style:text-properties officeooo:rsid="00497603"/>
    </style:style>
    <style:style style:name="T334" style:family="text">
      <style:text-properties officeooo:rsid="0049d8ae"/>
    </style:style>
    <style:style style:name="T335" style:family="text">
      <style:text-properties officeooo:rsid="00a6c2a9"/>
    </style:style>
    <style:style style:name="T336" style:family="text">
      <style:text-properties officeooo:rsid="00a962ba"/>
    </style:style>
    <style:style style:name="T337" style:family="text">
      <style:text-properties officeooo:rsid="00a81783"/>
    </style:style>
    <style:style style:name="T338" style:family="text">
      <style:text-properties officeooo:rsid="004a1e6a"/>
    </style:style>
    <style:style style:name="T339" style:family="text">
      <style:text-properties officeooo:rsid="004a09db"/>
    </style:style>
    <style:style style:name="T340" style:family="text">
      <style:text-properties officeooo:rsid="00aae173"/>
    </style:style>
    <style:style style:name="T341" style:family="text">
      <style:text-properties officeooo:rsid="003cca59"/>
    </style:style>
    <style:style style:name="T342" style:family="text">
      <style:text-properties officeooo:rsid="004bf568"/>
    </style:style>
    <style:style style:name="T343" style:family="text">
      <style:text-properties officeooo:rsid="004d7130"/>
    </style:style>
    <style:style style:name="T344" style:family="text">
      <style:text-properties officeooo:rsid="00267b30"/>
    </style:style>
    <style:style style:name="T345" style:family="text">
      <style:text-properties officeooo:rsid="0053d1b3"/>
    </style:style>
    <style:style style:name="T346" style:family="text">
      <style:text-properties officeooo:rsid="00545f58"/>
    </style:style>
    <style:style style:name="T347" style:family="text">
      <style:text-properties style:text-underline-style="none" fo:font-weight="normal" style:font-weight-asian="normal" style:font-weight-complex="normal"/>
    </style:style>
    <style:style style:name="T348" style:family="text">
      <style:text-properties officeooo:rsid="0032a5ea"/>
    </style:style>
    <style:style style:name="T349" style:family="text">
      <style:text-properties officeooo:rsid="00287682"/>
    </style:style>
    <style:style style:name="T350" style:family="text">
      <style:text-properties officeooo:rsid="00405712"/>
    </style:style>
    <style:style style:name="T351" style:family="text">
      <style:text-properties officeooo:rsid="00365c65"/>
    </style:style>
    <style:style style:name="T352" style:family="text">
      <style:text-properties officeooo:rsid="004ed02c"/>
    </style:style>
    <style:style style:name="T353" style:family="text">
      <style:text-properties officeooo:rsid="004ffc67"/>
    </style:style>
    <style:style style:name="T354" style:family="text">
      <style:text-properties officeooo:rsid="003349c6"/>
    </style:style>
    <style:style style:name="T355" style:family="text">
      <style:text-properties officeooo:rsid="005b5188"/>
    </style:style>
    <style:style style:name="T356" style:family="text">
      <style:text-properties officeooo:rsid="005ba4d6"/>
    </style:style>
    <style:style style:name="T357" style:family="text">
      <style:text-properties officeooo:rsid="004de60e"/>
    </style:style>
    <style:style style:name="T358" style:family="text">
      <style:text-properties officeooo:rsid="0022e7ac"/>
    </style:style>
    <style:style style:name="T359" style:family="text">
      <style:text-properties officeooo:rsid="0026816e"/>
    </style:style>
    <style:style style:name="T360" style:family="text">
      <style:text-properties officeooo:rsid="00387a1f"/>
    </style:style>
    <style:style style:name="T361" style:family="text">
      <style:text-properties officeooo:rsid="003a5c6b"/>
    </style:style>
    <style:style style:name="T362" style:family="text">
      <style:text-properties officeooo:rsid="003ae524"/>
    </style:style>
    <style:style style:name="T363" style:family="text">
      <style:text-properties officeooo:rsid="005118f1"/>
    </style:style>
    <style:style style:name="T364" style:family="text">
      <style:text-properties officeooo:rsid="005163ca"/>
    </style:style>
    <style:style style:name="T365" style:family="text">
      <style:text-properties officeooo:rsid="0052e8eb"/>
    </style:style>
    <style:style style:name="T366" style:family="text">
      <style:text-properties officeooo:rsid="005315e6"/>
    </style:style>
    <style:style style:name="T367" style:family="text">
      <style:text-properties officeooo:rsid="0024b38a"/>
    </style:style>
    <style:style style:name="T368" style:family="text">
      <style:text-properties officeooo:rsid="009b67a5"/>
    </style:style>
    <style:style style:name="T369" style:family="text">
      <style:text-properties officeooo:rsid="003b2917"/>
    </style:style>
    <style:style style:name="T370" style:family="text">
      <style:text-properties officeooo:rsid="00536354"/>
    </style:style>
    <style:style style:name="T371" style:family="text">
      <style:text-properties officeooo:rsid="002bc90d"/>
    </style:style>
    <style:style style:name="T372" style:family="text">
      <style:text-properties officeooo:rsid="00544f40"/>
    </style:style>
    <style:style style:name="T373" style:family="text">
      <style:text-properties officeooo:rsid="00589420"/>
    </style:style>
    <style:style style:name="T374" style:family="text">
      <style:text-properties officeooo:rsid="0059a368"/>
    </style:style>
    <style:style style:name="T375" style:family="text">
      <style:text-properties officeooo:rsid="0054c7a6"/>
    </style:style>
    <style:style style:name="T376" style:family="text">
      <style:text-properties officeooo:rsid="00558580"/>
    </style:style>
    <style:style style:name="T377" style:family="text">
      <style:text-properties officeooo:rsid="0055f0ef"/>
    </style:style>
    <style:style style:name="T378" style:family="text">
      <style:text-properties officeooo:rsid="00572703"/>
    </style:style>
    <style:style style:name="T379" style:family="text">
      <style:text-properties officeooo:rsid="00584cfe"/>
    </style:style>
    <style:style style:name="T380" style:family="text">
      <style:text-properties officeooo:rsid="0038fff7"/>
    </style:style>
    <style:style style:name="T381" style:family="text">
      <style:text-properties officeooo:rsid="002de66f"/>
    </style:style>
    <style:style style:name="T382" style:family="text">
      <style:text-properties officeooo:rsid="005604da"/>
    </style:style>
    <style:style style:name="T383" style:family="text">
      <style:text-properties officeooo:rsid="0057a534"/>
    </style:style>
    <style:style style:name="T384" style:family="text">
      <style:text-properties officeooo:rsid="003305a0"/>
    </style:style>
    <style:style style:name="T385" style:family="text">
      <style:text-properties officeooo:rsid="00405a7f"/>
    </style:style>
    <style:style style:name="T386" style:family="text">
      <style:text-properties officeooo:rsid="00e723d8"/>
    </style:style>
    <style:style style:name="T387" style:family="text">
      <style:text-properties officeooo:rsid="000e2fcf"/>
    </style:style>
    <style:style style:name="T388" style:family="text">
      <style:text-properties officeooo:rsid="0010bb08"/>
    </style:style>
    <style:style style:name="T389" style:family="text">
      <style:text-properties officeooo:rsid="00126893"/>
    </style:style>
    <style:style style:name="T390" style:family="text">
      <style:text-properties officeooo:rsid="00135f1e"/>
    </style:style>
    <style:style style:name="T391" style:family="text">
      <style:text-properties officeooo:rsid="00150bbd"/>
    </style:style>
    <style:style style:name="T392" style:family="text">
      <style:text-properties officeooo:rsid="001a67c3"/>
    </style:style>
    <style:style style:name="T393" style:family="text">
      <style:text-properties officeooo:rsid="001b64c2"/>
    </style:style>
    <style:style style:name="T394" style:family="text">
      <style:text-properties officeooo:rsid="001b822c"/>
    </style:style>
    <style:style style:name="T395" style:family="text">
      <style:text-properties style:text-position="super 58%" style:font-name="roboto" fo:font-weight="normal" officeooo:rsid="001e239c" style:font-weight-asian="normal" style:font-weight-complex="normal"/>
    </style:style>
    <style:style style:name="T396" style:family="text">
      <style:text-properties style:text-position="super 58%" style:font-name="roboto" officeooo:rsid="00c96c4b"/>
    </style:style>
    <style:style style:name="T397" style:family="text">
      <style:text-properties officeooo:rsid="00236e55"/>
    </style:style>
    <style:style style:name="T398" style:family="text">
      <style:text-properties officeooo:rsid="00274c6e"/>
    </style:style>
    <style:style style:name="T399" style:family="text">
      <style:text-properties officeooo:rsid="0030c895"/>
    </style:style>
    <style:style style:name="T400" style:family="text">
      <style:text-properties officeooo:rsid="0033561f"/>
    </style:style>
    <style:style style:name="T401" style:family="text">
      <style:text-properties officeooo:rsid="00376014"/>
    </style:style>
    <style:style style:name="T402" style:family="text">
      <style:text-properties officeooo:rsid="00390517"/>
    </style:style>
    <style:style style:name="T403" style:family="text">
      <style:text-properties officeooo:rsid="00397eda"/>
    </style:style>
    <style:style style:name="T404" style:family="text">
      <style:text-properties officeooo:rsid="003a99c2"/>
    </style:style>
    <style:style style:name="T405" style:family="text">
      <style:text-properties officeooo:rsid="003c44a3"/>
    </style:style>
    <style:style style:name="T406" style:family="text">
      <style:text-properties officeooo:rsid="003dafe3"/>
    </style:style>
    <style:style style:name="T407" style:family="text">
      <style:text-properties officeooo:rsid="003e5ca5"/>
    </style:style>
    <style:style style:name="T408" style:family="text">
      <style:text-properties officeooo:rsid="003eafef"/>
    </style:style>
    <style:style style:name="T409" style:family="text">
      <style:text-properties officeooo:rsid="003f72b0"/>
    </style:style>
    <style:style style:name="T410" style:family="text">
      <style:text-properties officeooo:rsid="00414c09"/>
    </style:style>
    <style:style style:name="T411" style:family="text">
      <style:text-properties officeooo:rsid="0041d13b"/>
    </style:style>
    <style:style style:name="T412" style:family="text">
      <style:text-properties officeooo:rsid="00451b0b"/>
    </style:style>
    <style:style style:name="T413" style:family="text">
      <style:text-properties officeooo:rsid="00469c41"/>
    </style:style>
    <style:style style:name="T414" style:family="text">
      <style:text-properties officeooo:rsid="004877f4"/>
    </style:style>
    <style:style style:name="T415" style:family="text">
      <style:text-properties officeooo:rsid="004b7dd7"/>
    </style:style>
    <style:style style:name="T416" style:family="text">
      <style:text-properties officeooo:rsid="004bafa8"/>
    </style:style>
    <style:style style:name="T417" style:family="text">
      <style:text-properties officeooo:rsid="004ca0ec"/>
    </style:style>
    <style:style style:name="T418" style:family="text">
      <style:text-properties officeooo:rsid="004dacf9"/>
    </style:style>
    <style:style style:name="T419" style:family="text">
      <style:text-properties officeooo:rsid="004dd269"/>
    </style:style>
    <style:style style:name="T420" style:family="text">
      <style:text-properties officeooo:rsid="004ecc5a"/>
    </style:style>
    <style:style style:name="T421" style:family="text">
      <style:text-properties officeooo:rsid="00519ef2"/>
    </style:style>
    <style:style style:name="T422" style:family="text">
      <style:text-properties officeooo:rsid="00536f0f"/>
    </style:style>
    <style:style style:name="T423" style:family="text">
      <style:text-properties officeooo:rsid="005cb5df"/>
    </style:style>
    <style:style style:name="T424" style:family="text">
      <style:text-properties officeooo:rsid="005e06ff"/>
    </style:style>
    <style:style style:name="T425" style:family="text">
      <style:text-properties officeooo:rsid="005e0dcc"/>
    </style:style>
    <style:style style:name="T426" style:family="text">
      <style:text-properties officeooo:rsid="00140bfe"/>
    </style:style>
    <style:style style:name="T427" style:family="text">
      <style:text-properties officeooo:rsid="0009963a"/>
    </style:style>
    <style:style style:name="T428" style:family="text">
      <style:text-properties officeooo:rsid="000cbe41"/>
    </style:style>
    <style:style style:name="T429" style:family="text">
      <style:text-properties officeooo:rsid="000adb5e"/>
    </style:style>
    <style:style style:name="T430" style:family="text">
      <style:text-properties officeooo:rsid="00129159"/>
    </style:style>
    <style:style style:name="T431" style:family="text">
      <style:text-properties officeooo:rsid="0007c6a8"/>
    </style:style>
    <style:style style:name="T432" style:family="text">
      <style:text-properties officeooo:rsid="00076f4f"/>
    </style:style>
    <style:style style:name="T433" style:family="text">
      <style:text-properties officeooo:rsid="000d1f51"/>
    </style:style>
    <style:style style:name="T434" style:family="text">
      <style:text-properties officeooo:rsid="00111d38"/>
    </style:style>
    <style:style style:name="T435" style:family="text">
      <style:text-properties officeooo:rsid="006a3d02"/>
    </style:style>
    <style:style style:name="T436" style:family="text">
      <style:text-properties officeooo:rsid="006b5f71"/>
    </style:style>
    <style:style style:name="T437" style:family="text">
      <style:text-properties officeooo:rsid="006f5baa"/>
    </style:style>
    <style:style style:name="T438" style:family="text">
      <style:text-properties officeooo:rsid="0070637f"/>
    </style:style>
    <style:style style:name="T439" style:family="text">
      <style:text-properties officeooo:rsid="00811bfa"/>
    </style:style>
    <style:style style:name="T440" style:family="text">
      <style:text-properties officeooo:rsid="0081fe67"/>
    </style:style>
    <style:style style:name="T441" style:family="text">
      <style:text-properties officeooo:rsid="0083bfae"/>
    </style:style>
    <style:style style:name="T442" style:family="text">
      <style:text-properties officeooo:rsid="0085f1bc"/>
    </style:style>
    <style:style style:name="T443" style:family="text">
      <style:text-properties officeooo:rsid="0087e3de"/>
    </style:style>
    <style:style style:name="T444" style:family="text">
      <style:text-properties officeooo:rsid="008b47e2"/>
    </style:style>
    <style:style style:name="T445" style:family="text">
      <style:text-properties officeooo:rsid="008df45c"/>
    </style:style>
    <style:style style:name="T446" style:family="text">
      <style:text-properties style:font-name="Google Sans Text"/>
    </style:style>
    <style:style style:name="T447" style:family="text">
      <style:text-properties style:font-name="Google Sans Text" fo:font-weight="normal" style:font-weight-asian="normal" style:font-weight-complex="normal"/>
    </style:style>
    <style:style style:name="T448" style:family="text">
      <style:text-properties style:font-name="Google Sans Text" fo:font-weight="normal" officeooo:rsid="006a3d02" style:font-weight-asian="normal" style:font-weight-complex="normal"/>
    </style:style>
    <style:style style:name="T449" style:family="text">
      <style:text-properties style:font-name="Google Sans Text" fo:font-weight="normal" officeooo:rsid="0091b763" style:font-weight-asian="normal" style:font-weight-complex="normal"/>
    </style:style>
    <style:style style:name="T450" style:family="text">
      <style:text-properties style:font-name="Google Sans Text" fo:font-weight="bold"/>
    </style:style>
    <style:style style:name="T451" style:family="text">
      <style:text-properties officeooo:rsid="0094e6cf"/>
    </style:style>
    <style:style style:name="T452" style:family="text">
      <style:text-properties fo:color="#1f1f1f" loext:opacity="100%" style:font-name="Google Sans Text" loext:padding="0in" loext:border="none"/>
    </style:style>
    <style:style style:name="T453" style:family="text">
      <style:text-properties officeooo:rsid="0099877e"/>
    </style:style>
    <style:style style:name="T454" style:family="text">
      <style:text-properties officeooo:rsid="001e23cc"/>
    </style:style>
    <style:style style:name="T455" style:family="text">
      <style:text-properties officeooo:rsid="00381652"/>
    </style:style>
    <style:style style:name="T456" style:family="text">
      <style:text-properties officeooo:rsid="002d3378"/>
    </style:style>
    <style:style style:name="T457" style:family="text">
      <style:text-properties officeooo:rsid="009ae0ac"/>
    </style:style>
    <style:style style:name="T458" style:family="text">
      <style:text-properties officeooo:rsid="0036bbcc"/>
    </style:style>
    <style:style style:name="T459" style:family="text">
      <style:text-properties officeooo:rsid="009d243c"/>
    </style:style>
    <style:style style:name="T460" style:family="text">
      <style:text-properties officeooo:rsid="00a349ab"/>
    </style:style>
    <style:style style:name="T461" style:family="text">
      <style:text-properties officeooo:rsid="00ad0440"/>
    </style:style>
    <style:style style:name="T462" style:family="text">
      <style:text-properties officeooo:rsid="00baa3d9"/>
    </style:style>
    <style:style style:name="T463" style:family="text">
      <style:text-properties officeooo:rsid="00baf822"/>
    </style:style>
    <style:style style:name="T464" style:family="text">
      <style:text-properties officeooo:rsid="00bcc613"/>
    </style:style>
    <style:style style:name="T465" style:family="text">
      <style:text-properties officeooo:rsid="00c593f6"/>
    </style:style>
    <style:style style:name="T466" style:family="text">
      <style:text-properties officeooo:rsid="00c77e5b"/>
    </style:style>
    <style:style style:name="T467" style:family="text">
      <style:text-properties officeooo:rsid="00c7ec3d"/>
    </style:style>
    <style:style style:name="T468" style:family="text">
      <style:text-properties officeooo:rsid="00c8ae4f"/>
    </style:style>
    <style:style style:name="T469" style:family="text">
      <style:text-properties officeooo:rsid="00ca9b30"/>
    </style:style>
    <style:style style:name="T470" style:family="text">
      <style:text-properties officeooo:rsid="00cacd0b"/>
    </style:style>
    <style:style style:name="T471" style:family="text">
      <style:text-properties officeooo:rsid="0068af0b"/>
    </style:style>
    <style:style style:name="T472" style:family="text">
      <style:text-properties officeooo:rsid="000c7646"/>
    </style:style>
    <style:style style:name="T473" style:family="text">
      <style:text-properties officeooo:rsid="00d94362"/>
    </style:style>
    <style:style style:name="T474" style:family="text">
      <style:text-properties officeooo:rsid="00e0934a"/>
    </style:style>
    <style:style style:name="T475" style:family="text">
      <style:text-properties officeooo:rsid="00e17e5b"/>
    </style:style>
    <style:style style:name="T476" style:family="text">
      <style:text-properties officeooo:rsid="00e3ca0e"/>
    </style:style>
    <style:style style:name="T477" style:family="text">
      <style:text-properties officeooo:rsid="00ebdcf8"/>
    </style:style>
    <style:style style:name="T478" style:family="text">
      <style:text-properties officeooo:rsid="00ed35e0"/>
    </style:style>
    <style:style style:name="T479" style:family="text">
      <style:text-properties officeooo:rsid="00f31413"/>
    </style:style>
    <style:style style:name="T480" style:family="text">
      <style:text-properties officeooo:rsid="00f4864b"/>
    </style:style>
    <style:style style:name="T481" style:family="text">
      <style:text-properties officeooo:rsid="00f54bf8"/>
    </style:style>
    <style:style style:name="T482" style:family="text">
      <style:text-properties officeooo:rsid="00f82f31"/>
    </style:style>
    <style:style style:name="T483" style:family="text">
      <style:text-properties officeooo:rsid="00ffe857"/>
    </style:style>
    <style:style style:name="T484" style:family="text">
      <style:text-properties officeooo:rsid="010516ec"/>
    </style:style>
    <style:style style:name="T485" style:family="text">
      <style:text-properties officeooo:rsid="010cc76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85"><text:a xlink:type="simple" xlink:href="#__RefHeading___Toc11703_959624642" text:style-name="Index_20_Link" text:visited-style-name="Index_20_Link">GitGalaxy Technical Specifications v4.1 (Master Blueprint)<text:tab/>9</text:a></text:p>
          <text:p text:style-name="P186"><text:a xlink:type="simple" xlink:href="#__RefHeading___Toc11705_959624642" text:style-name="Index_20_Link" text:visited-style-name="Index_20_Link">1. Foundation &amp; Architecture<text:tab/>9</text:a></text:p>
          <text:p text:style-name="P187"><text:a xlink:type="simple" xlink:href="#__RefHeading___Toc11707_959624642" text:style-name="Index_20_Link" text:visited-style-name="Index_20_Link">1.1 Project Overview<text:tab/>9</text:a></text:p>
          <text:p text:style-name="P187"><text:a xlink:type="simple" xlink:href="#__RefHeading___Toc11709_959624642" text:style-name="Index_20_Link" text:visited-style-name="Index_20_Link">1.2 Visualizing Complexity<text:tab/>11</text:a></text:p>
          <text:p text:style-name="P187"><text:a xlink:type="simple" xlink:href="#__RefHeading___Toc11711_959624642" text:style-name="Index_20_Link" text:visited-style-name="Index_20_Link">1.3 System Architecture: High-Level Stack<text:tab/>12</text:a></text:p>
          <text:p text:style-name="P187"><text:a xlink:type="simple" xlink:href="#__RefHeading___Toc11713_959624642" text:style-name="Index_20_Link" text:visited-style-name="Index_20_Link">1.4 System File Map: Backend (Scanner) vs. Frontend (Viewer)<text:tab/>13</text:a></text:p>
          <text:p text:style-name="P187"><text:a xlink:type="simple" xlink:href="#__RefHeading___Toc32686_2209633182" text:style-name="Index_20_Link" text:visited-style-name="Index_20_Link">1.5 The Security &amp; Privacy Protocol: Zero-Trust Local Analysis<text:tab/>14</text:a></text:p>
          <text:p text:style-name="P188"><text:a xlink:type="simple" xlink:href="#__RefHeading___Toc32688_2209633182" text:style-name="Index_20_Link" text:visited-style-name="Index_20_Link">1.5.1 Overview: "Your Code Never Leaves Your Computer"<text:tab/>14</text:a></text:p>
          <text:p text:style-name="P188"><text:a xlink:type="simple" xlink:href="#__RefHeading___Toc32690_2209633182" text:style-name="Index_20_Link" text:visited-style-name="Index_20_Link">1.5.2 The "Privacy Engine": ZipLoader.js<text:tab/>14</text:a></text:p>
          <text:p text:style-name="P188"><text:a xlink:type="simple" xlink:href="#__RefHeading___Toc32692_2209633182" text:style-name="Index_20_Link" text:visited-style-name="Index_20_Link">1.5.3 Implementation Detail: Security Safeguards<text:tab/>15</text:a></text:p>
          <text:p text:style-name="P186"><text:a xlink:type="simple" xlink:href="#__RefHeading___Toc11735_959624642" text:style-name="Index_20_Link" text:visited-style-name="Index_20_Link">2. Converting code into space and color info<text:tab/>15</text:a></text:p>
          <text:p text:style-name="P187"><text:a xlink:type="simple" xlink:href="#__RefHeading___Toc139657_2813440148" text:style-name="Index_20_Link" text:visited-style-name="Index_20_Link">2.1 How we represent complexity as physical structure<text:tab/>15</text:a></text:p>
          <text:p text:style-name="P188"><text:a xlink:type="simple" xlink:href="#__RefHeading___Toc139659_2813440148" text:style-name="Index_20_Link" text:visited-style-name="Index_20_Link">2.1.A. Star’s Size<text:tab/>16</text:a></text:p>
          <text:p text:style-name="P189"><text:a xlink:type="simple" xlink:href="#__RefHeading___Toc42110_730389025" text:style-name="Index_20_Link" text:visited-style-name="Index_20_Link">2.1.A.1. The Philosophy: Physical Presence<text:tab/>16</text:a></text:p>
          <text:p text:style-name="P189"><text:a xlink:type="simple" xlink:href="#__RefHeading___Toc42112_730389025" text:style-name="Index_20_Link" text:visited-style-name="Index_20_Link">2.1.A.2. The Inputs: Measuring Mass<text:tab/>16</text:a></text:p>
          <text:p text:style-name="P189"><text:a xlink:type="simple" xlink:href="#__RefHeading___Toc42114_730389025" text:style-name="Index_20_Link" text:visited-style-name="Index_20_Link">2.1.A.3. The Equation: Structural Mass &amp; Visual Radius<text:tab/>17</text:a></text:p>
          <text:p text:style-name="P189"><text:a xlink:type="simple" xlink:href="#__RefHeading___Toc42116_730389025" text:style-name="Index_20_Link" text:visited-style-name="Index_20_Link">2.1.A.4. The Visual Thresholds (The Scale)<text:tab/>17</text:a></text:p>
          <text:p text:style-name="P188"><text:a xlink:type="simple" xlink:href="#__RefHeading___Toc139738_2813440148" text:style-name="Index_20_Link" text:visited-style-name="Index_20_Link">2.1.B. Star’s Pulse Rate<text:tab/>18</text:a></text:p>
          <text:p text:style-name="P189"><text:a xlink:type="simple" xlink:href="#__RefHeading___Toc139669_2813440148" text:style-name="Index_20_Link" text:visited-style-name="Index_20_Link">2.1.B.1. The Philosophy: Bioluminescence<text:tab/>18</text:a></text:p>
          <text:p text:style-name="P189"><text:a xlink:type="simple" xlink:href="#__RefHeading___Toc139671_2813440148" text:style-name="Index_20_Link" text:visited-style-name="Index_20_Link">2.1.B.2. The Inputs: Measuring Gravity<text:tab/>18</text:a></text:p>
          <text:p text:style-name="P189"><text:a xlink:type="simple" xlink:href="#__RefHeading___Toc139673_2813440148" text:style-name="Index_20_Link" text:visited-style-name="Index_20_Link">2.1.B.3. The Equation: Intensity Mapping<text:tab/>18</text:a></text:p>
          <text:p text:style-name="P189"><text:a xlink:type="simple" xlink:href="#__RefHeading___Toc139740_2813440148" text:style-name="Index_20_Link" text:visited-style-name="Index_20_Link">2.1.B.4. Equation:<text:tab/>19</text:a></text:p>
          <text:p text:style-name="P189"><text:a xlink:type="simple" xlink:href="#__RefHeading___Toc139675_2813440148" text:style-name="Index_20_Link" text:visited-style-name="Index_20_Link">2.1.B.5. The Visual Thresholds (The Resonance)<text:tab/>19</text:a></text:p>
          <text:p text:style-name="P188"><text:a xlink:type="simple" xlink:href="#__RefHeading___Toc186402_2813440148" text:style-name="Index_20_Link" text:visited-style-name="Index_20_Link">2.1.C Star’s Shape<text:tab/>19</text:a></text:p>
          <text:p text:style-name="P189"><text:a xlink:type="simple" xlink:href="#__RefHeading___Toc186404_2813440148" text:style-name="Index_20_Link" text:visited-style-name="Index_20_Link">2.1.C.1. The Philosophy: Smooth vs. Sharp<text:tab/>20</text:a></text:p>
          <text:p text:style-name="P189"><text:a xlink:type="simple" xlink:href="#__RefHeading___Toc139687_2813440148%20Copy%201" text:style-name="Index_20_Link" text:visited-style-name="Index_20_Link">2.1.C.2. The Philosophy: Thinking vs. Speaking<text:tab/>20</text:a></text:p>
          <text:p text:style-name="P189"><text:a xlink:type="simple" xlink:href="#__RefHeading___Toc186406_2813440148" text:style-name="Index_20_Link" text:visited-style-name="Index_20_Link">2.1.C.3. The Inputs: The control flow ratio<text:tab/>20</text:a></text:p>
          <text:p text:style-name="P189"><text:a xlink:type="simple" xlink:href="#__RefHeading___Toc139691_2813440148%20Copy%201" text:style-name="Index_20_Link" text:visited-style-name="Index_20_Link">2.1.C.4. The Equation<text:tab/>21</text:a></text:p>
          <text:p text:style-name="P189"><text:a xlink:type="simple" xlink:href="#__RefHeading___Toc186408_2813440148" text:style-name="Index_20_Link" text:visited-style-name="Index_20_Link">2.1.C.5. The Equation: 5-Tier Morphing<text:tab/>21</text:a></text:p>
          <text:p text:style-name="P189"><text:a xlink:type="simple" xlink:href="#__RefHeading___Toc186410_2813440148" text:style-name="Index_20_Link" text:visited-style-name="Index_20_Link">2.1.C.6. The Visual Enhancements (Wireframe Logic)<text:tab/>22</text:a></text:p>
          <text:p text:style-name="P188"><text:a xlink:type="simple" xlink:href="#__RefHeading___Toc139744_2813440148" text:style-name="Index_20_Link" text:visited-style-name="Index_20_Link">2.1.D Satellite Unit<text:tab/>22</text:a></text:p>
          <text:p text:style-name="P189"><text:a xlink:type="simple" xlink:href="#__RefHeading___Toc139677_2813440148" text:style-name="Index_20_Link" text:visited-style-name="Index_20_Link">2.1.D.1. The Philosophy: The Toolkit<text:tab/>22</text:a></text:p>
          <text:p text:style-name="P189"><text:a xlink:type="simple" xlink:href="#__RefHeading___Toc139679_2813440148" text:style-name="Index_20_Link" text:visited-style-name="Index_20_Link">2.1.D.2. The Inputs: Identification<text:tab/>22</text:a></text:p>
          <text:p text:style-name="P189"><text:a xlink:type="simple" xlink:href="#__RefHeading___Toc139681_2813440148" text:style-name="Index_20_Link" text:visited-style-name="Index_20_Link">2.1.D.3. Basal Values (The Standard Model)<text:tab/>22</text:a></text:p>
          <text:p text:style-name="P188"><text:a xlink:type="simple" xlink:href="#__RefHeading___Toc16550_2209633182" text:style-name="Index_20_Link" text:visited-style-name="Index_20_Link">2.1.E Satellite Orbital Distance<text:tab/>23</text:a></text:p>
          <text:p text:style-name="P188"><text:a xlink:type="simple" xlink:href="#__RefHeading___Toc16552_2209633182" text:style-name="Index_20_Link" text:visited-style-name="Index_20_Link">2.1.F Number of satellites in a unit<text:tab/>24</text:a></text:p>
          <text:p text:style-name="P189"><text:a xlink:type="simple" xlink:href="#__RefHeading___Toc16552_2209633182%20Copy%201" text:style-name="Index_20_Link" text:visited-style-name="Index_20_Link">2.1.F.1. The Philosophy: Cognitive Friction<text:tab/>24</text:a></text:p>
          <text:p text:style-name="P189"><text:a xlink:type="simple" xlink:href="#__RefHeading___Toc16552_2209633182%20Copy%201%20Copy%201" text:style-name="Index_20_Link" text:visited-style-name="Index_20_Link">2.1.F.2. The Inputs: Anatomy of Complexity<text:tab/>24</text:a></text:p>
          <text:p text:style-name="P189"><text:a xlink:type="simple" xlink:href="#__RefHeading___Toc16552_2209633182%20Copy%201%20Copy%202" text:style-name="Index_20_Link" text:visited-style-name="Index_20_Link">2.1.F.3. The Equation: Calculating 'C'<text:tab/>25</text:a></text:p>
          <text:p text:style-name="P189"><text:a xlink:type="simple" xlink:href="#__RefHeading___Toc16552_2209633182%20Copy%201%20Copy%203" text:style-name="Index_20_Link" text:visited-style-name="Index_20_Link">2.1.F.4. The Visual Thresholds (The Step Function)<text:tab/>25</text:a></text:p>
          <text:p text:style-name="P188"><text:a xlink:type="simple" xlink:href="#__RefHeading___Toc139685_2813440148" text:style-name="Index_20_Link" text:visited-style-name="Index_20_Link">2.1.G Satellite’s Relative Positioning in a unit<text:tab/>26</text:a></text:p>
          <text:p text:style-name="P189"><text:a xlink:type="simple" xlink:href="#__RefHeading___Toc139693_2813440148" text:style-name="Index_20_Link" text:visited-style-name="Index_20_Link">2.1.G.1. The Visual Translation (The Lerp)<text:tab/>27</text:a></text:p>
          <text:p text:style-name="P188"><text:a xlink:type="simple" xlink:href="#__RefHeading___Toc16556_2209633182" text:style-name="Index_20_Link" text:visited-style-name="Index_20_Link">2.1.H Node Size (Metric: Argument Count)<text:tab/>27</text:a></text:p>
          <text:p text:style-name="P189"><text:a xlink:type="simple" xlink:href="#__RefHeading___Toc139695_2813440148" text:style-name="Index_20_Link" text:visited-style-name="Index_20_Link">2.1.H.1. The Philosophy: Heavy vs. Light<text:tab/>28</text:a></text:p>
          <text:p text:style-name="P189"><text:a xlink:type="simple" xlink:href="#__RefHeading___Toc139697_2813440148" text:style-name="Index_20_Link" text:visited-style-name="Index_20_Link">2.1.H.2. The Inputs: Measuring Args<text:tab/>28</text:a></text:p>
          <text:p text:style-name="P189"><text:a xlink:type="simple" xlink:href="#__RefHeading___Toc139699_2813440148" text:style-name="Index_20_Link" text:visited-style-name="Index_20_Link">2.1.H.3. The Equation: Logarithmic Scaling<text:tab/>28</text:a></text:p>
          <text:p text:style-name="P189"><text:a xlink:type="simple" xlink:href="#__RefHeading___Toc139701_2813440148" text:style-name="Index_20_Link" text:visited-style-name="Index_20_Link"><text:soft-page-break/>2.1.H.4. The Visual Output<text:tab/>28</text:a></text:p>
          <text:p text:style-name="P188"><text:a xlink:type="simple" xlink:href="#__RefHeading___Toc139715_2813440148" text:style-name="Index_20_Link" text:visited-style-name="Index_20_Link">2.1.I. Planetary Rings<text:tab/>28</text:a></text:p>
          <text:p text:style-name="P189"><text:a xlink:type="simple" xlink:href="#__RefHeading___Toc139717_2813440148" text:style-name="Index_20_Link" text:visited-style-name="Index_20_Link">2.1.I.1. The Philosophy: The Gravity Well<text:tab/>28</text:a></text:p>
          <text:p text:style-name="P189"><text:a xlink:type="simple" xlink:href="#__RefHeading___Toc139719_2813440148" text:style-name="Index_20_Link" text:visited-style-name="Index_20_Link">2.1.I.2. The Inputs: Measuring Dependencies<text:tab/>29</text:a></text:p>
          <text:p text:style-name="P189"><text:a xlink:type="simple" xlink:href="#__RefHeading___Toc139721_2813440148" text:style-name="Index_20_Link" text:visited-style-name="Index_20_Link">2.1.I.3. The Equation: Growth and Density<text:tab/>29</text:a></text:p>
          <text:p text:style-name="P189"><text:a xlink:type="simple" xlink:href="#__RefHeading___Toc139723_2813440148" text:style-name="Index_20_Link" text:visited-style-name="Index_20_Link">2.1.I.4. The Visual Output<text:tab/>29</text:a></text:p>
          <text:p text:style-name="P188"><text:a xlink:type="simple" xlink:href="#__RefHeading___Toc139725_2813440148" text:style-name="Index_20_Link" text:visited-style-name="Index_20_Link">2.1.J Relative Positioning (Metric: Sequence &amp; Affinity)<text:tab/>29</text:a></text:p>
          <text:p text:style-name="P189"><text:a xlink:type="simple" xlink:href="#__RefHeading___Toc139727_2813440148" text:style-name="Index_20_Link" text:visited-style-name="Index_20_Link">2.1.J.1. The Philosophy: The Tri-Phase Displacement<text:tab/>30</text:a></text:p>
          <text:p text:style-name="P189"><text:a xlink:type="simple" xlink:href="#__RefHeading___Toc139729_2813440148" text:style-name="Index_20_Link" text:visited-style-name="Index_20_Link">2.1.J.2. Phase 1: The Gravity Sort (Chronology &amp; Importance)<text:tab/>30</text:a></text:p>
          <text:p text:style-name="P189"><text:a xlink:type="simple" xlink:href="#__RefHeading___Toc139731_2813440148" text:style-name="Index_20_Link" text:visited-style-name="Index_20_Link">2.1.J.3. Phase 2: The Gap Spiral (Radial Positioning)<text:tab/>30</text:a></text:p>
          <text:p text:style-name="P189"><text:a xlink:type="simple" xlink:href="#__RefHeading___Toc139733_2813440148" text:style-name="Index_20_Link" text:visited-style-name="Index_20_Link">2.1.J.4. Phase 3: The Stratification (Z-Axis Type Layering)<text:tab/>31</text:a></text:p>
          <text:p text:style-name="P188"><text:a xlink:type="simple" xlink:href="#__RefHeading___Toc16558_2209633182%20Copy%201" text:style-name="Index_20_Link" text:visited-style-name="Index_20_Link">2.1.K Misc Equations<text:tab/>31</text:a></text:p>
          <text:p text:style-name="P187"><text:a xlink:type="simple" xlink:href="#__RefHeading___Toc11747_959624642" text:style-name="Index_20_Link" text:visited-style-name="Index_20_Link">2.2 Color Labeling Equations<text:tab/>31</text:a></text:p>
          <text:p text:style-name="P188"><text:a xlink:type="simple" xlink:href="#__RefHeading___Toc49783_1155106909" text:style-name="Index_20_Link" text:visited-style-name="Index_20_Link">2.2.A. Overview of methodology<text:tab/>31</text:a></text:p>
          <text:p text:style-name="P188"><text:a xlink:type="simple" xlink:href="#__RefHeading___Toc11765_959624642" text:style-name="Index_20_Link" text:visited-style-name="Index_20_Link">2.2.B. Sub-Equations<text:tab/>33</text:a></text:p>
          <text:p text:style-name="P188"><text:a xlink:type="simple" xlink:href="#__RefHeading___Toc26218_2298275600" text:style-name="Index_20_Link" text:visited-style-name="Index_20_Link">2.2.C. Transforming Noisy Regex Counts Into Something Meaningful<text:tab/>35</text:a></text:p>
          <text:p text:style-name="P188"><text:a xlink:type="simple" xlink:href="#__RefHeading___Toc560529_2813440148" text:style-name="Index_20_Link" text:visited-style-name="Index_20_Link">2.2.D. Ownership Mode: Shannon Entropy<text:tab/>36</text:a></text:p>
          <text:p text:style-name="P189"><text:a xlink:type="simple" xlink:href="#__RefHeading___Toc560531_2813440148" text:style-name="Index_20_Link" text:visited-style-name="Index_20_Link">2.2.D.1. The Philosophy: Knowledge Concentration<text:tab/>36</text:a></text:p>
          <text:p text:style-name="P189"><text:a xlink:type="simple" xlink:href="#__RefHeading___Toc560533_2813440148" text:style-name="Index_20_Link" text:visited-style-name="Index_20_Link">2.2.D.2. The Inputs: Contribution Share<text:tab/>37</text:a></text:p>
          <text:p text:style-name="P189"><text:a xlink:type="simple" xlink:href="#__RefHeading___Toc560535_2813440148" text:style-name="Index_20_Link" text:visited-style-name="Index_20_Link">2.2.D.3. Equation<text:tab/>37</text:a></text:p>
          <text:p text:style-name="P189"><text:a xlink:type="simple" xlink:href="#__RefHeading___Toc35684_3489481128" text:style-name="Index_20_Link" text:visited-style-name="Index_20_Link">2.2.D.4. Why This Model is Superior<text:tab/>37</text:a></text:p>
          <text:p text:style-name="P189"><text:a xlink:type="simple" xlink:href="#__RefHeading___Toc560537_2813440148" text:style-name="Index_20_Link" text:visited-style-name="Index_20_Link">2.2.D.5. Visual Interpretation: Ownership vs. Collective Diffusion<text:tab/>37</text:a></text:p>
          <text:p text:style-name="P189"><text:a xlink:type="simple" xlink:href="#__RefHeading___Toc560539_2813440148" text:style-name="Index_20_Link" text:visited-style-name="Index_20_Link">2.2.D.6. RQM: Scaling Logic &amp; Visual Overload<text:tab/>38</text:a></text:p>
          <text:p text:style-name="P188"><text:a xlink:type="simple" xlink:href="#__RefHeading___Toc560541_2813440148" text:style-name="Index_20_Link" text:visited-style-name="Index_20_Link">2.2.E. Cognitive Load Exposure<text:tab/>39</text:a></text:p>
          <text:p text:style-name="P189"><text:a xlink:type="simple" xlink:href="#__RefHeading___Toc560543_2813440148" text:style-name="Index_20_Link" text:visited-style-name="Index_20_Link">2.2.E.1. The Philosophy: The Entropy of Understanding<text:tab/>39</text:a></text:p>
          <text:p text:style-name="P189"><text:a xlink:type="simple" xlink:href="#__RefHeading___Toc42118_730389025" text:style-name="Index_20_Link" text:visited-style-name="Index_20_Link">2.2.E.2. The Philosophy: Mental Friction Density<text:tab/>40</text:a></text:p>
          <text:p text:style-name="P189"><text:a xlink:type="simple" xlink:href="#__RefHeading___Toc42120_730389025" text:style-name="Index_20_Link" text:visited-style-name="Index_20_Link">2.2.E.3. The Inputs (Regex &amp; Heuristics)<text:tab/>40</text:a></text:p>
          <text:p text:style-name="P189"><text:a xlink:type="simple" xlink:href="#__RefHeading___Toc42122_730389025" text:style-name="Index_20_Link" text:visited-style-name="Index_20_Link">2.2.E.4. The Universal Framework Integration<text:tab/>41</text:a></text:p>
          <text:p text:style-name="P189"><text:a xlink:type="simple" xlink:href="#__RefHeading___Toc42124_730389025" text:style-name="Index_20_Link" text:visited-style-name="Index_20_Link">2.2.E.6. The Equation: The "Badge of Honor" Sigmoid<text:tab/>41</text:a></text:p>
          <text:p text:style-name="P189"><text:a xlink:type="simple" xlink:href="#__RefHeading___Toc42134_730389025" text:style-name="Index_20_Link" text:visited-style-name="Index_20_Link">2.2.E.7. Implementation (Python Reference)<text:tab/>42</text:a></text:p>
          <text:p text:style-name="P189"><text:a xlink:type="simple" xlink:href="#__RefHeading___Toc42136_730389025" text:style-name="Index_20_Link" text:visited-style-name="Index_20_Link">2.2.E.8. Visual Verification ("The Truth")<text:tab/>43</text:a></text:p>
          <text:p text:style-name="P188"><text:a xlink:type="simple" xlink:href="#__RefHeading___Toc11753_959624642%20Copy%201" text:style-name="Index_20_Link" text:visited-style-name="Index_20_Link">2.2.F. Churn<text:tab/>43</text:a></text:p>
          <text:p text:style-name="P189"><text:a xlink:type="simple" xlink:href="#__RefHeading___Toc49793_1155106909" text:style-name="Index_20_Link" text:visited-style-name="Index_20_Link"><text:span text:style-name="T300">2.2.F.</text:span><text:span text:style-name="T300">A.</text:span><text:span text:style-name="T300"> The Philosophy: Relative Historical Volatility</text:span><text:tab/>43</text:a></text:p>
          <text:p text:style-name="P189"><text:a xlink:type="simple" xlink:href="#__RefHeading___Toc11753_959624642%20Copy%201%20Copy%201%20Copy%201" text:style-name="Index_20_Link" text:visited-style-name="Index_20_Link"><text:span text:style-name="T300">2.2.F.</text:span>B. The Inputs (Git History Data)<text:tab/>44</text:a></text:p>
          <text:p text:style-name="P189"><text:a xlink:type="simple" xlink:href="#__RefHeading___Toc11753_959624642%20Copy%201%20Copy%201%20Copy%202" text:style-name="Index_20_Link" text:visited-style-name="Index_20_Link"><text:span text:style-name="T300">2.2.F.</text:span>C. The Universal Framework Integration<text:tab/>44</text:a></text:p>
          <text:p text:style-name="P189"><text:a xlink:type="simple" xlink:href="#__RefHeading___Toc11753_959624642%20Copy%201%20Copy%201%20Copy%203" text:style-name="Index_20_Link" text:visited-style-name="Index_20_Link"><text:span text:style-name="T300">2.2.F.</text:span>D. The Equation: The Two-Pass Relative Seismic Model<text:tab/>44</text:a></text:p>
          <text:p text:style-name="P189"><text:a xlink:type="simple" xlink:href="#__RefHeading___Toc11753_959624642%20Copy%201%20Copy%201%20Copy%204" text:style-name="Index_20_Link" text:visited-style-name="Index_20_Link"><text:span text:style-name="T300">2.2.F.</text:span>E. Implementation (Python Reference)<text:tab/>45</text:a></text:p>
          <text:p text:style-name="P189"><text:a xlink:type="simple" xlink:href="#__RefHeading___Toc11753_959624642%20Copy%201%20Copy%201%20Copy%205" text:style-name="Index_20_Link" text:visited-style-name="Index_20_Link"><text:span text:style-name="T300">2.2.F.</text:span>F. Visual Verification ("The Truth")<text:tab/>46</text:a></text:p>
          <text:p text:style-name="P188"><text:a xlink:type="simple" xlink:href="#__RefHeading___Toc560553_2813440148" text:style-name="Index_20_Link" text:visited-style-name="Index_20_Link">2.2.G. Safety Mode (Metric: Structural Fortification)<text:tab/>46</text:a></text:p>
          <text:p text:style-name="P189"><text:a xlink:type="simple" xlink:href="#__RefHeading___Toc49795_1155106909" text:style-name="Index_20_Link" text:visited-style-name="Index_20_Link">2.2.G.A. The Philosophy: Structural Integrity "The Load-Bearing Capacity of Code."<text:tab/>46</text:a></text:p>
          <text:p text:style-name="P189"><text:a xlink:type="simple" xlink:href="#__RefHeading___Toc560553_2813440148%20Copy%201%20Copy%201" text:style-name="Index_20_Link" text:visited-style-name="Index_20_Link">2.2.G.B. The Inputs (Regex &amp; Heuristics)<text:tab/>47</text:a></text:p>
          <text:p text:style-name="P189"><text:a xlink:type="simple" xlink:href="#__RefHeading___Toc560553_2813440148%20Copy%201%20Copy%202" text:style-name="Index_20_Link" text:visited-style-name="Index_20_Link">2.2.G.C. The Universal Framework Integration<text:tab/>47</text:a></text:p>
          <text:p text:style-name="P189"><text:a xlink:type="simple" xlink:href="#__RefHeading___Toc560553_2813440148%20Copy%201%20Copy%203" text:style-name="Index_20_Link" text:visited-style-name="Index_20_Link">2.2.G.D. The Equation: The Structural Integrity Sigmoid<text:tab/>48</text:a></text:p>
          <text:p text:style-name="P189"><text:a xlink:type="simple" xlink:href="#__RefHeading___Toc560553_2813440148%20Copy%201%20Copy%204" text:style-name="Index_20_Link" text:visited-style-name="Index_20_Link">2.2.G.E. Implementation (Python Reference)<text:tab/>48</text:a></text:p>
          <text:p text:style-name="P189"><text:a xlink:type="simple" xlink:href="#__RefHeading___Toc560553_2813440148%20Copy%201%20Copy%205" text:style-name="Index_20_Link" text:visited-style-name="Index_20_Link">2.2.G.F. Visual Verification ("The Truth")<text:tab/>49</text:a></text:p>
          <text:p text:style-name="P188"><text:a xlink:type="simple" xlink:href="#__RefHeading___Toc560565_2813440148" text:style-name="Index_20_Link" text:visited-style-name="Index_20_Link">2.2.I. Technical Debt Exposure<text:tab/>50</text:a></text:p>
          <text:p text:style-name="P189"><text:a xlink:type="simple" xlink:href="#__RefHeading___Toc560565_2813440148%20Copy%201" text:style-name="Index_20_Link" text:visited-style-name="Index_20_Link">2.2.I.A. The Philosophy: Markers of Honesty<text:tab/>50</text:a></text:p>
          <text:p text:style-name="P189"><text:a xlink:type="simple" xlink:href="#__RefHeading___Toc560565_2813440148%20Copy%202" text:style-name="Index_20_Link" text:visited-style-name="Index_20_Link">2.2.I.B. The Inputs (Regex &amp; Heuristics)<text:tab/>50</text:a></text:p>
          <text:p text:style-name="P189"><text:a xlink:type="simple" xlink:href="#__RefHeading___Toc560565_2813440148%20Copy%203" text:style-name="Index_20_Link" text:visited-style-name="Index_20_Link">2.2.I.C. The Universal Framework Integration<text:tab/>51</text:a></text:p>
          <text:p text:style-name="P189"><text:a xlink:type="simple" xlink:href="#__RefHeading___Toc560565_2813440148%20Copy%204" text:style-name="Index_20_Link" text:visited-style-name="Index_20_Link"><text:soft-page-break/>2.2.I.D. The Equation: The Structural Stress Density<text:tab/>51</text:a></text:p>
          <text:p text:style-name="P189"><text:a xlink:type="simple" xlink:href="#__RefHeading___Toc560565_2813440148%20Copy%205" text:style-name="Index_20_Link" text:visited-style-name="Index_20_Link">2.2.I.E. Implementation (Python Reference)<text:tab/>51</text:a></text:p>
          <text:p text:style-name="P189"><text:a xlink:type="simple" xlink:href="#__RefHeading___Toc560565_2813440148%20Copy%206" text:style-name="Index_20_Link" text:visited-style-name="Index_20_Link">2.2.I.F. Visual Verification ("The Truth")<text:tab/>52</text:a></text:p>
          <text:p text:style-name="P188"><text:a xlink:type="simple" xlink:href="#__RefHeading___Toc42695_1155106909" text:style-name="Index_20_Link" text:visited-style-name="Index_20_Link">2.2.J. Documentation Risk Exposure (Metric: Sigmoid Debt)<text:tab/>53</text:a></text:p>
          <text:p text:style-name="P189"><text:a xlink:type="simple" xlink:href="#__RefHeading___Toc42697_1155106909" text:style-name="Index_20_Link" text:visited-style-name="Index_20_Link">2.2.J.1. The Philosophy: The Duty of Care<text:tab/>53</text:a></text:p>
          <text:p text:style-name="P189"><text:a xlink:type="simple" xlink:href="#__RefHeading___Toc42699_1155106909" text:style-name="Index_20_Link" text:visited-style-name="Index_20_Link">2.2.J.2. The Inputs (Tiered Efficiency)<text:tab/>53</text:a></text:p>
          <text:p text:style-name="P189"><text:a xlink:type="simple" xlink:href="#__RefHeading___Toc42701_1155106909" text:style-name="Index_20_Link" text:visited-style-name="Index_20_Link">2.2.J.3. The Universal Framework Integration<text:tab/>54</text:a></text:p>
          <text:p text:style-name="P189"><text:a xlink:type="simple" xlink:href="#__RefHeading___Toc42703_1155106909" text:style-name="Index_20_Link" text:visited-style-name="Index_20_Link">2.2.J.4. The Equation: The Dynamic Risk Sigmoid<text:tab/>54</text:a></text:p>
          <text:p text:style-name="P189"><text:a xlink:type="simple" xlink:href="#__RefHeading___Toc42711_1155106909" text:style-name="Index_20_Link" text:visited-style-name="Index_20_Link">2.2.J.5. Implementation (Python Reference)<text:tab/>55</text:a></text:p>
          <text:p text:style-name="P189"><text:a xlink:type="simple" xlink:href="#__RefHeading___Toc42713_1155106909" text:style-name="Index_20_Link" text:visited-style-name="Index_20_Link">2.2.J.6. Visual Verification ("The Risk Audit")<text:tab/>55</text:a></text:p>
          <text:p text:style-name="P188"><text:a xlink:type="simple" xlink:href="#__RefHeading___Toc202257_2813440148" text:style-name="Index_20_Link" text:visited-style-name="Index_20_Link">2.2.K. File Stability (Commit Heat)<text:tab/>56</text:a></text:p>
          <text:p text:style-name="P189"><text:a xlink:type="simple" xlink:href="#__RefHeading___Toc202257_2813440148%20Copy%201" text:style-name="Index_20_Link" text:visited-style-name="Index_20_Link">2.2.K.A. The Philosophy: The Geological Layers<text:tab/>56</text:a></text:p>
          <text:p text:style-name="P189"><text:a xlink:type="simple" xlink:href="#__RefHeading___Toc202257_2813440148%20Copy%202" text:style-name="Index_20_Link" text:visited-style-name="Index_20_Link">2.2.K.B. The Inputs (File System)<text:tab/>56</text:a></text:p>
          <text:p text:style-name="P189"><text:a xlink:type="simple" xlink:href="#__RefHeading___Toc202257_2813440148%20Copy%203" text:style-name="Index_20_Link" text:visited-style-name="Index_20_Link">2.2.K.C. The Universal Framework Integration<text:tab/>56</text:a></text:p>
          <text:p text:style-name="P189"><text:a xlink:type="simple" xlink:href="#__RefHeading___Toc202257_2813440148%20Copy%204" text:style-name="Index_20_Link" text:visited-style-name="Index_20_Link">2.2.K.D. The Equation: Relative Time Normalization<text:tab/>57</text:a></text:p>
          <text:p text:style-name="P189"><text:a xlink:type="simple" xlink:href="#__RefHeading___Toc202257_2813440148%20Copy%205" text:style-name="Index_20_Link" text:visited-style-name="Index_20_Link">2.2.K.E. Implementation (Python Reference)<text:tab/>57</text:a></text:p>
          <text:p text:style-name="P189"><text:a xlink:type="simple" xlink:href="#__RefHeading___Toc202257_2813440148%20Copy%206" text:style-name="Index_20_Link" text:visited-style-name="Index_20_Link">2.2.K.F. Visual Verification ("The Truth")<text:tab/>58</text:a></text:p>
          <text:p text:style-name="P188"><text:a xlink:type="simple" xlink:href="#__RefHeading___Toc227244_2813440148" text:style-name="Index_20_Link" text:visited-style-name="Index_20_Link">2.2.L. Test Coverage (Metric: Verification Density)<text:tab/>58</text:a></text:p>
          <text:p text:style-name="P189"><text:a xlink:type="simple" xlink:href="#__RefHeading___Toc227244_2813440148%20Copy%201" text:style-name="Index_20_Link" text:visited-style-name="Index_20_Link">2.2.L.A. The Philosophy: Trust vs. Verification<text:tab/>58</text:a></text:p>
          <text:p text:style-name="P189"><text:a xlink:type="simple" xlink:href="#__RefHeading___Toc227244_2813440148%20Copy%202" text:style-name="Index_20_Link" text:visited-style-name="Index_20_Link">2.2.L.B. The Inputs (Verification Signals)<text:tab/>59</text:a></text:p>
          <text:p text:style-name="P189"><text:a xlink:type="simple" xlink:href="#__RefHeading___Toc227244_2813440148%20Copy%203" text:style-name="Index_20_Link" text:visited-style-name="Index_20_Link">2.2.L.C. The Universal Framework Integration<text:tab/>59</text:a></text:p>
          <text:p text:style-name="P189"><text:a xlink:type="simple" xlink:href="#__RefHeading___Toc227244_2813440148%20Copy%204" text:style-name="Index_20_Link" text:visited-style-name="Index_20_Link">2.2.L.D. The Equation: The Verification Sigmoid<text:tab/>60</text:a></text:p>
          <text:p text:style-name="P189"><text:a xlink:type="simple" xlink:href="#__RefHeading___Toc227244_2813440148%20Copy%205" text:style-name="Index_20_Link" text:visited-style-name="Index_20_Link">2.2.L.E. Implementation (Python Reference)<text:tab/>60</text:a></text:p>
          <text:p text:style-name="P189"><text:a xlink:type="simple" xlink:href="#__RefHeading___Toc227244_2813440148%20Copy%206" text:style-name="Index_20_Link" text:visited-style-name="Index_20_Link">2.2.L.F. Visual Verification ("The Truth")<text:tab/>61</text:a></text:p>
          <text:p text:style-name="P188"><text:a xlink:type="simple" xlink:href="#__RefHeading___Toc11769_959624642" text:style-name="Index_20_Link" text:visited-style-name="Index_20_Link">2.2.M. The "Civil War" Algorithm: Tabs vs. Spaces<text:tab/>62</text:a></text:p>
          <text:p text:style-name="P188"><text:a xlink:type="simple" xlink:href="#__RefHeading___Toc560575_2813440148" text:style-name="Index_20_Link" text:visited-style-name="Index_20_Link">2.2.N. The "Graveyard" Detector (Metric: Architectural Transparency)<text:tab/>62</text:a></text:p>
          <text:p text:style-name="P189"><text:a xlink:type="simple" xlink:href="#__RefHeading___Toc560575_2813440148%20Copy%201" text:style-name="Index_20_Link" text:visited-style-name="Index_20_Link">2.2.N.A. The Philosophy: Code Necrosis<text:tab/>62</text:a></text:p>
          <text:p text:style-name="P189"><text:a xlink:type="simple" xlink:href="#__RefHeading___Toc560575_2813440148%20Copy%202" text:style-name="Index_20_Link" text:visited-style-name="Index_20_Link">2.2.N.B. The Inputs (Heuristic Detection)<text:tab/>63</text:a></text:p>
          <text:p text:style-name="P189"><text:a xlink:type="simple" xlink:href="#__RefHeading___Toc560575_2813440148%20Copy%203" text:style-name="Index_20_Link" text:visited-style-name="Index_20_Link">2.2.N.C. The Universal Framework Integration<text:tab/>63</text:a></text:p>
          <text:p text:style-name="P189"><text:a xlink:type="simple" xlink:href="#__RefHeading___Toc560575_2813440148%20Copy%204" text:style-name="Index_20_Link" text:visited-style-name="Index_20_Link">2.2.N.D. The Equation: The Necrosis Sigmoid<text:tab/>64</text:a></text:p>
          <text:p text:style-name="P189"><text:a xlink:type="simple" xlink:href="#__RefHeading___Toc560575_2813440148%20Copy%205" text:style-name="Index_20_Link" text:visited-style-name="Index_20_Link">2.2.N.E. Implementation (Python Reference)<text:tab/>64</text:a></text:p>
          <text:p text:style-name="P189"><text:a xlink:type="simple" xlink:href="#__RefHeading___Toc560575_2813440148%20Copy%206" text:style-name="Index_20_Link" text:visited-style-name="Index_20_Link">2.2.N.F. Visual Verification ("The Truth")<text:tab/>65</text:a></text:p>
          <text:p text:style-name="P188"><text:a xlink:type="simple" xlink:href="#__RefHeading___Toc227256_2813440148" text:style-name="Index_20_Link" text:visited-style-name="Index_20_Link">2.2.O. API Exposure (Metric: The Event Horizon)<text:tab/>66</text:a></text:p>
          <text:p text:style-name="P189"><text:a xlink:type="simple" xlink:href="#__RefHeading___Toc227256_2813440148%20Copy%201" text:style-name="Index_20_Link" text:visited-style-name="Index_20_Link">2.2.O.A. The Philosophy: The Event Horizon<text:tab/>66</text:a></text:p>
          <text:p text:style-name="P189"><text:a xlink:type="simple" xlink:href="#__RefHeading___Toc227256_2813440148%20Copy%202" text:style-name="Index_20_Link" text:visited-style-name="Index_20_Link">2.2.O.B. The Inputs (Surface Detection)<text:tab/>66</text:a></text:p>
          <text:p text:style-name="P189"><text:a xlink:type="simple" xlink:href="#__RefHeading___Toc227256_2813440148%20Copy%203" text:style-name="Index_20_Link" text:visited-style-name="Index_20_Link">2.2.O.C. The Universal Framework Integration<text:tab/>66</text:a></text:p>
          <text:p text:style-name="P189"><text:a xlink:type="simple" xlink:href="#__RefHeading___Toc227256_2813440148%20Copy%204" text:style-name="Index_20_Link" text:visited-style-name="Index_20_Link">2.2.O.D. The Equation: Linear Surface Density<text:tab/>67</text:a></text:p>
          <text:p text:style-name="P189"><text:a xlink:type="simple" xlink:href="#__RefHeading___Toc227256_2813440148%20Copy%205" text:style-name="Index_20_Link" text:visited-style-name="Index_20_Link">2.2.O.E. Implementation (Python Reference)<text:tab/>67</text:a></text:p>
          <text:p text:style-name="P189"><text:a xlink:type="simple" xlink:href="#__RefHeading___Toc227256_2813440148%20Copy%206" text:style-name="Index_20_Link" text:visited-style-name="Index_20_Link">2.2.O.F. Visual Verification ("The Truth")<text:tab/>68</text:a></text:p>
          <text:p text:style-name="P188"><text:a xlink:type="simple" xlink:href="#__RefHeading___Toc227268_2813440148" text:style-name="Index_20_Link" text:visited-style-name="Index_20_Link">2.2.P. Concurrency Exposure<text:tab/>68</text:a></text:p>
          <text:p text:style-name="P189"><text:a xlink:type="simple" xlink:href="#__RefHeading___Toc227268_2813440148%20Copy%201" text:style-name="Index_20_Link" text:visited-style-name="Index_20_Link">2.2.P.A. The Philosophy: The Signal-to-Noise Ratio<text:tab/>68</text:a></text:p>
          <text:p text:style-name="P189"><text:a xlink:type="simple" xlink:href="#__RefHeading___Toc227268_2813440148%20Copy%202" text:style-name="Index_20_Link" text:visited-style-name="Index_20_Link">2.2.P.B. The Inputs (Temporal Markers)<text:tab/>69</text:a></text:p>
          <text:p text:style-name="P189"><text:a xlink:type="simple" xlink:href="#__RefHeading___Toc227268_2813440148%20Copy%203" text:style-name="Index_20_Link" text:visited-style-name="Index_20_Link">2.2.P.C. The Universal Framework Integration<text:tab/>69</text:a></text:p>
          <text:p text:style-name="P189"><text:a xlink:type="simple" xlink:href="#__RefHeading___Toc227268_2813440148%20Copy%204" text:style-name="Index_20_Link" text:visited-style-name="Index_20_Link">2.2.P.D. The Equation: The Tipping Point Sigmoid<text:tab/>70</text:a></text:p>
          <text:p text:style-name="P189"><text:a xlink:type="simple" xlink:href="#__RefHeading___Toc227268_2813440148%20Copy%205" text:style-name="Index_20_Link" text:visited-style-name="Index_20_Link">2.2.P.E. Implementation (Python Reference)<text:tab/>70</text:a></text:p>
          <text:p text:style-name="P189"><text:a xlink:type="simple" xlink:href="#__RefHeading___Toc227268_2813440148%20Copy%206" text:style-name="Index_20_Link" text:visited-style-name="Index_20_Link">2.2.P.F. Visual Verification ("The Truth")<text:tab/>71</text:a></text:p>
          <text:p text:style-name="P188"><text:a xlink:type="simple" xlink:href="#__RefHeading___Toc227280_2813440148" text:style-name="Index_20_Link" text:visited-style-name="Index_20_Link">2.2.Q. State Flux Exposure (Metric: Boiling Plasma)<text:tab/>72</text:a></text:p>
          <text:p text:style-name="P189"><text:a xlink:type="simple" xlink:href="#__RefHeading___Toc227280_2813440148%20Copy%201" text:style-name="Index_20_Link" text:visited-style-name="Index_20_Link">2.2.Q.A. The Philosophy: Data Volatility<text:tab/>72</text:a></text:p>
          <text:p text:style-name="P189"><text:a xlink:type="simple" xlink:href="#__RefHeading___Toc227280_2813440148%20Copy%202" text:style-name="Index_20_Link" text:visited-style-name="Index_20_Link">2.2.Q.B. The Inputs (Mutation Markers)<text:tab/>72</text:a></text:p>
          <text:p text:style-name="P189"><text:a xlink:type="simple" xlink:href="#__RefHeading___Toc227280_2813440148%20Copy%203" text:style-name="Index_20_Link" text:visited-style-name="Index_20_Link"><text:soft-page-break/>2.2.Q.C. The Universal Framework Integration<text:tab/>72</text:a></text:p>
          <text:p text:style-name="P189"><text:a xlink:type="simple" xlink:href="#__RefHeading___Toc227280_2813440148%20Copy%204" text:style-name="Index_20_Link" text:visited-style-name="Index_20_Link">2.2.Q.D. The Equation: The Mutation Threshold Sigmoid<text:tab/>73</text:a></text:p>
          <text:p text:style-name="P189"><text:a xlink:type="simple" xlink:href="#__RefHeading___Toc227280_2813440148%20Copy%205" text:style-name="Index_20_Link" text:visited-style-name="Index_20_Link">2.2.Q.E. Implementation (Python Reference)<text:tab/>73</text:a></text:p>
          <text:p text:style-name="P189"><text:a xlink:type="simple" xlink:href="#__RefHeading___Toc227280_2813440148%20Copy%206" text:style-name="Index_20_Link" text:visited-style-name="Index_20_Link">2.2.Q.F. Visual Verification ("The Truth")<text:tab/>74</text:a></text:p>
          <text:p text:style-name="P187"><text:a xlink:type="simple" xlink:href="#__RefHeading___Toc560587_2813440148" text:style-name="Index_20_Link" text:visited-style-name="Index_20_Link">2.2.R. Language Identity<text:tab/>75</text:a></text:p>
          <text:p text:style-name="P188"><text:a xlink:type="simple" xlink:href="#__RefHeading___Toc560589_2813440148" text:style-name="Index_20_Link" text:visited-style-name="Index_20_Link">2.2.R.1. The Philosophy: The Right Tool for the Job<text:tab/>75</text:a></text:p>
          <text:p text:style-name="P189"><text:a xlink:type="simple" xlink:href="#__RefHeading___Toc560591_2813440148" text:style-name="Index_20_Link" text:visited-style-name="Index_20_Link">2.2.R.2. The Inputs: Identifying the Species<text:tab/>75</text:a></text:p>
          <text:p text:style-name="P189"><text:a xlink:type="simple" xlink:href="#__RefHeading___Toc560593_2813440148" text:style-name="Index_20_Link" text:visited-style-name="Index_20_Link">2.2.R.3. The Logic: The Identity Map &amp; Exo-Protocol<text:tab/>75</text:a></text:p>
          <text:p text:style-name="P189"><text:a xlink:type="simple" xlink:href="#__RefHeading___Toc560595_2813440148" text:style-name="Index_20_Link" text:visited-style-name="Index_20_Link">2.2.R.4. Why This Approach is Effective ("The Visual Truth")<text:tab/>76</text:a></text:p>
          <text:p text:style-name="P189"><text:a xlink:type="simple" xlink:href="#__RefHeading___Toc560597_2813440148" text:style-name="Index_20_Link" text:visited-style-name="Index_20_Link">2.2.R.5. Visual Summary Table (High-Contrast Palette)<text:tab/>76</text:a></text:p>
          <text:p text:style-name="P187"><text:a xlink:type="simple" xlink:href="#__RefHeading___Toc42715_1155106909" text:style-name="Index_20_Link" text:visited-style-name="Index_20_Link">2.2.S. Specification Exposure Risk<text:tab/>78</text:a></text:p>
          <text:p text:style-name="P188"><text:a xlink:type="simple" xlink:href="#__RefHeading___Toc42717_1155106909" text:style-name="Index_20_Link" text:visited-style-name="Index_20_Link">2.2.S.1. The Philosophy: The Map vs. The Territory<text:tab/>78</text:a></text:p>
          <text:p text:style-name="P188"><text:a xlink:type="simple" xlink:href="#__RefHeading___Toc42719_1155106909" text:style-name="Index_20_Link" text:visited-style-name="Index_20_Link">2.2.S.2. The Inputs (The Breadcrumbs)<text:tab/>78</text:a></text:p>
          <text:p text:style-name="P188"><text:a xlink:type="simple" xlink:href="#__RefHeading___Toc42721_1155106909" text:style-name="Index_20_Link" text:visited-style-name="Index_20_Link">2.2.S.3. The Universal Framework Integration<text:tab/>79</text:a></text:p>
          <text:p text:style-name="P188"><text:a xlink:type="simple" xlink:href="#__RefHeading___Toc42723_1155106909" text:style-name="Index_20_Link" text:visited-style-name="Index_20_Link">2.2.S.4. The Equation: The Alignment Debt<text:tab/>79</text:a></text:p>
          <text:p text:style-name="P188"><text:a xlink:type="simple" xlink:href="#__RefHeading___Toc42731_1155106909" text:style-name="Index_20_Link" text:visited-style-name="Index_20_Link">2.2.S.5. Implementation (Python Reference)<text:tab/>79</text:a></text:p>
          <text:p text:style-name="P188"><text:a xlink:type="simple" xlink:href="#__RefHeading___Toc42733_1155106909" text:style-name="Index_20_Link" text:visited-style-name="Index_20_Link">2.2.S.6. Visual Verification ("The Audit")<text:tab/>80</text:a></text:p>
          <text:p text:style-name="P187"><text:a xlink:type="simple" xlink:href="#__RefHeading___Toc11737_959624642" text:style-name="Index_20_Link" text:visited-style-name="Index_20_Link">2.3 Data Analysis Pipeline<text:tab/>81</text:a></text:p>
          <text:p text:style-name="P188"><text:a xlink:type="simple" xlink:href="#__RefHeading___Toc44242_2214491331" text:style-name="Index_20_Link" text:visited-style-name="Index_20_Link">2.3.0. The GalaxyScope Chassis – Optical Orchestration<text:tab/>83</text:a></text:p>
          <text:p text:style-name="P189"><text:a xlink:type="simple" xlink:href="#__RefHeading___Toc44244_2214491331" text:style-name="Index_20_Link" text:visited-style-name="Index_20_Link">2.3.0.A. The Adaptive Lightpath System<text:tab/>83</text:a></text:p>
          <text:p text:style-name="P190"><text:a xlink:type="simple" xlink:href="#__RefHeading___Toc44246_2214491331" text:style-name="Index_20_Link" text:visited-style-name="Index_20_Link">2.3.0.A.1. Phase 0: The Radar Scan (Ignition)<text:tab/>83</text:a></text:p>
          <text:p text:style-name="P190"><text:a xlink:type="simple" xlink:href="#__RefHeading___Toc44248_2214491331" text:style-name="Index_20_Link" text:visited-style-name="Index_20_Link">2.3.0.A.2. Phase 1: Parallel Refraction (Map-Reduce)<text:tab/>83</text:a></text:p>
          <text:p text:style-name="P190"><text:a xlink:type="simple" xlink:href="#__RefHeading___Toc44250_2214491331" text:style-name="Index_20_Link" text:visited-style-name="Index_20_Link">2.3.0.A.3. Phase 2: Relational Physics (Global Aggregation)<text:tab/>83</text:a></text:p>
          <text:p text:style-name="P189"><text:a xlink:type="simple" xlink:href="#__RefHeading___Toc44252_2214491331" text:style-name="Index_20_Link" text:visited-style-name="Index_20_Link">2.3.0.B. Adaptive Features and Hardware Overrides<text:tab/>84</text:a></text:p>
          <text:p text:style-name="P190"><text:a xlink:type="simple" xlink:href="#__RefHeading___Toc44254_2214491331" text:style-name="Index_20_Link" text:visited-style-name="Index_20_Link">2.3.0.B.1. The Domain Dialect Pre-Flight Patch<text:tab/>84</text:a></text:p>
          <text:p text:style-name="P190"><text:a xlink:type="simple" xlink:href="#__RefHeading___Toc44256_2214491331" text:style-name="Index_20_Link" text:visited-style-name="Index_20_Link">2.3.0.B.2. Splicer Pre-loading<text:tab/>84</text:a></text:p>
          <text:p text:style-name="P190"><text:a xlink:type="simple" xlink:href="#__RefHeading___Toc44258_2214491331" text:style-name="Index_20_Link" text:visited-style-name="Index_20_Link">2.3.0.B.3. Shared Metadata Locking (The Session Lock)<text:tab/>84</text:a></text:p>
          <text:p text:style-name="P188"><text:a xlink:type="simple" xlink:href="#__RefHeading___Toc44038_2214491331" text:style-name="Index_20_Link" text:visited-style-name="Index_20_Link">2.3.1. The Aperture Filter: Adjusting the Telescope’s Filter and Focus<text:tab/>84</text:a></text:p>
          <text:p text:style-name="P189"><text:a xlink:type="simple" xlink:href="#__RefHeading___Toc44040_2214491331" text:style-name="Index_20_Link" text:visited-style-name="Index_20_Link">2.3.1.A. Blocking the Radio Noise (The Lead Shield)<text:tab/>85</text:a></text:p>
          <text:p text:style-name="P190"><text:a xlink:type="simple" xlink:href="#__RefHeading___Toc44042_2214491331" text:style-name="Index_20_Link" text:visited-style-name="Index_20_Link">2.3.1.A.1. Tier 0: Resource Guarding<text:tab/>85</text:a></text:p>
          <text:p text:style-name="P190"><text:a xlink:type="simple" xlink:href="#__RefHeading___Toc44044_2214491331" text:style-name="Index_20_Link" text:visited-style-name="Index_20_Link">2.3.1.A.2. Tier 1: Path &amp; Black Hole Suppression<text:tab/>85</text:a></text:p>
          <text:p text:style-name="P190"><text:a xlink:type="simple" xlink:href="#__RefHeading___Toc44046_2214491331" text:style-name="Index_20_Link" text:visited-style-name="Index_20_Link">2.3.1.A.3. Bayesian Intent Overrides &amp; Stateful Caching<text:tab/>85</text:a></text:p>
          <text:p text:style-name="P189"><text:a xlink:type="simple" xlink:href="#__RefHeading___Toc44048_2214491331" text:style-name="Index_20_Link" text:visited-style-name="Index_20_Link">2.3.1.B. The Visible Spectrum (Linguistic &amp; Integrity Gates)<text:tab/>85</text:a></text:p>
          <text:p text:style-name="P190"><text:a xlink:type="simple" xlink:href="#__RefHeading___Toc44050_2214491331" text:style-name="Index_20_Link" text:visited-style-name="Index_20_Link">2.3.1.B.1. Rule 2.1: If no file extension, check for shebangs<text:tab/>85</text:a></text:p>
          <text:p text:style-name="P190"><text:a xlink:type="simple" xlink:href="#__RefHeading___Toc44052_2214491331" text:style-name="Index_20_Link" text:visited-style-name="Index_20_Link">2.3.1.B.2. Binary Detection<text:tab/>86</text:a></text:p>
          <text:p text:style-name="P190"><text:a xlink:type="simple" xlink:href="#__RefHeading___Toc44054_2214491331" text:style-name="Index_20_Link" text:visited-style-name="Index_20_Link">2.3.1.B.3. Minified Code<text:tab/>86</text:a></text:p>
          <text:p text:style-name="P189"><text:a xlink:type="simple" xlink:href="#__RefHeading___Toc44056_2214491331" text:style-name="Index_20_Link" text:visited-style-name="Index_20_Link">2.3.1.C. Data Classification Matrix<text:tab/>86</text:a></text:p>
          <text:p text:style-name="P188"><text:a xlink:type="simple" xlink:href="#__RefHeading___Toc44058_2214491331" text:style-name="Index_20_Link" text:visited-style-name="Index_20_Link">2.3.2. The GuideStar Protocol: Contextual Intelligence<text:tab/>86</text:a></text:p>
          <text:p text:style-name="P189"><text:a xlink:type="simple" xlink:href="#__RefHeading___Toc44060_2214491331" text:style-name="Index_20_Link" text:visited-style-name="Index_20_Link">2.3.2.A. The Prior Probability Vector<text:tab/>87</text:a></text:p>
          <text:p text:style-name="P190"><text:a xlink:type="simple" xlink:href="#__RefHeading___Toc44062_2214491331" text:style-name="Index_20_Link" text:visited-style-name="Index_20_Link">2.3.2.A.1. Selective Injection<text:tab/>87</text:a></text:p>
          <text:p text:style-name="P190"><text:a xlink:type="simple" xlink:href="#__RefHeading___Toc44064_2214491331" text:style-name="Index_20_Link" text:visited-style-name="Index_20_Link">2.3.2.A.2. Contextual Tagging<text:tab/>87</text:a></text:p>
          <text:p text:style-name="P190"><text:a xlink:type="simple" xlink:href="#__RefHeading___Toc44066_2214491331" text:style-name="Index_20_Link" text:visited-style-name="Index_20_Link">2.3.2.A.3. Whitelist Trust Bonus<text:tab/>87</text:a></text:p>
          <text:p text:style-name="P189"><text:a xlink:type="simple" xlink:href="#__RefHeading___Toc44068_2214491331" text:style-name="Index_20_Link" text:visited-style-name="Index_20_Link">2.3.2.B. The Handover: Intent vs. Identity<text:tab/>87</text:a></text:p>
          <text:p text:style-name="P189"><text:a xlink:type="simple" xlink:href="#__RefHeading___Toc44070_2214491331" text:style-name="Index_20_Link" text:visited-style-name="Index_20_Link">2.3.2.C. The Evidence Hierarchy: Identifying Social Proof<text:tab/>88</text:a></text:p>
          <text:p text:style-name="P190"><text:a xlink:type="simple" xlink:href="#__RefHeading___Toc44072_2214491331" text:style-name="Index_20_Link" text:visited-style-name="Index_20_Link">2.3.2.C.1. Tier 1: Machine Roadmap (Authoritative Proof)<text:tab/>88</text:a></text:p>
          <text:p text:style-name="P190"><text:a xlink:type="simple" xlink:href="#__RefHeading___Toc44074_2214491331" text:style-name="Index_20_Link" text:visited-style-name="Index_20_Link">2.3.2.C.2. Tier 2: Functional Motion (Dynamic Triggers)<text:tab/>88</text:a></text:p>
          <text:p text:style-name="P190"><text:a xlink:type="simple" xlink:href="#__RefHeading___Toc44076_2214491331" text:style-name="Index_20_Link" text:visited-style-name="Index_20_Link">2.3.2.C.3. Tier 3: Informational Context (Heuristic Labels)<text:tab/>89</text:a></text:p>
          <text:p text:style-name="P189"><text:a xlink:type="simple" xlink:href="#__RefHeading___Toc44078_2214491331" text:style-name="Index_20_Link" text:visited-style-name="Index_20_Link">2.3.2.D. Rules for Deep Manifest &amp; README Analysis<text:tab/>89</text:a></text:p>
          <text:p text:style-name="P190"><text:a xlink:type="simple" xlink:href="#__RefHeading___Toc44080_2214491331" text:style-name="Index_20_Link" text:visited-style-name="Index_20_Link">2.3.2.D.1. Deep Manifest Inspection (v6.3.0)<text:tab/>89</text:a></text:p>
          <text:p text:style-name="P190"><text:a xlink:type="simple" xlink:href="#__RefHeading___Toc44082_2214491331" text:style-name="Index_20_Link" text:visited-style-name="Index_20_Link"><text:soft-page-break/>2.3.2.D.2. Tactful README Scanning<text:tab/>89</text:a></text:p>
          <text:p text:style-name="P189"><text:a xlink:type="simple" xlink:href="#__RefHeading___Toc44084_2214491331" text:style-name="Index_20_Link" text:visited-style-name="Index_20_Link">2.3.2.E. Determinism and Inventory Integrity<text:tab/>89</text:a></text:p>
          <text:p text:style-name="P189"><text:a xlink:type="simple" xlink:href="#__RefHeading___Toc44086_2214491331" text:style-name="Index_20_Link" text:visited-style-name="Index_20_Link">2.3.2.F. Escalation to the Language Lens<text:tab/>90</text:a></text:p>
          <text:p text:style-name="P188"><text:a xlink:type="simple" xlink:href="#__RefHeading___Toc42222_730389025" text:style-name="Index_20_Link" text:visited-style-name="Index_20_Link">2.3.3. Focusing the Language Lens<text:tab/>90</text:a></text:p>
          <text:p text:style-name="P189"><text:a xlink:type="simple" xlink:href="#__RefHeading___Toc49719_1155106909" text:style-name="Index_20_Link" text:visited-style-name="Index_20_Link">2.3.3.A. The Bayesian Engine: Prediction vs. Audit<text:tab/>90</text:a></text:p>
          <text:p text:style-name="P189"><text:a xlink:type="simple" xlink:href="#__RefHeading___Toc49721_1155106909" text:style-name="Index_20_Link" text:visited-style-name="Index_20_Link">2.3.3.B. The Three-Stage Scanning Sequence<text:tab/>91</text:a></text:p>
          <text:p text:style-name="P189"><text:a xlink:type="simple" xlink:href="#__RefHeading___Toc49723_1155106909" text:style-name="Index_20_Link" text:visited-style-name="Index_20_Link">2.3.3.C. The Trust Matrix: Multi-Signal Verification<text:tab/>92</text:a></text:p>
          <text:p text:style-name="P189"><text:a xlink:type="simple" xlink:href="#__RefHeading___Toc42228_730389025%20Copy%201" text:style-name="Index_20_Link" text:visited-style-name="Index_20_Link">2.3.3.D. What banishment to the Singularity actually does<text:tab/>93</text:a></text:p>
          <text:p text:style-name="P189"><text:a xlink:type="simple" xlink:href="#__RefHeading___Toc42735_1155106909%20Copy%201" text:style-name="Index_20_Link" text:visited-style-name="Index_20_Link">2.3.3.E. How we handle files that switch languages part way through<text:tab/>93</text:a></text:p>
          <text:p text:style-name="P190"><text:a xlink:type="simple" xlink:href="#__RefHeading___Toc42737_1155106909%20Copy%201" text:style-name="Index_20_Link" text:visited-style-name="Index_20_Link">2.3.3.E.1. The Handshake Protocol (Detection)<text:tab/>93</text:a></text:p>
          <text:p text:style-name="P190"><text:a xlink:type="simple" xlink:href="#__RefHeading___Toc42739_1155106909%20Copy%201" text:style-name="Index_20_Link" text:visited-style-name="Index_20_Link">2.3.3.E.2. The Fluid State Counter (Language Sliding)<text:tab/>94</text:a></text:p>
          <text:p text:style-name="P190"><text:a xlink:type="simple" xlink:href="#__RefHeading___Toc42741_1155106909%20Copy%201" text:style-name="Index_20_Link" text:visited-style-name="Index_20_Link">2.3.3.E.3. The Polyglot Advantage<text:tab/>94</text:a></text:p>
          <text:p text:style-name="P190"><text:a xlink:type="simple" xlink:href="#__RefHeading___Toc42743_1155106909%20Copy%201" text:style-name="Index_20_Link" text:visited-style-name="Index_20_Link">2.3.3.E.4. Scoping Integrity (The Termination Logic)<text:tab/>94</text:a></text:p>
          <text:p text:style-name="P189"><text:a xlink:type="simple" xlink:href="#__RefHeading___Toc49725_1155106909%20Copy%201" text:style-name="Index_20_Link" text:visited-style-name="Index_20_Link">2.3.3.F. Determinism and Inventory Integrity<text:tab/>95</text:a></text:p>
          <text:p text:style-name="P188"><text:a xlink:type="simple" xlink:href="#__RefHeading___Toc44088_2214491331" text:style-name="Index_20_Link" text:visited-style-name="Index_20_Link">2.3.4. The Prism – Splitting the comments from the code<text:tab/>95</text:a></text:p>
          <text:p text:style-name="P189"><text:a xlink:type="simple" xlink:href="#__RefHeading___Toc44090_2214491331" text:style-name="Index_20_Link" text:visited-style-name="Index_20_Link">2.3.4.A. The Refraction Mechanics (The Prism Protocol)<text:tab/>95</text:a></text:p>
          <text:p text:style-name="P190"><text:a xlink:type="simple" xlink:href="#__RefHeading___Toc44092_2214491331" text:style-name="Index_20_Link" text:visited-style-name="Index_20_Link">2.3.4.A.1. Verified Hand-off &amp; Singularity Bypass<text:tab/>96</text:a></text:p>
          <text:p text:style-name="P190"><text:a xlink:type="simple" xlink:href="#__RefHeading___Toc44094_2214491331" text:style-name="Index_20_Link" text:visited-style-name="Index_20_Link">2.3.4.A.2. The 8 Mechanical Families (COMMENT_DEFINITIONS)<text:tab/>96</text:a></text:p>
          <text:p text:style-name="P190"><text:a xlink:type="simple" xlink:href="#__RefHeading___Toc44096_2214491331" text:style-name="Index_20_Link" text:visited-style-name="Index_20_Link">2.3.4.A.3. The Integrated Protection Shields<text:tab/>97</text:a></text:p>
          <text:p text:style-name="P190"><text:a xlink:type="simple" xlink:href="#__RefHeading___Toc44098_2214491331" text:style-name="Index_20_Link" text:visited-style-name="Index_20_Link">2.3.4.A.4. Polyglot Partitioning &amp; Language Sliding<text:tab/>97</text:a></text:p>
          <text:p text:style-name="P190"><text:a xlink:type="simple" xlink:href="#__RefHeading___Toc44100_2214491331" text:style-name="Index_20_Link" text:visited-style-name="Index_20_Link">2.3.4.A.5. Output Streams: The Dual-Mass Result<text:tab/>98</text:a></text:p>
          <text:p text:style-name="P188"><text:a xlink:type="simple" xlink:href="#__RefHeading___Toc44102_2214491331" text:style-name="Index_20_Link" text:visited-style-name="Index_20_Link">2.3.5. The Detector – The Logic Splicer &amp; Cartographer<text:tab/>98</text:a></text:p>
          <text:p text:style-name="P189"><text:a xlink:type="simple" xlink:href="#__RefHeading___Toc44104_2214491331" text:style-name="Index_20_Link" text:visited-style-name="Index_20_Link">2.3.5.A. Overview: The EMCCD Sensor &amp; Galactic Cartography<text:tab/>98</text:a></text:p>
          <text:p text:style-name="P190"><text:a xlink:type="simple" xlink:href="#__RefHeading___Toc44106_2214491331" text:style-name="Index_20_Link" text:visited-style-name="Index_20_Link">2.3.5.A.1. Hardware Role: The Signal Converter (detector.py)<text:tab/>98</text:a></text:p>
          <text:p text:style-name="P190"><text:a xlink:type="simple" xlink:href="#__RefHeading___Toc44108_2214491331" text:style-name="Index_20_Link" text:visited-style-name="Index_20_Link">2.3.5.A.2. Pre-Processing Guardrails: The Singularity Bypass<text:tab/>99</text:a></text:p>
          <text:p text:style-name="P189"><text:a xlink:type="simple" xlink:href="#__RefHeading___Toc44110_2214491331" text:style-name="Index_20_Link" text:visited-style-name="Index_20_Link">2.3.5.B. Sensory Mapping: The Charge-Coupled Registry<text:tab/>99</text:a></text:p>
          <text:p text:style-name="P190"><text:a xlink:type="simple" xlink:href="#__RefHeading___Toc44112_2214491331" text:style-name="Index_20_Link" text:visited-style-name="Index_20_Link">2.3.5.B.1. The Spectral Categories (Core Mapping)<text:tab/>99</text:a></text:p>
          <text:p text:style-name="P190"><text:a xlink:type="simple" xlink:href="#__RefHeading___Toc44114_2214491331" text:style-name="Index_20_Link" text:visited-style-name="Index_20_Link">2.3.5.B.2. The Metadata Extraction Engine: Decoding comment_stream<text:tab/>99</text:a></text:p>
          <text:p text:style-name="P190"><text:a xlink:type="simple" xlink:href="#__RefHeading___Toc44116_2214491331" text:style-name="Index_20_Link" text:visited-style-name="Index_20_Link">2.3.5.B.3. The Atomic Literal Shield: Index-Aligned Shielding<text:tab/>99</text:a></text:p>
          <text:p text:style-name="P188"><text:a xlink:type="simple" xlink:href="#__RefHeading___Toc44118_2214491331" text:style-name="Index_20_Link" text:visited-style-name="Index_20_Link">2.3.5.C. Structural Segmentation: The Five-Mode Optical Switch<text:tab/>100</text:a></text:p>
          <text:p text:style-name="P190"><text:a xlink:type="simple" xlink:href="#__RefHeading___Toc44120_2214491331" text:style-name="Index_20_Link" text:visited-style-name="Index_20_Link">2.3.5.C.1. Integration Mode A: Greedy Label-Based Segmentation (_slice_by_labels)<text:tab/>100</text:a></text:p>
          <text:p text:style-name="P190"><text:a xlink:type="simple" xlink:href="#__RefHeading___Toc44122_2214491331" text:style-name="Index_20_Link" text:visited-style-name="Index_20_Link">2.3.5.C.2. Integration Mode B: Recursive Scope Analysis (_slice_by_braces)<text:tab/>100</text:a></text:p>
          <text:p text:style-name="P190"><text:a xlink:type="simple" xlink:href="#__RefHeading___Toc44124_2214491331" text:style-name="Index_20_Link" text:visited-style-name="Index_20_Link">2.3.5.C.3. Integration Mode C: Indentation-Based Scope Resolution (_slice_by_indentation)<text:tab/>101</text:a></text:p>
          <text:p text:style-name="P190"><text:a xlink:type="simple" xlink:href="#__RefHeading___Toc44126_2214491331" text:style-name="Index_20_Link" text:visited-style-name="Index_20_Link">2.3.5.C.4. Integration Mode D: Semantic Handshake Stack (_slice_by_keywords)<text:tab/>101</text:a></text:p>
          <text:p text:style-name="P190"><text:a xlink:type="simple" xlink:href="#__RefHeading___Toc44128_2214491331" text:style-name="Index_20_Link" text:visited-style-name="Index_20_Link">2.3.5.C.5. Integration Mode E: Terminator Cleaving (_slice_by_terminator)<text:tab/>101</text:a></text:p>
          <text:p text:style-name="P189"><text:a xlink:type="simple" xlink:href="#__RefHeading___Toc44130_2214491331" text:style-name="Index_20_Link" text:visited-style-name="Index_20_Link">2.3.5.D. Metric Vectorization: Multi-Dimensional Physics<text:tab/>101</text:a></text:p>
          <text:p text:style-name="P190"><text:a xlink:type="simple" xlink:href="#__RefHeading___Toc44132_2214491331" text:style-name="Index_20_Link" text:visited-style-name="Index_20_Link">2.3.5.D.1. Physical Attribute Formulas<text:tab/>102</text:a></text:p>
          <text:p text:style-name="P188"><text:a xlink:type="simple" xlink:href="#__RefHeading___Toc44134_2214491331" text:style-name="Index_20_Link" text:visited-style-name="Index_20_Link">2.3.5.E. The Cartographer: Fractal Fibonacci Positioning<text:tab/>102</text:a></text:p>
          <text:p text:style-name="P190"><text:a xlink:type="simple" xlink:href="#__RefHeading___Toc44136_2214491331" text:style-name="Index_20_Link" text:visited-style-name="Index_20_Link">2.3.5.E.1. Galactic Tiling (Macro Layout)<text:tab/>102</text:a></text:p>
          <text:p text:style-name="P190"><text:a xlink:type="simple" xlink:href="#__RefHeading___Toc44138_2214491331" text:style-name="Index_20_Link" text:visited-style-name="Index_20_Link">2.3.5.E.2. Local Star Systems (Micro Layout)<text:tab/>103</text:a></text:p>
          <text:p text:style-name="P190"><text:a xlink:type="simple" xlink:href="#__RefHeading___Toc44140_2214491331" text:style-name="Index_20_Link" text:visited-style-name="Index_20_Link">2.3.5.E.3. Organic Entropy (Hash Jitter)<text:tab/>103</text:a></text:p>
          <text:p text:style-name="P189"><text:a xlink:type="simple" xlink:href="#__RefHeading___Toc44142_2214491331" text:style-name="Index_20_Link" text:visited-style-name="Index_20_Link">2.3.5.F. Calibration &amp; Operational Sensitivity Modes<text:tab/>103</text:a></text:p>
          <text:p text:style-name="P190"><text:a xlink:type="simple" xlink:href="#__RefHeading___Toc44144_2214491331" text:style-name="Index_20_Link" text:visited-style-name="Index_20_Link">2.3.5.F.1. Mode: Certified Architecture (Threshold: 0.78)<text:tab/>104</text:a></text:p>
          <text:p text:style-name="P190"><text:a xlink:type="simple" xlink:href="#__RefHeading___Toc44146_2214491331" text:style-name="Index_20_Link" text:visited-style-name="Index_20_Link">2.3.5.F.2. Mode: Event Horizon (Threshold: 0.42) - RECOMMENDED<text:tab/>104</text:a></text:p>
          <text:p text:style-name="P190"><text:a xlink:type="simple" xlink:href="#__RefHeading___Toc44148_2214491331" text:style-name="Index_20_Link" text:visited-style-name="Index_20_Link">2.3.5.F.3. Mode: Limit of Detection (Threshold: 0.30)<text:tab/>105</text:a></text:p>
          <text:p text:style-name="P188"><text:a xlink:type="simple" xlink:href="#__RefHeading___Toc44150_2214491331" text:style-name="Index_20_Link" text:visited-style-name="Index_20_Link">2.3.6. Signal Processing (Equations and 2nd Pass scanning Calculations)<text:tab/>105</text:a></text:p>
          <text:p text:style-name="P189"><text:a xlink:type="simple" xlink:href="#__RefHeading___Toc44152_2214491331" text:style-name="Index_20_Link" text:visited-style-name="Index_20_Link">2.3.6.A. Overview: The Post-Processing Pipeline<text:tab/>105</text:a></text:p>
          <text:p text:style-name="P189"><text:a xlink:type="simple" xlink:href="#__RefHeading___Toc44154_2214491331" text:style-name="Index_20_Link" text:visited-style-name="Index_20_Link"><text:soft-page-break/>2.3.6.B. Structural Forensics: The Universal Exposure Framework<text:tab/>105</text:a></text:p>
          <text:p text:style-name="P189"><text:a xlink:type="simple" xlink:href="#__RefHeading___Toc44156_2214491331" text:style-name="Index_20_Link" text:visited-style-name="Index_20_Link">2.3.6.C. Standardization: The Tiered Physics Model<text:tab/>106</text:a></text:p>
          <text:p text:style-name="P190"><text:a xlink:type="simple" xlink:href="#__RefHeading___Toc44158_2214491331" text:style-name="Index_20_Link" text:visited-style-name="Index_20_Link">2.3.6.C.1. The Normalization Tiers<text:tab/>106</text:a></text:p>
          <text:p text:style-name="P189"><text:a xlink:type="simple" xlink:href="#__RefHeading___Toc44160_2214491331" text:style-name="Index_20_Link" text:visited-style-name="Index_20_Link">2.3.6.D. The Physics Engine: Weighted Asymmetry &amp; Mass<text:tab/>106</text:a></text:p>
          <text:p text:style-name="P190"><text:a xlink:type="simple" xlink:href="#__RefHeading___Toc44162_2214491331" text:style-name="Index_20_Link" text:visited-style-name="Index_20_Link">2.3.6.D.1. The 2.5x Risk Bias<text:tab/>106</text:a></text:p>
          <text:p text:style-name="P188"><text:a xlink:type="simple" xlink:href="#__RefHeading___Toc44164_2214491331" text:style-name="Index_20_Link" text:visited-style-name="Index_20_Link">2.3.7. The Spectral Audit (Quality Control)<text:tab/>106</text:a></text:p>
          <text:p text:style-name="P189"><text:a xlink:type="simple" xlink:href="#__RefHeading___Toc44166_2214491331" text:style-name="Index_20_Link" text:visited-style-name="Index_20_Link">2.3.7.A. Signal Density Verification (Intent Density)<text:tab/>107</text:a></text:p>
          <text:p text:style-name="P190"><text:a xlink:type="simple" xlink:href="#__RefHeading___Toc44168_2214491331" text:style-name="Index_20_Link" text:visited-style-name="Index_20_Link">2.3.7.A.1. Logic Signal vs. Noise<text:tab/>107</text:a></text:p>
          <text:p text:style-name="P189"><text:a xlink:type="simple" xlink:href="#__RefHeading___Toc44170_2214491331" text:style-name="Index_20_Link" text:visited-style-name="Index_20_Link">2.3.7.B. Statistical Outlier Detection (The MAD Protocol)<text:tab/>107</text:a></text:p>
          <text:p text:style-name="P190"><text:a xlink:type="simple" xlink:href="#__RefHeading___Toc44172_2214491331" text:style-name="Index_20_Link" text:visited-style-name="Index_20_Link">2.3.7.B.1. Repository Baseline Calibration<text:tab/>107</text:a></text:p>
          <text:p text:style-name="P190"><text:a xlink:type="simple" xlink:href="#__RefHeading___Toc44174_2214491331" text:style-name="Index_20_Link" text:visited-style-name="Index_20_Link">2.3.7.B.2. Polyglot Baseline Defense<text:tab/>108</text:a></text:p>
          <text:p text:style-name="P190"><text:a xlink:type="simple" xlink:href="#__RefHeading___Toc44176_2214491331" text:style-name="Index_20_Link" text:visited-style-name="Index_20_Link">2.3.7.B.3. Bayesian Threshold Gating (T_adj)<text:tab/>108</text:a></text:p>
          <text:p text:style-name="P189"><text:a xlink:type="simple" xlink:href="#__RefHeading___Toc44178_2214491331" text:style-name="Index_20_Link" text:visited-style-name="Index_20_Link">2.3.7.C. The Event Horizon (The 50/0 Law and Relegation)<text:tab/>108</text:a></text:p>
          <text:p text:style-name="P189"><text:a xlink:type="simple" xlink:href="#__RefHeading___Toc44180_2214491331" text:style-name="Index_20_Link" text:visited-style-name="Index_20_Link">2.3.7.D. The Activation Protocol (Statistical Readiness)<text:tab/>109</text:a></text:p>
          <text:p text:style-name="P190"><text:a xlink:type="simple" xlink:href="#__RefHeading___Toc44182_2214491331" text:style-name="Index_20_Link" text:visited-style-name="Index_20_Link">2.3.7.D.1. Criteria for Statistical Engagement<text:tab/>109</text:a></text:p>
          <text:p text:style-name="P190"><text:a xlink:type="simple" xlink:href="#__RefHeading___Toc44184_2214491331" text:style-name="Index_20_Link" text:visited-style-name="Index_20_Link">2.3.7.D.2. Fallback: Inert Matter Exemption<text:tab/>109</text:a></text:p>
          <text:p text:style-name="P188"><text:a xlink:type="simple" xlink:href="#__RefHeading___Toc44186_2214491331" text:style-name="Index_20_Link" text:visited-style-name="Index_20_Link">2.3.8. The Audit Recorder <text:tab/>109</text:a></text:p>
          <text:p text:style-name="P189"><text:a xlink:type="simple" xlink:href="#__RefHeading___Toc44188_2214491331" text:style-name="Index_20_Link" text:visited-style-name="Index_20_Link">2.3.8.A. Root Structure (The Mission Archive)<text:tab/>109</text:a></text:p>
          <text:p text:style-name="P189"><text:a xlink:type="simple" xlink:href="#__RefHeading___Toc44190_2214491331" text:style-name="Index_20_Link" text:visited-style-name="Index_20_Link">2.3.8.B. Standardized Artifact Object Structure<text:tab/>110</text:a></text:p>
          <text:p text:style-name="P190"><text:a xlink:type="simple" xlink:href="#__RefHeading___Toc44192_2214491331" text:style-name="Index_20_Link" text:visited-style-name="Index_20_Link">2.3.8.B.1. Identity (The Passport)<text:tab/>110</text:a></text:p>
          <text:p text:style-name="P190"><text:a xlink:type="simple" xlink:href="#__RefHeading___Toc44194_2214491331" text:style-name="Index_20_Link" text:visited-style-name="Index_20_Link">2.3.8.B.2. Spatial Coordinates &amp; Galactic Profile<text:tab/>110</text:a></text:p>
          <text:p text:style-name="P190"><text:a xlink:type="simple" xlink:href="#__RefHeading___Toc44196_2214491331" text:style-name="Index_20_Link" text:visited-style-name="Index_20_Link">2.3.8.B.3. Risk Exposures (%)<text:tab/>111</text:a></text:p>
          <text:p text:style-name="P189"><text:a xlink:type="simple" xlink:href="#__RefHeading___Toc44198_2214491331" text:style-name="Index_20_Link" text:visited-style-name="Index_20_Link">2.3.8.C. Descriptive Descriptors (The Translation Layer)<text:tab/>111</text:a></text:p>
          <text:p text:style-name="P190"><text:a xlink:type="simple" xlink:href="#__RefHeading___Toc44200_2214491331" text:style-name="Index_20_Link" text:visited-style-name="Index_20_Link">2.3.8.C.1. Core Structural Descriptors<text:tab/>111</text:a></text:p>
          <text:p text:style-name="P190"><text:a xlink:type="simple" xlink:href="#__RefHeading___Toc44202_2214491331" text:style-name="Index_20_Link" text:visited-style-name="Index_20_Link">2.3.8.C.2. Risk and Vulnerability Descriptors<text:tab/>112</text:a></text:p>
          <text:p text:style-name="P190"><text:a xlink:type="simple" xlink:href="#__RefHeading___Toc44204_2214491331" text:style-name="Index_20_Link" text:visited-style-name="Index_20_Link">2.3.8.C.3. Low-Level and Environment Descriptors<text:tab/>112</text:a></text:p>
          <text:p text:style-name="P189"><text:a xlink:type="simple" xlink:href="#__RefHeading___Toc44206_2214491331" text:style-name="Index_20_Link" text:visited-style-name="Index_20_Link">2.3.8.D. Example Forensic JSON (Spec v6.2.5)<text:tab/>112</text:a></text:p>
          <text:p text:style-name="P189"><text:a xlink:type="simple" xlink:href="#__RefHeading___Toc44208_2214491331" text:style-name="Index_20_Link" text:visited-style-name="Index_20_Link">2.3.8.E. Forensic Report: Extremity Mapping<text:tab/>113</text:a></text:p>
          <text:p text:style-name="P190"><text:a xlink:type="simple" xlink:href="#__RefHeading___Toc44210_2214491331" text:style-name="Index_20_Link" text:visited-style-name="Index_20_Link">2.3.8.E.1. Metric Ranking Requirements<text:tab/>113</text:a></text:p>
          <text:p text:style-name="P190"><text:a xlink:type="simple" xlink:href="#__RefHeading___Toc44212_2214491331" text:style-name="Index_20_Link" text:visited-style-name="Index_20_Link">2.3.8.E.2. Language Standards<text:tab/>113</text:a></text:p>
          <text:p text:style-name="P188"><text:a xlink:type="simple" xlink:href="#__RefHeading___Toc44214_2214491331" text:style-name="Index_20_Link" text:visited-style-name="Index_20_Link">2.3.9. The GPU Recorder (Hypercompressed Data Storage)<text:tab/>113</text:a></text:p>
          <text:p text:style-name="P189"><text:a xlink:type="simple" xlink:href="#__RefHeading___Toc44216_2214491331" text:style-name="Index_20_Link" text:visited-style-name="Index_20_Link">2.3.9.A. Overview: The High-Speed Recording Head<text:tab/>114</text:a></text:p>
          <text:p text:style-name="P189"><text:a xlink:type="simple" xlink:href="#__RefHeading___Toc44218_2214491331" text:style-name="Index_20_Link" text:visited-style-name="Index_20_Link">2.3.9.B. Destructive RAM Eviction (Stage 3.3 Protocol)<text:tab/>114</text:a></text:p>
          <text:p text:style-name="P190"><text:a xlink:type="simple" xlink:href="#__RefHeading___Toc44220_2214491331" text:style-name="Index_20_Link" text:visited-style-name="Index_20_Link">2.3.9.B.1. Memory Reclamation Heuristics<text:tab/>114</text:a></text:p>
          <text:p text:style-name="P189"><text:a xlink:type="simple" xlink:href="#__RefHeading___Toc44222_2214491331" text:style-name="Index_20_Link" text:visited-style-name="Index_20_Link">2.3.9.C. The Columnar Pivot (Structure of Arrays)<text:tab/>114</text:a></text:p>
          <text:p text:style-name="P190"><text:a xlink:type="simple" xlink:href="#__RefHeading___Toc44224_2214491331" text:style-name="Index_20_Link" text:visited-style-name="Index_20_Link">2.3.9.C.1. Primary Column Schema<text:tab/>114</text:a></text:p>
          <text:p text:style-name="P189"><text:a xlink:type="simple" xlink:href="#__RefHeading___Toc44226_2214491331" text:style-name="Index_20_Link" text:visited-style-name="Index_20_Link">2.3.9.D. String Interning &amp; Text Minification<text:tab/>115</text:a></text:p>
          <text:p text:style-name="P190"><text:a xlink:type="simple" xlink:href="#__RefHeading___Toc44228_2214491331" text:style-name="Index_20_Link" text:visited-style-name="Index_20_Link">2.3.9.D.1. Registry Lookups<text:tab/>115</text:a></text:p>
          <text:p text:style-name="P189"><text:a xlink:type="simple" xlink:href="#__RefHeading___Toc44230_2214491331" text:style-name="Index_20_Link" text:visited-style-name="Index_20_Link">2.3.9.E. Numerical Quantization &amp; Positional Schemas<text:tab/>115</text:a></text:p>
          <text:p text:style-name="P190"><text:a xlink:type="simple" xlink:href="#__RefHeading___Toc44232_2214491331" text:style-name="Index_20_Link" text:visited-style-name="Index_20_Link">2.3.9.E.1. Physics and Exposure Scaling<text:tab/>115</text:a></text:p>
          <text:p text:style-name="P190"><text:a xlink:type="simple" xlink:href="#__RefHeading___Toc44234_2214491331" text:style-name="Index_20_Link" text:visited-style-name="Index_20_Link">2.3.9.E.2. Positional Vector Precision<text:tab/>115</text:a></text:p>
          <text:p text:style-name="P189"><text:a xlink:type="simple" xlink:href="#__RefHeading___Toc44236_2214491331" text:style-name="Index_20_Link" text:visited-style-name="Index_20_Link">2.3.9.F. Final Sealing (Maximized Compression)<text:tab/>116</text:a></text:p>
          <text:p text:style-name="P188"><text:a xlink:type="simple" xlink:href="#__RefHeading___Toc11741_959624642" text:style-name="Index_20_Link" text:visited-style-name="Index_20_Link">2.3.10. Overview of scanner_config.py<text:tab/>116</text:a></text:p>
          <text:p text:style-name="P187"><text:a xlink:type="simple" xlink:href="#__RefHeading___Toc65767_4054234433" text:style-name="Index_20_Link" text:visited-style-name="Index_20_Link">2.4. Strategy Validation – Does this work?<text:tab/>117</text:a></text:p>
          <text:p text:style-name="P188"><text:a xlink:type="simple" xlink:href="#__RefHeading___Toc36590_1787320247" text:style-name="Index_20_Link" text:visited-style-name="Index_20_Link"><text:span text:style-name="T300">2.</text:span><text:span text:style-name="T300">4.0. Claim 1 – Optimum Search Strategies Change with Scale</text:span><text:tab/>117</text:a></text:p>
          <text:p text:style-name="P188"><text:a xlink:type="simple" xlink:href="#__RefHeading___Toc65769_4054234433" text:style-name="Index_20_Link" text:visited-style-name="Index_20_Link"><text:span text:style-name="T300">2.4.</text:span><text:span text:style-name="T300">1. </text:span><text:span text:style-name="T300">Claim 2 – Coding Languages </text:span><text:span text:style-name="T300">Evol</text:span><text:span text:style-name="T300">ve</text:span><text:span text:style-name="T300"> Toward</text:span><text:span text:style-name="T300">s</text:span><text:span text:style-name="T300"> </text:span><text:span text:style-name="T300">Explicitness</text:span><text:tab/>118</text:a></text:p>
          <text:p text:style-name="P188"><text:a xlink:type="simple" xlink:href="#__RefHeading___Toc65771_4054234433" text:style-name="Index_20_Link" text:visited-style-name="Index_20_Link"><text:span text:style-name="T300">2.4.</text:span><text:span text:style-name="T300">2. </text:span><text:span text:style-name="T300">Assessing Complexity Across 27 Languages</text:span><text:tab/>118</text:a></text:p>
          <text:p text:style-name="P189"><text:a xlink:type="simple" xlink:href="#__RefHeading___Toc65773_4054234433" text:style-name="Index_20_Link" text:visited-style-name="Index_20_Link">2.4.2.1. False Positives &amp; Error Direction (Equations)<text:tab/>120</text:a></text:p>
          <text:p text:style-name="P188"><text:a xlink:type="simple" xlink:href="#__RefHeading___Toc65775_4054234433" text:style-name="Index_20_Link" text:visited-style-name="Index_20_Link">2.4.3. Assessing Regex Sub-Equations Across 27 Languages<text:tab/>120</text:a></text:p>
          <text:p text:style-name="P189"><text:a xlink:type="simple" xlink:href="#__RefHeading___Toc65777_4054234433" text:style-name="Index_20_Link" text:visited-style-name="Index_20_Link"><text:soft-page-break/>2.4.3.1. False Positives &amp; Error Direction (Overlays)<text:tab/>124</text:a></text:p>
          <text:p text:style-name="P188"><text:a xlink:type="simple" xlink:href="#__RefHeading___Toc65779_4054234433" text:style-name="Index_20_Link" text:visited-style-name="Index_20_Link">2.4.4. Assessing Risk Exposure Across 27 Languages<text:tab/>125</text:a></text:p>
          <text:p text:style-name="P189"><text:a xlink:type="simple" xlink:href="#__RefHeading___Toc65781_4054234433" text:style-name="Index_20_Link" text:visited-style-name="Index_20_Link">2.4.4.1. False Positives &amp; Error Direction (Physics)<text:tab/>126</text:a></text:p>
          <text:p text:style-name="P188"><text:a xlink:type="simple" xlink:href="#__RefHeading___Toc65783_4054234433" text:style-name="Index_20_Link" text:visited-style-name="Index_20_Link">2.4.5. <text:span text:style-name="T300">Summary of </text:span><text:span text:style-name="T300">Analys</text:span><text:span text:style-name="T300">es</text:span><text:span text:style-name="T300">: </text:span><text:span text:style-name="T300">The Evolution towards Explicitness</text:span><text:tab/>126</text:a></text:p>
          <text:p text:style-name="P189"><text:a xlink:type="simple" xlink:href="#__RefHeading___Toc65785_4054234433" text:style-name="Index_20_Link" text:visited-style-name="Index_20_Link">2.4.5.1. The "Color Orange" Paradox (Linguistic Gaps)<text:tab/>127</text:a></text:p>
          <text:p text:style-name="P189"><text:a xlink:type="simple" xlink:href="#__RefHeading___Toc65787_4054234433" text:style-name="Index_20_Link" text:visited-style-name="Index_20_Link">2.4.5.2. The Progression of Clarity (Implicit to Explicit)<text:tab/>127</text:a></text:p>
          <text:p text:style-name="P189"><text:a xlink:type="simple" xlink:href="#__RefHeading___Toc65789_4054234433" text:style-name="Index_20_Link" text:visited-style-name="Index_20_Link">2.4.5.3. Conclusion: Design for Scannability<text:tab/>128</text:a></text:p>
          <text:p text:style-name="P188"><text:a xlink:type="simple" xlink:href="#__RefHeading___Toc65791_4054234433" text:style-name="Index_20_Link" text:visited-style-name="Index_20_Link">2.4.6. Tiering Languages based on their Implicitness<text:tab/>128</text:a></text:p>
          <text:p text:style-name="P189"><text:a xlink:type="simple" xlink:href="#__RefHeading___Toc65793_4054234433" text:style-name="Index_20_Link" text:visited-style-name="Index_20_Link">2.4.6.1. Tier 1: Explicit Enough for ~99% Accurate Regex Scanning<text:tab/>129</text:a></text:p>
          <text:p text:style-name="P189"><text:a xlink:type="simple" xlink:href="#__RefHeading___Toc65795_4054234433" text:style-name="Index_20_Link" text:visited-style-name="Index_20_Link">2.4.6.2. Tier 2: Explicit with some Implicit<text:tab/>129</text:a></text:p>
          <text:p text:style-name="P189"><text:a xlink:type="simple" xlink:href="#__RefHeading___Toc65797_4054234433" text:style-name="Index_20_Link" text:visited-style-name="Index_20_Link">2.4.6.3. Tier 3: Mostly Implicit<text:tab/>129</text:a></text:p>
          <text:p text:style-name="P186"><text:a xlink:type="simple" xlink:href="#__RefHeading___Toc11715_959624642" text:style-name="Index_20_Link" text:visited-style-name="Index_20_Link">3. The Visual Engine (Frontend Rendering)<text:tab/>130</text:a></text:p>
          <text:p text:style-name="P187"><text:a xlink:type="simple" xlink:href="#__RefHeading___Toc16516_2209633182" text:style-name="Index_20_Link" text:visited-style-name="Index_20_Link">3.1 3D Engine Architecture: The Persistent Universe<text:tab/>130</text:a></text:p>
          <text:p text:style-name="P188"><text:a xlink:type="simple" xlink:href="#__RefHeading___Toc16518_2209633182" text:style-name="Index_20_Link" text:visited-style-name="Index_20_Link">3.1.1 System Overview<text:tab/>130</text:a></text:p>
          <text:p text:style-name="P188"><text:a xlink:type="simple" xlink:href="#__RefHeading___Toc16520_2209633182" text:style-name="Index_20_Link" text:visited-style-name="Index_20_Link">3.1.2 Philosophy: "The Camera is a Passenger"<text:tab/>130</text:a></text:p>
          <text:p text:style-name="P188"><text:a xlink:type="simple" xlink:href="#__RefHeading___Toc16522_2209633182" text:style-name="Index_20_Link" text:visited-style-name="Index_20_Link">3.1.3 Material Synthesis &amp; Performance (The Binning Strategy)<text:tab/>130</text:a></text:p>
          <text:p text:style-name="P188"><text:a xlink:type="simple" xlink:href="#__RefHeading___Toc16526_2209633182" text:style-name="Index_20_Link" text:visited-style-name="Index_20_Link">3.1.5 Atmosphere &amp; Volumetric Simulation<text:tab/>130</text:a></text:p>
          <text:p text:style-name="P188"><text:a xlink:type="simple" xlink:href="#__RefHeading___Toc16528_2209633182" text:style-name="Index_20_Link" text:visited-style-name="Index_20_Link">3.1.6 Unified Interactivity Flow<text:tab/>131</text:a></text:p>
          <text:p text:style-name="P188"><text:a xlink:type="simple" xlink:href="#__RefHeading___Toc16530_2209633182" text:style-name="Index_20_Link" text:visited-style-name="Index_20_Link">3.1.7 Optimization &amp; Culling<text:tab/>131</text:a></text:p>
          <text:p text:style-name="P188"><text:a xlink:type="simple" xlink:href="#__RefHeading___Toc24597_2209633182" text:style-name="Index_20_Link" text:visited-style-name="Index_20_Link">3.1.8 The "SpriteGlo" Technique<text:tab/>132</text:a></text:p>
          <text:p text:style-name="P187"><text:a xlink:type="simple" xlink:href="#__RefHeading___Toc78726_2209633182" text:style-name="Index_20_Link" text:visited-style-name="Index_20_Link">3.2 Atmosphere &amp; Immersion<text:tab/>132</text:a></text:p>
          <text:p text:style-name="P188"><text:a xlink:type="simple" xlink:href="#__RefHeading___Toc78728_2209633182" text:style-name="Index_20_Link" text:visited-style-name="Index_20_Link">3.2.1 The Universal Radiance Protocol<text:tab/>132</text:a></text:p>
          <text:p text:style-name="P187"><text:a xlink:type="simple" xlink:href="#__RefHeading___Toc47686_2813440148" text:style-name="Index_20_Link" text:visited-style-name="Index_20_Link">3.3.2. Visual Color Themes: Basal States &amp; Metric Overlays<text:tab/>132</text:a></text:p>
          <text:p text:style-name="P188"><text:a xlink:type="simple" xlink:href="#__RefHeading___Toc139651_2813440148" text:style-name="Index_20_Link" text:visited-style-name="Index_20_Link">3.3.2.A. Default: Ice Crystal (The Organic Structure)<text:tab/>132</text:a></text:p>
          <text:p text:style-name="P188"><text:a xlink:type="simple" xlink:href="#__RefHeading___Toc47688_2813440148" text:style-name="Index_20_Link" text:visited-style-name="Index_20_Link">3.3.2.B. The Galactic Empire<text:tab/>133</text:a></text:p>
          <text:p text:style-name="P188"><text:a xlink:type="simple" xlink:href="#__RefHeading___Toc139653_2813440148" text:style-name="Index_20_Link" text:visited-style-name="Index_20_Link">3.3.2.C. The Matrix (Hacker Aesthetic)<text:tab/>134</text:a></text:p>
          <text:p text:style-name="P188"><text:a xlink:type="simple" xlink:href="#__RefHeading___Toc139655_2813440148" text:style-name="Index_20_Link" text:visited-style-name="Index_20_Link">3.3.2.D. High Vis (Accessibility / High Contrast)<text:tab/>134</text:a></text:p>
          <text:p text:style-name="P186"><text:a xlink:type="simple" xlink:href="#__RefHeading___Toc11773_959624642" text:style-name="Index_20_Link" text:visited-style-name="Index_20_Link">4. Interaction &amp; User Experience (UX)<text:tab/>134</text:a></text:p>
          <text:p text:style-name="P187"><text:a xlink:type="simple" xlink:href="#__RefHeading___Toc24599_2209633182" text:style-name="Index_20_Link" text:visited-style-name="Index_20_Link">4.1 Navigation Dynamics<text:tab/>135</text:a></text:p>
          <text:p text:style-name="P188"><text:a xlink:type="simple" xlink:href="#__RefHeading___Toc32754_2209633182" text:style-name="Index_20_Link" text:visited-style-name="Index_20_Link">A. The "Warp" Flow<text:tab/>135</text:a></text:p>
          <text:p text:style-name="P188"><text:a xlink:type="simple" xlink:href="#__RefHeading___Toc32756_2209633182" text:style-name="Index_20_Link" text:visited-style-name="Index_20_Link">B. View Mode Toggling<text:tab/>135</text:a></text:p>
          <text:p text:style-name="P188"><text:a xlink:type="simple" xlink:href="#__RefHeading___Toc32758_2209633182" text:style-name="Index_20_Link" text:visited-style-name="Index_20_Link">C. Camera &amp; Visual Response<text:tab/>135</text:a></text:p>
          <text:p text:style-name="P188"><text:a xlink:type="simple" xlink:href="#__RefHeading___Toc32760_2209633182" text:style-name="Index_20_Link" text:visited-style-name="Index_20_Link">D. Unified Interactivity &amp; Selection Model<text:tab/>135</text:a></text:p>
          <text:p text:style-name="P188"><text:a xlink:type="simple" xlink:href="#__RefHeading___Toc32762_2209633182" text:style-name="Index_20_Link" text:visited-style-name="Index_20_Link">E. Drag-Threshold Safety<text:tab/>136</text:a></text:p>
          <text:p text:style-name="P188"><text:a xlink:type="simple" xlink:href="#__RefHeading___Toc32764_2209633182" text:style-name="Index_20_Link" text:visited-style-name="Index_20_Link">F. LOD (Level of Detail) Optimization<text:tab/>136</text:a></text:p>
          <text:p text:style-name="P188"><text:a xlink:type="simple" xlink:href="#__RefHeading___Toc32766_2209633182" text:style-name="Index_20_Link" text:visited-style-name="Index_20_Link">G. Single-Sector Isolation (Stage Mode):<text:tab/>136</text:a></text:p>
          <text:p text:style-name="P187"><text:a xlink:type="simple" xlink:href="#__RefHeading___Toc11781_959624642" text:style-name="Index_20_Link" text:visited-style-name="Index_20_Link">4.2 The Heads-Up Display (HUD)<text:tab/>136</text:a></text:p>
          <text:p text:style-name="P187"><text:a xlink:type="simple" xlink:href="#__RefHeading___Toc11783_959624642" text:style-name="Index_20_Link" text:visited-style-name="Index_20_Link">4.3 What happens when you click on a file – Deep Dive Interaction<text:tab/>136</text:a></text:p>
          <text:p text:style-name="P188"><text:a xlink:type="simple" xlink:href="#__RefHeading___Toc11785_959624642" text:style-name="Index_20_Link" text:visited-style-name="Index_20_Link">A. Vital Signs Header<text:tab/>137</text:a></text:p>
          <text:p text:style-name="P188"><text:a xlink:type="simple" xlink:href="#__RefHeading___Toc11787_959624642" text:style-name="Index_20_Link" text:visited-style-name="Index_20_Link">B. Behavioral Badge Display<text:tab/>137</text:a></text:p>
          <text:p text:style-name="P187"><text:a xlink:type="simple" xlink:href="#__RefHeading___Toc32768_2209633182" text:style-name="Index_20_Link" text:visited-style-name="Index_20_Link">4.4 Search &amp; Discovery: Navigation as Teleportation<text:tab/>137</text:a></text:p>
          <text:p text:style-name="P188"><text:a xlink:type="simple" xlink:href="#__RefHeading___Toc32770_2209633182" text:style-name="Index_20_Link" text:visited-style-name="Index_20_Link">4.4.1 The Navigation Dilemma: Scale vs. Legibility<text:tab/>137</text:a></text:p>
          <text:p text:style-name="P188"><text:a xlink:type="simple" xlink:href="#__RefHeading___Toc32772_2209633182" text:style-name="Index_20_Link" text:visited-style-name="Index_20_Link">4.4.2 Search Scope: Thinking Like a Developer<text:tab/>137</text:a></text:p>
          <text:p text:style-name="P188"><text:a xlink:type="simple" xlink:href="#__RefHeading___Toc32774_2209633182" text:style-name="Index_20_Link" text:visited-style-name="Index_20_Link">4.4.3 Cinematic Visual Response: The "Hero" Transition<text:tab/>138</text:a></text:p>
          <text:p text:style-name="P187"><text:a xlink:type="simple" xlink:href="#__RefHeading___Toc32776_2209633182" text:style-name="Index_20_Link" text:visited-style-name="Index_20_Link">4.5 The Heuristic Scanner: Turning Text into Physics<text:tab/>138</text:a></text:p>
          <text:p text:style-name="P188"><text:a xlink:type="simple" xlink:href="#__RefHeading___Toc32778_2209633182" text:style-name="Index_20_Link" text:visited-style-name="Index_20_Link">4.5.1 The Philosophy of Approximation: Code as Intent<text:tab/>138</text:a></text:p>
          <text:p text:style-name="P188"><text:a xlink:type="simple" xlink:href="#__RefHeading___Toc32780_2209633182" text:style-name="Index_20_Link" text:visited-style-name="Index_20_Link">4.5.2 The Heuristic Pipeline: How Text Becomes Geometry<text:tab/>139</text:a></text:p>
          <text:p text:style-name="P188"><text:a xlink:type="simple" xlink:href="#__RefHeading___Toc32782_2209633182" text:style-name="Index_20_Link" text:visited-style-name="Index_20_Link">4.5.3 The 4-Stage "Fluid Intelligence" Workflow<text:tab/>139</text:a></text:p>
          <text:p text:style-name="P188"><text:a xlink:type="simple" xlink:href="#__RefHeading___Toc32784_2209633182" text:style-name="Index_20_Link" text:visited-style-name="Index_20_Link">4.5.4 User Experience: From Upload to Warp<text:tab/>140</text:a></text:p>
          <text:p text:style-name="P187"><text:a xlink:type="simple" xlink:href="#__RefHeading___Toc32708_2209633182" text:style-name="Index_20_Link" text:visited-style-name="Index_20_Link"><text:soft-page-break/>4.6 The Gift Shop: Poster Generator (High-Resolution Artifacts)<text:tab/>140</text:a></text:p>
          <text:p text:style-name="P188"><text:a xlink:type="simple" xlink:href="#__RefHeading___Toc32710_2209633182" text:style-name="Index_20_Link" text:visited-style-name="Index_20_Link">4.6.1 Overview: Why an Artifact Generator?<text:tab/>140</text:a></text:p>
          <text:p text:style-name="P188"><text:a xlink:type="simple" xlink:href="#__RefHeading___Toc32712_2209633182" text:style-name="Index_20_Link" text:visited-style-name="Index_20_Link">4.6.2 Technical Functionality: The 300 DPI Buffer<text:tab/>140</text:a></text:p>
          <text:p text:style-name="P188"><text:a xlink:type="simple" xlink:href="#__RefHeading___Toc32714_2209633182" text:style-name="Index_20_Link" text:visited-style-name="Index_20_Link">4.6.3 Branding &amp; Museum Typography<text:tab/>141</text:a></text:p>
          <text:p text:style-name="P187"><text:a xlink:type="simple" xlink:href="#__RefHeading___Toc32802_2209633182" text:style-name="Index_20_Link" text:visited-style-name="Index_20_Link">4.7 The Accessibility Engine: A Parallel Universe<text:tab/>141</text:a></text:p>
          <text:p text:style-name="P188"><text:a xlink:type="simple" xlink:href="#__RefHeading___Toc32804_2209633182" text:style-name="Index_20_Link" text:visited-style-name="Index_20_Link">4.7.1 Overview: "The Map IS The Territory"<text:tab/>141</text:a></text:p>
          <text:p text:style-name="P188"><text:a xlink:type="simple" xlink:href="#__RefHeading___Toc32806_2209633182" text:style-name="Index_20_Link" text:visited-style-name="Index_20_Link">4.7.2 Semantic Translation: From Physics to Adjectives<text:tab/>141</text:a></text:p>
          <text:p text:style-name="P188"><text:a xlink:type="simple" xlink:href="#__RefHeading___Toc32808_2209633182" text:style-name="Index_20_Link" text:visited-style-name="Index_20_Link">4.7.3 Navigation &amp; Spatial Synchronization<text:tab/>142</text:a></text:p>
          <text:p text:style-name="P188"><text:a xlink:type="simple" xlink:href="#__RefHeading___Toc32810_2209633182" text:style-name="Index_20_Link" text:visited-style-name="Index_20_Link">4.7.4 The "Narrator" Live Region<text:tab/>142</text:a></text:p>
          <text:p text:style-name="P187"><text:a xlink:type="simple" xlink:href="#__RefHeading___Toc32786_2209633182" text:style-name="Index_20_Link" text:visited-style-name="Index_20_Link">4.9 The GalaxyScope: Performance Telemetry (Diagnostic HUD)<text:tab/>143</text:a></text:p>
          <text:p text:style-name="P188"><text:a xlink:type="simple" xlink:href="#__RefHeading___Toc32788_2209633182" text:style-name="Index_20_Link" text:visited-style-name="Index_20_Link">4.9.1 Overview: The Engine’s X-Ray<text:tab/>143</text:a></text:p>
          <text:p text:style-name="P188"><text:a xlink:type="simple" xlink:href="#__RefHeading___Toc32790_2209633182" text:style-name="Index_20_Link" text:visited-style-name="Index_20_Link">4.9.2 Activation &amp; Interface<text:tab/>143</text:a></text:p>
          <text:p text:style-name="P188"><text:a xlink:type="simple" xlink:href="#__RefHeading___Toc32792_2209633182" text:style-name="Index_20_Link" text:visited-style-name="Index_20_Link">4.9.3 Key Telemetry Metrics<text:tab/>143</text:a></text:p>
          <text:p text:style-name="P188"><text:a xlink:type="simple" xlink:href="#__RefHeading___Toc32794_2209633182" text:style-name="Index_20_Link" text:visited-style-name="Index_20_Link">4.9.4 Hardware-Aware Logic<text:tab/>144</text:a></text:p>
          <text:p text:style-name="P187"><text:a xlink:type="simple" xlink:href="#__RefHeading___Toc24601_2209633182" text:style-name="Index_20_Link" text:visited-style-name="Index_20_Link">4.10 Prototyping: Procedural High-Fidelity Mocks<text:tab/>144</text:a></text:p>
          <text:p text:style-name="P188"><text:a xlink:type="simple" xlink:href="#__RefHeading___Toc24603_2209633182" text:style-name="Index_20_Link" text:visited-style-name="Index_20_Link">4.10.1 The "Museum Simulation" Concept<text:tab/>144</text:a></text:p>
          <text:p text:style-name="P188"><text:a xlink:type="simple" xlink:href="#__RefHeading___Toc24607_2209633182" text:style-name="Index_20_Link" text:visited-style-name="Index_20_Link">4.10.3 The Fetch-Fallback Logic<text:tab/>144</text:a></text:p>
          <text:p text:style-name="P186"><text:a xlink:type="simple" xlink:href="#__RefHeading___Toc32841_2209633182" text:style-name="Index_20_Link" text:visited-style-name="Index_20_Link">5. Adaptive Scale &amp; Performance (The Living Engine)<text:tab/>144</text:a></text:p>
          <text:p text:style-name="P187"><text:a xlink:type="simple" xlink:href="#__RefHeading___Toc32843_2209633182" text:style-name="Index_20_Link" text:visited-style-name="Index_20_Link">5.1 The Challenge: Unpredictable Mass vs. Finite Compute<text:tab/>144</text:a></text:p>
          <text:p text:style-name="P187"><text:a xlink:type="simple" xlink:href="#__RefHeading___Toc32845_2209633182" text:style-name="Index_20_Link" text:visited-style-name="Index_20_Link">5.2 Philosophy: The Active Feedback Loop<text:tab/>145</text:a></text:p>
          <text:p text:style-name="P187"><text:a xlink:type="simple" xlink:href="#__RefHeading___Toc32847_2209633182" text:style-name="Index_20_Link" text:visited-style-name="Index_20_Link">5.3 Reactive Quality Management (RQM): The 4 Levels of Decay<text:tab/>145</text:a></text:p>
          <text:p text:style-name="P188"><text:a xlink:type="simple" xlink:href="#__RefHeading___Toc47690_2813440148" text:style-name="Index_20_Link" text:visited-style-name="Index_20_Link">5.3.1 Level 1: Material Pulse Suppression (Fragment Shader Relief)<text:tab/>145</text:a></text:p>
          <text:p text:style-name="P188"><text:a xlink:type="simple" xlink:href="#__RefHeading___Toc47692_2813440148" text:style-name="Index_20_Link" text:visited-style-name="Index_20_Link">5.3.2 Level 2: Atmospheric &amp; Fill-Rate Reduction<text:tab/>145</text:a></text:p>
          <text:p text:style-name="P188"><text:a xlink:type="simple" xlink:href="#__RefHeading___Toc47694_2813440148" text:style-name="Index_20_Link" text:visited-style-name="Index_20_Link">5.3.3 Level 3: Stochastic Culling (Vertex &amp; Draw Call Relief)<text:tab/>146</text:a></text:p>
          <text:p text:style-name="P188"><text:a xlink:type="simple" xlink:href="#__RefHeading___Toc47696_2813440148" text:style-name="Index_20_Link" text:visited-style-name="Index_20_Link">5.3.4 Level 4: Post-Process Bypass (The Nuclear Option)<text:tab/>146</text:a></text:p>
          <text:p text:style-name="P187"><text:a xlink:type="simple" xlink:href="#__RefHeading___Toc32857_2209633182" text:style-name="Index_20_Link" text:visited-style-name="Index_20_Link">5.4 Geometric Aggregation: From Suns to Megastructures<text:tab/>146</text:a></text:p>
          <text:p text:style-name="P188"><text:a xlink:type="simple" xlink:href="#__RefHeading___Toc32859_2209633182" text:style-name="Index_20_Link" text:visited-style-name="Index_20_Link">5.4.1 Individual Fidelity (Satellite/Planetary)<text:tab/>146</text:a></text:p>
          <text:p text:style-name="P188"><text:a xlink:type="simple" xlink:href="#__RefHeading___Toc32861_2209633182" text:style-name="Index_20_Link" text:visited-style-name="Index_20_Link">5.4.2 Topological Clusters (Stellar)<text:tab/>146</text:a></text:p>
          <text:p text:style-name="P188"><text:a xlink:type="simple" xlink:href="#__RefHeading___Toc32863_2209633182" text:style-name="Index_20_Link" text:visited-style-name="Index_20_Link">5.4.3 Dyson Cages (Megastructure)<text:tab/>147</text:a></text:p>
          <text:p text:style-name="P187"><text:a xlink:type="simple" xlink:href="#__RefHeading___Toc32865_2209633182" text:style-name="Index_20_Link" text:visited-style-name="Index_20_Link">5.5 Stochastic Sampling: Smart Moon Truncation<text:tab/>147</text:a></text:p>
          <text:p text:style-name="P187"><text:a xlink:type="simple" xlink:href="#__RefHeading___Toc32867_2209633182" text:style-name="Index_20_Link" text:visited-style-name="Index_20_Link">5.6 Hardware-Aware Fallbacks: The "1202 Alarm" Protocol<text:tab/>147</text:a></text:p>
          <text:p text:style-name="P188"><text:a xlink:type="simple" xlink:href="#__RefHeading___Toc32869_2209633182" text:style-name="Index_20_Link" text:visited-style-name="Index_20_Link">5.6.1 Trigger Conditions<text:tab/>147</text:a></text:p>
          <text:p text:style-name="P188"><text:a xlink:type="simple" xlink:href="#__RefHeading___Toc32871_2209633182" text:style-name="Index_20_Link" text:visited-style-name="Index_20_Link">5.6.2 The A11y Parallelism Hand-off<text:tab/>148</text:a></text:p>
          <text:p text:style-name="P188"><text:a xlink:type="simple" xlink:href="#__RefHeading___Toc32873_2209633182" text:style-name="Index_20_Link" text:visited-style-name="Index_20_Link">5.6.3 Persistence of Truth<text:tab/>148</text:a></text:p>
          <text:p text:style-name="P186"><text:a xlink:type="simple" xlink:href="#__RefHeading___Toc47698_2813440148" text:style-name="Index_20_Link" text:visited-style-name="Index_20_Link">5.7 Adaptive Atmospheric Cinematics<text:tab/>148</text:a></text:p>
          <text:p text:style-name="P187"><text:a xlink:type="simple" xlink:href="#__RefHeading___Toc47700_2813440148" text:style-name="Index_20_Link" text:visited-style-name="Index_20_Link">A. Quality Tiers &amp; Triggers<text:tab/>148</text:a></text:p>
          <text:p text:style-name="P187"><text:a xlink:type="simple" xlink:href="#__RefHeading___Toc47702_2813440148" text:style-name="Index_20_Link" text:visited-style-name="Index_20_Link">B. The Performance Sensor<text:tab/>149</text:a></text:p>
          <text:p text:style-name="P187"><text:a xlink:type="simple" xlink:href="#__RefHeading___Toc32875_2209633182" text:style-name="Index_20_Link" text:visited-style-name="Index_20_Link">5.8 Specific Optimization Challenges<text:tab/>149</text:a></text:p>
          <text:p text:style-name="P188"><text:a xlink:type="simple" xlink:href="#__RefHeading___Toc32877_2209633182" text:style-name="Index_20_Link" text:visited-style-name="Index_20_Link">5.8.1 Megastructure Challenge: SQLite (sqlite3.c)<text:tab/>149</text:a></text:p>
          <text:p text:style-name="P188"><text:a xlink:type="simple" xlink:href="#__RefHeading___Toc32879_2209633182" text:style-name="Index_20_Link" text:visited-style-name="Index_20_Link">5.8.2 High-Density Logic: Linux Kernel (kernel/sched/core.c)<text:tab/>149</text:a></text:p>
          <text:p text:style-name="P187"><text:a xlink:type="simple" xlink:href="#__RefHeading___Toc32881_2209633182" text:style-name="Index_20_Link" text:visited-style-name="Index_20_Link">5.9 Technical Thresholds: Fault Tolerance &amp; Mobile Fallbacks<text:tab/>150</text:a></text:p>
          <text:p text:style-name="P186"><text:a xlink:type="simple" xlink:href="#__RefHeading___Toc277554_2813440148" text:style-name="Index_20_Link" text:visited-style-name="Index_20_Link">8. Impacts &amp; Future Outlooks<text:tab/>150</text:a></text:p>
          <text:p text:style-name="P187"><text:a xlink:type="simple" xlink:href="#__RefHeading___Toc656524_2813440148" text:style-name="Index_20_Link" text:visited-style-name="Index_20_Link">8.1 Integration into the publishing pipeline for 24/7 Risk Exposure Analyses<text:tab/>150</text:a></text:p>
          <text:p text:style-name="P187"><text:a xlink:type="simple" xlink:href="#__RefHeading___Toc480075_2813440148" text:style-name="Index_20_Link" text:visited-style-name="Index_20_Link">8.2 One Non-Numeric Dashboard to rule them all<text:tab/>151</text:a></text:p>
          <text:p text:style-name="P187"><text:a xlink:type="simple" xlink:href="#__RefHeading___Toc277556_2813440148" text:style-name="Index_20_Link" text:visited-style-name="Index_20_Link">8.3 The Cockpit Crisis<text:tab/>151</text:a></text:p>
          <text:p text:style-name="P187"><text:a xlink:type="simple" xlink:href="#__RefHeading___Toc480077_2813440148" text:style-name="Index_20_Link" text:visited-style-name="Index_20_Link">8.4 Time to tend a Garden<text:tab/>152</text:a></text:p>
          <text:p text:style-name="P187"><text:a xlink:type="simple" xlink:href="#__RefHeading___Toc656526_2813440148" text:style-name="Index_20_Link" text:visited-style-name="Index_20_Link">8.5 Circling back to Specifications Exposure &amp; Auditing<text:tab/>152</text:a></text:p>
          <text:p text:style-name="P187"><text:a xlink:type="simple" xlink:href="#__RefHeading___Toc36598_1787320247" text:style-name="Index_20_Link" text:visited-style-name="Index_20_Link">8.6. The Field of AI Forensics<text:tab/>153</text:a></text:p>
        </text:index-body>
      </text:table-of-content>
      <text:p text:style-name="P1"><text:soft-page-break/></text:p>
      <text:h text:style-name="P70" text:outline-level="1"><text:bookmark-start text:name="__RefHeading___Toc11703_959624642"/>GitGalaxy Technical Specifications v4.1 (Master Blueprint)<text:bookmark-end text:name="__RefHeading___Toc11703_959624642"/></text:h>
      <text:h text:style-name="P71" text:outline-level="2"><text:bookmark-start text:name="__RefHeading___Toc11705_959624642"/>1. Foundation &amp; Architecture<text:bookmark-end text:name="__RefHeading___Toc11705_959624642"/></text:h>
      <text:h text:style-name="P72" text:outline-level="3"><text:bookmark-start text:name="__RefHeading___Toc11707_959624642"/>1.1 Project Overview<text:bookmark-end text:name="__RefHeading___Toc11707_959624642"/></text:h>
      <text:p text:style-name="P75"><text:span text:style-name="T96">1. </text:span><text:span text:style-name="T165">Code can be art. Logic can be art. Systems engineering can be art. GitGalaxy reveal</text:span><text:span text:style-name="T166">s</text:span><text:span text:style-name="T165"> the </text:span><text:span text:style-name="T83">complexity of</text:span><text:span text:style-name="T73"> codebases</text:span><text:span text:style-name="T165"> </text:span><text:span text:style-name="T82">as</text:span><text:span text:style-name="T84"> </text:span><text:span text:style-name="T85">explorable 3D</text:span><text:span text:style-name="T84"> galaxies </text:span><text:span text:style-name="T55">by using </text:span><text:span text:style-name="T167">source code as a seed for procedural generative art. </text:span><text:span text:style-name="T41">The human brain is not optimized for processing rows of digits; it is optimized for detecting patterns in nature or physics. By procedurally mapping complexity to things like spatial position, movement, pulses</text:span> <text:span text:style-name="T41">and colors, </text:span><text:span text:style-name="T69">GitGalaxy taps into our evolutionary strengths to help us understand</text:span> <text:span text:style-name="T69">complex systems intuitively</text:span><text:span text:style-name="T41">. </text:span></text:p>
      <text:p text:style-name="P22"><text:s/></text:p>
      <text:p text:style-name="P75"><text:span text:style-name="T96">2. </text:span><text:span text:style-name="T152">While</text:span><text:span text:style-name="T96"> </text:span><text:span text:style-name="T152">t</text:span><text:span text:style-name="T96">here are many ways to write code, organizations rely on agreed-upon standards for </text:span><text:span text:style-name="T152">coding practices</text:span><text:span text:style-name="T96">. </text:span><text:span text:style-name="T76">GitGalaxy assesses deviations from organizational standards and displays that info as color overlays onto the 3D generated world. </text:span><text:span text:style-name="T38">GitGalaxy </text:span><text:span text:style-name="T152">does not measure</text:span><text:span text:style-name="T38"> "Code Quality", which feels like a judgment, </text:span><text:span text:style-name="T152">but instead measures </text:span><text:span text:style-name="T79">Risk</text:span><text:span text:style-name="T38"> </text:span><text:span text:style-name="Strong_20_Emphasis"><text:span text:style-name="T38">Exposure</text:span></text:span><text:span text:style-name="T38">. Our </text:span><text:span text:style-name="T152">measurements</text:span><text:span text:style-name="T38"> do not judge; they highlight. They function as sensors, not critics.</text:span></text:p>
      <text:list text:style-name="L1">
        <text:list-item>
          <text:p text:style-name="P197"><text:span text:style-name="Strong_20_Emphasis"><text:span text:style-name="T42">We do not </text:span></text:span><text:span text:style-name="Strong_20_Emphasis"><text:span text:style-name="T56">assess</text:span></text:span><text:span text:style-name="Strong_20_Emphasis"><text:span text:style-name="T38"> "Bad Code";</text:span></text:span><text:span text:style-name="T38"> we measure </text:span><text:span text:style-name="Strong_20_Emphasis"><text:span text:style-name="T38">Cognitive </text:span></text:span><text:span text:style-name="Strong_20_Emphasis"><text:span text:style-name="T154">Load </text:span></text:span><text:span text:style-name="Strong_20_Emphasis"><text:span text:style-name="T38">Exposure, </text:span></text:span><text:span text:style-name="T38">how hard it is for a human to </text:span><text:span text:style-name="T170">work through</text:span><text:span text:style-name="T38"> the logic, </text:span><text:span text:style-name="T155">because </text:span><text:span text:style-name="T156">teams</text:span><text:span text:style-name="T155"> should be aware which files are the hardest to work on. </text:span></text:p>
        </text:list-item>
        <text:list-item>
          <text:p text:style-name="P197"><text:span text:style-name="Strong_20_Emphasis"><text:span text:style-name="T42">We do not </text:span></text:span><text:span text:style-name="Strong_20_Emphasis"><text:span text:style-name="T56">assess</text:span></text:span><text:span text:style-name="Strong_20_Emphasis"><text:span text:style-name="T38"> "Missing Docs";</text:span></text:span><text:span text:style-name="T38"> we </text:span><text:span text:style-name="T154">assess</text:span><text:span text:style-name="T38"> </text:span><text:span text:style-name="T80">Documentation</text:span><text:span text:style-name="Strong_20_Emphasis"><text:span text:style-name="T38"> Exposure, </text:span></text:span><text:span text:style-name="T38">the risk to the </text:span><text:span text:style-name="T156">team</text:span><text:span text:style-name="T38"> if a key </text:span><text:span text:style-name="T156">person </text:span><text:span text:style-name="T38">leaves.</text:span></text:p>
        </text:list-item>
        <text:list-item>
          <text:p text:style-name="P197"><text:span text:style-name="Strong_20_Emphasis"><text:span text:style-name="T42">We do not </text:span></text:span><text:span text:style-name="Strong_20_Emphasis"><text:span text:style-name="T56">assess</text:span></text:span><text:span text:style-name="Strong_20_Emphasis"><text:span text:style-name="T38"> "</text:span></text:span><text:span text:style-name="Strong_20_Emphasis"><text:span text:style-name="T154">Missing Testing</text:span></text:span><text:span text:style-name="Strong_20_Emphasis"><text:span text:style-name="T38">";</text:span></text:span><text:span text:style-name="T38"> we </text:span><text:span text:style-name="T154">assess</text:span><text:span text:style-name="T38"> </text:span><text:span text:style-name="T80">Testing</text:span><text:span text:style-name="Strong_20_Emphasis"><text:span text:style-name="T38"> Exposure, </text:span></text:span><text:span text:style-name="T38">the </text:span><text:span text:style-name="T156">risk</text:span><text:span text:style-name="T38"> of unshielded logic causing a meltdown in production. </text:span></text:p>
        </text:list-item>
        <text:list-item>
          <text:p text:style-name="P197"><text:span text:style-name="Strong_20_Emphasis"><text:span text:style-name="T57">We do not measure </text:span></text:span><text:span text:style-name="Strong_20_Emphasis"><text:span text:style-name="T108">"System Security";</text:span></text:span><text:span text:style-name="T66"> we measure </text:span><text:span text:style-name="Strong_20_Emphasis"><text:span text:style-name="T108">Safety Exposure, </text:span></text:span><text:span text:style-name="T66">the structural brittleness caused by a lack of </text:span><text:span text:style-name="Source_20_Text"><text:span text:style-name="T234">try/except</text:span></text:span><text:span text:style-name="T66"> blocks and robust error handling.</text:span></text:p>
        </text:list-item>
      </text:list>
      <text:list text:style-name="L2">
        <text:list-item>
          <text:p text:style-name="P198"><text:soft-page-break/><text:span text:style-name="Strong_20_Emphasis"><text:span text:style-name="T42">We do not measure </text:span></text:span><text:span text:style-name="Strong_20_Emphasis"><text:span text:style-name="T70">API Exposure</text:span></text:span><text:span text:style-name="Strong_20_Emphasis"><text:span text:style-name="T42"> </text:span></text:span><text:span text:style-name="Strong_20_Emphasis"><text:span text:style-name="T49">because its always bad, we just want </text:span></text:span><text:span text:style-name="Strong_20_Emphasis"><text:span text:style-name="T50">teams</text:span></text:span><text:span text:style-name="Strong_20_Emphasis"><text:span text:style-name="T49"> to understand </text:span></text:span><text:span text:style-name="Strong_20_Emphasis"><text:span text:style-name="T78">how sensitive a file might be to changes</text:span></text:span><text:span text:style-name="Strong_20_Emphasis"><text:span text:style-name="T49">.</text:span></text:span></text:p>
        </text:list-item>
        <text:list-item>
          <text:p text:style-name="P198"><text:span text:style-name="Strong_20_Emphasis"><text:span text:style-name="T42">We do not measure </text:span></text:span><text:span text:style-name="Strong_20_Emphasis"><text:span text:style-name="T70">Concurrency Exposure</text:span></text:span><text:span text:style-name="Strong_20_Emphasis"><text:span text:style-name="T42"> </text:span></text:span><text:span text:style-name="Strong_20_Emphasis"><text:span text:style-name="T49">because it’s always bad but because </text:span></text:span><text:span text:style-name="Strong_20_Emphasis"><text:span text:style-name="T50">teams</text:span></text:span><text:span text:style-name="Strong_20_Emphasis"><text:span text:style-name="T49"> should be able to easily assess </text:span></text:span><text:span text:style-name="T38">the </text:span><text:span text:style-name="T79">risk</text:span><text:span text:style-name="T70"> of race conditions and deadlocks</text:span><text:span text:style-name="T38"> in multi-threaded logic.</text:span></text:p>
        </text:list-item>
        <text:list-item>
          <text:p text:style-name="P198"><text:span text:style-name="Strong_20_Emphasis"><text:span text:style-name="T42">We do not measure </text:span></text:span><text:span text:style-name="Strong_20_Emphasis"><text:span text:style-name="T38">State Flux Exposure </text:span></text:span><text:span text:style-name="Strong_20_Emphasis"><text:span text:style-name="T49">because it’s always </text:span></text:span><text:span text:style-name="Strong_20_Emphasis"><text:span text:style-name="T50">bad but</text:span></text:span><text:span text:style-name="Strong_20_Emphasis"><text:span text:style-name="T49"> we </text:span></text:span><text:span text:style-name="Strong_20_Emphasis"><text:span text:style-name="T50">because teams </text:span></text:span><text:span text:style-name="Strong_20_Emphasis"><text:span text:style-name="T49">can easily assess </text:span></text:span><text:span text:style-name="T38">the </text:span><text:span text:style-name="T79">risk of state conflicts</text:span><text:span text:style-name="T155">. </text:span></text:p>
        </text:list-item>
        <text:list-item>
          <text:p text:style-name="P199"><text:span text:style-name="T42">We do not measure</text:span><text:span text:style-name="T70"> </text:span><text:span text:style-name="T89">Specification</text:span><text:span text:style-name="Strong_20_Emphasis"><text:span text:style-name="T70"> </text:span></text:span><text:span text:style-name="Strong_20_Emphasis"><text:span text:style-name="T38">Exposure</text:span></text:span><text:span text:style-name="T42"> to catch "Cowboy Code </text:span><text:span text:style-name="T63">that’s out of spec</text:span><text:span text:style-name="T42">," but to act as an </text:span><text:span text:style-name="Strong_20_Emphasis"><text:span text:style-name="T38">organizational compass</text:span></text:span><text:span text:style-name="T42">; it ensures that as a feature settles into the codebase, the documentation follows, fostering a culture where every line of logic has a traceable and understood home.</text:span></text:p>
        </text:list-item>
      </text:list>
      <text:p text:style-name="P35">By visualizing these exposures as <text:span text:style-name="T436">toggle-able </text:span>color overlays <text:span text:style-name="T387">onto the generated galaxy</text:span>, GitGalaxy provides <text:span text:style-name="T387">an intuitive</text:span> <text:span text:style-name="T9">non-numeric </text:span><text:span text:style-name="T10">d</text:span><text:span text:style-name="T2">ashboard</text:span>. It allows a team to agree on standard<text:span text:style-name="T387">s </text:span>and instantly see—without reading a single line of text—where their architecture <text:span text:style-name="T387">might be</text:span> drift<text:span text:style-name="T387">ing </text:span>into dangerous territory.</text:p>
      <text:p text:style-name="P75"><text:span text:style-name="T161">3. </text:span><text:span text:style-name="T170">Many projects are multi-lingual. </text:span><text:span text:style-name="T161">Traditional </text:span><text:span text:style-name="T162">code</text:span><text:span text:style-name="T161"> analysis tools (ASTs) act like strict linguists—they understand the grammar of one language perfectly but </text:span><text:span text:style-name="T162">not of any others</text:span><text:span text:style-name="T161">. GitGalaxy acts as </text:span><text:span text:style-name="T81">a Rosetta Stone for code </text:span><text:span text:style-name="T82">complexity, project scale and </text:span><text:span text:style-name="T77">risk exposure</text:span><text:span text:style-name="T161">. By prioritizing consistent </text:span><text:span text:style-name="T162">regex-based </text:span><text:span text:style-name="T161">approximation over rigid syntax </text:span><text:span text:style-name="T162">parsing</text:span><text:span text:style-name="T161">, we </text:span><text:span text:style-name="T162">can meaningfully compare different code bases </text:span><text:span text:style-name="T153">of different languages</text:span><text:span text:style-name="T161">. This </text:span><text:span text:style-name="T162">consistent</text:span><text:span text:style-name="T161"> standard allows us to </text:span><text:span text:style-name="T39">visually</text:span><text:span text:style-name="T161"> compare the </text:span><text:span text:style-name="T39">scale and complexity of different coding projects, from Apollo 11 (Assembly) to the Linux Kernel (C) to TensorFlow (Python) </text:span><text:span text:style-name="T170">under the same set of rules. </text:span></text:p>
      <text:p text:style-name="P23"/>
      <text:p text:style-name="P24"><text:span text:style-name="T2">Why This Matters:</text:span> </text:p>
      <text:p text:style-name="P24"/>
      <text:list text:style-name="L3">
        <text:list-item>
          <text:p text:style-name="P200"><text:span text:style-name="T2">Identify Hotspots: </text:span>Instantly spot files <text:span text:style-name="T388">with high exposure</text:span>, <text:span text:style-name="T388">as </text:span>they are <text:span text:style-name="T388">literally </text:span>glowing <text:span text:style-name="T437">planets in space</text:span>.</text:p>
        </text:list-item>
        <text:list-item>
          <text:p text:style-name="P200"><text:span text:style-name="T13">See</text:span><text:span text:style-name="T2"> Risk:</text:span> See exactly where "dangerous" patterns cluster before they become <text:span text:style-name="T393">issues</text:span>.</text:p>
        </text:list-item>
        <text:list-item>
          <text:p text:style-name="P200"><text:span text:style-name="T2">Audit Legacy Systems: </text:span>Map the topology of ancient codebases (like COBOL) to plan modernization strategies without reading a million lines of code.</text:p>
        </text:list-item>
        <text:list-item>
          <text:p text:style-name="P201">Analysis happens on your machine, <text:span text:style-name="T195">takes seconds and makes a file smaller than a photo and with a data presentation so easy kids could get it. </text:span></text:p>
        </text:list-item>
      </text:list>
      <text:p text:style-name="P11"><text:soft-page-break/></text:p>
      <text:p text:style-name="P33"/>
      <text:p text:style-name="P75"><text:span text:style-name="T96">To </text:span><text:span text:style-name="T97">accomplish</text:span><text:span text:style-name="T96"> this, GitGalaxy </text:span><text:span text:style-name="T98">uses</text:span><text:span text:style-name="T38"> </text:span><text:span text:style-name="T153">general </text:span><text:span text:style-name="T38">Regex-based semantic signatures </text:span><text:span text:style-name="T153">that have been </text:span><text:span text:style-name="T98">adapted to each language, </text:span><text:span text:style-name="T40">as </text:span><text:span text:style-name="T153">either 1. the input to various </text:span><text:span text:style-name="T172">Risk </text:span><text:span text:style-name="T153">Exposure Equation</text:span><text:span text:style-name="T160">s</text:span><text:span text:style-name="T153"> or 2. as</text:span><text:span text:style-name="T40"> seeds </text:span><text:span text:style-name="T153">for </text:span><text:span text:style-name="T40">a procedurally generated algorithm to create a novel visual representation of </text:span><text:span text:style-name="T160">codebase complexity</text:span><text:span text:style-name="T38">. </text:span><text:span text:style-name="T99">This project</text:span><text:span text:style-name="T38"> prioritize</text:span><text:span text:style-name="T99">s</text:span><text:span text:style-name="T38"> ease of use, zero-setup scanning, </text:span><text:span text:style-name="T97">comparative analyses and</text:span><text:span text:style-name="T38"> visual impact over the academic rigor of a </text:span><text:span text:style-name="T97">single language </text:span><text:span text:style-name="T38">Abstract Syntax Tree. </text:span><text:span text:style-name="T71">This </text:span><text:span text:style-name="T72">project</text:span><text:span text:style-name="T71"> does not </text:span><text:span text:style-name="T70">visualiz</text:span><text:span text:style-name="T71">e</text:span><text:span text:style-name="T70"> syntax </text:span><text:span text:style-name="T73">or if </text:span><text:span text:style-name="T87">it</text:span><text:span text:style-name="T73"> will compile</text:span><text:span text:style-name="T38">; </text:span><text:span text:style-name="T98">it </text:span><text:span text:style-name="T43">visualize</text:span><text:span text:style-name="T48">s</text:span><text:span text:style-name="T42"> </text:span><text:span text:style-name="T44">aspects of </text:span><text:span text:style-name="T42">functional intent. </text:span></text:p>
      <text:p text:style-name="P75"><text:span text:style-name="T100"/></text:p>
      <text:p text:style-name="P75"><text:span text:style-name="T153">GitGalaxy comes pre-loaded with functional </text:span><text:span text:style-name="T172">Risk </text:span><text:span text:style-name="T153">Exposure Equations but </text:span><text:span text:style-name="T96">customization may be needed to adapt for your </text:span><text:span text:style-name="T153">team’s standards</text:span><text:span text:style-name="T100">.</text:span><text:span text:style-name="T153"> </text:span><text:span text:style-name="T100">These equations</text:span><text:span text:style-name="T38"> define the intensity of the </text:span><text:span text:style-name="T153">color overlay</text:span><text:span text:style-name="T38"> effect. </text:span><text:span text:style-name="T101">A</text:span><text:span text:style-name="T38">ll equations </text:span><text:span text:style-name="T100">attempt</text:span><text:span text:style-name="T38"> </text:span><text:span text:style-name="T153">to </text:span><text:span text:style-name="T38">target a </text:span><text:span text:style-name="T42">0-100 </text:span><text:span text:style-name="T38">scale. </text:span><text:span text:style-name="T102">Although the developer has worked hard to make the equations as nuanced as they can be, the equations should be viewed as rough </text:span><text:span text:style-name="T103">approximations</text:span><text:span text:style-name="T102"> only. They should be used to identify general trends (</text:span><text:span text:style-name="T74">Good - this </text:span><text:span text:style-name="T77">file</text:span><text:span text:style-name="T74"> has high </text:span><text:span text:style-name="T87">API exposure</text:span><text:span text:style-name="T102">) versus absolute ranking over tiny differences (</text:span><text:span text:style-name="T74">Bad - this </text:span><text:span text:style-name="T77">file</text:span><text:span text:style-name="T74"> is better than that one because it scored 1% higher in the tech debt equation</text:span><text:span text:style-name="T102">). </text:span><text:span text:style-name="T184">We took pains to hide the specific numbers, and instead only report out general tiers (very high, high, medium, low, very low). </text:span></text:p>
      <text:p text:style-name="P25"><text:s/></text:p>
      <text:p text:style-name="P33"><text:span text:style-name="T235">GitGalaxy </text:span><text:span text:style-name="T236">calculate</text:span><text:span text:style-name="T235">s</text:span><text:span text:style-name="T236"> </text:span><text:span text:style-name="T393">exposure</text:span><text:span text:style-name="T235"> metrics</text:span><text:span text:style-name="T236"> in a non-linear fashion with equations and sub-equations. This is because there are multiple ways to</text:span><text:span text:style-name="T237"> achieve the same goal, like how to </text:span><text:span text:style-name="T389">adhere to safety standards</text:span><text:span text:style-name="T236">, and this allows </text:span><text:span text:style-name="T235">for</text:span><text:span text:style-name="T236"> </text:span><text:span text:style-name="T235">the </text:span><text:span text:style-name="T389">evaluation of </text:span><text:span text:style-name="T236">different </text:span><text:span text:style-name="T389">practices </text:span><text:span text:style-name="T237">and to weigh them differently. Sometimes our sub-equations pop up in multiple equations; for example both </text:span><text:span text:style-name="T238">the</text:span><text:span text:style-name="T237"> safety equation and the tech debt equation use the sub-equation of SafetyHits, which is a measure of </text:span><text:span text:style-name="T238">counts of </text:span><text:span text:style-name="T237">'try', 'catch', 'finally', 'assert', 'sanitize', </text:span><text:span text:style-name="T239">etc. </text:span></text:p>
      <text:h text:style-name="P72" text:outline-level="3"><text:bookmark-start text:name="__RefHeading___Toc11709_959624642"/><text:span text:style-name="T38">1.2 </text:span><text:span text:style-name="Strong_20_Emphasis"><text:span text:style-name="T104">Visualizing Complexity</text:span></text:span><text:bookmark-end text:name="__RefHeading___Toc11709_959624642"/></text:h>
      <text:p text:style-name="P35">GitGalaxy operates on the principle that source code <text:span text:style-name="T240">can be used as</text:span> a procedural generation seed. Just as a random string of text in Minecraft dictates the rise of mountains or the depth of oceans, your codebase's logic dictates the topology of the galaxy that emerges. We treat code not as a set of instructions to be compiled, but as <text:span text:style-name="T241">a seed</text:span> for a generative <text:span text:style-name="T240">galaxy</text:span>. </text:p>
      <text:p text:style-name="P35"><text:span text:style-name="T240">GitGalaxy </text:span><text:span text:style-name="T242">renders</text:span><text:span text:style-name="T240"> code bases with the following visual metaphors: </text:span></text:p>
      <text:list text:style-name="L4">
        <text:list-item>
          <text:list>
            <text:list-item>
              <text:p text:style-name="P203"><text:span text:style-name="T2">Files</text:span> <text:span text:style-name="T392">=</text:span> Stars orbiting around an unseen black hole</text:p>
            </text:list-item>
            <text:list-item>
              <text:p text:style-name="P214"><text:soft-page-break/><text:span text:style-name="Strong_20_Emphasis"><text:span text:style-name="T69">External libraries = </text:span></text:span><text:span text:style-name="Strong_20_Emphasis"><text:span text:style-name="T41">Rings around planets</text:span></text:span></text:p>
            </text:list-item>
            <text:list-item>
              <text:p text:style-name="P214"><text:span text:style-name="Strong_20_Emphasis"><text:span text:style-name="T69">File Relationships = </text:span></text:span><text:span text:style-name="Strong_20_Emphasis"><text:span text:style-name="T41">Relative locations </text:span></text:span><text:span text:style-name="Strong_20_Emphasis"><text:span text:style-name="T67">of stars </text:span></text:span><text:span text:style-name="Strong_20_Emphasis"><text:span text:style-name="T41">in </text:span></text:span><text:span text:style-name="Strong_20_Emphasis"><text:span text:style-name="T67">the </text:span></text:span><text:span text:style-name="Strong_20_Emphasis"><text:span text:style-name="T41">galaxy</text:span></text:span></text:p>
            </text:list-item>
            <text:list-item>
              <text:p text:style-name="P214"><text:span text:style-name="Strong_20_Emphasis"><text:span text:style-name="T69">Inbound imports = </text:span></text:span><text:span text:style-name="Strong_20_Emphasis"><text:span text:style-name="T68">A star’s pulse </text:span></text:span><text:span text:style-name="Strong_20_Emphasis"><text:span text:style-name="T41">rate</text:span></text:span></text:p>
            </text:list-item>
            <text:list-item>
              <text:p text:style-name="P214"><text:span text:style-name="Strong_20_Emphasis"><text:span text:style-name="T38">Functions</text:span></text:span><text:span text:style-name="Strong_20_Emphasis"><text:span text:style-name="T42"> </text:span></text:span><text:span text:style-name="Strong_20_Emphasis"><text:span text:style-name="T59">=</text:span></text:span><text:span text:style-name="Strong_20_Emphasis"><text:span text:style-name="T42"> </text:span></text:span><text:span text:style-name="Strong_20_Emphasis"><text:span text:style-name="T41">Satellites</text:span></text:span><text:span text:style-name="Strong_20_Emphasis"><text:span text:style-name="T38"> </text:span></text:span><text:span text:style-name="Strong_20_Emphasis"><text:span text:style-name="T41">orbit stars</text:span></text:span></text:p>
            </text:list-item>
            <text:list-item>
              <text:p text:style-name="P204"><text:span text:style-name="T1">Function </text:span><text:span text:style-name="T28">c</text:span><text:span text:style-name="T1">omplexity </text:span><text:span text:style-name="T195">=</text:span><text:span text:style-name="T1"> </text:span><text:span text:style-name="T194">Arrangement, number and size of satellites in a unit</text:span></text:p>
            </text:list-item>
            <text:list-item>
              <text:p text:style-name="P204"><text:span text:style-name="T1">Function length = </text:span><text:span text:style-name="T194">Satellite orbital distance</text:span></text:p>
            </text:list-item>
            <text:list-item>
              <text:p text:style-name="P205"><text:span text:style-name="T2">Function Arguments</text:span><text:span text:style-name="T194"> = satellite size</text:span></text:p>
            </text:list-item>
            <text:list-item>
              <text:p text:style-name="P202">File Complexity = <text:span text:style-name="T195">Star shape</text:span></text:p>
            </text:list-item>
            <text:list-item>
              <text:p text:style-name="P204"><text:span text:style-name="T1">Tech debt</text:span> <text:span text:style-name="T11">exposure </text:span>= color overlay</text:p>
            </text:list-item>
            <text:list-item>
              <text:p text:style-name="P204"><text:span text:style-name="T1">Documentation </text:span><text:span text:style-name="T11">exposure</text:span> = color overlay</text:p>
            </text:list-item>
            <text:list-item>
              <text:p text:style-name="P204"><text:span text:style-name="T1">Cognitiv</text:span><text:span text:style-name="T36">e L</text:span><text:span text:style-name="T1">oad </text:span><text:span text:style-name="T11">exposure</text:span>= <text:span text:style-name="T194">color overlay</text:span></text:p>
            </text:list-item>
            <text:list-item>
              <text:p text:style-name="P204"><text:span text:style-name="T1">Safety </text:span><text:span text:style-name="T11">exposure</text:span> = <text:span text:style-name="T194">color overlay</text:span></text:p>
            </text:list-item>
            <text:list-item>
              <text:p text:style-name="P204"><text:span text:style-name="T1">Testing </text:span><text:span text:style-name="T11">exposure</text:span> = <text:span text:style-name="T194">color overlay</text:span></text:p>
            </text:list-item>
            <text:list-item>
              <text:p text:style-name="P204"><text:span text:style-name="T2">API </text:span><text:span text:style-name="T25">e</text:span><text:span text:style-name="T2">xposure</text:span> = <text:span text:style-name="T243">color overlay</text:span></text:p>
            </text:list-item>
            <text:list-item>
              <text:p text:style-name="P206"><text:span text:style-name="T2">Concurrency </text:span><text:span text:style-name="T25">e</text:span><text:span text:style-name="T2">xposure</text:span> = color overlay</text:p>
            </text:list-item>
            <text:list-item>
              <text:p text:style-name="P206"><text:span text:style-name="T2">State Flux </text:span><text:span text:style-name="T25">e</text:span><text:span text:style-name="T2">xposure </text:span>= color overlay</text:p>
            </text:list-item>
            <text:list-item>
              <text:p text:style-name="P207"><text:span text:style-name="T12">Private Info </text:span><text:span text:style-name="T25">e</text:span><text:span text:style-name="T2">xposure</text:span> = color overlay</text:p>
            </text:list-item>
            <text:list-item>
              <text:p text:style-name="P208"><text:span text:style-name="T1">Churn</text:span><text:span text:style-name="T194"> = color overlay</text:span></text:p>
            </text:list-item>
            <text:list-item>
              <text:p text:style-name="P208"><text:span text:style-name="T2">Commit Heat</text:span> = <text:span text:style-name="T194">color overlay</text:span></text:p>
            </text:list-item>
            <text:list-item>
              <text:p text:style-name="P210">Languages used <text:span text:style-name="T195">= color overlay</text:span></text:p>
            </text:list-item>
            <text:list-item>
              <text:p text:style-name="P211">Authorship<text:span text:style-name="T195"> = color overlay</text:span></text:p>
            </text:list-item>
            <text:list-item>
              <text:p text:style-name="P209"><text:span text:style-name="T14">Audit</text:span><text:span text:style-name="T2"> </text:span><text:span text:style-name="T25">e</text:span><text:span text:style-name="T2">xposure </text:span><text:span text:style-name="T194">= color overlay</text:span></text:p>
            </text:list-item>
          </text:list>
        </text:list-item>
      </text:list>
      <text:p text:style-name="P54"/>
      <text:h text:style-name="P30" text:outline-level="3"><text:bookmark-start text:name="__RefHeading___Toc11711_959624642"/>1.3 System Architecture: High-Level Stack<text:bookmark-end text:name="__RefHeading___Toc11711_959624642"/></text:h>
      <text:p text:style-name="P75"><text:span text:style-name="T38">The application utilizes a concern-separated architecture designed to bridge raw forensic data with cinematic visualization. The primary deployment model is a </text:span><text:span text:style-name="Strong_20_Emphasis"><text:span text:style-name="T38">Client-Side "Zero-Trust" Application</text:span></text:span><text:span text:style-name="T38"> (Open Source), with an optional </text:span><text:span text:style-name="Strong_20_Emphasis"><text:span text:style-name="T38">Enterprise Backend.</text:span></text:span></text:p>
      <text:p text:style-name="P83"><text:span text:style-name="Strong_20_Emphasis"><text:span text:style-name="T38">The Open-Source Core (Browser-Based Engine):</text:span></text:span></text:p>
      <text:list text:style-name="L5">
        <text:list-item>
          <text:p text:style-name="P215"><text:span text:style-name="Source_20_Text"><text:span text:style-name="T38">scanner.worker.js</text:span></text:span><text:span text:style-name="Strong_20_Emphasis"><text:span text:style-name="T38"> (The Primary Engine):</text:span></text:span><text:span text:style-name="T38"> The heart of the free version. It runs in a background Web Worker to perform 100% local analysis. It digests regex hits and calculates </text:span><text:span text:style-name="T168">risk exposures </text:span><text:span text:style-name="T38">without transmitting code to a server.</text:span></text:p>
        </text:list-item>
        <text:list-item>
          <text:p text:style-name="P215"><text:span text:style-name="Source_20_Text"><text:span text:style-name="T38">scanner_config.js</text:span></text:span><text:span text:style-name="Strong_20_Emphasis"><text:span text:style-name="T38"> (The Rulebook):</text:span></text:span><text:span text:style-name="T38"> A ported, JavaScript-native registry of heuristic patterns. It includes the standard Regex library for 18+ languages.</text:span></text:p>
        </text:list-item>
        <text:list-item>
          <text:p text:style-name="P215"><text:soft-page-break/><text:span text:style-name="Source_20_Text"><text:span text:style-name="T38">zip_loader.js</text:span></text:span><text:span text:style-name="Strong_20_Emphasis"><text:span text:style-name="T38"> (The Ingestion Layer):</text:span></text:span><text:span text:style-name="T38"> Handles the "Zero-Trust" unpacking of repositories directly in browser memory.</text:span></text:p>
        </text:list-item>
      </text:list>
      <text:p text:style-name="P83"><text:span text:style-name="Strong_20_Emphasis"><text:span text:style-name="T38">The Bridge (Data Schema):</text:span></text:span></text:p>
      <text:list text:style-name="L6">
        <text:list-item>
          <text:p text:style-name="P216"><text:span text:style-name="Source_20_Text"><text:span text:style-name="T38">result.json</text:span></text:span><text:span text:style-name="Strong_20_Emphasis"><text:span text:style-name="T38"> (The Interface Contract):</text:span></text:span><text:span text:style-name="T38"> While the user never sees this file in the web version, it acts as the strict data schema that decouples the logic from the rendering.</text:span></text:p>
          <text:list>
            <text:list-item>
              <text:p text:style-name="P216"><text:span text:style-name="Strong_20_Emphasis"><text:span text:style-name="T38">In Web Mode:</text:span></text:span><text:span text:style-name="T38"> It exists as an ephemeral in-memory object passed from the Worker to the Main Thread via </text:span><text:span text:style-name="Source_20_Text"><text:span text:style-name="T38">postMessage</text:span></text:span><text:span text:style-name="T38">.</text:span></text:p>
            </text:list-item>
            <text:list-item>
              <text:p text:style-name="P216"><text:span text:style-name="Strong_20_Emphasis"><text:span text:style-name="T38">In Enterprise Mode:</text:span></text:span><text:span text:style-name="T38"> It is serialized to disk for CI/CD reporting </text:span><text:span text:style-name="T168">or trends over time analyses. </text:span></text:p>
            </text:list-item>
            <text:list-item>
              <text:p text:style-name="P216"><text:span text:style-name="Strong_20_Emphasis"><text:span text:style-name="T38">Role:</text:span></text:span><text:span text:style-name="T38"> It carries the unified payload for physics coordinates and </text:span><text:span text:style-name="Strong_20_Emphasis"><text:span text:style-name="T58">risk exposure</text:span></text:span><text:span text:style-name="T38">, ensuring the 3D Viewer behaves identically regardless of the source.</text:span></text:p>
            </text:list-item>
          </text:list>
        </text:list-item>
      </text:list>
      <text:p text:style-name="P83"><text:span text:style-name="Strong_20_Emphasis"><text:span text:style-name="T38">The Viewer (Frontend):</text:span></text:span></text:p>
      <text:list text:style-name="L7">
        <text:list-item>
          <text:p text:style-name="P217"><text:span text:style-name="Source_20_Text"><text:span text:style-name="T38">engine-3d.js</text:span></text:span><text:span text:style-name="Strong_20_Emphasis"><text:span text:style-name="T38"> (The Visualizer):</text:span></text:span><text:span text:style-name="T38"> A Three.js WebGL </text:span><text:span text:style-name="T169">engine that displays the spatial and color information of a codebase into an interactive non-numeric dashboard.</text:span></text:p>
        </text:list-item>
      </text:list>
      <text:h text:style-name="P72" text:outline-level="3"><text:bookmark-start text:name="__RefHeading___Toc11713_959624642"/><text:span text:style-name="T38">1.4 System File Map: Backend (Scanner) vs. Frontend (Viewer)</text:span><text:bookmark-end text:name="__RefHeading___Toc11713_959624642"/></text:h>
      <text:p text:style-name="P196"/>
      <text:p text:style-name="P196">ROOT/</text:p>
      <text:p text:style-name="P196">├── index.html <text:s text:c="16"/># Main Entry Point (UI Shell &amp; Canvas Container)</text:p>
      <text:p text:style-name="P196">├── app.py <text:s text:c="20"/># [Enterprise] Python Server for LAN access / Backend routing</text:p>
      <text:p text:style-name="P196">├── LICENSE <text:s text:c="19"/># PolyForm Noncommercial License 1.0.0</text:p>
      <text:p text:style-name="P196">│</text:p>
      <text:p text:style-name="P196">├── backend/ <text:s text:c="18"/># [Enterprise] The GitGalaxy Physics Pipeline (Offline Scanner)</text:p>
      <text:p text:style-name="P196">│ <text:s text:c="2"/>├── galaxyscope.py <text:s text:c="8"/># The Orchestrator (Main chassis connecting all modules)</text:p>
      <text:p text:style-name="P196">│ <text:s text:c="2"/>├── gitgalaxy_standards_v011.py <text:s/># The Master Registry (Regex definitions and Universal Laws)</text:p>
      <text:p text:style-name="P196">│ <text:s text:c="2"/>│</text:p>
      <text:p text:style-name="P196">│ <text:s text:c="2"/># --- The Optical Pipeline Modules ---</text:p>
      <text:p text:style-name="P196">│ <text:s text:c="2"/>├── chronometer.py <text:s text:c="8"/># Phase 0.0: Temporal Telemetry (Author &amp; Churn mapping)</text:p>
      <text:p text:style-name="P196">│ <text:s text:c="2"/>├── aperture.py <text:s text:c="11"/># Phase 0.1: The Solar Shield (Ingestion &amp; Filtering)</text:p>
      <text:p text:style-name="P196">│ <text:s text:c="2"/>├── guidestar_lens.py <text:s text:c="5"/># Phase 0.5: Alignment &amp; Context Prioritization</text:p>
      <text:p text:style-name="P196">│ <text:s text:c="2"/>├── language_lens.py <text:s text:c="6"/># Phase 1: The Entity Census (Bayesian Identity Locks)</text:p>
      <text:p text:style-name="P196">│ <text:s text:c="2"/>├── prism.py <text:s text:c="14"/># Phase 2: Structural Refractor (Logic vs. Literature split)</text:p>
      <text:p text:style-name="P196"><text:soft-page-break/>│ <text:s text:c="2"/>├── detector.py <text:s text:c="11"/># Phase 3: The Primary Detector (High-speed regex hit counting)</text:p>
      <text:p text:style-name="P196">│ <text:s text:c="2"/>├── signal_processor.py <text:s text:c="3"/># Phase 4: Exposure Engine (Transforms hits into risk metrics)</text:p>
      <text:p text:style-name="P196">│ <text:s text:c="2"/>├── spectral_auditor.py <text:s text:c="3"/># Phase 7: Quality Control (Density checks &amp; Outlier relegation)</text:p>
      <text:p text:style-name="P196">│ <text:s text:c="2"/>├── cartographer.py <text:s text:c="7"/># Phase 7.5: Spatial Geometry (3D mapping calculations)</text:p>
      <text:p text:style-name="P196">│ <text:s text:c="2"/>├── audit_recorder.py <text:s text:c="5"/># Phase 8: Astrograph Auditor (Human-readable forensic logs)</text:p>
      <text:p text:style-name="P196">│ <text:s text:c="2"/>├── llm_recorder.py <text:s text:c="7"/># Phase 8.5: AI Translation (SQLite &amp; Markdown outputs)</text:p>
      <text:p text:style-name="P196">│ <text:s text:c="2"/>└── gpu_recorder.py <text:s text:c="7"/># Phase 9: The Vectorizer (Columnar pivots for WebGL performance)</text:p>
      <text:p text:style-name="P196">│</text:p>
      <text:p text:style-name="P196">├── js/ <text:s text:c="23"/># Client-Side Logic (Frontend Visualizer)</text:p>
      <text:p text:style-name="P196">│ <text:s text:c="2"/>├── main.js <text:s text:c="15"/># Main Controller (UI &lt;-&gt; Engine handshakes)</text:p>
      <text:p text:style-name="P196">│ <text:s text:c="2"/>└── core/ <text:s text:c="17"/># The WebGL Visualization Engine</text:p>
      <text:p text:style-name="P196">│ <text:s text:c="6"/>├── galaxy-engine.js <text:s text:c="2"/># Physics Core (Three.js scene management)</text:p>
      <text:p text:style-name="P196">│ <text:s text:c="6"/>├── data-parser.js <text:s text:c="4"/># Decodes columnar GPU telemetry from the backend</text:p>
      <text:p text:style-name="P196">│ <text:s text:c="6"/>├── materials.js <text:s text:c="6"/># Visual Cortex (Data Focus Protocol &amp; "Ghost Mode")</text:p>
      <text:p text:style-name="P196">│ <text:s text:c="6"/>└── phase-6-shaders.js # Custom WebGL shaders for high-performance rendering</text:p>
      <text:p text:style-name="P196">│</text:p>
      <text:p text:style-name="P196">├── config/ <text:s text:c="19"/># Shared Configuration</text:p>
      <text:p text:style-name="P196">│ <text:s text:c="2"/>└── colors.js <text:s text:c="13"/># Palette Registry (Behavior, Language, Archetype mapping)</text:p>
      <text:p text:style-name="P196">│</text:p>
      <text:p text:style-name="P196">├── css/ <text:s text:c="22"/># Styling &amp; HUD Layout</text:p>
      <text:p text:style-name="P196">│ <text:s text:c="2"/>├── input.css <text:s text:c="13"/># Tailwind input source</text:p>
      <text:p text:style-name="P196">│ <text:s text:c="2"/>├── output.css <text:s text:c="12"/># Compiled Tailwind definitions</text:p>
      <text:p text:style-name="P196">│ <text:s text:c="2"/>└── styles.css <text:s text:c="12"/># Custom overrides and animations</text:p>
      <text:p text:style-name="P196">│</text:p>
      <text:p text:style-name="P196">├── data/ <text:s text:c="21"/># The Artifacts</text:p>
      <text:p text:style-name="P196">│ <text:s text:c="2"/>└── legendary/ <text:s text:c="12"/># Pre-baked JSONs for the Museum (Apollo 11, Voyager, etc.)</text:p>
      <text:p text:style-name="P196">│</text:p>
      <text:p text:style-name="P196">├── docs/ <text:s text:c="21"/># The Knowledge Base</text:p>
      <text:p text:style-name="P196">│ <text:s text:c="2"/>├── pipeline.odt <text:s text:c="10"/># Core architectural manifesto</text:p>
      <text:p text:style-name="P196">│ <text:s text:c="2"/>├── Language Lens Specs.odt# Documentation for the Bayesian language engine</text:p>
      <text:p text:style-name="P196">│ <text:s text:c="2"/>└── ... (Assorted technical specs, checklists, and equation worksheets)</text:p>
      <text:p text:style-name="P196">│</text:p>
      <text:p text:style-name="P196">└── archive/ <text:s text:c="18"/># Deprecated prototypes and legacy logic</text:p>
      <text:p text:style-name="P196"><text:s text:c="4"/>└── ...</text:p>
      <text:p text:style-name="P74"><text:span text:style-name="Source_20_Text"><text:span text:style-name="T105"/></text:span></text:p>
      <text:h text:style-name="P31" text:outline-level="3"><text:bookmark-start text:name="__RefHeading___Toc32686_2209633182"/>1.5 The Security &amp; Privacy Protocol: Zero-Trust Local Analysis<text:bookmark-end text:name="__RefHeading___Toc32686_2209633182"/></text:h>
      <text:h text:style-name="P34" text:outline-level="4"><text:bookmark-start text:name="__RefHeading___Toc32688_2209633182"/>1.5.1 Overview: "Your Code Never Leaves Your Computer"<text:bookmark-end text:name="__RefHeading___Toc32688_2209633182"/></text:h>
      <text:p text:style-name="P83"><text:span text:style-name="T38">GitGalaxy is built on a </text:span><text:span text:style-name="Strong_20_Emphasis"><text:span text:style-name="T38">Zero-Trust Privacy Model</text:span></text:span><text:span text:style-name="T38">. GitGalaxy performs 100% of its scanning, vectorization, and rendering within the local browser environment.</text:span></text:p>
      <text:list text:style-name="L8">
        <text:list-item>
          <text:p text:style-name="P218"><text:span text:style-name="Strong_20_Emphasis"><text:span text:style-name="T38">No Data Transmission:</text:span></text:span><text:span text:style-name="T38"> Source code is never transmitted to any API, cloud database, or third-party service.</text:span></text:p>
        </text:list-item>
        <text:list-item>
          <text:p text:style-name="P218"><text:soft-page-break/><text:span text:style-name="Strong_20_Emphasis"><text:span text:style-name="T38">Ephemeral Memory Processing:</text:span></text:span><text:span text:style-name="T38"> Repositories are unpacked into a volatile memory buffer (RAM) and are automatically purged when the browser tab is closed.</text:span></text:p>
        </text:list-item>
        <text:list-item>
          <text:p text:style-name="P218"><text:span text:style-name="Strong_20_Emphasis"><text:span text:style-name="T38">Privacy-by-Design:</text:span></text:span><text:span text:style-name="T38"> Even when "uploading" a repository, the browser merely reads the local file into a Web Worker; the data remains behind the user's firewall at all times.</text:span></text:p>
        </text:list-item>
      </text:list>
      <text:h text:style-name="P34" text:outline-level="4"><text:bookmark-start text:name="__RefHeading___Toc32690_2209633182"/>1.5.2 The "Privacy Engine": ZipLoader.js<text:bookmark-end text:name="__RefHeading___Toc32690_2209633182"/></text:h>
      <text:p text:style-name="P83"><text:span text:style-name="T38">The technical cornerstone of this protocol is the client-side </text:span><text:span text:style-name="Strong_20_Emphasis"><text:span text:style-name="T38">ZipLoader</text:span></text:span><text:span text:style-name="T38">, which utilizes the JSZip library to handle repository ingestion safely:</text:span></text:p>
      <text:list text:style-name="L9">
        <text:list-item>
          <text:p text:style-name="P219"><text:span text:style-name="Strong_20_Emphasis"><text:span text:style-name="T38">Heuristic Unpacking:</text:span></text:span><text:span text:style-name="T38"> The loader identifies source files while strictly excluding binary blobs, junk folders (</text:span><text:span text:style-name="Source_20_Text"><text:span text:style-name="T38">node_modules</text:span></text:span><text:span text:style-name="T38">, </text:span><text:span text:style-name="Source_20_Text"><text:span text:style-name="T38">__pycache__</text:span></text:span><text:span text:style-name="T38">, </text:span><text:span text:style-name="Source_20_Text"><text:span text:style-name="T38">.git</text:span></text:span><text:span text:style-name="T38">), and build artifacts (</text:span><text:span text:style-name="Source_20_Text"><text:span text:style-name="T38">dist</text:span></text:span><text:span text:style-name="T38">, </text:span><text:span text:style-name="Source_20_Text"><text:span text:style-name="T38">vendor</text:span></text:span><text:span text:style-name="T38">).</text:span></text:p>
        </text:list-item>
        <text:list-item>
          <text:p text:style-name="P219"><text:span text:style-name="Strong_20_Emphasis"><text:span text:style-name="T38">Binary Shield:</text:span></text:span><text:span text:style-name="T38"> The loader implements a mandatory null-byte detection check (</text:span><text:span text:style-name="Source_20_Text"><text:span text:style-name="T38">indexOf('\0')</text:span></text:span><text:span text:style-name="T38">). If a file contains non-textual characters, it is immediately discarded to prevent memory corruption or the unintentional analysis of compiled binaries.</text:span></text:p>
        </text:list-item>
        <text:list-item>
          <text:p text:style-name="P219"><text:span text:style-name="Strong_20_Emphasis"><text:span text:style-name="T38">Exclusion Heuristics:</text:span></text:span><text:span text:style-name="T38"> To ensure performance and privacy, the loader prunes any path containing hidden files (starting with </text:span><text:span text:style-name="Source_20_Text"><text:span text:style-name="T38">.</text:span></text:span><text:span text:style-name="T38">) or common media/font extensions.</text:span></text:p>
        </text:list-item>
      </text:list>
      <text:h text:style-name="P34" text:outline-level="4"><text:bookmark-start text:name="__RefHeading___Toc32692_2209633182"/>1.5.3 Implementation Detail: Security Safeguards<text:bookmark-end text:name="__RefHeading___Toc32692_2209633182"/></text:h>
      <text:list text:style-name="L10">
        <text:list-item>
          <text:p text:style-name="P220"><text:span text:style-name="Strong_20_Emphasis"><text:span text:style-name="T38">In-Memory Sanitization:</text:span></text:span><text:span text:style-name="T38"> Code is read as string buffers. No persistent files are ever created on the local file system by the application.</text:span></text:p>
        </text:list-item>
        <text:list-item>
          <text:p text:style-name="P220"><text:span text:style-name="Strong_20_Emphasis"><text:span text:style-name="T38">Concurrency Protection:</text:span></text:span><text:span text:style-name="T38"> The </text:span><text:span text:style-name="Source_20_Text"><text:span text:style-name="T38">isProcessing</text:span></text:span><text:span text:style-name="T38"> guard prevents memory overflow by ensuring only one unpacking operation occurs at a time, protecting the user's browser stability during large-scale Tier 4 (Megastructure) scans.</text:span></text:p>
        </text:list-item>
      </text:list>
      <text:p text:style-name="P74"/>
      <text:h text:style-name="P29" text:outline-level="2"><text:bookmark-start text:name="__RefHeading___Toc11735_959624642"/><text:span text:style-name="T390">2</text:span>. <text:span text:style-name="T391">Converting code into space and color info</text:span><text:bookmark-end text:name="__RefHeading___Toc11735_959624642"/></text:h>
      <text:p text:style-name="P83"><text:span text:style-name="Emphasis"><text:span text:style-name="T246">Note: We have updated to attempt a function by function labeling for each of </text:span></text:span><text:span text:style-name="Emphasis"><text:span text:style-name="T392">the</text:span></text:span><text:span text:style-name="Emphasis"><text:span text:style-name="T246"> </text:span></text:span><text:span text:style-name="Emphasis"><text:span text:style-name="T37">complexity metrics for </text:span></text:span><text:span text:style-name="Emphasis"><text:span text:style-name="T246">and use a vectorized json to attempt to streamline this. </text:span></text:span><text:span text:style-name="Emphasis"><text:span text:style-name="T392">Risk exposure</text:span></text:span><text:span text:style-name="Emphasis"><text:span text:style-name="T37"> metrics like color are determined at the file level, not at the function level.</text:span></text:span></text:p>
      <text:h text:style-name="P72" text:outline-level="3"><text:bookmark-start text:name="__RefHeading___Toc139657_2813440148"/><text:soft-page-break/><text:span text:style-name="T157">2</text:span><text:span text:style-name="T38">.1 </text:span><text:span text:style-name="T111">How we represent complexity as physical structure</text:span> <text:bookmark-end text:name="__RefHeading___Toc139657_2813440148"/></text:h>
      <text:p text:style-name="P75"><text:span text:style-name="T38">Code complexity is mapped to </text:span><text:span text:style-name="Strong_20_Emphasis"><text:span text:style-name="T38">physical structure</text:span></text:span><text:span text:style-name="T38">, creating organic, distinct shapes for different </text:span><text:span text:style-name="T112">complexity</text:span><text:span text:style-name="T38"> patterns. </text:span><text:span text:style-name="T113">This representation of complexity does not depend on color. </text:span><text:span text:style-name="T112">They are summarized below. </text:span></text:p>
      <text:p text:style-name="P75"><text:span text:style-name="Source_20_Text"><text:span text:style-name="T112"/></text:span></text:p>
      <table:table table:name="Table1" table:style-name="Table1">
        <table:table-column table:style-name="Table1.A"/>
        <table:table-column table:style-name="Table1.B"/>
        <table:table-column table:style-name="Table1.C"/>
        <table:table-row>
          <table:table-cell table:style-name="Table1.A1" office:value-type="string">
            <text:p text:style-name="P80">Physical Attribute</text:p>
          </table:table-cell>
          <table:table-cell table:style-name="Table1.A1" office:value-type="string">
            <text:p text:style-name="P80">Code Metric (Heuristic)</text:p>
          </table:table-cell>
          <table:table-cell table:style-name="Table1.A1" office:value-type="string">
            <text:p text:style-name="P80">Visual Result (The "Look")</text:p>
          </table:table-cell>
        </table:table-row>
        <table:table-row>
          <table:table-cell table:style-name="Table1.A1" office:value-type="string">
            <text:p text:style-name="P79"><text:span text:style-name="Strong_20_Emphasis">Star’s Size</text:span></text:p>
          </table:table-cell>
          <table:table-cell table:style-name="Table1.A1" office:value-type="string">
            <text:p text:style-name="P79">Lines of Code (LOC) per File</text:p>
          </table:table-cell>
          <table:table-cell table:style-name="Table1.A1" office:value-type="string">
            <text:p text:style-name="P79"><text:span text:style-name="Strong_20_Emphasis">Mass.</text:span> Logarithmic scaling ensures that 10k+ LOC files appear as massive suns, while 10 LOC scripts remain small asteroids.</text:p>
          </table:table-cell>
        </table:table-row>
        <table:table-row>
          <table:table-cell table:style-name="Table1.A1" office:value-type="string">
            <text:p text:style-name="P79"><text:span text:style-name="Strong_20_Emphasis">Star’s Pulse Rate</text:span></text:p>
          </table:table-cell>
          <table:table-cell table:style-name="Table1.A1" office:value-type="string">
            <text:p text:style-name="P79">Inbound References (Popularity)</text:p>
          </table:table-cell>
          <table:table-cell table:style-name="Table1.A1" office:value-type="string">
            <text:p text:style-name="P79"><text:span text:style-name="Strong_20_Emphasis">Bioluminescence.</text:span> Core utilities pulse with a white-hot "heartbeat." Unreferenced files remain dim and static.</text:p>
          </table:table-cell>
        </table:table-row>
        <table:table-row>
          <table:table-cell table:style-name="Table1.A1" office:value-type="string">
            <text:p text:style-name="P79"><text:span text:style-name="Strong_20_Emphasis">Star’s Shape</text:span></text:p>
          </table:table-cell>
          <table:table-cell table:style-name="Table1.A1" office:value-type="string">
            <text:p text:style-name="P79">control flow ratio (File Level)</text:p>
          </table:table-cell>
          <table:table-cell table:style-name="Table1.A1" office:value-type="string">
            <text:p text:style-name="P79"><text:span text:style-name="Strong_20_Emphasis">Geometry.</text:span> Morphs from a smooth <text:span text:style-name="Strong_20_Emphasis">Sphere</text:span> (Declarative/Data) to a sharp <text:span text:style-name="Strong_20_Emphasis">Tetrahedron</text:span> (Pure Algorithmic Logic).</text:p>
          </table:table-cell>
        </table:table-row>
        <table:table-row>
          <table:table-cell table:style-name="Table1.A1" office:value-type="string">
            <text:p text:style-name="P79"><text:span text:style-name="Strong_20_Emphasis">Satellite Unit</text:span></text:p>
          </table:table-cell>
          <table:table-cell table:style-name="Table1.A1" office:value-type="string">
            <text:p text:style-name="P79">Function Declaration</text:p>
          </table:table-cell>
          <table:table-cell table:style-name="Table1.A1" office:value-type="string">
            <text:p text:style-name="P79"><text:span text:style-name="Strong_20_Emphasis">Moons.</text:span> Every discrete function is materialized as a satellite orbiting its parent star. <text:span text:style-name="T399">Limits for monorepos. </text:span></text:p>
          </table:table-cell>
        </table:table-row>
        <table:table-row>
          <table:table-cell table:style-name="Table1.A1" office:value-type="string">
            <text:p text:style-name="P79"><text:span text:style-name="Strong_20_Emphasis">Satellite Distance</text:span></text:p>
          </table:table-cell>
          <table:table-cell table:style-name="Table1.A1" office:value-type="string">
            <text:p text:style-name="P79">Lines of Code (LOC) per Function</text:p>
          </table:table-cell>
          <table:table-cell table:style-name="Table1.A1" office:value-type="string">
            <text:p text:style-name="P79"><text:span text:style-name="Strong_20_Emphasis">Orbital Reach.</text:span> Long functions reach further into the void; small stubs orbit tightly near the star’s surface.</text:p>
          </table:table-cell>
        </table:table-row>
        <table:table-row>
          <table:table-cell table:style-name="Table1.A1" office:value-type="string">
            <text:p text:style-name="P79"><text:span text:style-name="Strong_20_Emphasis">Number of Satellites</text:span></text:p>
          </table:table-cell>
          <table:table-cell table:style-name="Table1.A1" office:value-type="string">
            <text:p text:style-name="P79">Cyclomatic Complexity</text:p>
          </table:table-cell>
          <table:table-cell table:style-name="Table1.A1" office:value-type="string">
            <text:p text:style-name="P79"><text:span text:style-name="Strong_20_Emphasis">Fractal Density.</text:span> Highly complex functions spawn sub-clusters or dense swarms of satellites, creating a "thorny" silhouette.</text:p>
          </table:table-cell>
        </table:table-row>
        <table:table-row>
          <table:table-cell table:style-name="Table1.A1" office:value-type="string">
            <text:p text:style-name="P79"><text:span text:style-name="Strong_20_Emphasis">Satellite Position</text:span></text:p>
          </table:table-cell>
          <table:table-cell table:style-name="Table1.A1" office:value-type="string">
            <text:p text:style-name="P79">control flow ratio (Function Level)</text:p>
          </table:table-cell>
          <table:table-cell table:style-name="Table1.A1" office:value-type="string">
            <text:p text:style-name="P79"><text:span text:style-name="Strong_20_Emphasis">Branching Angle.</text:span> Sharp, jagged angles (&lt;45°) indicate complex control flow; 90° "Circuit Board" patterns indicate linear flow.</text:p>
          </table:table-cell>
        </table:table-row>
        <table:table-row>
          <table:table-cell table:style-name="Table1.A1" office:value-type="string">
            <text:p text:style-name="P79"><text:span text:style-name="Strong_20_Emphasis">Satellite Size</text:span></text:p>
          </table:table-cell>
          <table:table-cell table:style-name="Table1.A1" office:value-type="string">
            <text:p text:style-name="P79">Argument Count</text:p>
          </table:table-cell>
          <table:table-cell table:style-name="Table1.A1" office:value-type="string">
            <text:p text:style-name="P79"><text:span text:style-name="Strong_20_Emphasis">Volume.</text:span> Large moons represent "Heavy" functions with many inputs; small dots represent lightweight, encapsulated utilities.</text:p>
          </table:table-cell>
        </table:table-row>
        <table:table-row>
          <table:table-cell table:style-name="Table1.A1" office:value-type="string">
            <text:p text:style-name="P79"><text:span text:style-name="Strong_20_Emphasis">Star’s Rings</text:span></text:p>
          </table:table-cell>
          <table:table-cell table:style-name="Table1.A1" office:value-type="string">
            <text:p text:style-name="P79">External Library Imports</text:p>
          </table:table-cell>
          <table:table-cell table:style-name="Table1.A1" office:value-type="string">
            <text:p text:style-name="P79"><text:span text:style-name="Strong_20_Emphasis">Accretion Disks.</text:span> Files tethered to many external dependencies manifest glowing rings, symbolizing a large "Gravity Well."</text:p>
          </table:table-cell>
        </table:table-row>
        <table:table-row>
          <table:table-cell table:style-name="Table1.A1" office:value-type="string">
            <text:p text:style-name="P79"><text:span text:style-name="Strong_20_Emphasis">Star’s Position</text:span></text:p>
          </table:table-cell>
          <table:table-cell table:style-name="Table1.A1" office:value-type="string">
            <text:p text:style-name="P79">Semantic Affinity (Directory/Path)</text:p>
          </table:table-cell>
          <table:table-cell table:style-name="Table1.A1" office:value-type="string">
            <text:p text:style-name="P79"><text:span text:style-name="Strong_20_Emphasis">Neighborhoods.</text:span> Files are grouped into sectoral clusters based on folder structure, creating distinct "Auth," "UI," and "API" continents.</text:p>
          </table:table-cell>
        </table:table-row>
      </table:table>
      <text:p text:style-name="P75"><text:span text:style-name="Source_20_Text"><text:span text:style-name="T38"/></text:span></text:p>
      <text:h text:style-name="P76" text:outline-level="4"><text:bookmark-start text:name="__RefHeading___Toc139659_2813440148"/><text:soft-page-break/><text:span text:style-name="Strong_20_Emphasis"><text:span text:style-name="T390">2</text:span></text:span><text:span text:style-name="Strong_20_Emphasis"><text:span text:style-name="T247">.1.A. Star’s Size</text:span></text:span><text:bookmark-end text:name="__RefHeading___Toc139659_2813440148"/></text:h>
      <text:h text:style-name="Heading_20_5" text:outline-level="5"><text:span text:style-name="Strong_20_Emphasis"/></text:h>
      <text:p text:style-name="P152"><text:span text:style-name="Strong_20_Emphasis"><text:span text:style-name="T195">Purpose: Visualize the sheer "Gravitational Weight" of a file within the system. Why: In a galaxy, size is the first thing you notice. But in software, "length" does not always equal "weight." A 200-line configuration file is light, while a 50-line recursive algorithm is heavy. By calculating mass based on complexity, risk, and volume, we ensure that the most impactful files—the ones that are hard to read, dangerous to touch, or heavily connected—physically dominate the screen as super-massive suns. We use size to instantly communicate structural importance.</text:span></text:span></text:p>
      <text:h text:style-name="P151" text:outline-level="5"><text:bookmark-start text:name="__RefHeading___Toc42110_730389025"/>2.1.A.1. The Philosophy: Physical Presence <text:bookmark-end text:name="__RefHeading___Toc42110_730389025"/></text:h>
      <text:p text:style-name="Text_20_body">We treat code as physical matter, but we recognize that matter has different densities.</text:p>
      <text:p text:style-name="Text_20_body">Low Density: Simple data, linear lists, and standard config files. These are large but light, easy to move.</text:p>
      <text:p text:style-name="Text_20_body">High Density: Complex branching logic, heavy arguments, and high risk exposure. These are small but incredibly heavy, exerting high gravity.</text:p>
      <text:p text:style-name="Text_20_body">By scaling the star's size based on this Composite Mass, we create a visual hierarchy where the true "Main Characters"—the complex logic engines—naturally anchor the sector, while simple helper files drift in the background.</text:p>
      <text:h text:style-name="Heading_20_5" text:outline-level="5"><text:bookmark-start text:name="__RefHeading___Toc42112_730389025"/>2.1.A.2. The Inputs: Measuring Mass <text:bookmark-end text:name="__RefHeading___Toc42112_730389025"/></text:h>
      <text:p text:style-name="P152">The mass calculation ingests five distinct dimensions of code structure:</text:p>
      <text:list text:style-name="L11">
        <text:list-item>
          <text:p text:style-name="P221">Function Impact: The complexity of every function inside the file.</text:p>
        </text:list-item>
        <text:list-item>
          <text:p text:style-name="P221">API Exposure: How publicly visible the file is.</text:p>
        </text:list-item>
        <text:list-item>
          <text:p text:style-name="P221">Concurrency Exposure: The density of asynchronous/threading logic.</text:p>
        </text:list-item>
        <text:list-item>
          <text:p text:style-name="P221">State Flux Exposure: The density of variable mutation.</text:p>
        </text:list-item>
        <text:list-item>
          <text:p text:style-name="P221">LOC (Lines of Code): The raw physical volume (scaled down to act as a base substrate).</text:p>
        </text:list-item>
      </text:list>
      <text:h text:style-name="Heading_20_5" text:outline-level="5"><text:bookmark-start text:name="__RefHeading___Toc42114_730389025"/>2.1.A.3. The Equation: Structural Mass &amp; Visual Radius <text:bookmark-end text:name="__RefHeading___Toc42114_730389025"/></text:h>
      <text:p text:style-name="P152">We utilize a multi-stage summation to determine the raw mass. Complexity multiplies; volume merely adds. We then apply a logarithmic clamp to determine the final visual <text:soft-page-break/>radius, ensuring that massive "God Objects" are distinct but do not consume the entire viewport.</text:p>
      <text:p text:style-name="Text_20_body">Step 1: Calculate Function Impact For every function in the file, we calculate an impact score based on its decision density (Branches), connectivity (Args), and length.</text:p>
      <text:p text:style-name="Text_20_body">Function Impact = ((BranchHits + 1) * (Args + 1) + (0.05 * LOC)) * 10</text:p>
      <text:p text:style-name="Text_20_body">Step 2: Calculate Total Mass (The Raw Metric) The file's final mass is the sum of its functions plus its system-wide risk exposures.</text:p>
      <text:p text:style-name="Text_20_body">Total Mass = Sum(Function Impacts) + API + Concurrency + Flux + (LOC / 50)</text:p>
      <text:p text:style-name="Text_20_body">Step 3: Calculate Visual Radius (The Render Size) We apply a base-2 logarithm to compress the massive range of weights (10 to 1,000,000) into a renderable scale (10 to 50 units).</text:p>
      <text:p text:style-name="Text_20_body">Radius = 10 + (Math.log2(Math.max(Total Mass, 1)) * 2)</text:p>
      <text:h text:style-name="Heading_20_5" text:outline-level="5"><text:bookmark-start text:name="__RefHeading___Toc42116_730389025"/>2.1.A.4. The Visual Thresholds (The Scale) <text:bookmark-end text:name="__RefHeading___Toc42116_730389025"/></text:h>
      <text:p text:style-name="P152">The Asteroid (Mass &lt; 100): Radius ~16 units. Simple DTOs, interfaces, or small configs. Nimble, low-gravity rocks that drift in the periphery.</text:p>
      <text:p text:style-name="Text_20_body">The Planet (Mass 100 - 1,000): Radius ~20 to 26 units. Standard business logic. Visible, stable, but not overwhelming. The "Middle Class" of the galaxy.</text:p>
      <text:p text:style-name="Text_20_body">The Star (Mass 1,000 - 20,000): Radius ~27 to 38 units. Core utilities, major controllers, or complex engines. These anchor local clusters and exert visible gravity.</text:p>
      <text:p text:style-name="Text_20_body">The Super-Giant (Mass 20,000+): Radius ~40+ units. "God Objects," massive reducers, or legacy core files. These dominate the screen, signaling extreme structural density.</text:p>
      <text:p text:style-name="P83"><text:span text:style-name="Strong_20_Emphasis"><text:span text:style-name="T195"/></text:span></text:p>
      <text:h text:style-name="P76" text:outline-level="4"><text:bookmark-start text:name="__RefHeading___Toc139738_2813440148"/><text:span text:style-name="Strong_20_Emphasis"><text:span text:style-name="T390">2</text:span></text:span><text:span text:style-name="Strong_20_Emphasis">.1.B. Star’s Pulse Rate</text:span><text:bookmark-end text:name="__RefHeading___Toc139738_2813440148"/></text:h>
      <text:p text:style-name="P83"><text:span text:style-name="Strong_20_Emphasis"><text:span text:style-name="T2">Metric</text:span></text:span><text:span text:style-name="Strong_20_Emphasis"><text:span text:style-name="T195">: Inbound Reference Count (Popularity). </text:span></text:span></text:p>
      <text:p text:style-name="P83"><text:span text:style-name="Strong_20_Emphasis"><text:span text:style-name="T2">Purpose</text:span></text:span><text:span text:style-name="Strong_20_Emphasis"><text:span text:style-name="T195">: </text:span></text:span><text:span text:style-name="Strong_20_Emphasis"><text:span text:style-name="T196">See how popular or highly referenced a file is</text:span></text:span><text:span text:style-name="Strong_20_Emphasis"><text:span text:style-name="T195">. </text:span></text:span></text:p>
      <text:p text:style-name="P83"><text:span text:style-name="Strong_20_Emphasis"><text:span text:style-name="T2">Why</text:span></text:span><text:span text:style-name="Strong_20_Emphasis"><text:span text:style-name="T195">: </text:span></text:span><text:span text:style-name="Strong_20_Emphasis"><text:span text:style-name="T196">A fundamental measure of a file’s importance in a system.</text:span></text:span></text:p>
      <text:p text:style-name="P83"><text:span text:style-name="Strong_20_Emphasis"><text:span text:style-name="T2">Effect</text:span></text:span><text:span text:style-name="Strong_20_Emphasis"><text:span text:style-name="T195">: Modulates the Emissive Intensity (Bloom Strength) and Pulse Floor. </text:span></text:span><text:span text:style-name="Strong_20_Emphasis"><text:span text:style-name="T196">Pulses</text:span></text:span><text:span text:style-name="Strong_20_Emphasis"><text:span text:style-name="T195"> should feel powerful </text:span></text:span><text:span text:style-name="Strong_20_Emphasis"><text:span text:style-name="T196">and stately, never blinky and annoying</text:span></text:span><text:span text:style-name="Strong_20_Emphasis"><text:span text:style-name="T195">. Instead of deadening the colors with opacity fades, we use Bioluminescence. A "God Class" </text:span></text:span><text:span text:style-name="Strong_20_Emphasis"><text:span text:style-name="T196">file that is</text:span></text:span><text:span text:style-name="Strong_20_Emphasis"><text:span text:style-name="T195"> imported by </text:span></text:span><text:span text:style-name="Strong_20_Emphasis"><text:span text:style-name="T196">many </text:span></text:span><text:soft-page-break/><text:span text:style-name="Strong_20_Emphasis"><text:span text:style-name="T196">other files </text:span></text:span><text:span text:style-name="Strong_20_Emphasis"><text:span text:style-name="T195">shouldn't just blink faster; it should burn hotter </text:span></text:span><text:span text:style-name="Strong_20_Emphasis"><text:span text:style-name="T196">and</text:span></text:span><text:span text:style-name="Strong_20_Emphasis"><text:span text:style-name="T195"> overwhelm the surrounding atmosphere.</text:span></text:span></text:p>
      <text:h text:style-name="P77" text:outline-level="5"><text:bookmark-start text:name="__RefHeading___Toc139669_2813440148"/><text:span text:style-name="Strong_20_Emphasis"><text:span text:style-name="T390">2</text:span></text:span><text:span text:style-name="Strong_20_Emphasis"><text:span text:style-name="T247">.1.B.</text:span></text:span>1. The Philosophy: Bioluminescence<text:bookmark-end text:name="__RefHeading___Toc139669_2813440148"/></text:h>
      <text:p text:style-name="P83">We treat the codebase as a living deep-sea organism.</text:p>
      <text:list text:style-name="L12">
        <text:list-item>
          <text:p text:style-name="P222"><text:span text:style-name="Strong_20_Emphasis">Hot:</text:span> Core utilities or "God Objects." These are the nuclear reactors of the system. They burn with a high-intensity, white-hot core that never fully dims.</text:p>
        </text:list-item>
        <text:list-item>
          <text:p text:style-name="P222"><text:span text:style-name="Strong_20_Emphasis">Cold:</text:span> Leaf nodes or configs. They emit a gentle, shallow phosphorescence.</text:p>
        </text:list-item>
      </text:list>
      <text:h text:style-name="P77" text:outline-level="5"><text:bookmark-start text:name="__RefHeading___Toc139671_2813440148"/><text:span text:style-name="Strong_20_Emphasis"><text:span text:style-name="T390">2</text:span></text:span><text:span text:style-name="Strong_20_Emphasis"><text:span text:style-name="T247">.1.B.</text:span></text:span>2. The Inputs: Measuring Gravity<text:bookmark-end text:name="__RefHeading___Toc139671_2813440148"/></text:h>
      <text:list text:style-name="L13">
        <text:list-item>
          <text:p text:style-name="P223"><text:span text:style-name="Strong_20_Emphasis">Ref (Inbound References):</text:span> The count of <text:span text:style-name="Emphasis">other</text:span> files that import this specific file.</text:p>
        </text:list-item>
        <text:list-item>
          <text:p text:style-name="P223"><text:span text:style-name="Strong_20_Emphasis">MaxRef:</text:span> The highest reference count found in the entire repository. This sets the "Ceiling" for the simulation.</text:p>
        </text:list-item>
      </text:list>
      <text:h text:style-name="P77" text:outline-level="5"><text:bookmark-start text:name="__RefHeading___Toc139673_2813440148"/><text:span text:style-name="Strong_20_Emphasis"><text:span text:style-name="T390">2</text:span></text:span><text:span text:style-name="Strong_20_Emphasis"><text:span text:style-name="T247">.1.B.</text:span></text:span>3. The Equation: Intensity Mapping<text:bookmark-end text:name="__RefHeading___Toc139673_2813440148"/></text:h>
      <text:p text:style-name="P83">We don't just change speed; we change the <text:span text:style-name="Strong_20_Emphasis">Dynamic Range</text:span> of the glow.</text:p>
      <text:list text:style-name="L14">
        <text:list-item>
          <text:p text:style-name="P224"><text:span text:style-name="Strong_20_Emphasis">Logic:</text:span></text:p>
          <text:list>
            <text:list-item>
              <text:p text:style-name="P224"><text:span text:style-name="Strong_20_Emphasis">Frequency (Speed):</text:span> Capped between 0.5Hz and 1.5Hz. We keep the pulse "Stately" and "Breathing," avoiding rapid strobing.</text:p>
            </text:list-item>
            <text:list-item>
              <text:p text:style-name="P224"><text:span text:style-name="Strong_20_Emphasis">Amplitude (Intensity):</text:span> Mapped directly to popularity.</text:p>
              <text:list>
                <text:list-item>
                  <text:p text:style-name="P224"><text:span text:style-name="Strong_20_Emphasis">Floor:</text:span> The minimum brightness. Popular files <text:span text:style-name="Emphasis">never</text:span> go dark.</text:p>
                </text:list-item>
                <text:list-item>
                  <text:p text:style-name="P224"><text:span text:style-name="Strong_20_Emphasis">Ceiling:</text:span> The maximum brightness. Popular files bloom into pure white.</text:p>
                </text:list-item>
              </text:list>
            </text:list-item>
          </text:list>
        </text:list-item>
      </text:list>
      <text:h text:style-name="P77" text:outline-level="5"><text:bookmark-start text:name="__RefHeading___Toc139740_2813440148"/><text:span text:style-name="Strong_20_Emphasis"><text:span text:style-name="T390">2</text:span></text:span><text:span text:style-name="Strong_20_Emphasis"><text:span text:style-name="T247">.1.B.</text:span></text:span><text:span text:style-name="Strong_20_Emphasis"><text:span text:style-name="T249">4. </text:span></text:span><text:span text:style-name="Strong_20_Emphasis"><text:span text:style-name="T399">Equation</text:span></text:span><text:span text:style-name="Strong_20_Emphasis">:</text:span><text:bookmark-end text:name="__RefHeading___Toc139740_2813440148"/></text:h>
      <text:p text:style-name="P82"><text:span text:style-name="Source_20_Text">// Normalize Popularity (0.0 to 1.0)</text:span></text:p>
      <text:p text:style-name="P82"><text:span text:style-name="Source_20_Text">const P = Math.min(Ref / MaxRef, 1.0);</text:span></text:p>
      <text:p text:style-name="P82"/>
      <text:p text:style-name="P82"><text:span text:style-name="Source_20_Text">// 1. Stately Speed (0.5Hz to 1.5Hz) - Preventing the "Hazard Strobe"</text:span></text:p>
      <text:p text:style-name="P82"><text:span text:style-name="Source_20_Text">const speed = 0.5 + (P * 1.0);</text:span></text:p>
      <text:p text:style-name="P82"/>
      <text:p text:style-name="P82"><text:span text:style-name="Source_20_Text">// 2. The Bloom Floor (0.2 to 1.0)</text:span></text:p>
      <text:p text:style-name="P82"><text:span text:style-name="Source_20_Text">// Important files never fade below 1.0 (Full Brightness)</text:span></text:p>
      <text:p text:style-name="P82"><text:span text:style-name="Source_20_Text">const minIntensity = 0.2 + (P * 0.8);</text:span></text:p>
      <text:p text:style-name="P82"/>
      <text:p text:style-name="P82"><text:span text:style-name="Source_20_Text">// 3. The Bloom Ceiling (1.5 to 4.0)</text:span></text:p>
      <text:p text:style-name="P82"><text:span text:style-name="Source_20_Text">// Important files burst into blinding white (4.0) at the peak</text:span></text:p>
      <text:p text:style-name="P82"><text:span text:style-name="Source_20_Text">const maxIntensity = 1.5 + (P * 2.5);</text:span></text:p>
      <text:p text:style-name="P82"/>
      <text:p text:style-name="P82"><text:span text:style-name="Source_20_Text">// Final Shader Value</text:span></text:p>
      <text:p text:style-name="P78"><text:soft-page-break/><text:span text:style-name="Source_20_Text">emissiveIntensity = minIntensity + (sin(time * speed) * (maxIntensity - minIntensity));</text:span></text:p>
      <text:h text:style-name="P77" text:outline-level="5"><text:bookmark-start text:name="__RefHeading___Toc139675_2813440148"/><text:span text:style-name="Strong_20_Emphasis"><text:span text:style-name="T390">2</text:span></text:span><text:span text:style-name="Strong_20_Emphasis"><text:span text:style-name="T247">.1.B.</text:span></text:span><text:span text:style-name="Strong_20_Emphasis"><text:span text:style-name="T249">5</text:span></text:span>. The Visual Thresholds (The Resonance)<text:bookmark-end text:name="__RefHeading___Toc139675_2813440148"/></text:h>
      <text:list text:style-name="L15">
        <text:list-item>
          <text:p text:style-name="P225"><text:span text:style-name="Strong_20_Emphasis">The Firefly (Low Refs):</text:span></text:p>
          <text:list>
            <text:list-item>
              <text:p text:style-name="P225"><text:span text:style-name="Strong_20_Emphasis">Pulse:</text:span> 0.5 Hz (Slow).</text:p>
            </text:list-item>
            <text:list-item>
              <text:p text:style-name="P225"><text:span text:style-name="Strong_20_Emphasis">Range:</text:span> 0.2 -&gt; 1.5.</text:p>
            </text:list-item>
            <text:list-item>
              <text:p text:style-name="P225"><text:span text:style-name="Strong_20_Emphasis">Visual:</text:span> A gentle, rhythmic shimmer. The object retains its rich theme color (e.g., Deep Cyan) and occasionally brightens.</text:p>
            </text:list-item>
          </text:list>
        </text:list-item>
        <text:list-item>
          <text:p text:style-name="P225"><text:span text:style-name="Strong_20_Emphasis">The Reactor (High Refs):</text:span></text:p>
          <text:list>
            <text:list-item>
              <text:p text:style-name="P225"><text:span text:style-name="Strong_20_Emphasis">Pulse:</text:span> 1.5 Hz (Moderate/Stately).</text:p>
            </text:list-item>
            <text:list-item>
              <text:p text:style-name="P225"><text:span text:style-name="Strong_20_Emphasis">Range:</text:span> 1.0 -&gt; 4.0.</text:p>
            </text:list-item>
            <text:list-item>
              <text:p text:style-name="P225"><text:span text:style-name="Strong_20_Emphasis">Visual:</text:span> A powerful, "Core Saturation" effect. The center of the object burns white-hot due to Bloom overload, while the edges retain the theme color. It feels "heavy" and "alive," anchoring the scene.</text:p>
            </text:list-item>
          </text:list>
        </text:list-item>
      </text:list>
      <text:h text:style-name="P76" text:outline-level="4"><text:bookmark-start text:name="__RefHeading___Toc186402_2813440148"/><text:span text:style-name="Strong_20_Emphasis"><text:span text:style-name="T390">2</text:span></text:span><text:span text:style-name="Strong_20_Emphasis">.1.C Star’s Shape </text:span><text:bookmark-end text:name="__RefHeading___Toc186402_2813440148"/></text:h>
      <text:p text:style-name="P83"><text:span text:style-name="Strong_20_Emphasis">Metric:</text:span> control flow ratio (). </text:p>
      <text:p text:style-name="P83"><text:span text:style-name="Strong_20_Emphasis">Purpose:</text:span> Give every star a distinctive silhouette that communicates the "State of Matter" of the code. </text:p>
      <text:p text:style-name="P83"><text:span text:style-name="Strong_20_Emphasis">Why:</text:span> A file isn't just a size; it has a temperament. Declarative code (like a list of variables) is stable and solid. Algorithmic code (like a sorting method) is energetic and sharp. Without this variance, the galaxy looks like a generic ball field. By morphing the shape, we allow developers to "feel" the difference between a config file and a logic core without reading a single character. </text:p>
      <text:p text:style-name="P83"><text:span text:style-name="Strong_20_Emphasis">Effect:</text:span> Transitions the central mesh through five distinct geometric tiers.</text:p>
      <text:h text:style-name="P77" text:outline-level="5"><text:bookmark-start text:name="__RefHeading___Toc186404_2813440148"/><text:span text:style-name="Strong_20_Emphasis"><text:span text:style-name="T390">2</text:span></text:span><text:span text:style-name="Strong_20_Emphasis">.1.C.</text:span>1. The Philosophy: Smooth vs. Sharp<text:bookmark-end text:name="__RefHeading___Toc186404_2813440148"/></text:h>
      <text:p text:style-name="P83">We categorize code into five "Phases of Matter" based on its decision-making density.</text:p>
      <text:list text:style-name="L16">
        <text:list-item>
          <text:p text:style-name="P226"><text:span text:style-name="Strong_20_Emphasis">Organic (Smooth):</text:span> Passive code that defines things. It feels safe and "round."</text:p>
        </text:list-item>
        <text:list-item>
          <text:p text:style-name="P226"><text:span text:style-name="Strong_20_Emphasis">Crystalline (Jagged):</text:span> Active code that decides things. It feels sharp and "dangerous."</text:p>
        </text:list-item>
      </text:list>
      <text:h text:style-name="P137" text:outline-level="5"><text:bookmark-start text:name="__RefHeading___Toc139687_2813440148 Copy 1"/><text:soft-page-break/><text:span text:style-name="Strong_20_Emphasis"><text:span text:style-name="T119">2</text:span></text:span><text:span text:style-name="Strong_20_Emphasis"><text:span text:style-name="T116">.1.</text:span></text:span><text:span text:style-name="Strong_20_Emphasis"><text:span text:style-name="T122">C</text:span></text:span><text:span text:style-name="Strong_20_Emphasis"><text:span text:style-name="T117">.</text:span></text:span><text:span text:style-name="Strong_20_Emphasis"><text:span text:style-name="T122">2</text:span></text:span>. The Philosophy: Thinking vs. Speaking<text:bookmark-end text:name="__RefHeading___Toc139687_2813440148 Copy 1"/></text:h>
      <text:p text:style-name="P138">Code does two things: it either <text:span text:style-name="Strong_20_Emphasis">computes</text:span> (makes decisions) or it <text:span text:style-name="Strong_20_Emphasis">declares</text:span> (defines structures).</text:p>
      <text:list xml:id="list3712635341" text:style-name="L17">
        <text:list-item>
          <text:p text:style-name="P227"><text:span text:style-name="Strong_20_Emphasis">Computing (Logic):</text:span> "If X happens, do Y." This is jagged, non-linear, and energetic. It represents the "Thinking" brain.</text:p>
        </text:list-item>
        <text:list-item>
          <text:p text:style-name="P227"><text:span text:style-name="Strong_20_Emphasis">Defining (Structure):</text:span> "Let X equal 5." This is flat, linear, and stable. It represents the "Memory" or "Structure" of the system.</text:p>
        </text:list-item>
      </text:list>
      <text:p text:style-name="P138"><text:span text:style-name="Strong_20_Emphasis">We visualize this tension physically. A file that "thinks" a lot (algorithms) looks sharp and aggressive. A file that "remembers" a lot (configs, interfaces) </text:span><text:span text:style-name="Strong_20_Emphasis"><text:span text:style-name="T247">has softer angles.</text:span></text:span></text:p>
      <text:h text:style-name="P77" text:outline-level="5"><text:bookmark-start text:name="__RefHeading___Toc186406_2813440148"/><text:span text:style-name="Strong_20_Emphasis"><text:span text:style-name="T390">2</text:span></text:span><text:span text:style-name="Strong_20_Emphasis">.1.C.</text:span><text:span text:style-name="Strong_20_Emphasis"><text:span text:style-name="T451">3</text:span></text:span>. The Inputs: The control flow ratio<text:bookmark-end text:name="__RefHeading___Toc186406_2813440148"/></text:h>
      <text:p text:style-name="P136">The scanner separates every regex hit into one of two buckets:</text:p>
      <text:list text:style-name="L18">
        <text:list-item>
          <text:p text:style-name="P229"><text:span text:style-name="Strong_20_Emphasis">A. Branch Hits (The Logic)</text:span></text:p>
          <text:list>
            <text:list-item>
              <text:p text:style-name="P229"><text:span text:style-name="Strong_20_Emphasis">Concept:</text:span> Points where execution splits.</text:p>
            </text:list-item>
            <text:list-item>
              <text:p text:style-name="P229"><text:span text:style-name="Strong_20_Emphasis">Variables Used:</text:span> <text:span text:style-name="Source_20_Text">BranchHits</text:span> (from scanner).</text:p>
            </text:list-item>
            <text:list-item>
              <text:p text:style-name="P229"><text:span text:style-name="Strong_20_Emphasis">Triggers:</text:span> <text:span text:style-name="Source_20_Text">if</text:span>, <text:span text:style-name="Source_20_Text">else</text:span>, <text:span text:style-name="Source_20_Text">switch</text:span>, <text:span text:style-name="Source_20_Text">case</text:span>, <text:span text:style-name="Source_20_Text">for</text:span>, <text:span text:style-name="Source_20_Text">while</text:span>, <text:span text:style-name="Source_20_Text">catch</text:span>, <text:span text:style-name="Source_20_Text">&amp;&amp;</text:span>, <text:span text:style-name="Source_20_Text">||</text:span>, ternary <text:span text:style-name="Source_20_Text">?</text:span>.</text:p>
            </text:list-item>
            <text:list-item>
              <text:p text:style-name="P229"><text:span text:style-name="Strong_20_Emphasis">Meaning:</text:span> High counts here mean the code is constantly changing direction.</text:p>
            </text:list-item>
          </text:list>
        </text:list-item>
        <text:list-item>
          <text:p text:style-name="P229"><text:span text:style-name="Strong_20_Emphasis">B. Linear Hits (The Structure)</text:span></text:p>
          <text:list>
            <text:list-item>
              <text:p text:style-name="P229"><text:span text:style-name="Strong_20_Emphasis">Concept:</text:span> Points where execution flows straight or data is defined.</text:p>
            </text:list-item>
            <text:list-item>
              <text:p text:style-name="P229"><text:span text:style-name="Strong_20_Emphasis">Variables Used:</text:span> <text:span text:style-name="Source_20_Text">LinearHits</text:span>.</text:p>
            </text:list-item>
            <text:list-item>
              <text:p text:style-name="P229"><text:span text:style-name="Strong_20_Emphasis">Triggers:</text:span> <text:span text:style-name="Source_20_Text">const</text:span>, <text:span text:style-name="Source_20_Text">let</text:span>, <text:span text:style-name="Source_20_Text">return</text:span>, <text:span text:style-name="Source_20_Text">import</text:span>, <text:span text:style-name="Source_20_Text">export</text:span>, <text:span text:style-name="Source_20_Text">class</text:span>, <text:span text:style-name="Source_20_Text">interface</text:span>, <text:span text:style-name="Source_20_Text">type</text:span>.</text:p>
            </text:list-item>
            <text:list-item>
              <text:p text:style-name="P229"><text:span text:style-name="Strong_20_Emphasis">Meaning:</text:span> High counts here mean the code is describing <text:span text:style-name="Emphasis">what</text:span> things are, not <text:span text:style-name="Emphasis">doing</text:span> things.</text:p>
            </text:list-item>
          </text:list>
        </text:list-item>
      </text:list>
      <text:h text:style-name="P135" text:outline-level="5"><text:bookmark-start text:name="__RefHeading___Toc139691_2813440148 Copy 1"/><text:span text:style-name="Strong_20_Emphasis"><text:span text:style-name="T119">2</text:span></text:span><text:span text:style-name="Strong_20_Emphasis"><text:span text:style-name="T116">.1.</text:span></text:span><text:span text:style-name="Strong_20_Emphasis"><text:span text:style-name="T121">C.</text:span></text:span><text:span text:style-name="Strong_20_Emphasis"><text:span text:style-name="T122">4</text:span></text:span>. The Equation<text:bookmark-end text:name="__RefHeading___Toc139691_2813440148 Copy 1"/></text:h>
      <text:p text:style-name="P136">We calculate the <text:span text:style-name="Strong_20_Emphasis">control flow ratio ()</text:span> as the percentage of relevant code that is dedicated to branching.</text:p>
      <text:list text:style-name="L19">
        <text:list-item>
          <text:p text:style-name="P230"><text:span text:style-name="Strong_20_Emphasis">Summation:</text:span> We find the total "Semantic Mass" of the file. <text:span text:style-name="Source_20_Text">TotalFlow = BranchHits + LinearHits</text:span></text:p>
        </text:list-item>
        <text:list-item>
          <text:p text:style-name="P230"><text:soft-page-break/><text:span text:style-name="Strong_20_Emphasis">Ratio Calculation:</text:span> <text:span text:style-name="Source_20_Text">R_L = BranchHits / TotalFlow</text:span></text:p>
          <text:list>
            <text:list-item>
              <text:p text:style-name="P230"><text:span text:style-name="Strong_20_Emphasis">Result 0.0:</text:span> Pure Structure (e.g., a JSON file or TS Interface).</text:p>
            </text:list-item>
            <text:list-item>
              <text:p text:style-name="P230"><text:span text:style-name="Strong_20_Emphasis">Result 1.0:</text:span> Pure Logic (e.g., a complex regex parser or math utility).</text:p>
            </text:list-item>
            <text:list-item>
              <text:p text:style-name="P230"><text:span text:style-name="Strong_20_Emphasis">Result 0.5:</text:span> Balanced code (Standard business logic).</text:p>
            </text:list-item>
          </text:list>
        </text:list-item>
      </text:list>
      <text:h text:style-name="P77" text:outline-level="5"><text:bookmark-start text:name="__RefHeading___Toc186408_2813440148"/><text:span text:style-name="Strong_20_Emphasis"><text:span text:style-name="T390">2</text:span></text:span><text:span text:style-name="Strong_20_Emphasis">.1.C.</text:span><text:span text:style-name="Strong_20_Emphasis"><text:span text:style-name="T451">5</text:span></text:span>. The Equation: 5-Tier Morphing<text:bookmark-end text:name="__RefHeading___Toc186408_2813440148"/></text:h>
      <text:p text:style-name="P83">The engine selects a <text:span text:style-name="Source_20_Text">BufferGeometry</text:span> based on the following threshol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control flow ratio ()</text:p>
          </table:table-cell>
          <table:table-cell table:style-name="Table4.A1" office:value-type="string">
            <text:p text:style-name="P80">Geometry Type</text:p>
          </table:table-cell>
          <table:table-cell table:style-name="Table4.A1" office:value-type="string">
            <text:p text:style-name="P80">Visual Style</text:p>
          </table:table-cell>
          <table:table-cell table:style-name="Table4.A1" office:value-type="string">
            <text:p text:style-name="P80">Human Translation</text:p>
          </table:table-cell>
        </table:table-row>
        <table:table-row>
          <table:table-cell table:style-name="Table4.A1" office:value-type="string">
            <text:p text:style-name="P79"><text:span text:style-name="Strong_20_Emphasis">0 – </text:span><text:span text:style-name="Strong_20_Emphasis"><text:span text:style-name="T250">0.59</text:span></text:span></text:p>
          </table:table-cell>
          <table:table-cell table:style-name="Table4.A1" office:value-type="string">
            <text:p text:style-name="P79"><text:span text:style-name="Strong_20_Emphasis">Sphere</text:span></text:p>
          </table:table-cell>
          <table:table-cell table:style-name="Table4.A1" office:value-type="string">
            <text:p text:style-name="P79">Glowing Orb</text:p>
          </table:table-cell>
          <table:table-cell table:style-name="Table4.A1" office:value-type="string">
            <text:p text:style-name="P79">"The Seed": Pure data or metadata.</text:p>
          </table:table-cell>
        </table:table-row>
        <table:table-row>
          <table:table-cell table:style-name="Table4.A1" office:value-type="string">
            <text:p text:style-name="P79"><text:span text:style-name="Strong_20_Emphasis">0.</text:span><text:span text:style-name="Strong_20_Emphasis"><text:span text:style-name="T250">6 - .69</text:span></text:span></text:p>
          </table:table-cell>
          <table:table-cell table:style-name="Table4.A1" office:value-type="string">
            <text:p text:style-name="P79"><text:span text:style-name="Strong_20_Emphasis">Icosahedron</text:span></text:p>
          </table:table-cell>
          <table:table-cell table:style-name="Table4.A1" office:value-type="string">
            <text:p text:style-name="P79">20-sided <text:span text:style-name="T250">Glowing Wireframe</text:span></text:p>
          </table:table-cell>
          <table:table-cell table:style-name="Table4.A1" office:value-type="string">
            <text:p text:style-name="P79">Mostly declarative/classes.</text:p>
          </table:table-cell>
        </table:table-row>
        <table:table-row>
          <table:table-cell table:style-name="Table4.A1" office:value-type="string">
            <text:p text:style-name="P79"><text:span text:style-name="Strong_20_Emphasis"><text:span text:style-name="T250">0.7 – 0.79</text:span></text:span></text:p>
          </table:table-cell>
          <table:table-cell table:style-name="Table4.A1" office:value-type="string">
            <text:p text:style-name="P79"><text:span text:style-name="Strong_20_Emphasis">Dodecahedron</text:span></text:p>
          </table:table-cell>
          <table:table-cell table:style-name="Table4.A1" office:value-type="string">
            <text:p text:style-name="P79">12-sided <text:span text:style-name="T250">Glowing Wireframe</text:span></text:p>
          </table:table-cell>
          <table:table-cell table:style-name="Table4.A1" office:value-type="string">
            <text:p text:style-name="P79">Balanced business logic.</text:p>
          </table:table-cell>
        </table:table-row>
        <table:table-row>
          <table:table-cell table:style-name="Table4.A1" office:value-type="string">
            <text:p text:style-name="P79"><text:span text:style-name="Strong_20_Emphasis">0.</text:span><text:span text:style-name="Strong_20_Emphasis"><text:span text:style-name="T250">8 – 0.89</text:span></text:span></text:p>
          </table:table-cell>
          <table:table-cell table:style-name="Table4.A1" office:value-type="string">
            <text:p text:style-name="P79"><text:span text:style-name="Strong_20_Emphasis">Octahedron</text:span></text:p>
          </table:table-cell>
          <table:table-cell table:style-name="Table4.A1" office:value-type="string">
            <text:p text:style-name="P79">8-sided <text:span text:style-name="T250">Glowing Wireframe</text:span></text:p>
          </table:table-cell>
          <table:table-cell table:style-name="Table4.A1" office:value-type="string">
            <text:p text:style-name="P79">Highly algorithmic/complex.</text:p>
          </table:table-cell>
        </table:table-row>
        <table:table-row>
          <table:table-cell table:style-name="Table4.A1" office:value-type="string">
            <text:p text:style-name="P79"><text:span text:style-name="Strong_20_Emphasis">0.</text:span><text:span text:style-name="Strong_20_Emphasis"><text:span text:style-name="T250">90</text:span></text:span><text:span text:style-name="Strong_20_Emphasis"> – 1.0</text:span></text:p>
          </table:table-cell>
          <table:table-cell table:style-name="Table4.A1" office:value-type="string">
            <text:p text:style-name="P79"><text:span text:style-name="Strong_20_Emphasis">Tetrahedron</text:span></text:p>
          </table:table-cell>
          <table:table-cell table:style-name="Table4.A1" office:value-type="string">
            <text:p text:style-name="P79">4-sided <text:span text:style-name="T250">Glowing Wireframe</text:span></text:p>
          </table:table-cell>
          <table:table-cell table:style-name="Table4.A1" office:value-type="string">
            <text:p text:style-name="P79">Pure logic/Recursion. </text:p>
          </table:table-cell>
        </table:table-row>
      </table:table>
      <text:p text:style-name="P83"><text:span text:style-name="Strong_20_Emphasis"><text:span text:style-name="T195">Note on Matrix Optimization: For wireframe-only modes (like "The Matrix" theme), the Sphere primitive in the 0.0-0.59 range should be replaced with </text:span></text:span><text:span text:style-name="Strong_20_Emphasis"><text:span text:style-name="T197">a </text:span></text:span><text:span text:style-name="Strong_20_Emphasis"><text:span text:style-name="T195">Icosidodecahedron (32 faces – </text:span></text:span><text:span text:style-name="Strong_20_Emphasis"><text:span text:style-name="T197">Buckyball!)</text:span></text:span></text:p>
      <text:h text:style-name="P77" text:outline-level="5"><text:bookmark-start text:name="__RefHeading___Toc186410_2813440148"/><text:span text:style-name="Strong_20_Emphasis"><text:span text:style-name="T390">2</text:span></text:span><text:span text:style-name="Strong_20_Emphasis">.1.C.</text:span><text:span text:style-name="Strong_20_Emphasis"><text:span text:style-name="T451">6</text:span></text:span>. The Visual Enhancements (Wireframe Logic)<text:bookmark-end text:name="__RefHeading___Toc186410_2813440148"/></text:h>
      <text:p text:style-name="P83">To emphasize the "Digital" nature of high-logic code, the rendering style shifts as the shape sharpens:</text:p>
      <text:list text:style-name="L20">
        <text:list-item>
          <text:p text:style-name="P231"><text:span text:style-name="Strong_20_Emphasis"><text:span text:style-name="T195">The Low Tier (Sphere):</text:span></text:span><text:span text:style-name="T195"> Rendered with a solid, emissive material. It feels like a glowing planet with soft, volumetric light.</text:span></text:p>
        </text:list-item>
        <text:list-item>
          <text:p text:style-name="P231"><text:span text:style-name="Strong_20_Emphasis"><text:span text:style-name="T195">The High Tiers (Icosahedron – Tetrahedron):</text:span></text:span><text:span text:style-name="T195"> Rendered as </text:span><text:span text:style-name="Strong_20_Emphasis"><text:span text:style-name="T195">Glow Wireframes</text:span></text:span><text:span text:style-name="T195">.</text:span> We expose the edges and facets, making the star look like a flickering vector projection. As the <text:span text:style-name="T251">control flow ratio</text:span> increases, the wireframe density thins out, making the final "Tetrahedron" look like <text:span text:style-name="T2">a lethal, minimalist pyramid of pure calculation</text:span>.</text:p>
        </text:list-item>
      </text:list>
      <text:h text:style-name="P76" text:outline-level="4"><text:bookmark-start text:name="__RefHeading___Toc139744_2813440148"/><text:soft-page-break/><text:span text:style-name="Strong_20_Emphasis"><text:span text:style-name="T119">2</text:span></text:span><text:span text:style-name="Strong_20_Emphasis"><text:span text:style-name="T115">.1.D </text:span></text:span><text:span text:style-name="Strong_20_Emphasis"><text:span text:style-name="T116">Satellite Unit</text:span></text:span><text:bookmark-end text:name="__RefHeading___Toc139744_2813440148"/></text:h>
      <text:p text:style-name="P75"><text:span text:style-name="Strong_20_Emphasis"><text:span text:style-name="T127">Metric</text:span></text:span><text:span text:style-name="Strong_20_Emphasis"><text:span text:style-name="T125">: Function Declaration (e.g., </text:span></text:span><text:span text:style-name="Source_20_Text"><text:span text:style-name="T252">function</text:span></text:span><text:span text:style-name="Strong_20_Emphasis"><text:span text:style-name="T125">, </text:span></text:span><text:span text:style-name="Source_20_Text"><text:span text:style-name="T252">=&gt;</text:span></text:span><text:span text:style-name="Strong_20_Emphasis"><text:span text:style-name="T125">, </text:span></text:span><text:span text:style-name="Source_20_Text"><text:span text:style-name="T252">def</text:span></text:span><text:span text:style-name="Strong_20_Emphasis"><text:span text:style-name="T125">, </text:span></text:span><text:span text:style-name="Source_20_Text"><text:span text:style-name="T252">class method</text:span></text:span><text:span text:style-name="Strong_20_Emphasis"><text:span text:style-name="T125">). </text:span></text:span></text:p>
      <text:p text:style-name="P75"><text:span text:style-name="Strong_20_Emphasis"><text:span text:style-name="T127">Purpose</text:span></text:span><text:span text:style-name="Strong_20_Emphasis"><text:span text:style-name="T125">: Represents a discrete unit of logic—a "Tool"—contained within the file (the Toolbox). </text:span></text:span></text:p>
      <text:p text:style-name="P75"><text:span text:style-name="Strong_20_Emphasis"><text:span text:style-name="T127">Why</text:span></text:span><text:span text:style-name="Strong_20_Emphasis"><text:span text:style-name="T125">: Files are rarely monolithic blocks of text; they are collections of distinct functions. We visualize these as moons orbiting the planet to show the granularity and inventory of the file at a glance. </text:span></text:span></text:p>
      <text:p text:style-name="P75"><text:span text:style-name="Strong_20_Emphasis"><text:span text:style-name="T127">Effect</text:span></text:span><text:span text:style-name="Strong_20_Emphasis"><text:span text:style-name="T125">: Spawns a small spherical geometry orbiting the central parent.</text:span></text:span></text:p>
      <text:h text:style-name="P77" text:outline-level="5"><text:bookmark-start text:name="__RefHeading___Toc139677_2813440148"/><text:span text:style-name="Strong_20_Emphasis"><text:span text:style-name="T119">2</text:span></text:span><text:span text:style-name="Strong_20_Emphasis"><text:span text:style-name="T115">.1.D.</text:span></text:span>1. The Philosophy: The Toolkit<text:bookmark-end text:name="__RefHeading___Toc139677_2813440148"/></text:h>
      <text:p text:style-name="P83">We treat the file as a container.</text:p>
      <text:list text:style-name="L21">
        <text:list-item>
          <text:p text:style-name="P232"><text:span text:style-name="Strong_20_Emphasis">The Star:</text:span> The Box (Class/Module).</text:p>
        </text:list-item>
        <text:list-item>
          <text:p text:style-name="P232"><text:span text:style-name="Strong_20_Emphasis">The Satellites:</text:span> The Tools (Functions/Methods). A star with no moons is likely a static data configuration. A star with 50 moons is a heavy utility class with many diverse tools.</text:p>
        </text:list-item>
      </text:list>
      <text:h text:style-name="P77" text:outline-level="5"><text:bookmark-start text:name="__RefHeading___Toc139679_2813440148"/><text:span text:style-name="Strong_20_Emphasis"><text:span text:style-name="T119">2</text:span></text:span><text:span text:style-name="Strong_20_Emphasis"><text:span text:style-name="T115">.1.D.</text:span></text:span>2. The Inputs: Identification<text:bookmark-end text:name="__RefHeading___Toc139679_2813440148"/></text:h>
      <text:list text:style-name="L22">
        <text:list-item>
          <text:p text:style-name="P233"><text:span text:style-name="Strong_20_Emphasis">Regex Hits:</text:span> <text:span text:style-name="Source_20_Text">function</text:span>, <text:span text:style-name="Source_20_Text">=&gt;</text:span>, <text:span text:style-name="Source_20_Text">def</text:span>, <text:span text:style-name="Source_20_Text">func</text:span>.</text:p>
        </text:list-item>
        <text:list-item>
          <text:p text:style-name="P233"><text:span text:style-name="Strong_20_Emphasis">Cap:</text:span> ~12 satellites (To prevent rendering swarms, we visualize a representative sample).</text:p>
        </text:list-item>
      </text:list>
      <text:h text:style-name="P77" text:outline-level="5"><text:bookmark-start text:name="__RefHeading___Toc139681_2813440148"/><text:span text:style-name="Strong_20_Emphasis"><text:span text:style-name="T119">2</text:span></text:span><text:span text:style-name="Strong_20_Emphasis"><text:span text:style-name="T115">.1.D.</text:span></text:span>3. Basal Values (The Standard Model)<text:bookmark-end text:name="__RefHeading___Toc139681_2813440148"/></text:h>
      <text:p text:style-name="P83">Every satellite begins with these default physical properties before other metrics (like complexity) warp them:</text:p>
      <text:list text:style-name="L23">
        <text:list-item>
          <text:p text:style-name="P234"><text:span text:style-name="Strong_20_Emphasis">Geometry:</text:span> <text:span text:style-name="Source_20_Text">SphereGeometry(2, 4, 4)</text:span> (Low-poly "Moon").</text:p>
        </text:list-item>
        <text:list-item>
          <text:p text:style-name="P234"><text:span text:style-name="Strong_20_Emphasis">Radius:</text:span> 2 Units (Fixed, small).</text:p>
        </text:list-item>
        <text:list-item>
          <text:p text:style-name="P234"><text:span text:style-name="Strong_20_Emphasis">Color:</text:span> Inherits Parent Star's color (Visual Cohesion).</text:p>
        </text:list-item>
        <text:list-item>
          <text:p text:style-name="P234"><text:span text:style-name="Strong_20_Emphasis">Opacity:</text:span> 0.8 (Slightly ghosted to indicate subservience).</text:p>
        </text:list-item>
        <text:list-item>
          <text:p text:style-name="P234"><text:span text:style-name="Strong_20_Emphasis">Orbit:</text:span> Rotates around the parent at a basal speed unless modified by "Heat" metrics.</text:p>
        </text:list-item>
      </text:list>
      <text:p text:style-name="P64">2.1.D.<text:span text:style-name="T460">4.</text:span> The Function Impact Score</text:p>
      <text:p text:style-name="P153">Not all moons are equal. A one-line "getter" is a pebble; a 500-line algorithm is a moon. To ensure the visualization is honest, we calculate an Impact Score for every function <text:soft-page-break/>found. This score determines which 12 satellites are rendered (we always show the heaviest) and how "large" they appear.</text:p>
      <text:p text:style-name="Text_20_body">Logic: We combine Complexity (Branches), Connectivity (Args), and Volume (LOC) into a single weight metric.</text:p>
      <text:p text:style-name="Text_20_body">Impact Score = ((BranchHits + 1) * (Args + 1) + (0.05 * LOC)) * 10</text:p>
      <text:p text:style-name="Text_20_body">BranchHits: The density of decision making. Args: The weight of inputs/coupling. LOC: The physical length (scaled down by 0.05 to prioritize logic over verbosity). Multiplier (10): Scales the integer for storage efficiency in vectorized formats.</text:p>
      <text:p text:style-name="P83"><text:span text:style-name="Strong_20_Emphasis"><text:span text:style-name="T116"/></text:span></text:p>
      <text:h text:style-name="P76" text:outline-level="4"><text:bookmark-start text:name="__RefHeading___Toc16550_2209633182"/><text:span text:style-name="T157">2</text:span><text:span text:style-name="T38">.1.</text:span><text:span text:style-name="T134">E</text:span><text:span text:style-name="T38"> </text:span><text:span text:style-name="Strong_20_Emphasis"><text:span text:style-name="T135">Satellite </text:span></text:span><text:span text:style-name="Strong_20_Emphasis"><text:span text:style-name="T136">Orbital Distance</text:span></text:span><text:bookmark-end text:name="__RefHeading___Toc16550_2209633182"/></text:h>
      <text:p text:style-name="P83"><text:bookmark-start text:name="__RefHeading___Toc139683_2813440148"/><text:span text:style-name="T70">Metric</text:span><text:span text:style-name="T38">: Lines of Code </text:span><text:span text:style-name="T136">in a function. </text:span><text:bookmark-end text:name="__RefHeading___Toc139683_2813440148"/></text:p>
      <text:p text:style-name="P83"><text:span text:style-name="T75">Effect</text:span><text:span text:style-name="T46">: Bigger the function, the further the satellite. </text:span></text:p>
      <text:p text:style-name="P83"><text:span text:style-name="T70">Input</text:span><text:span text:style-name="T38">: LOC (Lines of Code for the specific function/block).</text:span></text:p>
      <text:p text:style-name="P83"><text:span text:style-name="T2">Logic</text:span>: Logarithmic Scaling. This ensures that we can visually differentiate between small (10 lines), large (1,000 lines), and massive (100,000 lines) files without the graphic growing infinitely off the screen.</text:p>
      <text:p text:style-name="P83"><text:span text:style-name="Strong_20_Emphasis"><text:span text:style-name="T38">Equation:</text:span></text:span></text:p>
      <text:list text:style-name="L24">
        <text:list-header>
          <text:p text:style-name="P192"><text:span text:style-name="Source_20_Text">Length_pixels = 60 + (Math.log2(Math.max(LOC, 1)) * 30)</text:span></text:p>
        </text:list-header>
      </text:list>
      <text:p text:style-name="P81"><text:span text:style-name="Strong_20_Emphasis"><text:span text:style-name="T38">Scaling Examples: </text:span></text:span></text:p>
      <text:list text:continue-numbering="true" text:style-name="L24">
        <text:list-item>
          <text:list>
            <text:list-item>
              <text:p text:style-name="P235"><text:span text:style-name="Strong_20_Emphasis"><text:span text:style-name="T38">10 LOC:</text:span></text:span><text:span text:style-name="T38"> ~160px (Visible Stub)</text:span></text:p>
            </text:list-item>
            <text:list-item>
              <text:p text:style-name="P235"><text:span text:style-name="Strong_20_Emphasis"><text:span text:style-name="T38">100 LOC:</text:span></text:span><text:span text:style-name="T38"> ~260px (Standard Branch)</text:span></text:p>
            </text:list-item>
            <text:list-item>
              <text:p text:style-name="P235"><text:span text:style-name="Strong_20_Emphasis"><text:span text:style-name="T38">1,000 LOC:</text:span></text:span><text:span text:style-name="T38"> ~360px (Major Limb)</text:span></text:p>
            </text:list-item>
            <text:list-item>
              <text:p text:style-name="P235"><text:span text:style-name="Strong_20_Emphasis"><text:span text:style-name="T38">100,000 LOC:</text:span></text:span><text:span text:style-name="T38"> ~560px (Megastructure Reach)</text:span></text:p>
            </text:list-item>
          </text:list>
        </text:list-item>
      </text:list>
      <text:p text:style-name="P83"><text:span text:style-name="Strong_20_Emphasis"><text:span text:style-name="T38">Visual Output:</text:span></text:span></text:p>
      <text:list text:continue-numbering="true" text:style-name="L24">
        <text:list-item>
          <text:list>
            <text:list-item>
              <text:p text:style-name="P235"><text:span text:style-name="Strong_20_Emphasis"><text:span text:style-name="T38">3D:</text:span></text:span><text:span text:style-name="T38"> Distance of the orbiting </text:span><text:span text:style-name="T137">satellite</text:span><text:span text:style-name="T38"> from the core (Orbital Radius).</text:span></text:p>
            </text:list-item>
          </text:list>
        </text:list-item>
      </text:list>
      <text:h text:style-name="P34" text:outline-level="4"><text:bookmark-start text:name="__RefHeading___Toc16552_2209633182"/><text:span text:style-name="T390">2</text:span>.1.<text:span text:style-name="T254">F</text:span> <text:span text:style-name="Strong_20_Emphasis"><text:span text:style-name="T253">Number of satellites in a unit</text:span></text:span><text:bookmark-end text:name="__RefHeading___Toc16552_2209633182"/></text:h>
      <text:p text:style-name="P83"><text:span text:style-name="T2">Metric</text:span>: <text:span text:style-name="Strong_20_Emphasis"><text:span text:style-name="T195">Extended Cyclomatic Complexity</text:span></text:span> Visualizes the "Knotty" nature of logic. High cognitive load manifests as dense, recursive fractals or clusters of satellites.</text:p>
      <text:p text:style-name="P83"><text:soft-page-break/><text:span text:style-name="T2">Input</text:span>: <text:span text:style-name="Strong_20_Emphasis"><text:span text:style-name="T195">C</text:span></text:span> (Composite Complexity Score), <text:span text:style-name="T255">defined in depth below.</text:span></text:p>
      <text:p text:style-name="P83"><text:span text:style-name="T3">Effect</text:span>: <text:s/></text:p>
      <text:list text:style-name="L25">
        <text:list-item>
          <text:p text:style-name="P236">3D: Number of satellites in satellite/function unit.</text:p>
        </text:list-item>
      </text:list>
      <text:h text:style-name="P77" text:outline-level="5"><text:bookmark-start text:name="__RefHeading___Toc16552_2209633182 Copy 1"/><text:span text:style-name="T157">2</text:span><text:span text:style-name="T38">.1.</text:span><text:span text:style-name="T138">F</text:span><text:span text:style-name="T137">.</text:span>1. The Philosophy: Cognitive Friction<text:bookmark-end text:name="__RefHeading___Toc16552_2209633182 Copy 1"/></text:h>
      <text:p text:style-name="P83">Computers don't care about <text:span text:style-name="Source_20_Text">try/catch</text:span> blocks or nested <text:span text:style-name="Source_20_Text">if</text:span> statements; they execute them in nanoseconds. Humans, however, have limited working memory. Every time a developer reads an <text:span text:style-name="Source_20_Text">if</text:span>, a loop, or an error handler, they have to "fork" their mental model of what the code is doing. We call this <text:span text:style-name="Strong_20_Emphasis"><text:span text:style-name="T195">Cognitive Friction</text:span></text:span>.</text:p>
      <text:p text:style-name="P83">In GitGalaxy, we visualize this friction physically. A simple, linear script grows like a straight bamboo shoot. A complex, defensive, branching <text:span text:style-name="T255">function</text:span> grows like a dense, thorny thicket.</text:p>
      <text:h text:style-name="P77" text:outline-level="5"><text:bookmark-start text:name="__RefHeading___Toc16552_2209633182 Copy 1 Copy 1"/><text:span text:style-name="T157">2</text:span><text:span text:style-name="T38">.1.</text:span><text:span text:style-name="T138">F</text:span><text:span text:style-name="T137">.</text:span>2. The Inputs: Anatomy of Complexity<text:bookmark-end text:name="__RefHeading___Toc16552_2209633182 Copy 1 Copy 1"/></text:h>
      <text:p text:style-name="P83">To calculate this, we look at two distinct types of code patterns found by the scanner:</text:p>
      <text:list text:style-name="L26">
        <text:list-item>
          <text:p text:style-name="P237"><text:span text:style-name="Strong_20_Emphasis">A. Structural Complexity (The Skeleton)</text:span></text:p>
          <text:list>
            <text:list-item>
              <text:p text:style-name="P237"><text:span text:style-name="Strong_20_Emphasis">What it is:</text:span> The actual decision points in the logic.</text:p>
            </text:list-item>
            <text:list-item>
              <text:p text:style-name="P237"><text:span text:style-name="Strong_20_Emphasis">Variables Used:</text:span> <text:span text:style-name="Source_20_Text">BranchHits</text:span> (from scanner).</text:p>
            </text:list-item>
            <text:list-item>
              <text:p text:style-name="P237"><text:span text:style-name="Strong_20_Emphasis">Triggers:</text:span> <text:span text:style-name="Source_20_Text">if</text:span>, <text:span text:style-name="Source_20_Text">else</text:span>, <text:span text:style-name="Source_20_Text">for</text:span>, <text:span text:style-name="Source_20_Text">while</text:span>, <text:span text:style-name="Source_20_Text">switch</text:span>, logical operators (<text:span text:style-name="Source_20_Text">&amp;&amp;</text:span>, <text:span text:style-name="Source_20_Text">||</text:span>), and ternaries (<text:span text:style-name="Source_20_Text">?</text:span>).</text:p>
            </text:list-item>
            <text:list-item>
              <text:p text:style-name="P237"><text:span text:style-name="Strong_20_Emphasis">Why it matters:</text:span> Each of these represents a split in reality. "If X is true, go left; otherwise, go right." Too many splits make the path impossible to follow.</text:p>
            </text:list-item>
          </text:list>
        </text:list-item>
        <text:list-item>
          <text:p text:style-name="P237"><text:span text:style-name="Strong_20_Emphasis">B. Defensive Overhead (The Armor)</text:span></text:p>
          <text:list>
            <text:list-item>
              <text:p text:style-name="P237"><text:span text:style-name="Strong_20_Emphasis">What it is:</text:span> Code written to protect against failure, not to perform the primary task.</text:p>
            </text:list-item>
            <text:list-item>
              <text:p text:style-name="P237"><text:span text:style-name="Strong_20_Emphasis">Variables Used:</text:span> <text:span text:style-name="Source_20_Text">SafetyHits</text:span>.</text:p>
            </text:list-item>
            <text:list-item>
              <text:p text:style-name="P237"><text:span text:style-name="Strong_20_Emphasis">Triggers:</text:span> <text:span text:style-name="Source_20_Text">try</text:span>, <text:span text:style-name="Source_20_Text">catch</text:span>, <text:span text:style-name="Source_20_Text">finally</text:span>, <text:span text:style-name="Source_20_Text">assert</text:span>, <text:span text:style-name="Source_20_Text">guard</text:span>, <text:span text:style-name="Source_20_Text">validate</text:span>.</text:p>
            </text:list-item>
            <text:list-item>
              <text:p text:style-name="P237"><text:span text:style-name="Strong_20_Emphasis">Why it matters:</text:span> While safety is good, it creates visual noise. A function wrapped in three layers of error handling is structurally denser than one <text:soft-page-break/>that just does the math. We count this as complexity, but we weight it differently because it's "necessary" complexity.</text:p>
            </text:list-item>
          </text:list>
        </text:list-item>
      </text:list>
      <text:h text:style-name="P77" text:outline-level="5"><text:bookmark-start text:name="__RefHeading___Toc16552_2209633182 Copy 1 Copy 2"/><text:span text:style-name="T157">2</text:span><text:span text:style-name="T38">.1.</text:span><text:span text:style-name="T138">F</text:span><text:span text:style-name="T137">.</text:span>3. The Equation: Calculating 'C'<text:bookmark-end text:name="__RefHeading___Toc16552_2209633182 Copy 1 Copy 2"/></text:h>
      <text:p text:style-name="P83">We calculate the <text:span text:style-name="Strong_20_Emphasis">Composite Complexity Score (C)</text:span> using a weighted sum.</text:p>
      <text:list text:style-name="L27">
        <text:list-item>
          <text:p text:style-name="P238"><text:span text:style-name="Strong_20_Emphasis">Count the Branches:</text:span> We take the raw count of structural elements. <text:span text:style-name="Source_20_Text">Structural = BranchHits</text:span></text:p>
        </text:list-item>
        <text:list-item>
          <text:p text:style-name="P238"><text:span text:style-name="Strong_20_Emphasis">Weigh the Armor:</text:span> We take the count of safety elements and multiply by <text:span text:style-name="Strong_20_Emphasis">0.5</text:span>. <text:span text:style-name="Source_20_Text">Defensive = SafetyHits * 0.5</text:span> <text:span text:style-name="Emphasis">Human Translation:</text:span> Two safety checks consume as much "mental space" as one actual logic branch. This prevents well-protected code from looking unfairly "spaghetti-like" while acknowledging that it is still denser than unsafe code.</text:p>
        </text:list-item>
        <text:list-item>
          <text:p text:style-name="P239"><text:span text:style-name="Strong_20_Emphasis">Summation:</text:span> <text:span text:style-name="Strong_20_Emphasis"><text:span text:style-name="T195">Composite Complexity Score (C</text:span></text:span><text:span text:style-name="Strong_20_Emphasis"><text:span text:style-name="T219">)</text:span></text:span><text:span text:style-name="Source_20_Text"><text:span text:style-name="T195"> = Structural + Defensive </text:span></text:span><text:span text:style-name="Source_20_Text"><text:span text:style-name="T219">= BranchHits + 0.5 * SafetyHits</text:span></text:span></text:p>
        </text:list-item>
      </text:list>
      <text:h text:style-name="P77" text:outline-level="5"><text:bookmark-start text:name="__RefHeading___Toc16552_2209633182 Copy 1 Copy 3"/><text:span text:style-name="T157">2</text:span><text:span text:style-name="T38">.1.</text:span><text:span text:style-name="T138">F</text:span><text:span text:style-name="T137">.</text:span>4. The Visual Thresholds (The Step Function)<text:bookmark-end text:name="__RefHeading___Toc16552_2209633182 Copy 1 Copy 3"/></text:h>
      <text:p text:style-name="P83">We map the abstract number <text:span text:style-name="Source_20_Text">C</text:span> to a physical <text:span text:style-name="Strong_20_Emphasis">Fractal Depth</text:span>. This determines how many times the geometry splits or how many moons orbit the planet.</text:p>
      <text:list text:style-name="L28">
        <text:list-item>
          <text:p text:style-name="P240"><text:span text:style-name="Strong_20_Emphasis">Level 0: The Bamboo (C ≤ 2)</text:span></text:p>
          <text:list>
            <text:list-item>
              <text:p text:style-name="P240"><text:span text:style-name="Strong_20_Emphasis">Code looks like:</text:span> A simple list of instructions. Do A, then B, then C.</text:p>
            </text:list-item>
            <text:list-item>
              <text:p text:style-name="P240"><text:span text:style-name="Strong_20_Emphasis">Visual:</text:span> A single, straight <text:span text:style-name="T436">line</text:span> or a planet with 0-1 moons.</text:p>
            </text:list-item>
          </text:list>
        </text:list-item>
        <text:list-item>
          <text:p text:style-name="P240"><text:span text:style-name="Strong_20_Emphasis">Level 1: The Fork (C &gt; 2)</text:span></text:p>
          <text:list>
            <text:list-item>
              <text:p text:style-name="P240"><text:span text:style-name="Strong_20_Emphasis">Code looks like:</text:span> A basic function with one or two checks.</text:p>
            </text:list-item>
            <text:list-item>
              <text:p text:style-name="P240"><text:span text:style-name="Strong_20_Emphasis">Visual:</text:span> The <text:span text:style-name="T436">unit</text:span> splits once.</text:p>
            </text:list-item>
          </text:list>
        </text:list-item>
        <text:list-item>
          <text:p text:style-name="P240"><text:span text:style-name="Strong_20_Emphasis">Level 2: The Tree (C &gt; 8)</text:span></text:p>
          <text:list>
            <text:list-item>
              <text:p text:style-name="P240"><text:span text:style-name="Strong_20_Emphasis">Code looks like:</text:span> Standard business logic. Loops inside conditions.</text:p>
            </text:list-item>
            <text:list-item>
              <text:p text:style-name="P240"><text:span text:style-name="Strong_20_Emphasis">Visual:</text:span> Distinct branching structure. 3-4 moons.</text:p>
            </text:list-item>
          </text:list>
        </text:list-item>
        <text:list-item>
          <text:p text:style-name="P240"><text:span text:style-name="Strong_20_Emphasis">Level 3: The Thicket (C &gt; 15)</text:span></text:p>
          <text:list>
            <text:list-item>
              <text:p text:style-name="P240"><text:span text:style-name="Strong_20_Emphasis">Code looks like:</text:span> Complex algorithms, state machines, or legacy parsers.</text:p>
            </text:list-item>
            <text:list-item>
              <text:p text:style-name="P240"><text:span text:style-name="Strong_20_Emphasis">Visual:</text:span> Dense, aggressive branching. A swarm of moons.</text:p>
            </text:list-item>
          </text:list>
        </text:list-item>
        <text:list-item>
          <text:p text:style-name="P240"><text:span text:style-name="Strong_20_Emphasis">Level 4: The Jungle (C &gt; 25)</text:span></text:p>
          <text:list>
            <text:list-item>
              <text:p text:style-name="P240"><text:soft-page-break/><text:span text:style-name="Strong_20_Emphasis">Code looks like:</text:span> "God Objects," massive switch statements, or deep recursion.</text:p>
            </text:list-item>
            <text:list-item>
              <text:p text:style-name="P240"><text:span text:style-name="Strong_20_Emphasis">Visual:</text:span> A chaotic, fractal explosion. The geometry is almost solid with branches.</text:p>
            </text:list-item>
          </text:list>
        </text:list-item>
      </text:list>
      <text:p text:style-name="P83"><text:bookmark-start text:name="__RefHeading___Toc16552_2209633182 Copy 1 Copy 4"/><text:span text:style-name="Strong_20_Emphasis"><text:span text:style-name="T157">2</text:span></text:span><text:span text:style-name="Strong_20_Emphasis"><text:span text:style-name="T38">.1.</text:span></text:span><text:span text:style-name="Strong_20_Emphasis"><text:span text:style-name="T138">F</text:span></text:span><text:span text:style-name="Strong_20_Emphasis"><text:span text:style-name="T137">.</text:span></text:span><text:span text:style-name="Strong_20_Emphasis"><text:span text:style-name="T138">5 </text:span></text:span><text:span text:style-name="Strong_20_Emphasis">Equation Implementation:</text:span><text:bookmark-end text:name="__RefHeading___Toc16552_2209633182 Copy 1 Copy 4"/></text:p>
      <text:p text:style-name="P82"><text:span text:style-name="Source_20_Text">// 1. Control Flow &amp; Logic (The Skeleton)</text:span></text:p>
      <text:p text:style-name="P82"><text:span text:style-name="Source_20_Text">// Matches: if, else, for, while, switch, &amp;&amp;, ||, ?, ??</text:span></text:p>
      <text:p text:style-name="P82"><text:span text:style-name="Source_20_Text">const Structural = count(Rules.branch);</text:span></text:p>
      <text:p text:style-name="P82"/>
      <text:p text:style-name="P82"><text:span text:style-name="Source_20_Text">// 2. Defensive Overhead (The Armor)</text:span></text:p>
      <text:p text:style-name="P82"><text:span text:style-name="Source_20_Text">// We use the standard 'SafetyHits' sub-equation from Spec 3.3.</text:span></text:p>
      <text:p text:style-name="P82"><text:span text:style-name="Source_20_Text">// Matches: try, catch, finally, assert, sanitize, validate, checkAuth, isinstance</text:span></text:p>
      <text:p text:style-name="P82"><text:span text:style-name="Source_20_Text">// We weight these at 50% because they add noise/density but often wrap existing logic.</text:span></text:p>
      <text:p text:style-name="P82"><text:span text:style-name="Source_20_Text">const Defensive = SafetyHits * 0.5;</text:span></text:p>
      <text:p text:style-name="P82"/>
      <text:p text:style-name="P82"><text:span text:style-name="Source_20_Text">// 3. Composite Score</text:span></text:p>
      <text:p text:style-name="P82"><text:span text:style-name="Source_20_Text">const C = Structural + Defensive;</text:span></text:p>
      <text:p text:style-name="P82"/>
      <text:p text:style-name="P82"><text:span text:style-name="Source_20_Text">// 4. Fractal Mapping (Step Function)</text:span></text:p>
      <text:p text:style-name="P82"><text:span text:style-name="Source_20_Text">if (C &gt; 25) Depth = 4 <text:s/>// "Dense Thicket" (The Jungle)</text:span></text:p>
      <text:p text:style-name="P82"><text:span text:style-name="Source_20_Text">else if (C &gt; 15) Depth = 3</text:span></text:p>
      <text:p text:style-name="P82"><text:span text:style-name="Source_20_Text">else if (C &gt; 8) <text:s/>Depth = 2</text:span></text:p>
      <text:p text:style-name="P82"><text:span text:style-name="Source_20_Text">else if (C &gt; 2) <text:s/>Depth = 1</text:span></text:p>
      <text:p text:style-name="P78"><text:span text:style-name="Source_20_Text">else <text:s text:c="12"/>Depth = 0 <text:s/>// "Line" (The Bamboo)</text:span></text:p>
      <text:h text:style-name="P76" text:outline-level="4"><text:bookmark-start text:name="__RefHeading___Toc139685_2813440148"/><text:span text:style-name="Strong_20_Emphasis"><text:span text:style-name="T119">2</text:span></text:span><text:span text:style-name="Strong_20_Emphasis"><text:span text:style-name="T116">.1.</text:span></text:span><text:span text:style-name="Strong_20_Emphasis"><text:span text:style-name="T117">G</text:span></text:span><text:span text:style-name="Strong_20_Emphasis"><text:span text:style-name="T116"> Satellite’s Relative Positioning in a unit</text:span></text:span><text:bookmark-end text:name="__RefHeading___Toc139685_2813440148"/></text:h>
      <text:p text:style-name="P83"><text:span text:style-name="T2">Metric</text:span>: <text:span text:style-name="Strong_20_Emphasis"><text:span text:style-name="T195">Ratio </text:span></text:span><text:span text:style-name="Strong_20_Emphasis"><text:span text:style-name="T198">of logic to declarative statements</text:span></text:span></text:p>
      <text:p text:style-name="P83"><text:span text:style-name="Strong_20_Emphasis"><text:span text:style-name="T3">Purpose</text:span></text:span><text:span text:style-name="Strong_20_Emphasis"><text:span text:style-name="T198">: Give every function or deployment of satellites a distinctive shape depending on that function’s ratio of logical statements to declarative statements. </text:span></text:span></text:p>
      <text:p text:style-name="P83"><text:span text:style-name="Strong_20_Emphasis"><text:span text:style-name="T3">Why: </text:span></text:span><text:span text:style-name="Strong_20_Emphasis"><text:span text:style-name="T198">It looks boring and repetitive without it. </text:span></text:span></text:p>
      <text:p text:style-name="P83"><text:span text:style-name="T3">Effect</text:span><text:span text:style-name="T255">: Alters how the satellites in a function are arranged in 3D space. </text:span></text:p>
      <text:h text:style-name="P77" text:outline-level="5"><text:bookmark-start text:name="__RefHeading___Toc139693_2813440148"/><text:span text:style-name="Strong_20_Emphasis"><text:span text:style-name="T119">2</text:span></text:span><text:span text:style-name="Strong_20_Emphasis"><text:span text:style-name="T116">.1.</text:span></text:span><text:span text:style-name="Strong_20_Emphasis"><text:span text:style-name="T117">G.</text:span></text:span><text:span text:style-name="Strong_20_Emphasis"><text:span text:style-name="T123">1</text:span></text:span>. The Visual Translation (The Lerp)<text:bookmark-end text:name="__RefHeading___Toc139693_2813440148"/></text:h>
      <text:p text:style-name="P150">We map the abstract ratio () to physical angles using <text:span text:style-name="Strong_20_Emphasis">Linear Interpolation (Lerp)</text:span><text:span text:style-name="Strong_20_Emphasis"><text:span text:style-name="T195"> </text:span></text:span><text:span text:style-name="Strong_20_Emphasis"><text:span text:style-name="T228">and the control flow ratio defined above. </text:span></text:span></text:p>
      <text:p text:style-name="P150"><text:span text:style-name="Strong_20_Emphasis"><text:span text:style-name="T195"><text:s/></text:span></text:span><text:span text:style-name="Strong_20_Emphasis"><text:span text:style-name="T119">2</text:span></text:span><text:span text:style-name="Strong_20_Emphasis"><text:span text:style-name="T116">.1.</text:span></text:span><text:span text:style-name="Strong_20_Emphasis"><text:span text:style-name="T117">G.</text:span></text:span><text:span text:style-name="Strong_20_Emphasis">1. The Philosophy: Thinking vs. Speaking</text:span></text:p>
      <text:p text:style-name="P150">Code does two things: it either <text:span text:style-name="Strong_20_Emphasis">computes</text:span> (makes decisions) or it <text:span text:style-name="Strong_20_Emphasis">declares</text:span> (defines structures).</text:p>
      <text:list text:continue-list="list3712635341" text:style-name="L17">
        <text:list-item>
          <text:p text:style-name="P228"><text:soft-page-break/><text:span text:style-name="Strong_20_Emphasis">Computing (Logic):</text:span> "If X happens, do Y." This is jagged, non-linear, and energetic. It represents the "Thinking" brain.</text:p>
        </text:list-item>
        <text:list-item>
          <text:p text:style-name="P228"><text:span text:style-name="Strong_20_Emphasis">Defining (Structure):</text:span> "Let X equal 5." This is flat, linear, and stable. It represents the "Memory" or "Structure" of the system.</text:p>
        </text:list-item>
      </text:list>
      <text:p text:style-name="P150"><text:span text:style-name="Strong_20_Emphasis"><text:span text:style-name="T195">We visualize this tension physically. A file that "thinks" a lot (algorithms) looks sharp and aggressive. A file that "remembers" a lot (configs, interfaces) </text:span></text:span><text:span text:style-name="Strong_20_Emphasis"><text:span text:style-name="T227">has softer angles.</text:span></text:span></text:p>
      <text:p text:style-name="P83"><text:span text:style-name="Strong_20_Emphasis">Equation:</text:span> <text:span text:style-name="Source_20_Text">Angle = 22.5 + (1.0 - R_L) * (90 – 22.5)</text:span></text:p>
      <text:p text:style-name="P83"><text:span text:style-name="Strong_20_Emphasis">High Logic ():</text:span> Angle . Branches diverge sharply, creating a "Lightning Bolt" look. </text:p>
      <text:p text:style-name="P83"><text:span text:style-name="Strong_20_Emphasis">High Structure ():</text:span> Angle . Branches diverge at right angles, creating a "Circuit Board" or "Grid" look. </text:p>
      <text:p text:style-name="P46">Angles are then used to build the position of the satellites. </text:p>
      <text:p text:style-name="P83"><text:span text:style-name="Strong_20_Emphasis"><text:span text:style-name="T116"/></text:span></text:p>
      <text:h text:style-name="P34" text:outline-level="4"><text:bookmark-start text:name="__RefHeading___Toc16556_2209633182"/><text:span text:style-name="T390">2</text:span>.1.<text:span text:style-name="T256">H</text:span> Node Size (Metric: Argument Count)<text:bookmark-end text:name="__RefHeading___Toc16556_2209633182"/></text:h>
      <text:p text:style-name="P83"><text:span text:style-name="Strong_20_Emphasis"><text:span text:style-name="T139">Metric:</text:span></text:span><text:span text:style-name="Emphasis"><text:span text:style-name="T139"> Argument Count (Args). </text:span></text:span></text:p>
      <text:p text:style-name="P83"><text:span text:style-name="Strong_20_Emphasis"><text:span text:style-name="T139">Purpose:</text:span></text:span><text:span text:style-name="Emphasis"><text:span text:style-name="T139"> Visualizes the "State Heaviness" or I/O weight of a function. </text:span></text:span></text:p>
      <text:p text:style-name="P83"><text:span text:style-name="Strong_20_Emphasis"><text:span text:style-name="T139">Why:</text:span></text:span><text:span text:style-name="Emphasis"><text:span text:style-name="T139"> Functions with many arguments often carry significant state or context ("I/O Weight"). A clean utility usually takes 1-2 arguments, while a legacy handler might take 10. We visualize this physically to differentiate sleek tools from heavy machinery. </text:span></text:span></text:p>
      <text:p text:style-name="P83"><text:span text:style-name="Strong_20_Emphasis"><text:span text:style-name="T139">Effect:</text:span></text:span><text:span text:style-name="Emphasis"><text:span text:style-name="T139"> Modulates the physical size (Scale) of the orbiting satellite.</text:span></text:span></text:p>
      <text:h text:style-name="P77" text:outline-level="5"><text:bookmark-start text:name="__RefHeading___Toc139695_2813440148"/><text:span text:style-name="T157">2</text:span><text:span text:style-name="T38">.1.</text:span><text:span text:style-name="T143">H.</text:span>1. The Philosophy: Heavy vs. Light<text:bookmark-end text:name="__RefHeading___Toc139695_2813440148"/></text:h>
      <text:p text:style-name="P83">We view arguments as "Inputs" or "Cables" plugged into the function.</text:p>
      <text:list text:style-name="L29">
        <text:list-item>
          <text:p text:style-name="P241"><text:span text:style-name="Strong_20_Emphasis">Lightweight:</text:span> 0-2 arguments. Sharp, encapsulated, easy to move.</text:p>
        </text:list-item>
        <text:list-item>
          <text:p text:style-name="P241"><text:span text:style-name="Strong_20_Emphasis">Heavyweight:</text:span> 5+ arguments. Bloated, carrying too much context, harder to maintain.</text:p>
        </text:list-item>
      </text:list>
      <text:h text:style-name="P77" text:outline-level="5"><text:bookmark-start text:name="__RefHeading___Toc139697_2813440148"/><text:span text:style-name="T157">2</text:span><text:span text:style-name="T38">.1.</text:span><text:span text:style-name="T143">H.</text:span>2. The Inputs: Measuring Args<text:bookmark-end text:name="__RefHeading___Toc139697_2813440148"/></text:h>
      <text:list text:style-name="L30">
        <text:list-item>
          <text:p text:style-name="P242"><text:span text:style-name="Strong_20_Emphasis">Args:</text:span> The count of arguments in the function signature found by the scanner.</text:p>
        </text:list-item>
        <text:list-item>
          <text:p text:style-name="P242"><text:span text:style-name="Strong_20_Emphasis">Range:</text:span> Typically 0 to 20+.</text:p>
        </text:list-item>
      </text:list>
      <text:h text:style-name="P77" text:outline-level="5"><text:bookmark-start text:name="__RefHeading___Toc139699_2813440148"/><text:soft-page-break/><text:span text:style-name="T157">2</text:span><text:span text:style-name="T38">.1.</text:span><text:span text:style-name="T143">H.</text:span>3. The Equation: Logarithmic Scaling<text:bookmark-end text:name="__RefHeading___Toc139699_2813440148"/></text:h>
      <text:p text:style-name="P83">We use logarithmic scaling to prevent massive orbs for functions with many arguments (e.g., 20+). A linear scale would make them visually overwhelming; a log scale highlights the difference between 0 and 5, but compresses the difference between 10 and 20.</text:p>
      <text:p text:style-name="P83"><text:span text:style-name="Strong_20_Emphasis">Equation:</text:span> <text:span text:style-name="Source_20_Text">Scale = 1.0 + (Math.log2(Math.max(Args, 1)) * 0.2)</text:span></text:p>
      <text:list text:style-name="L31">
        <text:list-item>
          <text:p text:style-name="P243"><text:span text:style-name="Strong_20_Emphasis">Base Scale:</text:span> 1.0 (Standard Unit).</text:p>
        </text:list-item>
        <text:list-item>
          <text:p text:style-name="P243"><text:span text:style-name="Strong_20_Emphasis">Factor:</text:span> * 0.2 (Gentle growth multiplier).</text:p>
        </text:list-item>
      </text:list>
      <text:h text:style-name="P77" text:outline-level="5"><text:bookmark-start text:name="__RefHeading___Toc139701_2813440148"/><text:span text:style-name="T157">2</text:span><text:span text:style-name="T38">.1.</text:span><text:span text:style-name="T143">H.</text:span>4. The Visual Output<text:bookmark-end text:name="__RefHeading___Toc139701_2813440148"/></text:h>
      <text:list text:style-name="L32">
        <text:list-item>
          <text:p text:style-name="P244"><text:span text:style-name="Strong_20_Emphasis">3D:</text:span> Radius of the orbiting Moon particles.</text:p>
        </text:list-item>
      </text:list>
      <text:h text:style-name="P76" text:outline-level="4"><text:bookmark-start text:name="__RefHeading___Toc139715_2813440148"/><text:span text:style-name="Source_20_Text"><text:span text:style-name="T157">2</text:span></text:span><text:span text:style-name="Source_20_Text"><text:span text:style-name="T144">.1.I. </text:span></text:span><text:span text:style-name="Source_20_Text"><text:span text:style-name="T38">Planetary Rings </text:span></text:span><text:bookmark-end text:name="__RefHeading___Toc139715_2813440148"/></text:h>
      <text:p text:style-name="P83"><text:span text:style-name="Strong_20_Emphasis">Metric:</text:span> <text:span text:style-name="T248">External Library Import Count </text:span><text:s/></text:p>
      <text:p text:style-name="P83"><text:span text:style-name="Strong_20_Emphasis">Purpose:</text:span> <text:span text:style-name="T248">See which files import external libraries</text:span></text:p>
      <text:p text:style-name="P83"><text:span text:style-name="Strong_20_Emphasis">Why: </text:span><text:span text:style-name="Strong_20_Emphasis"><text:span text:style-name="T199">Determine which files have dependencies that you don’t fully control.</text:span></text:span></text:p>
      <text:p text:style-name="P83"><text:span text:style-name="Strong_20_Emphasis">Effect:</text:span> Spawns <text:span text:style-name="T248">rings around the file to determine </text:span></text:p>
      <text:h text:style-name="P77" text:outline-level="5"><text:bookmark-start text:name="__RefHeading___Toc139717_2813440148"/><text:span text:style-name="Source_20_Text"><text:span text:style-name="T157">2</text:span></text:span><text:span text:style-name="Source_20_Text"><text:span text:style-name="T144">.1.I.</text:span></text:span>1. The Philosophy: The Gravity Well<text:bookmark-end text:name="__RefHeading___Toc139717_2813440148"/></text:h>
      <text:p text:style-name="P83">A clean file is a sphere. It floats freely. A file with dependencies is tethered. The more it imports, the heavier it gets. We set a <text:span text:style-name="Strong_20_Emphasis">High Threshold</text:span> for rings. We don't want visual noise for a single utility import. Rings are reserved for "Heavy Lifters" and "Glue Code."</text:p>
      <text:h text:style-name="P77" text:outline-level="5"><text:bookmark-start text:name="__RefHeading___Toc139719_2813440148"/><text:span text:style-name="Source_20_Text"><text:span text:style-name="T157">2</text:span></text:span><text:span text:style-name="Source_20_Text"><text:span text:style-name="T144">.1.I.</text:span></text:span>2. The Inputs: Measuring Dependencies<text:bookmark-end text:name="__RefHeading___Toc139719_2813440148"/></text:h>
      <text:list text:style-name="L33">
        <text:list-item>
          <text:p text:style-name="P245"><text:span text:style-name="Strong_20_Emphasis">ImportHits:</text:span> The count of <text:span text:style-name="Source_20_Text">import</text:span>, <text:span text:style-name="Source_20_Text">require</text:span>, or <text:span text:style-name="Source_20_Text">include</text:span> statements found by the scanner.</text:p>
        </text:list-item>
        <text:list-item>
          <text:p text:style-name="P245"><text:span text:style-name="Strong_20_Emphasis">Threshold:</text:span> <text:span text:style-name="Strong_20_Emphasis">&gt; 5 Imports</text:span>. Anything less is considered "Standard Weight" and renders with <text:span text:style-name="Strong_20_Emphasis">No Rings</text:span>.</text:p>
        </text:list-item>
      </text:list>
      <text:h text:style-name="P77" text:outline-level="5"><text:bookmark-start text:name="__RefHeading___Toc139721_2813440148"/><text:span text:style-name="Source_20_Text"><text:span text:style-name="T157">2</text:span></text:span><text:span text:style-name="Source_20_Text"><text:span text:style-name="T144">.1.I.</text:span></text:span>3. The Equation: Growth and Density<text:bookmark-end text:name="__RefHeading___Toc139721_2813440148"/></text:h>
      <text:p text:style-name="P83">Instead of complex accretion disks, we use a single, evolving ring system that grows in <text:span text:style-name="Strong_20_Emphasis">Density (Opacity)</text:span> and <text:span text:style-name="Strong_20_Emphasis">Mass (Width)</text:span> as the gravity increases.</text:p>
      <text:list text:style-name="L34">
        <text:list-item>
          <text:p text:style-name="P246"><text:span text:style-name="Strong_20_Emphasis">Logic:</text:span></text:p>
          <text:list>
            <text:list-item>
              <text:p text:style-name="P246"><text:span text:style-name="Strong_20_Emphasis">Opacity (Visibility):</text:span> Ranges from <text:span text:style-name="Strong_20_Emphasis">0.0 to 0.6</text:span> over the first 26 imports.</text:p>
              <text:list>
                <text:list-item>
                  <text:p text:style-name="P246"><text:soft-page-break/><text:span text:style-name="Emphasis">Math:</text:span> <text:span text:style-name="Source_20_Text">Opacity = Math.min((ImportHits / 26) * 0.6, 0.6)</text:span></text:p>
                </text:list-item>
                <text:list-item>
                  <text:p text:style-name="P246"><text:span text:style-name="Emphasis">Effect:</text:span> Rare imports create a barely visible "Ghost Ring." As dependencies hit the critical mass (26), the ring becomes a distinct, semi-solid band.</text:p>
                </text:list-item>
              </text:list>
            </text:list-item>
            <text:list-item>
              <text:p text:style-name="P246"><text:span text:style-name="Strong_20_Emphasis">Width (Tube Thickness):</text:span> Grows continuously as imports increase.</text:p>
              <text:list>
                <text:list-item>
                  <text:p text:style-name="P246"><text:span text:style-name="Emphasis">Math:</text:span> <text:span text:style-name="Source_20_Text">TubeRadius = BaseWidth + (ImportHits * 0.1)</text:span></text:p>
                </text:list-item>
                <text:list-item>
                  <text:p text:style-name="P246"><text:span text:style-name="Emphasis">Effect:</text:span> The ring gets physically thicker and wider, consuming more visual space around the planet as the gravity well deepens.</text:p>
                </text:list-item>
              </text:list>
            </text:list-item>
          </text:list>
        </text:list-item>
      </text:list>
      <text:h text:style-name="P77" text:outline-level="5"><text:bookmark-start text:name="__RefHeading___Toc139723_2813440148"/><text:span text:style-name="Source_20_Text"><text:span text:style-name="T157">2</text:span></text:span><text:span text:style-name="Source_20_Text"><text:span text:style-name="T144">.1.I.</text:span></text:span>4. The Visual Output<text:bookmark-end text:name="__RefHeading___Toc139723_2813440148"/></text:h>
      <text:list text:style-name="L35">
        <text:list-item>
          <text:list>
            <text:list-item>
              <text:p text:style-name="P247"><text:span text:style-name="Strong_20_Emphasis">Geometry:</text:span> <text:span text:style-name="Source_20_Text">TorusGeometry</text:span>.</text:p>
            </text:list-item>
            <text:list-item>
              <text:p text:style-name="P247"><text:span text:style-name="Strong_20_Emphasis">Tube Radius:</text:span> Scaled linearly by <text:span text:style-name="Source_20_Text">ImportHits</text:span>.</text:p>
            </text:list-item>
            <text:list-item>
              <text:p text:style-name="P247"><text:span text:style-name="Strong_20_Emphasis">Material:</text:span> Transparent with <text:span text:style-name="Source_20_Text">opacity</text:span> capped at 0.6.</text:p>
            </text:list-item>
            <text:list-item>
              <text:p text:style-name="P247"><text:span text:style-name="Strong_20_Emphasis">Tilt:</text:span> Rings are tilted at randomized axes (Euler angles) to ensure they don't look like flat plates, but dynamic, gyroscope-like orbital paths.</text:p>
              <text:p text:style-name="P247"><text:span text:style-name="Source_20_Text"><text:span text:style-name="T38"/></text:span></text:p>
            </text:list-item>
          </text:list>
        </text:list-item>
      </text:list>
      <text:h text:style-name="P73" text:outline-level="4"><text:bookmark-start text:name="__RefHeading___Toc139725_2813440148"/><text:span text:style-name="Source_20_Text"><text:span text:style-name="T157">2</text:span></text:span><text:span text:style-name="Source_20_Text"><text:span text:style-name="T38">.1.J Relative Positioning (Metric: Sequence &amp; Affinity)</text:span></text:span><text:bookmark-end text:name="__RefHeading___Toc139725_2813440148"/></text:h>
      <text:p text:style-name="P83"><text:span text:style-name="Strong_20_Emphasis">Metric:</text:span> Semantic Affinity (Folder + Type + Importance). </text:p>
      <text:p text:style-name="P83"><text:span text:style-name="Strong_20_Emphasis">Purpose:</text:span> Group related files into "Constellations" or "Sectors" to create a navigable map, rather than a uniform noise field. </text:p>
      <text:p text:style-name="P83"><text:span text:style-name="Strong_20_Emphasis">Why:</text:span> A standard spiral is predictable but dumb—it places a <text:span text:style-name="Source_20_Text">login.js</text:span> next to a <text:span text:style-name="Source_20_Text">utils.js</text:span> just because they loaded sequentially. By sorting and offsetting based on metadata, we create "Neighborhoods." Auth files cluster together; Tests float above the plane; Configs sink to the bottom. </text:p>
      <text:p text:style-name="P83"><text:span text:style-name="Strong_20_Emphasis">Effect:</text:span> Determines the final coordinates through a <text:span text:style-name="Strong_20_Emphasis"><text:span text:style-name="T195">Tri-Phase</text:span></text:span><text:span text:style-name="T195"> </text:span>procedural loop.</text:p>
      <text:h text:style-name="P77" text:outline-level="5"><text:bookmark-start text:name="__RefHeading___Toc139727_2813440148"/><text:span text:style-name="Source_20_Text"><text:span text:style-name="T157">2</text:span></text:span><text:span text:style-name="Source_20_Text"><text:span text:style-name="T38">.1.J.</text:span></text:span>1. The Philosophy: The Tri-Phase Displacement<text:bookmark-end text:name="__RefHeading___Toc139727_2813440148"/></text:h>
      <text:p text:style-name="P83">We don't use expensive physics simulations (N-Body gravity). Instead, we use a predictable <text:span text:style-name="Strong_20_Emphasis">3-Pass Sort &amp; Offset</text:span> algorithm. This ensures that the same code always generates the same galaxy (deterministic) but produces organic, organized clusters.</text:p>
      <text:h text:style-name="P77" text:outline-level="5"><text:bookmark-start text:name="__RefHeading___Toc139729_2813440148"/><text:soft-page-break/><text:span text:style-name="Source_20_Text"><text:span text:style-name="T157">2</text:span></text:span><text:span text:style-name="Source_20_Text"><text:span text:style-name="T38">.1.J.</text:span></text:span><text:span text:style-name="Source_20_Text"><text:span text:style-name="T145">2. </text:span></text:span>Phase 1: The Gravity Sort (Chronology &amp; Importance)<text:bookmark-end text:name="__RefHeading___Toc139729_2813440148"/></text:h>
      <text:p text:style-name="P83">Before positioning, we re-index the file list to determine "Who sits at the Head of the Table?"</text:p>
      <text:list text:style-name="L36">
        <text:list-item>
          <text:p text:style-name="P248"><text:span text:style-name="Strong_20_Emphasis">Primary Sort:</text:span> <text:span text:style-name="Strong_20_Emphasis">Inbound Reference Count (descending).</text:span></text:p>
          <text:list>
            <text:list-item>
              <text:p text:style-name="P248"><text:span text:style-name="Emphasis">Effect:</text:span> The "God Classes" and Core Utilities (High Gravity) naturally move to index <text:span text:style-name="Source_20_Text">0</text:span> (The Galactic Center).</text:p>
            </text:list-item>
          </text:list>
        </text:list-item>
        <text:list-item>
          <text:p text:style-name="P248"><text:span text:style-name="Strong_20_Emphasis">Secondary Sort:</text:span> <text:span text:style-name="Strong_20_Emphasis">Directory Path.</text:span></text:p>
          <text:list>
            <text:list-item>
              <text:p text:style-name="P248"><text:span text:style-name="Emphasis">Effect:</text:span> Files in the same folder (e.g., <text:span text:style-name="Source_20_Text">src/auth/</text:span>) end up adjacent in the list, ensuring they spiral out together in a "Sector."</text:p>
            </text:list-item>
          </text:list>
        </text:list-item>
      </text:list>
      <text:h text:style-name="P77" text:outline-level="5"><text:bookmark-start text:name="__RefHeading___Toc139731_2813440148"/><text:span text:style-name="Source_20_Text"><text:span text:style-name="T157">2</text:span></text:span><text:span text:style-name="Source_20_Text"><text:span text:style-name="T38">.1.J.</text:span></text:span><text:span text:style-name="Source_20_Text"><text:span text:style-name="T145">3. </text:span></text:span>Phase 2: The Gap Spiral (Radial Positioning)<text:bookmark-end text:name="__RefHeading___Toc139731_2813440148"/></text:h>
      <text:p text:style-name="P83">We apply the Golden Angle Spiral, but we inject <text:span text:style-name="Strong_20_Emphasis">"Void Gaps"</text:span> when the directory changes.</text:p>
      <text:list text:style-name="L37">
        <text:list-item>
          <text:p text:style-name="P249"><text:span text:style-name="Strong_20_Emphasis">Logic:</text:span></text:p>
          <text:list>
            <text:list-item>
              <text:p text:style-name="P249">Iterate through the sorted list.</text:p>
            </text:list-item>
            <text:list-item>
              <text:p text:style-name="P249">Calculate standard spiral step: <text:span text:style-name="Source_20_Text">angle += 0.5</text:span>.</text:p>
            </text:list-item>
            <text:list-item>
              <text:p text:style-name="P249"><text:span text:style-name="Strong_20_Emphasis">The Check:</text:span> If <text:span text:style-name="Source_20_Text">CurrentFile.folder !== PreviousFile.folder</text:span>:</text:p>
              <text:list>
                <text:list-item>
                  <text:p text:style-name="P249">Add <text:span text:style-name="Strong_20_Emphasis">buffer</text:span> to the radius (<text:span text:style-name="Source_20_Text">radius += 150</text:span>).</text:p>
                </text:list-item>
                <text:list-item>
                  <text:p text:style-name="P249"><text:span text:style-name="Emphasis">Result:</text:span> This creates physical empty space between the "Auth Sector" and the "UI Sector," visibly grouping them into islands along the spiral arm.</text:p>
                </text:list-item>
              </text:list>
            </text:list-item>
            <text:list-item>
              <text:p text:style-name="P249"><text:span text:style-name="Strong_20_Emphasis">Standard:</text:span> <text:span text:style-name="Source_20_Text">radius += 12</text:span>. (Tight packing for related files).</text:p>
            </text:list-item>
          </text:list>
        </text:list-item>
      </text:list>
      <text:h text:style-name="P77" text:outline-level="5"><text:bookmark-start text:name="__RefHeading___Toc139733_2813440148"/><text:span text:style-name="Source_20_Text"><text:span text:style-name="T157">2</text:span></text:span><text:span text:style-name="Source_20_Text"><text:span text:style-name="T38">.1.J.</text:span></text:span><text:span text:style-name="Source_20_Text"><text:span text:style-name="T145">4. </text:span></text:span>Phase 3: The Stratification (Z-Axis Type Layering)<text:bookmark-end text:name="__RefHeading___Toc139733_2813440148"/></text:h>
      <text:p text:style-name="P83">We use the vertical axis () to separate concerns, preventing the disk from looking like a flat pancake.</text:p>
      <text:list text:style-name="L38">
        <text:list-item>
          <text:p text:style-name="P250"><text:span text:style-name="Strong_20_Emphasis">Logic:</text:span> instead of random jitter, we map <text:span text:style-name="Strong_20_Emphasis">File Type</text:span> to <text:span text:style-name="Strong_20_Emphasis">Elevation</text:span>.</text:p>
          <text:list>
            <text:list-item>
              <text:p text:style-name="P250"><text:span text:style-name="Strong_20_Emphasis">The Logic Plane (Y = 0):</text:span> Source Code (<text:span text:style-name="Source_20_Text">.js</text:span>, <text:span text:style-name="Source_20_Text">.ts</text:span>, <text:span text:style-name="Source_20_Text">.py</text:span>, <text:span text:style-name="Source_20_Text">.rs</text:span>). The active layer.</text:p>
            </text:list-item>
            <text:list-item>
              <text:p text:style-name="P250"><text:span text:style-name="Strong_20_Emphasis">The Asset Atmosphere (Y = +60):</text:span> Styles &amp; Assets (<text:span text:style-name="Source_20_Text">.css</text:span>, <text:span text:style-name="Source_20_Text">.png</text:span>, <text:span text:style-name="Source_20_Text">.svg</text:span>). Floating above the logic like clouds.</text:p>
            </text:list-item>
            <text:list-item>
              <text:p text:style-name="P250"><text:soft-page-break/><text:span text:style-name="Strong_20_Emphasis">The Bedrock (Y = -60):</text:span> Configs &amp; Data (<text:span text:style-name="Source_20_Text">.json</text:span>, <text:span text:style-name="Source_20_Text">.yml</text:span>, <text:span text:style-name="Source_20_Text">.dockerfile</text:span>, <text:span text:style-name="Source_20_Text">.md</text:span>). Sunk below the logic like a foundation.</text:p>
            </text:list-item>
            <text:list-item>
              <text:p text:style-name="P250"><text:span text:style-name="Emphasis">Random Jitter:</text:span> We add a small <text:span text:style-name="Source_20_Text">±10</text:span> jitter to all layers to maintain organic volume.</text:p>
            </text:list-item>
          </text:list>
        </text:list-item>
      </text:list>
      <text:p text:style-name="P83"/>
      <text:h text:style-name="P76" text:outline-level="4"><text:bookmark-start text:name="__RefHeading___Toc16558_2209633182 Copy 1"/><text:span text:style-name="Source_20_Text"><text:span text:style-name="T157">2</text:span></text:span><text:span text:style-name="Source_20_Text"><text:span text:style-name="T38">.1.</text:span></text:span><text:span text:style-name="Source_20_Text"><text:span text:style-name="T108">K</text:span></text:span><text:span text:style-name="Source_20_Text"><text:span text:style-name="T38"> </text:span></text:span><text:span text:style-name="Strong_20_Emphasis"><text:span text:style-name="T143">Misc Equations</text:span></text:span><text:bookmark-end text:name="__RefHeading___Toc16558_2209633182 Copy 1"/></text:h>
      <text:p text:style-name="P75"><text:span text:style-name="Source_20_Text"><text:span text:style-name="T38">The code implements a dynamic orbitRadius formula: 40 + (log2(loc) * 10). This establishes an "Event Horizon" for functional moons, ensuring that high-mass files (Tier 4) do not physically intersect with their orbiting satellites, maintaining structural legibility at extreme scales.</text:span></text:span></text:p>
      <text:p text:style-name="P75"><text:span text:style-name="Source_20_Text"><text:span text:style-name="T38"/></text:span></text:p>
      <text:h text:style-name="P30" text:outline-level="3"><text:bookmark-start text:name="__RefHeading___Toc11747_959624642"/><text:span text:style-name="T390">2</text:span>.2 <text:span text:style-name="T236">Color Labeling Equations</text:span><text:bookmark-end text:name="__RefHeading___Toc11747_959624642"/></text:h>
      <text:h text:style-name="Heading_20_4" text:outline-level="4"><text:bookmark-start text:name="__RefHeading___Toc49783_1155106909"/><text:span text:style-name="Strong_20_Emphasis"><text:span text:style-name="T390">2</text:span></text:span><text:span text:style-name="Strong_20_Emphasis"><text:span text:style-name="T257">.2.A. Overview of methodology</text:span></text:span><text:bookmark-end text:name="__RefHeading___Toc49783_1155106909"/></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xt:span text:style-name="T258">Labeling </text:span>Mode</text:p>
          </table:table-cell>
          <table:table-cell table:style-name="Table2.A1" office:value-type="string">
            <text:p text:style-name="P144"><text:span text:style-name="Strong_20_Emphasis"><text:span text:style-name="T452">What It Checks</text:span></text:span></text:p>
          </table:table-cell>
          <table:table-cell table:style-name="Table2.A1" office:value-type="string">
            <text:p text:style-name="P16">Color</text:p>
          </table:table-cell>
          <table:table-cell table:style-name="Table2.A1" office:value-type="string">
            <text:p text:style-name="P18">Visual Effect</text:p>
          </table:table-cell>
        </table:table-row>
        <table:table-row>
          <table:table-cell table:style-name="Table2.A1" office:value-type="string">
            <text:p text:style-name="P43"><text:span text:style-name="Strong_20_Emphasis"><text:span text:style-name="T124">Ownership </text:span></text:span></text:p>
          </table:table-cell>
          <table:table-cell table:style-name="Table2.A1" office:value-type="string">
            <text:p text:style-name="P143"><text:span text:style-name="T1">Who wrote this?</text:span> Shows if a file is owned by one person (Solo) or everyone (Collective).</text:p>
          </table:table-cell>
          <table:table-cell table:style-name="Table2.A1" office:value-type="string">
            <text:p text:style-name="P43"><text:span text:style-name="Strong_20_Emphasis"><text:span text:style-name="T120"><text:s/>White</text:span></text:span></text:p>
          </table:table-cell>
          <table:table-cell table:style-name="Table2.A1" office:value-type="string">
            <text:p text:style-name="P143"><text:span text:style-name="T1">Rainbow.</text:span> Single colors are individuals; bright White is a team effort.</text:p>
          </table:table-cell>
        </table:table-row>
        <table:table-row>
          <table:table-cell table:style-name="Table2.A1" office:value-type="string">
            <text:p text:style-name="P43"><text:span text:style-name="Strong_20_Emphasis"><text:span text:style-name="T124">Cognitive Load </text:span></text:span></text:p>
          </table:table-cell>
          <table:table-cell table:style-name="Table2.A1" office:value-type="string">
            <text:p text:style-name="P143"><text:span text:style-name="T1">How hard is it to read?</text:span> Highlights confusing logic that requires high mental effort.</text:p>
          </table:table-cell>
          <table:table-cell table:style-name="Table2.A1" office:value-type="string">
            <text:p text:style-name="P43"><text:span text:style-name="Strong_20_Emphasis"><text:span text:style-name="T118"><text:s/></text:span></text:span><text:span text:style-name="Strong_20_Emphasis"><text:span text:style-name="T120">P</text:span></text:span><text:span text:style-name="Strong_20_Emphasis"><text:span text:style-name="T118">urple</text:span></text:span></text:p>
          </table:table-cell>
          <table:table-cell table:style-name="Table2.A1" office:value-type="string">
            <text:p text:style-name="P143"><text:span text:style-name="T1">Purple.</text:span> The deeper the purple, the harder the logic is to follow.</text:p>
          </table:table-cell>
        </table:table-row>
        <table:table-row>
          <table:table-cell table:style-name="Table2.A1" office:value-type="string">
            <text:p text:style-name="P43"><text:span text:style-name="Strong_20_Emphasis"><text:span text:style-name="T124">Churn</text:span></text:span><text:span text:style-name="Strong_20_Emphasis"><text:span text:style-name="T114"> </text:span></text:span></text:p>
          </table:table-cell>
          <table:table-cell table:style-name="Table2.A1" office:value-type="string">
            <text:p text:style-name="P143"><text:span text:style-name="T1">How often does it change?</text:span> Identifies files that are constantly being rewritten or patched.</text:p>
          </table:table-cell>
          <table:table-cell table:style-name="Table2.A1" office:value-type="string">
            <text:p text:style-name="P43"><text:span text:style-name="Strong_20_Emphasis"><text:span text:style-name="T118">Orange</text:span></text:span></text:p>
          </table:table-cell>
          <table:table-cell table:style-name="Table2.A1" office:value-type="string">
            <text:p text:style-name="P143"><text:span text:style-name="T1">Orange.</text:span> Bright orange indicates a file that refuses to settle down.</text:p>
          </table:table-cell>
        </table:table-row>
        <table:table-row>
          <table:table-cell table:style-name="Table2.A1" office:value-type="string">
            <text:p text:style-name="P43"><text:span text:style-name="Strong_20_Emphasis"><text:span text:style-name="T124">Safety </text:span></text:span></text:p>
          </table:table-cell>
          <table:table-cell table:style-name="Table2.A1" office:value-type="string">
            <text:p text:style-name="P143"><text:span text:style-name="T1">Is it bulletproof?</text:span> Checks for defensive code (error handling) vs. risky code.</text:p>
          </table:table-cell>
          <table:table-cell table:style-name="Table2.A1" office:value-type="string">
            <text:p text:style-name="P43"><text:span text:style-name="Strong_20_Emphasis"><text:span text:style-name="T120">Red </text:span></text:span></text:p>
            <text:p text:style-name="P43"><text:span text:style-name="Strong_20_Emphasis"><text:span text:style-name="T120">to</text:span></text:span></text:p>
            <text:p text:style-name="P43"><text:span text:style-name="Strong_20_Emphasis"><text:span text:style-name="T114"><text:s/>Cyan</text:span></text:span><text:span text:style-name="T114"> </text:span></text:p>
          </table:table-cell>
          <table:table-cell table:style-name="Table2.A1" office:value-type="string">
            <text:p text:style-name="P143"><text:span text:style-name="T1">Red to Cyan.</text:span> Red is fragile/risky; Cyan is fortified/safe.</text:p>
          </table:table-cell>
        </table:table-row>
        <table:table-row>
          <table:table-cell table:style-name="Table2.A1" office:value-type="string">
            <text:p text:style-name="P43"><text:span text:style-name="Strong_20_Emphasis"><text:span text:style-name="T126">Tech Debt</text:span></text:span></text:p>
          </table:table-cell>
          <table:table-cell table:style-name="Table2.A1" office:value-type="string">
            <text:p text:style-name="P143"><text:span text:style-name="T1">Are there shortcuts?</text:span> Scans for "TODOs", "Hacks", and temporary <text:soft-page-break/>fixes.</text:p>
          </table:table-cell>
          <table:table-cell table:style-name="Table2.A1" office:value-type="string">
            <text:p text:style-name="P43"><text:span text:style-name="Strong_20_Emphasis"><text:span text:style-name="T114">Red</text:span></text:span><text:span text:style-name="T114"> </text:span></text:p>
          </table:table-cell>
          <table:table-cell table:style-name="Table2.A1" office:value-type="string">
            <text:p text:style-name="P143"><text:span text:style-name="T1">Red.</text:span> Glowing red highlights unfinished business.</text:p>
          </table:table-cell>
        </table:table-row>
        <table:table-row>
          <table:table-cell table:style-name="Table2.A1" office:value-type="string">
            <text:p text:style-name="P44"><text:span text:style-name="Strong_20_Emphasis"><text:span text:style-name="T42">Doc Mode</text:span></text:span></text:p>
          </table:table-cell>
          <table:table-cell table:style-name="Table2.A1" office:value-type="string">
            <text:p text:style-name="P143"><text:span text:style-name="T1">Is it explained?</text:span> Measures the quality of instruction manuals and comments.</text:p>
          </table:table-cell>
          <table:table-cell table:style-name="Table2.A1" office:value-type="string">
            <text:p text:style-name="P43"><text:span text:style-name="Strong_20_Emphasis"><text:span text:style-name="T114">Library Gold</text:span></text:span><text:span text:style-name="T114"> </text:span></text:p>
          </table:table-cell>
          <table:table-cell table:style-name="Table2.A1" office:value-type="string">
            <text:p text:style-name="P143"><text:span text:style-name="T1">Gold.</text:span> Bright gold indicates library-grade documentation.</text:p>
          </table:table-cell>
        </table:table-row>
        <table:table-row>
          <table:table-cell table:style-name="Table2.A1" office:value-type="string">
            <text:p text:style-name="P44"><text:span text:style-name="Strong_20_Emphasis"><text:span text:style-name="T42">Commit Heat</text:span></text:span></text:p>
          </table:table-cell>
          <table:table-cell table:style-name="Table2.A1" office:value-type="string">
            <text:p text:style-name="P143"><text:span text:style-name="T1">Is it fresh?</text:span> Shows where work is happening <text:span text:style-name="T287">right now</text:span> vs. months ago.</text:p>
          </table:table-cell>
          <table:table-cell table:style-name="Table2.A1" office:value-type="string">
            <text:p text:style-name="P13">Green</text:p>
          </table:table-cell>
          <table:table-cell table:style-name="Table2.A1" office:value-type="string">
            <text:p text:style-name="P143"><text:span text:style-name="T1">Green.</text:span> Radioactive green means it was edited today.</text:p>
          </table:table-cell>
        </table:table-row>
        <table:table-row>
          <table:table-cell table:style-name="Table2.A1" office:value-type="string">
            <text:p text:style-name="P44"><text:span text:style-name="Strong_20_Emphasis"><text:span text:style-name="T42">Test Coverage</text:span></text:span></text:p>
          </table:table-cell>
          <table:table-cell table:style-name="Table2.A1" office:value-type="string">
            <text:p text:style-name="P143"><text:span text:style-name="T1">Is it verified?</text:span> Checks if the code has a safety net of tests proving it works.</text:p>
          </table:table-cell>
          <table:table-cell table:style-name="Table2.A1" office:value-type="string">
            <text:p text:style-name="P17">Pink</text:p>
          </table:table-cell>
          <table:table-cell table:style-name="Table2.A1" office:value-type="string">
            <text:p text:style-name="P143"><text:span text:style-name="T1">Pink.</text:span> Glowing pink means the code is heavily tested.</text:p>
          </table:table-cell>
        </table:table-row>
        <table:table-row>
          <table:table-cell table:style-name="Table2.A1" office:value-type="string">
            <text:p text:style-name="P19"><text:bookmark-start text:name="__RefHeading___Toc9523_2831427032"/>Civil War<text:bookmark-end text:name="__RefHeading___Toc9523_2831427032"/></text:p>
          </table:table-cell>
          <table:table-cell table:style-name="Table2.A1" office:value-type="string">
            <text:p text:style-name="P143"><text:span text:style-name="T1">Tabs or Spaces?</text:span> Checks for indentation consistency.</text:p>
          </table:table-cell>
          <table:table-cell table:style-name="Table2.A1" office:value-type="string">
            <text:p text:style-name="P14">Green Vs. Yellow</text:p>
          </table:table-cell>
          <table:table-cell table:style-name="Table2.A1" office:value-type="string">
            <text:p text:style-name="P143"><text:span text:style-name="T1">Green vs Yellow.</text:span> Blue indicates a messy mix of both.</text:p>
          </table:table-cell>
        </table:table-row>
        <table:table-row>
          <table:table-cell table:style-name="Table2.A1" office:value-type="string">
            <text:p text:style-name="P19"><text:bookmark-start text:name="__RefHeading___Toc9531_2831427032"/>Graveyard<text:bookmark-end text:name="__RefHeading___Toc9531_2831427032"/></text:p>
          </table:table-cell>
          <table:table-cell table:style-name="Table2.A1" office:value-type="string">
            <text:p text:style-name="P143"><text:span text:style-name="T1">Is there dead code?</text:span> Finds blocks of code that were commented out and abandoned.</text:p>
          </table:table-cell>
          <table:table-cell table:style-name="Table2.A1" office:value-type="string">
            <text:p text:style-name="P15">Purple</text:p>
          </table:table-cell>
          <table:table-cell table:style-name="Table2.A1" office:value-type="string">
            <text:p text:style-name="P143"><text:span text:style-name="T1">Purple.</text:span> A "haunted" purple glow indicates historical hoarding.</text:p>
          </table:table-cell>
        </table:table-row>
        <table:table-row>
          <table:table-cell table:style-name="Table2.A1" office:value-type="string">
            <text:p text:style-name="P20">API Exposure</text:p>
          </table:table-cell>
          <table:table-cell table:style-name="Table2.A1" office:value-type="string">
            <text:p text:style-name="P143"><text:span text:style-name="T1">Is it public?</text:span> Highlights the entry points where the system talks to the outside world.</text:p>
          </table:table-cell>
          <table:table-cell table:style-name="Table2.A1" office:value-type="string">
            <text:p text:style-name="P13">#ff007f</text:p>
            <text:p text:style-name="P13">Electric Rose</text:p>
          </table:table-cell>
          <table:table-cell table:style-name="Table2.A1" office:value-type="string">
            <text:p text:style-name="P143"><text:span text:style-name="T1">Electric Rose.</text:span> Indicates a public interface or endpoint.</text:p>
          </table:table-cell>
        </table:table-row>
        <table:table-row>
          <table:table-cell table:style-name="Table2.A1" office:value-type="string">
            <text:p text:style-name="P45">Concurrency Exposure</text:p>
          </table:table-cell>
          <table:table-cell table:style-name="Table2.A1" office:value-type="string">
            <text:p text:style-name="P143"><text:span text:style-name="T1">Is it multitasking?</text:span> Highlights complex timing, threads, or asynchronous logic.</text:p>
          </table:table-cell>
          <table:table-cell table:style-name="Table2.A1" office:value-type="string">
            <text:p text:style-name="P13">#7b2ff7 </text:p>
            <text:p text:style-name="P13"><text:span text:style-name="T259">E</text:span>lectric Ultraviolet</text:p>
          </table:table-cell>
          <table:table-cell table:style-name="Table2.A1" office:value-type="string">
            <text:p text:style-name="P143"><text:span text:style-name="T1">Ultraviolet.</text:span> Indicates potential race conditions or timing risks.</text:p>
          </table:table-cell>
        </table:table-row>
        <table:table-row table:style-name="Table2.14">
          <table:table-cell table:style-name="Table2.A1" office:value-type="string">
            <text:p text:style-name="P19">State Flux Exposure</text:p>
          </table:table-cell>
          <table:table-cell table:style-name="Table2.A1" office:value-type="string">
            <text:p text:style-name="P143"><text:span text:style-name="T1">Is the data changing?</text:span> Highlights variables that are constantly being modified/mutated.</text:p>
          </table:table-cell>
          <table:table-cell table:style-name="Table2.A1" office:value-type="string">
            <text:p text:style-name="P13">#ffb84e</text:p>
            <text:p text:style-name="P13">Clyde Orange</text:p>
          </table:table-cell>
          <table:table-cell table:style-name="Table2.A1" office:value-type="string">
            <text:p text:style-name="P143"><text:span text:style-name="T1">Clyde Orange.</text:span> Indicates "boiling" data that is hard to track.</text:p>
          </table:table-cell>
        </table:table-row>
      </table:table>
      <text:p text:style-name="P32"><text:span text:style-name="Strong_20_Emphasis"><text:span text:style-name="T38"/></text:span></text:p>
      <text:h text:style-name="P12" text:outline-level="4"><text:bookmark-start text:name="__RefHeading___Toc11765_959624642"/><text:span text:style-name="T390">2</text:span><text:span text:style-name="T259">.2.</text:span><text:span text:style-name="T238">B</text:span>. Sub-Equations<text:bookmark-end text:name="__RefHeading___Toc11765_959624642"/></text:h>
      <text:p text:style-name="P35">To ensure the equations above are actionable, the following variables are defined based on the scanner's regex hits:</text:p>
      <text:p text:style-name="Text_20_body"><text:bookmark text:name="p-rc_be5868252400bb32-684"/><text:soft-page-break/><text:span text:style-name="Strong_20_Emphasis"><text:span text:style-name="T69">branch_hits:</text:span></text:span><text:span text:style-name="Strong_20_Emphasis"><text:span text:style-name="T38"> Control flow constructs including conditionals (</text:span></text:span><text:span text:style-name="Strong_20_Emphasis"><text:span text:style-name="Source_20_Text">if</text:span></text:span><text:span text:style-name="Strong_20_Emphasis"><text:span text:style-name="T38">, </text:span></text:span><text:span text:style-name="Strong_20_Emphasis"><text:span text:style-name="Source_20_Text">switch</text:span></text:span><text:span text:style-name="Strong_20_Emphasis"><text:span text:style-name="T38">), loops (</text:span></text:span><text:span text:style-name="Strong_20_Emphasis"><text:span text:style-name="Source_20_Text">for</text:span></text:span><text:span text:style-name="Strong_20_Emphasis"><text:span text:style-name="T38">, </text:span></text:span><text:span text:style-name="Strong_20_Emphasis"><text:span text:style-name="Source_20_Text">while</text:span></text:span><text:span text:style-name="Strong_20_Emphasis"><text:span text:style-name="T38">), jumps (</text:span></text:span><text:span text:style-name="Strong_20_Emphasis"><text:span text:style-name="Source_20_Text">break</text:span></text:span><text:span text:style-name="Strong_20_Emphasis"><text:span text:style-name="T38">, </text:span></text:span><text:span text:style-name="Strong_20_Emphasis"><text:span text:style-name="Source_20_Text">throw</text:span></text:span><text:span text:style-name="Strong_20_Emphasis"><text:span text:style-name="T38">), and logical operators (</text:span></text:span><text:span text:style-name="Strong_20_Emphasis"><text:span text:style-name="Source_20_Text">&amp;&amp;</text:span></text:span><text:span text:style-name="Strong_20_Emphasis"><text:span text:style-name="T38">, </text:span></text:span><text:span text:style-name="Strong_20_Emphasis"><text:span text:style-name="Source_20_Text">||</text:span></text:span><text:span text:style-name="Strong_20_Emphasis"><text:span text:style-name="T38">) that divert execution paths. </text:span></text:span></text:p>
      <text:list text:style-name="L39">
        <text:list-item>
          <text:p text:style-name="P251"><text:bookmark text:name="p-rc_be5868252400bb32-685"/><text:span text:style-name="T1">args_hits:</text:span> Function signatures, parameter lists, input registers, or lambda arguments that define the data inputs for a logic block. </text:p>
        </text:list-item>
      </text:list>
      <text:list text:style-name="L40">
        <text:list-item>
          <text:p text:style-name="P252"><text:bookmark text:name="p-rc_be5868252400bb32-686"/><text:span text:style-name="T1">linear_hits:</text:span> Sequential flow markers, including variable declarations (<text:span text:style-name="Source_20_Text">const</text:span>, <text:span text:style-name="Source_20_Text">var</text:span>), imports, returns, and structural keywords that indicate non-branching logic. </text:p>
        </text:list-item>
      </text:list>
      <text:list text:style-name="L41">
        <text:list-item>
          <text:p text:style-name="P253"><text:bookmark text:name="p-rc_be5868252400bb32-687"/><text:span text:style-name="T1">func_start_hits:</text:span> The syntactic anchor identifying the beginning of a named function, method, subroutine, or procedure definition (excluding classes/interfaces). </text:p>
        </text:list-item>
      </text:list>
      <text:list text:style-name="L42">
        <text:list-item>
          <text:p text:style-name="P254"><text:bookmark text:name="p-rc_be5868252400bb32-688"/><text:span text:style-name="T1">class_start_hits:</text:span> The syntax that defines an object-oriented class, struct, record, or enum, driving API surface area calculations. </text:p>
        </text:list-item>
      </text:list>
      <text:list text:style-name="L43">
        <text:list-item>
          <text:p text:style-name="P255"><text:bookmark text:name="p-rc_be5868252400bb32-689"/><text:span text:style-name="T1">safety_hits:</text:span> Defensive constructs such as exception handling (<text:span text:style-name="Source_20_Text">try/catch</text:span>), type assertions, null checks, and memory protection mechanisms (<text:span text:style-name="Source_20_Text">readonly</text:span>). </text:p>
        </text:list-item>
      </text:list>
      <text:list text:style-name="L44">
        <text:list-item>
          <text:p text:style-name="P256"><text:bookmark text:name="p-rc_be5868252400bb32-690"/><text:span text:style-name="T1">safety_neg_hits:</text:span> Risk factors including error suppression, dynamic code execution (<text:span text:style-name="Source_20_Text">eval</text:span>), type-system bypasses (<text:span text:style-name="Source_20_Text">any</text:span>, <text:span text:style-name="Source_20_Text">!</text:span>), and unsafe pointer usage. </text:p>
        </text:list-item>
      </text:list>
      <text:list text:style-name="L45">
        <text:list-item>
          <text:p text:style-name="P257"><text:bookmark text:name="p-rc_be5868252400bb32-691"/><text:span text:style-name="T1">danger_hits:</text:span> Critical indicators of technical debt (<text:span text:style-name="Source_20_Text">TODO/FIXME</text:span>), destructive system calls (<text:span text:style-name="Source_20_Text">process.exit</text:span>), hardcoded secrets, or catastrophic failure modes. </text:p>
        </text:list-item>
      </text:list>
      <text:list text:style-name="L46">
        <text:list-item>
          <text:p text:style-name="P258"><text:bookmark text:name="p-rc_be5868252400bb32-692"/><text:span text:style-name="T1">io_hits:</text:span> Interactions with external boundaries, including file systems, network requests (<text:span text:style-name="Source_20_Text">fetch</text:span>), database queries, and hardware I/O. </text:p>
        </text:list-item>
      </text:list>
      <text:list text:style-name="L47">
        <text:list-item>
          <text:p text:style-name="P259"><text:bookmark text:name="p-rc_be5868252400bb32-693"/><text:span text:style-name="T1">api_hits:</text:span> Keywords identifying public interfaces (<text:span text:style-name="Source_20_Text">export</text:span>, <text:span text:style-name="Source_20_Text">public</text:span>), exported members, or globally accessible entry points that define surface area. </text:p>
        </text:list-item>
      </text:list>
      <text:list text:style-name="L48">
        <text:list-item>
          <text:p text:style-name="P260"><text:bookmark text:name="p-rc_be5868252400bb32-694"/><text:span text:style-name="T1">flux_hits:</text:span> Markers of state change, including variable assignment (<text:span text:style-name="Source_20_Text">let</text:span>, <text:span text:style-name="Source_20_Text">mut</text:span>), mutable collections, pointer updates, and side-effect triggers. </text:p>
        </text:list-item>
      </text:list>
      <text:list text:style-name="L49">
        <text:list-item>
          <text:p text:style-name="P261"><text:bookmark text:name="p-rc_be5868252400bb32-695"/><text:span text:style-name="T1">graveyard_hits:</text:span> Patterns detecting commented-out code blocks (<text:span text:style-name="Source_20_Text">// if</text:span>), legacy logic, or "zombie" code (<text:span text:style-name="Source_20_Text">// console.log</text:span>) that remains in the source file. </text:p>
        </text:list-item>
      </text:list>
      <text:list text:style-name="L50">
        <text:list-item>
          <text:p text:style-name="P262"><text:bookmark text:name="p-rc_be5868252400bb32-696"/><text:span text:style-name="T1">doc_hits:</text:span> Structured documentation syntax, including JSDoc (<text:span text:style-name="Source_20_Text">/**</text:span>), XML comments, and standard metadata tags describing code intent. </text:p>
        </text:list-item>
      </text:list>
      <text:list text:style-name="L51">
        <text:list-item>
          <text:p text:style-name="P263"><text:bookmark text:name="p-rc_be5868252400bb32-697"/><text:span text:style-name="T1">test_hits:</text:span> Framework-specific keywords for assertions, unit test definitions, mocks, and verification suites (<text:span text:style-name="Source_20_Text">describe</text:span>, <text:span text:style-name="Source_20_Text">assert</text:span>, <text:span text:style-name="Source_20_Text">mock</text:span>). </text:p>
        </text:list-item>
      </text:list>
      <text:list text:style-name="L52">
        <text:list-item>
          <text:p text:style-name="P264"><text:bookmark text:name="p-rc_be5868252400bb32-698"/><text:soft-page-break/><text:span text:style-name="T1">concurrency_hits:</text:span> Constructs for asynchronous execution (<text:span text:style-name="Source_20_Text">async/await</text:span>), threading, parallel processing, coroutines, and synchronization primitives. </text:p>
        </text:list-item>
      </text:list>
      <text:list text:style-name="L53">
        <text:list-item>
          <text:p text:style-name="P265"><text:bookmark text:name="p-rc_be5868252400bb32-699"/><text:span text:style-name="T1">ui_framework_hits:</text:span> Patterns specific to frontend or UI development, including component definitions, view bindings (<text:span text:style-name="Source_20_Text">document.getElementById</text:span>), and rendering logic. </text:p>
        </text:list-item>
      </text:list>
      <text:list text:style-name="L54">
        <text:list-item>
          <text:p text:style-name="P266"><text:bookmark text:name="p-rc_be5868252400bb32-700"/><text:span text:style-name="T1">closures_hits:</text:span> Syntax for anonymous functions, lambdas, blocks, or inline delegates that capture local context (<text:span text:style-name="Source_20_Text">=&gt;</text:span>). </text:p>
        </text:list-item>
      </text:list>
      <text:list text:style-name="L55">
        <text:list-item>
          <text:p text:style-name="P267"><text:bookmark text:name="p-rc_be5868252400bb32-701"/><text:span text:style-name="T1">globals_hits:</text:span> References to global scope (<text:span text:style-name="Source_20_Text">window.</text:span>, <text:span text:style-name="Source_20_Text">process.env</text:span>), environment variables, singletons, or system-wide shared state. </text:p>
        </text:list-item>
      </text:list>
      <text:list text:style-name="L56">
        <text:list-item>
          <text:p text:style-name="P268"><text:bookmark text:name="p-rc_be5868252400bb32-702"/><text:span text:style-name="T1">decorators_hits:</text:span> Annotations, attributes, or wrapper syntax used to modify or tag classes and methods with metadata (<text:span text:style-name="Source_20_Text">@Injectable</text:span>). </text:p>
        </text:list-item>
      </text:list>
      <text:list text:style-name="L57">
        <text:list-item>
          <text:p text:style-name="P269"><text:bookmark text:name="p-rc_be5868252400bb32-703"/><text:span text:style-name="T1">generics_hits:</text:span> Syntax defining type parameters (<text:span text:style-name="Source_20_Text">&lt;T&gt;</text:span>), templates, or polymorphic structures for type-agnostic logic. </text:p>
        </text:list-item>
      </text:list>
      <text:list text:style-name="L58">
        <text:list-item>
          <text:p text:style-name="P270"><text:bookmark text:name="p-rc_be5868252400bb32-704"/><text:span text:style-name="T1">comprehensions_hits:</text:span> High-density logic patterns including list comprehensions, functional chains (<text:span text:style-name="Source_20_Text">.map</text:span>, <text:span text:style-name="Source_20_Text">.filter</text:span>), and array transformations. </text:p>
        </text:list-item>
      </text:list>
      <text:list text:style-name="L59">
        <text:list-item>
          <text:p text:style-name="P271"><text:bookmark text:name="p-rc_be5868252400bb32-705"/><text:span text:style-name="T1">scientific_hits:</text:span> Usage of mathematical libraries (<text:span text:style-name="Source_20_Text">Math.</text:span>, <text:span text:style-name="Source_20_Text">numpy</text:span>), tensor operations, arbitrary precision arithmetic, or complex number processing. </text:p>
        </text:list-item>
      </text:list>
      <text:list text:style-name="L60">
        <text:list-item>
          <text:p text:style-name="P272"><text:bookmark text:name="p-rc_be5868252400bb32-706"/><text:span text:style-name="T1">heat_triggers_hits:</text:span> High-complexity constructs such as metaprogramming, reflection (<text:span text:style-name="Source_20_Text">Proxy</text:span>, <text:span text:style-name="Source_20_Text">eval</text:span>), macros, or dynamic dispatch that increase cognitive load. </text:p>
        </text:list-item>
      </text:list>
      <text:list text:style-name="L61">
        <text:list-item>
          <text:p text:style-name="P273"><text:bookmark text:name="p-rc_be5868252400bb32-707"/><text:span text:style-name="T1">import_hits:</text:span> Syntax for dependency management, module loading (<text:span text:style-name="Source_20_Text">import</text:span>, <text:span text:style-name="Source_20_Text">require</text:span>), file inclusion, or library linking. </text:p>
        </text:list-item>
      </text:list>
      <text:list text:style-name="L62">
        <text:list-item>
          <text:p text:style-name="P274"><text:bookmark text:name="p-rc_be5868252400bb32-708"/><text:span text:style-name="T1">ownership_hits:</text:span> Metadata extraction patterns for identifying authors, maintainers, or copyright holders within file headers (<text:span text:style-name="Source_20_Text">@author</text:span>).</text:p>
        </text:list-item>
      </text:list>
      <text:p text:style-name="Text_20_body"><text:span text:style-name="Strong_20_Emphasis"><text:span text:style-name="T38"/></text:span></text:p>
      <text:h text:style-name="Heading_20_4" text:outline-level="4"><text:bookmark-start text:name="__RefHeading___Toc26218_2298275600"/><text:span text:style-name="T92">2.2.C. Transforming </text:span><text:span text:style-name="T93">N</text:span><text:span text:style-name="T92">oisy </text:span><text:span text:style-name="T93">R</text:span><text:span text:style-name="T92">egex </text:span><text:span text:style-name="T93">C</text:span><text:span text:style-name="T92">ounts </text:span><text:span text:style-name="T93">I</text:span><text:span text:style-name="T92">nto </text:span><text:span text:style-name="T93">S</text:span><text:span text:style-name="T92">omething </text:span><text:span text:style-name="T93">M</text:span><text:span text:style-name="T92">eaningful</text:span><text:bookmark-end text:name="__RefHeading___Toc26218_2298275600"/></text:h>
      <text:p text:style-name="P149">We recognize that raw heuristic counts are inherently fragile; they are easily fooled by "safety theater" (like empty catch blocks) and lack the deep contextual awareness of a compiler. To transform this fuzzy, easily manipulated data into actionable intelligence, we implemented a <text:span text:style-name="T1">Universal Exposure Framework</text:span> that treats code metrics not as <text:soft-page-break/>absolute truths, but as weighted signals within a "Physics Engine." This approach applies four specific stabilizing forces to counteract the noise of static analysis:</text:p>
      <text:list text:style-name="L63">
        <text:list-item>
          <text:p text:style-name="P275"><text:span text:style-name="T1">Weighted Asymmetry (The Entropy Check):</text:span> A simple counter treats a vulnerability and a safeguard as equal opposites (1 - 1 = 0). In reality, it is significantly harder to secure a system than to break it. We apply a <text:span text:style-name="T1">2.5x multiplier</text:span> to all detected risks, forcing the code to demonstrate disproportionate defensive density before it can achieve a "Safe" rating. This prevents minor cosmetic fixes from masking structural brittleness.</text:p>
        </text:list-item>
        <text:list-item>
          <text:p text:style-name="P276"><text:span text:style-name="T450">The Breach Cap (Zero-Trust Logic):</text:span><text:span text:style-name="T446"> To prevent large files with high test coverage from masking critical flaws, we enforce a hard limit: if the raw count of </text:span><text:span text:style-name="Source_20_Text"><text:span text:style-name="T446">Risk Hits</text:span></text:span><text:span text:style-name="T446"> exceeds </text:span><text:span text:style-name="Source_20_Text"><text:span text:style-name="T446">Guardrail Hits</text:span></text:span><text:span text:style-name="T446">, the module is capped at a "Fragile" rating regardless of its other qualities. This overrides the math with a reality check—no amount of unit testing can neutralize a fundamentally insecure architecture.</text:span></text:p>
        </text:list-item>
        <text:list-item>
          <text:p text:style-name="P275"><text:span text:style-name="T1">The Sigmoid Clamp (Noise Gating):</text:span> Linear counting penalizes large files for having trace amounts of technical debt. We utilize a logistic function to act as a noise gate, suppressing trivial findings (0-5% density) while aggressively highlighting clusters of debt once they cross a critical threshold (~20%). This ensures the visualization focuses on systemic patterns rather than isolated infractions.</text:p>
        </text:list-item>
        <text:list-item>
          <text:p text:style-name="P275"><text:span text:style-name="T1">Quantized </text:span><text:span text:style-name="T35">Final </text:span><text:span text:style-name="T1">Tiering (Removing False Precision):</text:span> Presenting a "Safety Score" of 87.4% implies a level of precision that regex cannot provide. By binning complex scores into five distinct <text:span text:style-name="T1">Qualitative Tiers</text:span> (Unshielded, Fragile, Stable, Defended, Fortified), we remove false precision and deliver a binary truth: the module is either sufficiently defended for its context, or it is not.</text:p>
        </text:list-item>
      </text:list>
      <text:p text:style-name="P148"/>
      <text:p text:style-name="P142"><text:span text:style-name="Source_20_Text"><text:span text:style-name="T177">Instead of a single "Master Equation" </text:span></text:span><text:span text:style-name="Source_20_Text"><text:span text:style-name="T176">for </text:span></text:span><text:span text:style-name="Source_20_Text"><text:span text:style-name="T185">all</text:span></text:span><text:span text:style-name="Source_20_Text"><text:span text:style-name="T176"> Risk Exposure</text:span></text:span><text:span text:style-name="Source_20_Text"><text:span text:style-name="T185">s</text:span></text:span><text:span text:style-name="Source_20_Text"><text:span text:style-name="T176">,</text:span></text:span><text:span text:style-name="Source_20_Text"><text:span text:style-name="T177"> we employ a </text:span></text:span><text:span text:style-name="Strong_20_Emphasis"><text:span text:style-name="T177">Universal Framework</text:span></text:span><text:span text:style-name="Source_20_Text"><text:span text:style-name="T177"> that is instantiated and calibrated for each of the Risk Exposure domains. </text:span></text:span><text:span text:style-name="Source_20_Text"><text:span text:style-name="T176"><text:s/></text:span></text:span></text:p>
      <text:p text:style-name="P142"><text:span text:style-name="Strong_20_Emphasis">The Standardization:</text:span> While each <text:span text:style-name="T454">Risk Exposure </text:span>equation is unique, they all adhere to the same physics:</text:p>
      <text:p text:style-name="P21">Each coding language is set in a tier that determines the value for Fc, Irc. </text:p>
      <text:list text:style-name="L64">
        <text:list-item>
          <text:p text:style-name="P212"><text:span text:style-name="T1">Tier 1</text:span> = Explicit Languages (High Trust, e.g., Rust).</text:p>
        </text:list-item>
        <text:list-item>
          <text:p text:style-name="P212"><text:span text:style-name="T1">Tier 2</text:span> = Structured Languages (Minor Doubt, e.g., Java).</text:p>
        </text:list-item>
        <text:list-item>
          <text:p text:style-name="P277"><text:span text:style-name="Source_20_Text"><text:span text:style-name="T95">Tier 3</text:span></text:span><text:span text:style-name="Source_20_Text"><text:span text:style-name="T176"> = Implicit Languages (Fog of War, e.g., Shell).</text:span></text:span></text:p>
          <text:p text:style-name="P277"><text:soft-page-break/><text:span text:style-name="Strong_20_Emphasis"><text:span text:style-name="T176"/></text:span></text:p>
        </text:list-item>
      </text:list>
      <text:list text:style-name="L65">
        <text:list-item>
          <text:p text:style-name="P213"><text:span text:style-name="T1">Fc</text:span> = Fidelity Coefficient. (A dampener used to reduce trust in ambiguous languages).</text:p>
        </text:list-item>
        <text:list-item>
          <text:p text:style-name="P213"><text:span text:style-name="T1">Irc</text:span> = Implicit Risk Correction. (A flat penalty added to ambiguous languages aka "Opacity Tax").</text:p>
        </text:list-item>
        <text:list-item>
          <text:p text:style-name="P213"><text:span text:style-name="T1">Mp</text:span> = Multiplier / Path Modifier. (Scales risk based on file location, e.g., Core vs. Lab). <text:span text:style-name="T453">We reward people for good file structure, when we can. </text:span></text:p>
        </text:list-item>
      </text:list>
      <text:p text:style-name="P37"/>
      <text:p text:style-name="P142">While each risk domain has a unique formula, they all follow this general form. We weigh risk (Asymmetry) heavier than defenses, add the "Opacity Tax" to the risk, and dampen the defenses with the "Trust Coefficient."</text:p>
      <text:p text:style-name="P141"><text:span text:style-name="Source_20_Text">RiskExposure = [ ((RiskHits + Irc) * Weight) - (DefenseHits * Fc) ] / LOC * Mp</text:span></text:p>
      <text:p text:style-name="P141"><text:span text:style-name="Source_20_Text"/></text:p>
      <text:p text:style-name="P141"><text:span text:style-name="Source_20_Text"/></text:p>
      <text:h text:style-name="P76" text:outline-level="4"><text:bookmark-start text:name="__RefHeading___Toc560529_2813440148"/>2.2.D. Ownership Mode: Shannon Entropy<text:bookmark-end text:name="__RefHeading___Toc560529_2813440148"/></text:h>
      <text:p text:style-name="P83"><text:span text:style-name="T483">Ownership displays</text:span> the distribution of authorship within a file. Ownership isn’t about blaming a single author; it’s about visualizing the <text:span text:style-name="Strong_20_Emphasis">Collective Mind.</text:span> A healthy culture is transparent about where knowledge is shared and where it is siloed.</text:p>
      <text:p text:style-name="P83">Rather than a linear author count, this utilizes Shannon Entropy to determine the concentration or dispersion of contributions, <text:span text:style-name="T483">which allows for some unique coloring options. Every person gets their own color based on their name hash. Then as authors increase, color blends to white (like a how all the colors in the rainbow make white light). </text:span></text:p>
      <text:h text:style-name="P77" text:outline-level="5"><text:bookmark-start text:name="__RefHeading___Toc560531_2813440148"/>2.2.D.1. The Philosophy: Knowledge Concentration<text:bookmark-end text:name="__RefHeading___Toc560531_2813440148"/></text:h>
      <text:p text:style-name="P83">Authorship is analyzed as a variable of structural clarity versus architectural diffusion.</text:p>
      <text:list text:style-name="L66">
        <text:list-item>
          <text:p text:style-name="P278"><text:span text:style-name="Strong_20_Emphasis">Low Entropy (Unique Hue):</text:span> A pattern where contributions are concentrated within a single primary author. This is represented by a stable, solid color identifying the "owner," symbolizing a unified mental model. <text:span text:style-name="T397">A unique hue is generated by the author name hash to prevent color overlap. </text:span></text:p>
        </text:list-item>
        <text:list-item>
          <text:p text:style-name="P278"><text:span text:style-name="Strong_20_Emphasis">High Entropy (</text:span><text:span text:style-name="Strong_20_Emphasis"><text:span text:style-name="T483">White</text:span></text:span><text:span text:style-name="Strong_20_Emphasis">):</text:span> A pattern where contributions are distributed across multiple authors. As additional contributors influence the file, the star's color intensifies until it reaches an "over-saturated" white state. </text:p>
        </text:list-item>
      </text:list>
      <text:h text:style-name="P77" text:outline-level="5"><text:bookmark-start text:name="__RefHeading___Toc560533_2813440148"/><text:soft-page-break/>2.2.D.2. The Inputs: Contribution Share<text:bookmark-end text:name="__RefHeading___Toc560533_2813440148"/></text:h>
      <text:list text:style-name="L67">
        <text:list-item>
          <text:p text:style-name="P279"><text:span text:style-name="Strong_20_Emphasis">Authors:</text:span> A data map of author identifiers to their specific commit frequencies for the file.</text:p>
        </text:list-item>
        <text:list-item>
          <text:p text:style-name="P279"><text:span text:style-name="Strong_20_Emphasis">TotalCommits:</text:span> The aggregate sum of all commits recorded for the file.</text:p>
        </text:list-item>
        <text:list-item>
          <text:p text:style-name="P279"><text:span text:style-name="Strong_20_Emphasis">GlobalAuthorCount:</text:span> The total number of unique contributors across the entire repository.</text:p>
        </text:list-item>
      </text:list>
      <text:h text:style-name="P140" text:outline-level="5"><text:bookmark-start text:name="__RefHeading___Toc560535_2813440148"/>2.2.D.3. Equation<text:bookmark-end text:name="__RefHeading___Toc560535_2813440148"/></text:h>
      <text:p text:style-name="P142"><text:span text:style-name="Strong_20_Emphasis">p_i:</text:span> The proportion of total commits made by author "i" (e.g., if Author A made 20/100 commits, p = 0.2).</text:p>
      <text:p text:style-name="P142"><text:span text:style-name="T456">Entropy = </text:span>H = -sum(p_i * log2(p_i))</text:p>
      <text:p text:style-name="P142">OwnershipScore = min(H * 32, 100)</text:p>
      <text:h text:style-name="P183" text:outline-level="5"><text:bookmark-start text:name="__RefHeading___Toc35684_3489481128"/><text:span text:style-name="T453">2.2.D.4. </text:span>Why This Model is Superior<text:bookmark-end text:name="__RefHeading___Toc35684_3489481128"/></text:h>
      <text:list text:style-name="L68">
        <text:list-header>
          <text:p text:style-name="P280"><text:span text:style-name="Strong_20_Emphasis">It Solves the "Long Tail" Problem:</text:span> A file with 1 Major Author (90%) and 1 Minor Author (10%) is relatively stable. A file with 1 Major Author (90%) and 10 Minor Authors (1% each) is chaotic. The Linear model scores these identical (Score: 10). The Entropy model correctly identifies the second file as significantly more "active" or "noisy" because it accounts for the sheer number of distinct voices in the mix <text:span text:style-name="T456">while still marking it mostly with the color of the main author. While the Linear model only asks "Who is the biggest author, </text:span><text:span text:style-name="T483">regardless of commit size</text:span><text:span text:style-name="T456">?", the </text:span><text:span text:style-name="T483">e</text:span><text:span text:style-name="T456">ntropy model </text:span><text:span text:style-name="T483">displays</text:span><text:span text:style-name="T456"> "How much </text:span><text:span text:style-name="Emphasis"><text:span text:style-name="T456">uncertainty</text:span></text:span><text:span text:style-name="T456"> exists in the authorship?". In GitGalaxy, high entropy means </text:span><text:span text:style-name="T232">di</text:span><text:span text:style-name="Strong_20_Emphasis"><text:span text:style-name="T233">ffusion of </text:span></text:span><text:span text:style-name="Strong_20_Emphasis"><text:span text:style-name="T232">authorship</text:span></text:span><text:span text:style-name="T456">. </text:span></text:p>
        </text:list-header>
      </text:list>
      <text:list text:style-name="L69">
        <text:list-header>
          <text:h text:style-name="P191" text:outline-level="5"/>
        </text:list-header>
      </text:list>
      <text:h text:style-name="P139" text:outline-level="5"><text:bookmark-start text:name="__RefHeading___Toc560537_2813440148"/>2.2.D.<text:span text:style-name="T453">5</text:span>. Visual Interpretation: Ownership vs. Collective Diffusion<text:bookmark-end text:name="__RefHeading___Toc560537_2813440148"/></text:h>
      <text:list text:continue-numbering="true" text:style-name="L69">
        <text:list-header>
          <text:p text:style-name="P281"><text:span text:style-name="Strong_20_Emphasis"/></text:p>
        </text:list-header>
        <text:list-item>
          <text:p text:style-name="P281"><text:span text:style-name="Strong_20_Emphasis">Concentrated Pattern (Score 0):</text:span></text:p>
        </text:list-item>
        <text:list-item>
          <text:p text:style-name="P281"><text:span text:style-name="Strong_20_Emphasis">Visual:</text:span> A single solid color determined by a deterministic hash of the primary author's name (e.g., "Alice" = Cyan, "Bob" = Amber).</text:p>
        </text:list-item>
        <text:list-item>
          <text:p text:style-name="P281"><text:span text:style-name="Strong_20_Emphasis">Definition:</text:span> Pure Ownership. The logic represents a single individual's architectural intent. The light is stable and monochromatic.</text:p>
        </text:list-item>
        <text:list-item>
          <text:p text:style-name="P281"><text:span text:style-name="Strong_20_Emphasis">Transitioning Pattern (Score 1–</text:span><text:span text:style-name="Strong_20_Emphasis"><text:span text:style-name="T400">80</text:span></text:span><text:span text:style-name="Strong_20_Emphasis">):</text:span></text:p>
        </text:list-item>
        <text:list-item>
          <text:p text:style-name="P281"><text:span text:style-name="Strong_20_Emphasis">Visual:</text:span> The core author color begins to desaturate and brighten. A subtle vibration begins at the edges of the star as the entropy score increases, simulating light reaching a breaking point <text:span text:style-name="T397">due to the collective force of the team.</text:span></text:p>
        </text:list-item>
        <text:list-item>
          <text:p text:style-name="P281"><text:soft-page-break/><text:span text:style-name="Strong_20_Emphasis">Distributed Pattern (Score </text:span><text:span text:style-name="Strong_20_Emphasis"><text:span text:style-name="T400">81-</text:span></text:span><text:span text:style-name="Strong_20_Emphasis">100):</text:span></text:p>
        </text:list-item>
        <text:list-item>
          <text:p text:style-name="P281"><text:span text:style-name="Strong_20_Emphasis">Visual:</text:span> The star reaches peak intensity, appearing as a brilliant, glowing white. This "over-<text:span text:style-name="T38">saturated" state triggers a high-frequency chromatic aberration fringe (shifting red, blue, and yellow offsets).</text:span></text:p>
        </text:list-item>
        <text:list-item>
          <text:p text:style-name="P281"><text:span text:style-name="Strong_20_Emphasis"><text:span text:style-name="T129">Definition:</text:span></text:span><text:span text:style-name="Source_20_Text"><text:span text:style-name="T130"> </text:span></text:span><text:span text:style-name="Source_20_Text"><text:span text:style-name="T128">Collective Maintenance. Responsibility and architectural intent are shared. The "vibrating white" symbolizes a high-activity module where constant multi-author input has reached a state of architectural diffusion.</text:span></text:span></text:p>
        </text:list-item>
      </text:list>
      <text:p text:style-name="P142"><text:span text:style-name="Source_20_Text"><text:span text:style-name="T128"/></text:span></text:p>
      <text:h text:style-name="P77" text:outline-level="5"><text:bookmark-start text:name="__RefHeading___Toc560539_2813440148"/>2.2.D.<text:span text:style-name="T453">6</text:span>. RQM: Scaling Logic &amp; Visual Overload<text:bookmark-end text:name="__RefHeading___Toc560539_2813440148"/></text:h>
      <text:p text:style-name="P83">The engine monitors repository complexity and author density to prevent visual interference and GPU bottlenecking. When specific thresholds are met, the engine transitions from high-fidelity rendering to a macroscopic heatmap.</text:p>
      <text:p text:style-name="P83"><text:span text:style-name="Strong_20_Emphasis">Threshold Trigger A: Megastructure</text:span></text:p>
      <text:list text:style-name="L70">
        <text:list-item>
          <text:p text:style-name="P282"><text:span text:style-name="Source_20_Text">Repo.fileCount &gt; 50,000</text:span></text:p>
        </text:list-item>
        <text:list-item>
          <text:p text:style-name="P282"><text:span text:style-name="Strong_20_Emphasis">Response:</text:span> Switch to Blue-to-White Scale.</text:p>
        </text:list-item>
      </text:list>
      <text:p text:style-name="P83"><text:span text:style-name="Strong_20_Emphasis">Threshold Trigger B: Visual Overload</text:span></text:p>
      <text:list text:style-name="L71">
        <text:list-item>
          <text:p text:style-name="P283"><text:span text:style-name="Source_20_Text">GlobalAuthorCount &gt; 200</text:span></text:p>
        </text:list-item>
        <text:list-item>
          <text:p text:style-name="P283"><text:span text:style-name="Strong_20_Emphasis">Rationale:</text:span> At counts exceeding 200 unique authors, deterministic hues become indistinguishable (neighboring colors in RGB space lack sufficient contrast).</text:p>
        </text:list-item>
        <text:list-item>
          <text:p text:style-name="P283"><text:span text:style-name="Strong_20_Emphasis">Response:</text:span> Disable individual author hashing. Switch to Blue-to-White Scale.</text:p>
        </text:list-item>
      </text:list>
      <text:p text:style-name="P83"><text:span text:style-name="Strong_20_Emphasis">Threshold Trigger C: Reactive Performance</text:span></text:p>
      <text:list text:style-name="L72">
        <text:list-item>
          <text:p text:style-name="P284"><text:span text:style-name="Source_20_Text">FPS &lt; </text:span><text:span text:style-name="Source_20_Text"><text:span text:style-name="T483">45</text:span></text:span></text:p>
        </text:list-item>
        <text:list-item>
          <text:p text:style-name="P284"><text:span text:style-name="Strong_20_Emphasis">Response:</text:span> Disable <text:span text:style-name="T484">multi-color mode and,</text:span> Switch to Blue-to-White Scale.</text:p>
        </text:list-item>
      </text:list>
      <text:p text:style-name="P83"><text:span text:style-name="Strong_20_Emphasis">The Macroscopic Scale: Blue-to-White Gradient</text:span> Instead of calculating vibrating vertex offsets or unique author hues, the engine switches to a simple linear color interpolation (Lerp).</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0">State</text:p>
          </table:table-cell>
          <table:table-cell table:style-name="Table16.A1" office:value-type="string">
            <text:p text:style-name="P80">Visual Feature (H-Fidelity)</text:p>
          </table:table-cell>
          <table:table-cell table:style-name="Table16.A1" office:value-type="string">
            <text:p text:style-name="P80">Visual Feature (Scale Shortcut)</text:p>
          </table:table-cell>
          <table:table-cell table:style-name="Table16.A1" office:value-type="string">
            <text:p text:style-name="P80">Rationale</text:p>
          </table:table-cell>
        </table:table-row>
        <table:table-row>
          <table:table-cell table:style-name="Table16.A1" office:value-type="string">
            <text:p text:style-name="P79"><text:span text:style-name="Strong_20_Emphasis">Individual</text:span> (Entropy 0)</text:p>
          </table:table-cell>
          <table:table-cell table:style-name="Table16.A1" office:value-type="string">
            <text:p text:style-name="P79">Unique Author Hue (Deterministic)</text:p>
          </table:table-cell>
          <table:table-cell table:style-name="Table16.A1" office:value-type="string">
            <text:p text:style-name="P79"><text:span text:style-name="Strong_20_Emphasis">Deep Azure (#0044FF)</text:span></text:p>
          </table:table-cell>
          <table:table-cell table:style-name="Table16.A1" office:value-type="string">
            <text:p text:style-name="P79">Provides a cool, stable baseline for unified code.</text:p>
          </table:table-cell>
        </table:table-row>
        <text:soft-page-break/>
        <table:table-row>
          <table:table-cell table:style-name="Table16.A1" office:value-type="string">
            <text:p text:style-name="P79"><text:span text:style-name="Strong_20_Emphasis">Collective</text:span> (Entropy 100)</text:p>
          </table:table-cell>
          <table:table-cell table:style-name="Table16.A1" office:value-type="string">
            <text:p text:style-name="P79">Vibrating Chromatic Aberration</text:p>
          </table:table-cell>
          <table:table-cell table:style-name="Table16.A1" office:value-type="string">
            <text:p text:style-name="P79"><text:span text:style-name="Strong_20_Emphasis">Pure Supernova White (#FFFFFF)</text:span></text:p>
          </table:table-cell>
          <table:table-cell table:style-name="Table16.A1" office:value-type="string">
            <text:p text:style-name="P79">Represents "High Energy" and shared responsibility.</text:p>
          </table:table-cell>
        </table:table-row>
        <table:table-row>
          <table:table-cell table:style-name="Table16.A1" office:value-type="string">
            <text:p text:style-name="P79"><text:span text:style-name="Strong_20_Emphasis">The Transition</text:span></text:p>
          </table:table-cell>
          <table:table-cell table:style-name="Table16.A1" office:value-type="string">
            <text:p text:style-name="P79">Pulse &amp; Color Shift</text:p>
          </table:table-cell>
          <table:table-cell table:style-name="Table16.A1" office:value-type="string">
            <text:p text:style-name="P79"><text:span text:style-name="Strong_20_Emphasis">Linear Blue-to-White Lerp</text:span></text:p>
          </table:table-cell>
          <table:table-cell table:style-name="Table16.A1" office:value-type="string">
            <text:p text:style-name="P79">Maintains the data signal without visual noise or shader overhead.</text:p>
          </table:table-cell>
        </table:table-row>
      </table:table>
      <text:p text:style-name="P83"><text:span text:style-name="Strong_20_Emphasis">Performance Gain:</text:span> By switching to the Blue-to-White scale, the engine reduces the CPU-to-GPU uniform update frequency and bypasses the multi-pass aberration shader.</text:p>
      <text:h text:style-name="P76" text:outline-level="4"><text:bookmark-start text:name="__RefHeading___Toc560541_2813440148"/>2.2.E. Cognitive Load <text:span text:style-name="T400">Exposure</text:span><text:bookmark-end text:name="__RefHeading___Toc560541_2813440148"/></text:h>
      <text:p text:style-name="P83"><text:span text:style-name="Strong_20_Emphasis">Summary:</text:span> Visualizes the "Mental RAM" required to understand a file. Unlike Lines of Code (which measures physical size), Cognitive Load measures the density of decision-making and the "tangleness" of logic. A healthy engineering culture admits that human working memory is a finite resource. This metric is a tool for <text:span text:style-name="Strong_20_Emphasis">Engineering Empathy.</text:span> We recognize that complex problems often require complex solutions; we don't measure 'Tangled Logic' to critique the necessity of the code, but to surface it so the team can be honest about which files require the most mental overhead. Surfacing 'Brain Melting' zones is an act of transparency that protects the team from burnout by identifying where the highest cognitive tax is being paid.</text:p>
      <text:p text:style-name="P83"><text:span text:style-name="Strong_20_Emphasis">Effect:</text:span> Modulates the color spectrum toward Deep Glowing Purple (#800080).</text:p>
      <text:h text:style-name="P77" text:outline-level="5"><text:bookmark-start text:name="__RefHeading___Toc560543_2813440148"/>2.2.E.1. The Philosophy: The Entropy of Understanding<text:bookmark-end text:name="__RefHeading___Toc560543_2813440148"/></text:h>
      <text:p text:style-name="P83">Human working memory is a biological bottleneck. Every time a developer encounters a nested if, a complex ternary, or a manual memory management keyword, they must "cache" the current state in their brain. This represents the total <text:span text:style-name="Strong_20_Emphasis">Cognitive Load</text:span> of a module.</text:p>
      <text:p text:style-name="P83">In GitGalaxy, we treat code as a thermal system where logic generates heat and documentation provides cooling. By being honest about where the <text:span text:style-name="Strong_20_Emphasis">Cognitive Load</text:span> is "hot," we move away from performance judgment and toward resource management. We acknowledge that "High Load" is often a requirement of high-performance or high-utility code; the goal is visibility, not elimination.</text:p>
      <text:list text:style-name="L73">
        <text:list-item>
          <text:p text:style-name="P285"><text:span text:style-name="Strong_20_Emphasis">Low Cognitive Load:</text:span> Linear code that reads like a story; low impact on the developer's working memory.</text:p>
        </text:list-item>
        <text:list-item>
          <text:p text:style-name="P285"><text:span text:style-name="Strong_20_Emphasis">High Cognitive Load:</text:span> Necessary but complex logic that requires the developer to simulate multiple realities simultaneously; identifies areas that require peak focus.</text:p>
        </text:list-item>
      </text:list>
      <text:h text:style-name="Heading_20_5" text:outline-level="5"><text:bookmark-start text:name="__RefHeading___Toc42118_730389025"/><text:soft-page-break/><text:span text:style-name="T457">2.2.E.2</text:span>. The Philosophy: Mental Friction Density<text:bookmark-end text:name="__RefHeading___Toc42118_730389025"/></text:h>
      <text:p text:style-name="P106"><text:span text:style-name="Strong_20_Emphasis">"Not how big it is, but how hard it is to read."</text:span></text:p>
      <text:p text:style-name="P106">We measure the <text:span text:style-name="Strong_20_Emphasis">density of decision-making</text:span> per line of code. Unlike "Mass" (Star Size), which measures volume, this exposure highlights "Brain Melting" zones—code that requires a developer to hold multiple states, timelines, or abstract concepts in their working memory simultaneously.</text:p>
      <text:list text:style-name="L74">
        <text:list-item>
          <text:p text:style-name="P286"><text:span text:style-name="Strong_20_Emphasis">Low Score (0 - Basal White):</text:span> Linear flow. Data definitions. Configs. (e.g., HTML, JSON, simple DTOs).</text:p>
        </text:list-item>
        <text:list-item>
          <text:p text:style-name="P286"><text:span text:style-name="Strong_20_Emphasis">High Score (100 - Radioactive Purple):</text:span> High branching, async timing, state mutation, and meta-programming packed into a tight space.</text:p>
        </text:list-item>
      </text:list>
      <text:h text:style-name="Heading_20_5" text:outline-level="5"><text:bookmark-start text:name="__RefHeading___Toc42120_730389025"/><text:span text:style-name="T457">2.2.E.3. </text:span>The Inputs (Regex &amp; Heuristics)<text:bookmark-end text:name="__RefHeading___Toc42120_730389025"/></text:h>
      <text:p text:style-name="P106">We utilize the pre-calculated hits from <text:span text:style-name="Source_20_Text">scanner_config.py</text:span>. We weight them based on the "Mental Tax" they impose on the reader.</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5">Input Variable</text:p>
          </table:table-cell>
          <table:table-cell table:style-name="Table5.A1" office:value-type="string">
            <text:p text:style-name="P105">Regex Key</text:p>
          </table:table-cell>
          <table:table-cell table:style-name="Table5.A1" office:value-type="string">
            <text:p text:style-name="P105">Weight</text:p>
          </table:table-cell>
          <table:table-cell table:style-name="Table5.A1" office:value-type="string">
            <text:p text:style-name="P105">Typical Count (100 LOC File)</text:p>
          </table:table-cell>
          <table:table-cell table:style-name="Table5.A1" office:value-type="string">
            <text:p text:style-name="P105">Rationale</text:p>
          </table:table-cell>
        </table:table-row>
        <table:table-row>
          <table:table-cell table:style-name="Table5.A1" office:value-type="string">
            <text:p text:style-name="P104"><text:span text:style-name="Strong_20_Emphasis">BranchHits</text:span></text:p>
          </table:table-cell>
          <table:table-cell table:style-name="Table5.A1" office:value-type="string">
            <text:p text:style-name="P104"><text:span text:style-name="Source_20_Text">branch</text:span></text:p>
          </table:table-cell>
          <table:table-cell table:style-name="Table5.A1" office:value-type="string">
            <text:p text:style-name="P104"><text:span text:style-name="Strong_20_Emphasis">1.0x</text:span></text:p>
          </table:table-cell>
          <table:table-cell table:style-name="Table5.A1" office:value-type="string">
            <text:p text:style-name="P104">~15</text:p>
          </table:table-cell>
          <table:table-cell table:style-name="Table5.A1" office:value-type="string">
            <text:p text:style-name="P104">The baseline of decision making (if/else). Each branch forks the mental model.</text:p>
          </table:table-cell>
        </table:table-row>
        <table:table-row>
          <table:table-cell table:style-name="Table5.A1" office:value-type="string">
            <text:p text:style-name="P104"><text:span text:style-name="Strong_20_Emphasis">FluxHits</text:span></text:p>
          </table:table-cell>
          <table:table-cell table:style-name="Table5.A1" office:value-type="string">
            <text:p text:style-name="P104"><text:span text:style-name="Source_20_Text">flux</text:span></text:p>
          </table:table-cell>
          <table:table-cell table:style-name="Table5.A1" office:value-type="string">
            <text:p text:style-name="P104"><text:span text:style-name="Strong_20_Emphasis">2.0x</text:span></text:p>
          </table:table-cell>
          <table:table-cell table:style-name="Table5.A1" office:value-type="string">
            <text:p text:style-name="P104">~5</text:p>
          </table:table-cell>
          <table:table-cell table:style-name="Table5.A1" office:value-type="string">
            <text:p text:style-name="P104"><text:span text:style-name="Strong_20_Emphasis">State Mutation.</text:span> Tracking variables changing values (<text:span text:style-name="Source_20_Text">var</text:span>, <text:span text:style-name="Source_20_Text">set</text:span>) taxes short-term memory more than static logic.</text:p>
          </table:table-cell>
        </table:table-row>
        <table:table-row>
          <table:table-cell table:style-name="Table5.A1" office:value-type="string">
            <text:p text:style-name="P104"><text:span text:style-name="Strong_20_Emphasis">AsyncHits</text:span></text:p>
          </table:table-cell>
          <table:table-cell table:style-name="Table5.A1" office:value-type="string">
            <text:p text:style-name="P104"><text:span text:style-name="Source_20_Text">concurrency</text:span></text:p>
          </table:table-cell>
          <table:table-cell table:style-name="Table5.A1" office:value-type="string">
            <text:p text:style-name="P104"><text:span text:style-name="Strong_20_Emphasis">3.0x</text:span></text:p>
          </table:table-cell>
          <table:table-cell table:style-name="Table5.A1" office:value-type="string">
            <text:p text:style-name="P104">~2</text:p>
          </table:table-cell>
          <table:table-cell table:style-name="Table5.A1" office:value-type="string">
            <text:p text:style-name="P104"><text:span text:style-name="Strong_20_Emphasis">Temporal Complexity.</text:span> Logic that jumps in time (<text:span text:style-name="Source_20_Text">await</text:span>, <text:span text:style-name="Source_20_Text">promise</text:span>) forces the reader to track non-linear execution.</text:p>
          </table:table-cell>
        </table:table-row>
        <table:table-row>
          <table:table-cell table:style-name="Table5.A1" office:value-type="string">
            <text:p text:style-name="P104"><text:span text:style-name="Strong_20_Emphasis">HeatTriggers</text:span></text:p>
          </table:table-cell>
          <table:table-cell table:style-name="Table5.A1" office:value-type="string">
            <text:p text:style-name="P104"><text:span text:style-name="Source_20_Text">heat_triggers</text:span></text:p>
          </table:table-cell>
          <table:table-cell table:style-name="Table5.A1" office:value-type="string">
            <text:p text:style-name="P104"><text:span text:style-name="Strong_20_Emphasis">5.0x</text:span></text:p>
          </table:table-cell>
          <table:table-cell table:style-name="Table5.A1" office:value-type="string">
            <text:p text:style-name="P104">~1</text:p>
          </table:table-cell>
          <table:table-cell table:style-name="Table5.A1" office:value-type="string">
            <text:p text:style-name="P104"><text:span text:style-name="Strong_20_Emphasis">Abstraction penalty.</text:span> Macros, reflection, and dynamic dispatch hide the true logic, forcing "mental compilation."</text:p>
          </table:table-cell>
        </table:table-row>
        <table:table-row>
          <table:table-cell table:style-name="Table5.A1" office:value-type="string">
            <text:p text:style-name="P104"><text:span text:style-name="Strong_20_Emphasis">DangerHits</text:span></text:p>
          </table:table-cell>
          <table:table-cell table:style-name="Table5.A1" office:value-type="string">
            <text:p text:style-name="P104"><text:span text:style-name="Source_20_Text">danger</text:span></text:p>
          </table:table-cell>
          <table:table-cell table:style-name="Table5.A1" office:value-type="string">
            <text:p text:style-name="P104"><text:span text:style-name="Strong_20_Emphasis">5.0x</text:span></text:p>
          </table:table-cell>
          <table:table-cell table:style-name="Table5.A1" office:value-type="string">
            <text:p text:style-name="P104">0</text:p>
          </table:table-cell>
          <table:table-cell table:style-name="Table5.A1" office:value-type="string">
            <text:p text:style-name="P104"><text:span text:style-name="Strong_20_Emphasis">Anxiety.</text:span> <text:span text:style-name="Source_20_Text">eval</text:span> or <text:span text:style-name="Source_20_Text">unsafe</text:span> forces the brain into a slow, high-alert verification mode.</text:p>
          </table:table-cell>
        </table:table-row>
        <table:table-row>
          <table:table-cell table:style-name="Table5.A1" office:value-type="string">
            <text:p text:style-name="P104"><text:span text:style-name="Strong_20_Emphasis">DocHits</text:span></text:p>
          </table:table-cell>
          <table:table-cell table:style-name="Table5.A1" office:value-type="string">
            <text:p text:style-name="P104"><text:span text:style-name="Source_20_Text">doc</text:span></text:p>
          </table:table-cell>
          <table:table-cell table:style-name="Table5.A1" office:value-type="string">
            <text:p text:style-name="P104"><text:span text:style-name="Strong_20_Emphasis">Cooling</text:span></text:p>
          </table:table-cell>
          <table:table-cell table:style-name="Table5.A1" office:value-type="string">
            <text:p text:style-name="P104">~5</text:p>
          </table:table-cell>
          <table:table-cell table:style-name="Table5.A1" office:value-type="string">
            <text:p text:style-name="P104">Structured documentation (<text:span text:style-name="Source_20_Text">@param</text:span>) provides mental shortcuts, reducing the <text:soft-page-break/>effective load.</text:p>
          </table:table-cell>
        </table:table-row>
      </table:table>
      <text:h text:style-name="Heading_20_5" text:outline-level="5"><text:bookmark-start text:name="__RefHeading___Toc42122_730389025"/><text:span text:style-name="T457">2.2.E.4</text:span>. The Universal Framework Integration<text:bookmark-end text:name="__RefHeading___Toc42122_730389025"/></text:h>
      <text:p text:style-name="P106">We apply the standard variables to ensure fairness across languages.</text:p>
      <text:list text:style-name="L75">
        <text:list-item>
          <text:p text:style-name="P287"><text:span text:style-name="Source_20_Text">Irc</text:span><text:span text:style-name="Strong_20_Emphasis"> (Implicit Risk Correction):</text:span> Added to the <text:span text:style-name="Strong_20_Emphasis">Weighted Complexity</text:span>. Opaque languages (Shell, Perl) get a baseline complexity penalty because the syntax itself implies hidden logic.</text:p>
        </text:list-item>
        <text:list-item>
          <text:p text:style-name="P287"><text:span text:style-name="Source_20_Text">Fc</text:span><text:span text:style-name="Strong_20_Emphasis"> (Fidelity Coefficient):</text:span> Applied to the <text:span text:style-name="Strong_20_Emphasis">Cooling Factor</text:span>. We trust documentation in explicit languages (Java) more than in implicit ones (Ruby) where comments might drift from reality.</text:p>
        </text:list-item>
        <text:list-item>
          <text:p text:style-name="P287"><text:span text:style-name="Source_20_Text">Mp</text:span><text:span text:style-name="Strong_20_Emphasis"> (Path Modifier):</text:span> <text:span text:style-name="Strong_20_Emphasis">REMOVED.</text:span> We measure Absolute Complexity. A complex file in <text:span text:style-name="Source_20_Text">core/</text:span> is just as difficult to read as a complex file in <text:span text:style-name="Source_20_Text">utils/</text:span>. The goal is to expose truth, not hide "expected" complexity.</text:p>
        </text:list-item>
      </text:list>
      <text:h text:style-name="Heading_20_5" text:outline-level="5"><text:bookmark-start text:name="__RefHeading___Toc42124_730389025"/><text:span text:style-name="T457">2.2.E.6</text:span>. The Equation: The "Badge of Honor" Sigmoid<text:bookmark-end text:name="__RefHeading___Toc42124_730389025"/></text:h>
      <text:p text:style-name="P106">We use a <text:span text:style-name="Strong_20_Emphasis">Logistic Function (Sigmoid)</text:span> tuned to be forgiving of moderate complexity but demanding of high complexity.</text:p>
      <text:p text:style-name="Text_20_body"><text:bookmark-start text:name="__RefHeading___Toc42126_730389025"/>Step A: Calculate Weighted Complexity (The Synergistic Sum)<text:bookmark-end text:name="__RefHeading___Toc42126_730389025"/></text:p>
      <text:p text:style-name="P106">We sum the stressors. Note that <text:span text:style-name="Source_20_Text">Irc</text:span> is added here, ensuring that implicit languages start with a higher baseline friction.</text:p>
      <text:p text:style-name="Text_20_body"><text:bookmark-start text:name="__RefHeading___Toc42128_730389025"/>Step B: Calculate Density (The Intensity)<text:bookmark-end text:name="__RefHeading___Toc42128_730389025"/></text:p>
      <text:p text:style-name="P106">We normalize complexity against mass. This represents "Complexity per Line of Code."</text:p>
      <text:p text:style-name="Text_20_body"><text:bookmark-start text:name="__RefHeading___Toc42130_730389025"/>Step C: The Sigmoid Curve (The Score)<text:bookmark-end text:name="__RefHeading___Toc42130_730389025"/></text:p>
      <text:p text:style-name="P106">We map density to a 0-100 scale using a Sigmoid with tunable levers.</text:p>
      <text:list text:style-name="L76">
        <text:list-item>
          <text:p text:style-name="P288"><text:span text:style-name="Strong_20_Emphasis">Threshold ():</text:span> <text:span text:style-name="Strong_20_Emphasis">0.75</text:span>. This pushes the "center" of the curve to the right. Code must have a high density (0.75 weighted points per line) just to reach a score of 50.</text:p>
        </text:list-item>
        <text:list-item>
          <text:p text:style-name="P288"><text:span text:style-name="Strong_20_Emphasis">Slope ():</text:span> <text:span text:style-name="Strong_20_Emphasis">4.0</text:span>. A moderate slope ensures a smooth transition rather than a sudden wall. It allows for nuance in the 50-80 range.</text:p>
        </text:list-item>
      </text:list>
      <text:list text:style-name="L77">
        <text:list-item>
          <text:p text:style-name="P289"><text:span text:style-name="Emphasis">At Density 0.2 (Standard):</text:span> Score 10 (Very Low)</text:p>
        </text:list-item>
        <text:list-item>
          <text:p text:style-name="P289"><text:span text:style-name="Emphasis">At Density 0.5 (Complex):</text:span> Score 26 (Moderate)</text:p>
        </text:list-item>
        <text:list-item>
          <text:p text:style-name="P289"><text:span text:style-name="Emphasis">At Density 0.75 (Heavy):</text:span> Score = 50 (The Tipping Point)</text:p>
        </text:list-item>
        <text:list-item>
          <text:p text:style-name="P289"><text:soft-page-break/><text:span text:style-name="Emphasis">At Density 1.5 (Extreme):</text:span> Score 95 (Rare Badge of Honor)</text:p>
        </text:list-item>
      </text:list>
      <text:p text:style-name="Text_20_body"><text:bookmark-start text:name="__RefHeading___Toc42132_730389025"/>Step D: The Cooling Factor (The Antidote)<text:bookmark-end text:name="__RefHeading___Toc42132_730389025"/></text:p>
      <text:p text:style-name="P106">Documentation reduces load, but <text:span text:style-name="Strong_20_Emphasis">never to zero</text:span>. Complex logic is still complex, even if explained well. We cap the cooling effect at <text:span text:style-name="Strong_20_Emphasis">50% (0.5)</text:span>.</text:p>
      <text:h text:style-name="Heading_20_5" text:outline-level="5"><text:bookmark-start text:name="__RefHeading___Toc42134_730389025"/><text:span text:style-name="T457">2.2.E.7</text:span>. Implementation (Python Reference)<text:bookmark-end text:name="__RefHeading___Toc42134_730389025"/></text:h>
      <text:p text:style-name="P102"><text:span text:style-name="Source_20_Text">import math</text:span></text:p>
      <text:p text:style-name="P102"/>
      <text:p text:style-name="P102"><text:span text:style-name="Source_20_Text">def calculate_cognitive_load(self, data, fc, irc):</text:span></text:p>
      <text:p text:style-name="P102"><text:span text:style-name="Source_20_Text"><text:s text:c="4"/>"""</text:span></text:p>
      <text:p text:style-name="P102"><text:span text:style-name="Source_20_Text"><text:s text:c="4"/>Calculates 2.2.E Cognitive Load Exposure via Sigmoid Curve.</text:span></text:p>
      <text:p text:style-name="P102"><text:span text:style-name="Source_20_Text"><text:s text:c="4"/>Returns int 0-100.</text:span></text:p>
      <text:p text:style-name="P102"><text:span text:style-name="Source_20_Text"><text:s text:c="4"/>"""</text:span></text:p>
      <text:p text:style-name="P102"><text:span text:style-name="Source_20_Text"><text:s text:c="4"/># 1. Inputs</text:span></text:p>
      <text:p text:style-name="P102"><text:span text:style-name="Source_20_Text"><text:s text:c="4"/>loc = max(data['meaningful_loc'], 1)</text:span></text:p>
      <text:p text:style-name="P102"><text:span text:style-name="Source_20_Text"><text:s text:c="4"/>branch = data['hits']['branch']</text:span></text:p>
      <text:p text:style-name="P102"><text:span text:style-name="Source_20_Text"><text:s text:c="4"/>flux = data['hits']['flux']</text:span></text:p>
      <text:p text:style-name="P102"><text:span text:style-name="Source_20_Text"><text:s text:c="4"/>async_hits = data['hits']['concurrency']</text:span></text:p>
      <text:p text:style-name="P102"><text:span text:style-name="Source_20_Text"><text:s text:c="4"/>heat = data['hits']['heat_triggers']</text:span></text:p>
      <text:p text:style-name="P102"><text:span text:style-name="Source_20_Text"><text:s text:c="4"/>danger = data['hits']['danger']</text:span></text:p>
      <text:p text:style-name="P102"><text:span text:style-name="Source_20_Text"><text:s text:c="4"/>docs = data['hits']['doc']</text:span></text:p>
      <text:p text:style-name="P102"/>
      <text:p text:style-name="P102"><text:span text:style-name="Source_20_Text"><text:s text:c="4"/># 2. Step A: Synergistic Weighted Sum</text:span></text:p>
      <text:p text:style-name="P102"><text:span text:style-name="Source_20_Text"><text:s text:c="4"/># Note: Irc is added to the numerator to penalize small implicit files.</text:span></text:p>
      <text:p text:style-name="P102"><text:span text:style-name="Source_20_Text"><text:s text:c="4"/>weighted_complexity = (</text:span></text:p>
      <text:p text:style-name="P102"><text:span text:style-name="Source_20_Text"><text:s text:c="8"/>(branch * 1.0) + </text:span></text:p>
      <text:p text:style-name="P102"><text:span text:style-name="Source_20_Text"><text:s text:c="8"/>(flux * 2.0) + </text:span></text:p>
      <text:p text:style-name="P102"><text:span text:style-name="Source_20_Text"><text:s text:c="8"/>(async_hits * 3.0) + </text:span></text:p>
      <text:p text:style-name="P102"><text:span text:style-name="Source_20_Text"><text:s text:c="8"/>(heat * 5.0) + </text:span></text:p>
      <text:p text:style-name="P102"><text:span text:style-name="Source_20_Text"><text:s text:c="8"/>(danger * 5.0) + </text:span></text:p>
      <text:p text:style-name="P102"><text:span text:style-name="Source_20_Text"><text:s text:c="8"/>irc </text:span></text:p>
      <text:p text:style-name="P102"><text:span text:style-name="Source_20_Text"><text:s text:c="4"/>)</text:span></text:p>
      <text:p text:style-name="P102"/>
      <text:p text:style-name="P102"><text:span text:style-name="Source_20_Text"><text:s text:c="4"/># 3. Step B: Density Calculation</text:span></text:p>
      <text:p text:style-name="P102"><text:span text:style-name="Source_20_Text"><text:s text:c="4"/>density = weighted_complexity / loc</text:span></text:p>
      <text:p text:style-name="P102"/>
      <text:p text:style-name="P102"><text:span text:style-name="Source_20_Text"><text:s text:c="4"/># 4. Step C: Sigmoid Curve (The Badge of Honor)</text:span></text:p>
      <text:p text:style-name="P102"><text:span text:style-name="Source_20_Text"><text:s text:c="4"/># Threshold (T) = 0.75: Pushes the "50" mark to high density.</text:span></text:p>
      <text:p text:style-name="P102"><text:span text:style-name="Source_20_Text"><text:s text:c="4"/># Slope (K) = 4.0: Gentle rise, making high scores hard to earn.</text:span></text:p>
      <text:p text:style-name="P102"><text:span text:style-name="Source_20_Text"><text:s text:c="4"/>threshold = 0.75</text:span></text:p>
      <text:p text:style-name="P102"><text:span text:style-name="Source_20_Text"><text:s text:c="4"/>slope = 4.0</text:span></text:p>
      <text:p text:style-name="P102"><text:span text:style-name="Source_20_Text"><text:s text:c="4"/></text:span></text:p>
      <text:p text:style-name="P102"><text:span text:style-name="Source_20_Text"><text:s text:c="4"/>try:</text:span></text:p>
      <text:p text:style-name="P102"><text:span text:style-name="Source_20_Text"><text:s text:c="8"/>raw_score = 100 / (1 + math.exp(-slope * (density - threshold)))</text:span></text:p>
      <text:p text:style-name="P102"><text:span text:style-name="Source_20_Text"><text:s text:c="4"/>except OverflowError:</text:span></text:p>
      <text:p text:style-name="P102"><text:span text:style-name="Source_20_Text"><text:s text:c="8"/># Handle overflow for extreme density values</text:span></text:p>
      <text:p text:style-name="P102"><text:span text:style-name="Source_20_Text"><text:s text:c="8"/>raw_score = 100 if density &gt; threshold else 0</text:span></text:p>
      <text:p text:style-name="P102"/>
      <text:p text:style-name="P102"><text:span text:style-name="Source_20_Text"><text:s text:c="4"/># 5. Step D: Cooling Factor (Docs)</text:span></text:p>
      <text:p text:style-name="P102"><text:span text:style-name="Source_20_Text"><text:s text:c="4"/># We trust docs based on Fidelity (Fc). Max cooling is 50%.</text:span></text:p>
      <text:p text:style-name="P102"><text:span text:style-name="Source_20_Text"><text:s text:c="4"/>doc_coverage = (docs * 10) / loc</text:span></text:p>
      <text:p text:style-name="P102"><text:span text:style-name="Source_20_Text"><text:s text:c="4"/>cooling = max(0.5, 1.0 - (doc_coverage * fc))</text:span></text:p>
      <text:p text:style-name="P102"/>
      <text:p text:style-name="P102"><text:span text:style-name="Source_20_Text"><text:s text:c="4"/># Final Calculation (No Mp)</text:span></text:p>
      <text:p text:style-name="P102"><text:span text:style-name="Source_20_Text"><text:s text:c="4"/>final_score = raw_score * cooling</text:span></text:p>
      <text:p text:style-name="P102"><text:soft-page-break/><text:span text:style-name="Source_20_Text"><text:s text:c="4"/></text:span></text:p>
      <text:p text:style-name="P103"><text:span text:style-name="Source_20_Text"><text:s text:c="4"/>return int(min(final_score, 100))</text:span></text:p>
      <text:h text:style-name="Heading_20_5" text:outline-level="5"><text:bookmark-start text:name="__RefHeading___Toc42136_730389025"/><text:span text:style-name="T457">2.2.E.8.</text:span> Visual Verification ("The Truth")<text:bookmark-end text:name="__RefHeading___Toc42136_730389025"/></text:h>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05">Scenario</text:p>
          </table:table-cell>
          <table:table-cell table:style-name="Table6.A1" office:value-type="string">
            <text:p text:style-name="P105">Mass (Size)</text:p>
          </table:table-cell>
          <table:table-cell table:style-name="Table6.A1" office:value-type="string">
            <text:p text:style-name="P105">Density</text:p>
          </table:table-cell>
          <table:table-cell table:style-name="Table6.A1" office:value-type="string">
            <text:p text:style-name="P105">Raw Score</text:p>
          </table:table-cell>
          <table:table-cell table:style-name="Table6.A1" office:value-type="string">
            <text:p text:style-name="P105">Why?</text:p>
          </table:table-cell>
        </table:table-row>
        <table:table-row>
          <table:table-cell table:style-name="Table6.A1" office:value-type="string">
            <text:p text:style-name="P104"><text:span text:style-name="Strong_20_Emphasis">Big JSON Config</text:span></text:p>
          </table:table-cell>
          <table:table-cell table:style-name="Table6.A1" office:value-type="string">
            <text:p text:style-name="P104"><text:span text:style-name="Strong_20_Emphasis">Huge Star</text:span></text:p>
          </table:table-cell>
          <table:table-cell table:style-name="Table6.A1" office:value-type="string">
            <text:p text:style-name="P104">0.0</text:p>
          </table:table-cell>
          <table:table-cell table:style-name="Table6.A1" office:value-type="string">
            <text:p text:style-name="P104"><text:span text:style-name="Strong_20_Emphasis">4</text:span></text:p>
          </table:table-cell>
          <table:table-cell table:style-name="Table6.A1" office:value-type="string">
            <text:p text:style-name="P104">Minimal baseline. Effectively invisible.</text:p>
          </table:table-cell>
        </table:table-row>
        <table:table-row>
          <table:table-cell table:style-name="Table6.A1" office:value-type="string">
            <text:p text:style-name="P104"><text:span text:style-name="Strong_20_Emphasis">Standard React Component</text:span></text:p>
          </table:table-cell>
          <table:table-cell table:style-name="Table6.A1" office:value-type="string">
            <text:p text:style-name="P104"><text:span text:style-name="Strong_20_Emphasis">Medium Star</text:span></text:p>
          </table:table-cell>
          <table:table-cell table:style-name="Table6.A1" office:value-type="string">
            <text:p text:style-name="P104">0.2</text:p>
          </table:table-cell>
          <table:table-cell table:style-name="Table6.A1" office:value-type="string">
            <text:p text:style-name="P104"><text:span text:style-name="Strong_20_Emphasis">10</text:span></text:p>
          </table:table-cell>
          <table:table-cell table:style-name="Table6.A1" office:value-type="string">
            <text:p text:style-name="P104">Low score. Considered "Standard" complexity.</text:p>
          </table:table-cell>
        </table:table-row>
        <table:table-row>
          <table:table-cell table:style-name="Table6.A1" office:value-type="string">
            <text:p text:style-name="P104"><text:span text:style-name="Strong_20_Emphasis">Complex Algorithm</text:span></text:p>
          </table:table-cell>
          <table:table-cell table:style-name="Table6.A1" office:value-type="string">
            <text:p text:style-name="P104"><text:span text:style-name="Strong_20_Emphasis">Medium Star</text:span></text:p>
          </table:table-cell>
          <table:table-cell table:style-name="Table6.A1" office:value-type="string">
            <text:p text:style-name="P104">0.5</text:p>
          </table:table-cell>
          <table:table-cell table:style-name="Table6.A1" office:value-type="string">
            <text:p text:style-name="P104"><text:span text:style-name="Strong_20_Emphasis">26</text:span></text:p>
          </table:table-cell>
          <table:table-cell table:style-name="Table6.A1" office:value-type="string">
            <text:p text:style-name="P104">Noticeable, but not alarming. "Doing work."</text:p>
          </table:table-cell>
        </table:table-row>
        <table:table-row>
          <table:table-cell table:style-name="Table6.A1" office:value-type="string">
            <text:p text:style-name="P104"><text:span text:style-name="Strong_20_Emphasis">Heavy Logic Core</text:span></text:p>
          </table:table-cell>
          <table:table-cell table:style-name="Table6.A1" office:value-type="string">
            <text:p text:style-name="P104"><text:span text:style-name="Strong_20_Emphasis">Large Star</text:span></text:p>
          </table:table-cell>
          <table:table-cell table:style-name="Table6.A1" office:value-type="string">
            <text:p text:style-name="P104">0.75</text:p>
          </table:table-cell>
          <table:table-cell table:style-name="Table6.A1" office:value-type="string">
            <text:p text:style-name="P104"><text:span text:style-name="Strong_20_Emphasis">50</text:span></text:p>
          </table:table-cell>
          <table:table-cell table:style-name="Table6.A1" office:value-type="string">
            <text:p text:style-name="P104">The Tipping Point. This is where "Hard" begins.</text:p>
          </table:table-cell>
        </table:table-row>
        <table:table-row>
          <table:table-cell table:style-name="Table6.A1" office:value-type="string">
            <text:p text:style-name="P104"><text:span text:style-name="Strong_20_Emphasis">Small Regex Parser</text:span></text:p>
          </table:table-cell>
          <table:table-cell table:style-name="Table6.A1" office:value-type="string">
            <text:p text:style-name="P104"><text:span text:style-name="Strong_20_Emphasis">Tiny Star</text:span></text:p>
          </table:table-cell>
          <table:table-cell table:style-name="Table6.A1" office:value-type="string">
            <text:p text:style-name="P104">1.5</text:p>
          </table:table-cell>
          <table:table-cell table:style-name="Table6.A1" office:value-type="string">
            <text:p text:style-name="P104"><text:span text:style-name="Strong_20_Emphasis">95</text:span></text:p>
          </table:table-cell>
          <table:table-cell table:style-name="Table6.A1" office:value-type="string">
            <text:p text:style-name="P104"><text:span text:style-name="Strong_20_Emphasis">Rare.</text:span> Requires 1.5x complexity density per line.</text:p>
          </table:table-cell>
        </table:table-row>
      </table:table>
      <text:p text:style-name="P106"/>
      <text:p text:style-name="P107"><text:span text:style-name="Source_20_Text"><text:span text:style-name="T2"/></text:span></text:p>
      <text:h text:style-name="P34" text:outline-level="4"><text:bookmark-start text:name="__RefHeading___Toc11753_959624642 Copy 1"/><text:span text:style-name="T4">2.2.F. </text:span><text:span text:style-name="T5">Churn</text:span><text:bookmark-end text:name="__RefHeading___Toc11753_959624642 Copy 1"/></text:h>
      <text:h text:style-name="Heading_20_5" text:outline-level="5"><text:bookmark-start text:name="__RefHeading___Toc49793_1155106909"/><text:span text:style-name="Source_20_Text"><text:span text:style-name="T131">2.2.F.</text:span></text:span><text:span text:style-name="Source_20_Text"><text:span text:style-name="T132">A.</text:span></text:span><text:span text:style-name="Source_20_Text"><text:span text:style-name="T133"> The Philosophy: Relative Historical Volatility</text:span></text:span><text:bookmark-end text:name="__RefHeading___Toc49793_1155106909"/></text:h>
      <text:p text:style-name="P112">Churn measures the "Frequency of Interruption." However, "High Churn" is relative. In a startup, 10 commits/week is normal. In a legacy bank system, 1 commit/week is alarming.</text:p>
      <text:p text:style-name="P112">We use <text:span text:style-name="Strong_20_Emphasis">Auto-Scaling Normalization</text:span> to make this metric useful for <text:span text:style-name="Emphasis">any</text:span> project. The most volatile file in the repository always defines the "100" mark. All other files are measured relative to this local maximum.</text:p>
      <text:list text:style-name="L78">
        <text:list-item>
          <text:p text:style-name="P290"><text:span text:style-name="Strong_20_Emphasis">Low Score (0 - Cool Crystal):</text:span> The most stable files in <text:span text:style-name="Emphasis">this specific repo</text:span>.</text:p>
        </text:list-item>
        <text:list-item>
          <text:p text:style-name="P290"><text:span text:style-name="Strong_20_Emphasis">High Score (100 - Volatile Orange):</text:span> The single most changed file in the repo (relative to its age).</text:p>
        </text:list-item>
      </text:list>
      <text:h text:style-name="Heading_20_5" text:outline-level="5"><text:bookmark-start text:name="__RefHeading___Toc11753_959624642 Copy 1 Copy 1 Copy 1"/><text:span text:style-name="Source_20_Text"><text:span text:style-name="T131">2.2.F.</text:span></text:span><text:span text:style-name="T455">B</text:span>. The Inputs (Git History Data)<text:bookmark-end text:name="__RefHeading___Toc11753_959624642 Copy 1 Copy 1 Copy 1"/></text:h>
      <text:p text:style-name="P112">We rely on the version control history (Git) to extract "Deep Time" metrics.</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11">Input Variable</text:p>
          </table:table-cell>
          <table:table-cell table:style-name="Table3.A1" office:value-type="string">
            <text:p text:style-name="P111">Source</text:p>
          </table:table-cell>
          <table:table-cell table:style-name="Table3.A1" office:value-type="string">
            <text:p text:style-name="P111">Unit</text:p>
          </table:table-cell>
          <table:table-cell table:style-name="Table3.A1" office:value-type="string">
            <text:p text:style-name="P111">Rationale</text:p>
          </table:table-cell>
        </table:table-row>
        <table:table-row>
          <table:table-cell table:style-name="Table3.A1" office:value-type="string">
            <text:p text:style-name="P110"><text:span text:style-name="Strong_20_Emphasis">TotalCommits</text:span></text:p>
          </table:table-cell>
          <table:table-cell table:style-name="Table3.A1" office:value-type="string">
            <text:p text:style-name="P110"><text:span text:style-name="Source_20_Text">git rev-list --count</text:span></text:p>
          </table:table-cell>
          <table:table-cell table:style-name="Table3.A1" office:value-type="string">
            <text:p text:style-name="P110">Integer</text:p>
          </table:table-cell>
          <table:table-cell table:style-name="Table3.A1" office:value-type="string">
            <text:p text:style-name="P110">The raw volume of change. Every commit is a "stress event."</text:p>
          </table:table-cell>
        </table:table-row>
        <table:table-row>
          <table:table-cell table:style-name="Table3.A1" office:value-type="string">
            <text:p text:style-name="P110"><text:span text:style-name="Strong_20_Emphasis">FileAgeInWeeks</text:span></text:p>
          </table:table-cell>
          <table:table-cell table:style-name="Table3.A1" office:value-type="string">
            <text:p text:style-name="P110"><text:span text:style-name="Source_20_Text">git log --reverse</text:span></text:p>
          </table:table-cell>
          <table:table-cell table:style-name="Table3.A1" office:value-type="string">
            <text:p text:style-name="P110">Weeks</text:p>
          </table:table-cell>
          <table:table-cell table:style-name="Table3.A1" office:value-type="string">
            <text:p text:style-name="P110">The duration the file has existed. Used to calculate <text:span text:style-name="Emphasis">frequency</text:span>.</text:p>
          </table:table-cell>
        </table:table-row>
        <table:table-row>
          <table:table-cell table:style-name="Table3.A1" office:value-type="string">
            <text:p text:style-name="P110"><text:span text:style-name="Strong_20_Emphasis">RepoMaxFrequency</text:span></text:p>
          </table:table-cell>
          <table:table-cell table:style-name="Table3.A1" office:value-type="string">
            <text:p text:style-name="P110"><text:span text:style-name="Emphasis">Calculated</text:span></text:p>
          </table:table-cell>
          <table:table-cell table:style-name="Table3.A1" office:value-type="string">
            <text:p text:style-name="P110">Float</text:p>
          </table:table-cell>
          <table:table-cell table:style-name="Table3.A1" office:value-type="string">
            <text:p text:style-name="P110">The highest "Seismic Frequency" found in the entire repository during Pass 1.</text:p>
          </table:table-cell>
        </table:table-row>
      </table:table>
      <text:h text:style-name="Heading_20_5" text:outline-level="5"><text:bookmark-start text:name="__RefHeading___Toc11753_959624642 Copy 1 Copy 1 Copy 2"/><text:span text:style-name="Source_20_Text"><text:span text:style-name="T131">2.2.F.</text:span></text:span><text:span text:style-name="T455">C</text:span>. The Universal Framework Integration<text:bookmark-end text:name="__RefHeading___Toc11753_959624642 Copy 1 Copy 1 Copy 2"/></text:h>
      <text:p text:style-name="P112">While Churn is auto-scaled, we still apply the <text:span text:style-name="Strong_20_Emphasis">Path Modifier (</text:span><text:span text:style-name="Source_20_Text">Mp</text:span><text:span text:style-name="Strong_20_Emphasis">)</text:span> to account for architectural expectations <text:span text:style-name="Emphasis">after</text:span> normalization.</text:p>
      <text:list text:style-name="L79">
        <text:list-item>
          <text:p text:style-name="P291"><text:span text:style-name="Source_20_Text">Fc</text:span><text:span text:style-name="Strong_20_Emphasis"> (Fidelity Coefficient):</text:span> <text:span text:style-name="Strong_20_Emphasis">Not Applied.</text:span> History is absolute.</text:p>
        </text:list-item>
        <text:list-item>
          <text:p text:style-name="P291"><text:span text:style-name="Source_20_Text">Irc</text:span><text:span text:style-name="Strong_20_Emphasis"> (Implicit Risk Correction):</text:span> <text:span text:style-name="Strong_20_Emphasis">Not Applied.</text:span></text:p>
        </text:list-item>
        <text:list-item>
          <text:p text:style-name="P291"><text:span text:style-name="Source_20_Text">Mp</text:span><text:span text:style-name="Strong_20_Emphasis"> (Path Modifier):</text:span> <text:span text:style-name="Strong_20_Emphasis">Applied.</text:span> We expect high churn in <text:span text:style-name="Source_20_Text">experiments/</text:span> (Low Mp), but high churn in <text:span text:style-name="Source_20_Text">kernel/</text:span> is a critical warning (High Mp).</text:p>
        </text:list-item>
      </text:list>
      <text:h text:style-name="Heading_20_5" text:outline-level="5"><text:bookmark-start text:name="__RefHeading___Toc11753_959624642 Copy 1 Copy 1 Copy 3"/><text:span text:style-name="Source_20_Text"><text:span text:style-name="T131">2.2.F.</text:span></text:span><text:span text:style-name="T455">D</text:span>. The Equation: The Two-Pass Relative Seismic Model<text:bookmark-end text:name="__RefHeading___Toc11753_959624642 Copy 1 Copy 1 Copy 3"/></text:h>
      <text:p text:style-name="P112">We leverage the existing <text:span text:style-name="Strong_20_Emphasis"><text:span text:style-name="T195">Two-Pass Scanner Architecture</text:span></text:span><text:span text:style-name="T195"> </text:span>to implement auto-scaling efficiently.</text:p>
      <text:p text:style-name="Text_20_body"><text:bookmark-start text:name="__RefHeading___Toc42138_730389025"/>Phase 1: Survey (The First Pass)<text:bookmark-end text:name="__RefHeading___Toc42138_730389025"/></text:p>
      <text:p text:style-name="P112">During the initial file scan, we calculate the <text:span text:style-name="Strong_20_Emphasis"><text:span text:style-name="T195">Raw Seismic Frequency</text:span></text:span> for every file and track the global maximum.</text:p>
      <text:list text:style-name="L80">
        <text:list-item>
          <text:p text:style-name="P193"><text:span text:style-name="Source_20_Text">freq = commits / math.sqrt(age_weeks)</text:span></text:p>
        </text:list-item>
        <text:list-item>
          <text:p text:style-name="P292"><text:span text:style-name="Strong_20_Emphasis">Why Square Root?</text:span> It dampens the penalty for very old files. A 10-year-old file with 1000 commits (sustained activity) is still a hotspot, but less so than a 1-month-old file with 100 commits (explosive activity).</text:p>
        </text:list-item>
        <text:list-item>
          <text:p text:style-name="P292"><text:span text:style-name="Strong_20_Emphasis">Action:</text:span> Store <text:span text:style-name="Source_20_Text">Frequency</text:span> in the file object. Update <text:span text:style-name="Source_20_Text">GlobalMaxFrequency</text:span> if current is higher.</text:p>
        </text:list-item>
      </text:list>
      <text:p text:style-name="Text_20_body"><text:bookmark-start text:name="__RefHeading___Toc42140_730389025"/>Phase 2: Normalization (The Second Pass)<text:bookmark-end text:name="__RefHeading___Toc42140_730389025"/></text:p>
      <text:p text:style-name="P112">Once all files are scanned and the true <text:span text:style-name="Source_20_Text">GlobalMaxFrequency</text:span> is known, we revisit every file to calculate the final relative score.</text:p>
      <text:p text:style-name="Text_20_body"><text:bookmark-start text:name="__RefHeading___Toc42142_730389025"/>Phase 3: Context Adjustment<text:bookmark-end text:name="__RefHeading___Toc42142_730389025"/></text:p>
      <text:p text:style-name="P112"><text:soft-page-break/>Finally, we apply the Path Modifier (<text:span text:style-name="Source_20_Text">Mp</text:span>) to dampen or amplify the significance of that churn based on location.</text:p>
      <text:h text:style-name="Heading_20_5" text:outline-level="5"><text:bookmark-start text:name="__RefHeading___Toc11753_959624642 Copy 1 Copy 1 Copy 4"/><text:span text:style-name="Source_20_Text"><text:span text:style-name="T131">2.2.F.</text:span></text:span><text:span text:style-name="T455">E</text:span>. Implementation (Python Reference)<text:bookmark-end text:name="__RefHeading___Toc11753_959624642 Copy 1 Copy 1 Copy 4"/></text:h>
      <text:p text:style-name="P112">This integrates seamlessly into <text:span text:style-name="Source_20_Text">scanner2.py</text:span>. We collect raw data in <text:span text:style-name="Source_20_Text">analyze_file</text:span> and normalize it in <text:span text:style-name="Source_20_Text">second_pass</text:span>.</text:p>
      <text:p text:style-name="P108"><text:span text:style-name="Source_20_Text">import math</text:span></text:p>
      <text:p text:style-name="P108"/>
      <text:p text:style-name="P108"><text:span text:style-name="Source_20_Text">class ChurnCalculator:</text:span></text:p>
      <text:p text:style-name="P108"><text:span text:style-name="Source_20_Text"><text:s text:c="4"/>def __init__(self):</text:span></text:p>
      <text:p text:style-name="P108"><text:span text:style-name="Source_20_Text"><text:s text:c="8"/>self.max_freq = 0.0</text:span></text:p>
      <text:p text:style-name="P108"/>
      <text:p text:style-name="P108"><text:span text:style-name="Source_20_Text"><text:s text:c="4"/>def calculate_raw_frequency(self, file_data):</text:span></text:p>
      <text:p text:style-name="P108"><text:span text:style-name="Source_20_Text"><text:s text:c="8"/>"""</text:span></text:p>
      <text:p text:style-name="P108"><text:span text:style-name="Source_20_Text"><text:s text:c="8"/>Phase 1: Calculate Raw Frequency and update Global Max.</text:span></text:p>
      <text:p text:style-name="P108"><text:span text:style-name="Source_20_Text"><text:s text:c="8"/>Called inside 'analyze_file'.</text:span></text:p>
      <text:p text:style-name="P108"><text:span text:style-name="Source_20_Text"><text:s text:c="8"/>"""</text:span></text:p>
      <text:p text:style-name="P108"><text:span text:style-name="Source_20_Text"><text:s text:c="8"/>commits = file_data.get('git_commits', 0)</text:span></text:p>
      <text:p text:style-name="P108"><text:span text:style-name="Source_20_Text"><text:s text:c="8"/>age_weeks = max(file_data.get('git_age_weeks', 1), 1)</text:span></text:p>
      <text:p text:style-name="P108"><text:span text:style-name="Source_20_Text"><text:s text:c="8"/></text:span></text:p>
      <text:p text:style-name="P108"><text:span text:style-name="Source_20_Text"><text:s text:c="8"/># Raw Seismic Frequency</text:span></text:p>
      <text:p text:style-name="P108"><text:span text:style-name="Source_20_Text"><text:s text:c="8"/>freq = commits / math.sqrt(age_weeks)</text:span></text:p>
      <text:p text:style-name="P108"><text:span text:style-name="Source_20_Text"><text:s text:c="8"/></text:span></text:p>
      <text:p text:style-name="P108"><text:span text:style-name="Source_20_Text"><text:s text:c="8"/># Store for Pass 2</text:span></text:p>
      <text:p text:style-name="P108"><text:span text:style-name="Source_20_Text"><text:s text:c="8"/>file_data['_raw_churn_freq'] = freq</text:span></text:p>
      <text:p text:style-name="P108"><text:span text:style-name="Source_20_Text"><text:s text:c="8"/></text:span></text:p>
      <text:p text:style-name="P108"><text:span text:style-name="Source_20_Text"><text:s text:c="8"/># Update Global Max</text:span></text:p>
      <text:p text:style-name="P108"><text:span text:style-name="Source_20_Text"><text:s text:c="8"/>if freq &gt; self.max_freq:</text:span></text:p>
      <text:p text:style-name="P108"><text:span text:style-name="Source_20_Text"><text:s text:c="12"/>self.max_freq = freq</text:span></text:p>
      <text:p text:style-name="P108"><text:span text:style-name="Source_20_Text"><text:s text:c="12"/></text:span></text:p>
      <text:p text:style-name="P108"><text:span text:style-name="Source_20_Text"><text:s text:c="4"/>def normalize_scores(self, universe_data, path_modifiers):</text:span></text:p>
      <text:p text:style-name="P108"><text:span text:style-name="Source_20_Text"><text:s text:c="8"/>"""</text:span></text:p>
      <text:p text:style-name="P108"><text:span text:style-name="Source_20_Text"><text:s text:c="8"/>Phase 2: Normalize all scores relative to the Max.</text:span></text:p>
      <text:p text:style-name="P108"><text:span text:style-name="Source_20_Text"><text:s text:c="8"/>Called inside 'second_pass' or 'report_stats'.</text:span></text:p>
      <text:p text:style-name="P108"><text:span text:style-name="Source_20_Text"><text:s text:c="8"/>"""</text:span></text:p>
      <text:p text:style-name="P108"><text:span text:style-name="Source_20_Text"><text:s text:c="8"/># Avoid division by zero</text:span></text:p>
      <text:p text:style-name="P108"><text:span text:style-name="Source_20_Text"><text:s text:c="8"/>max_f = self.max_freq if self.max_freq &gt; 0 else 1.0</text:span></text:p>
      <text:p text:style-name="P108"><text:span text:style-name="Source_20_Text"><text:s text:c="8"/></text:span></text:p>
      <text:p text:style-name="P108"><text:span text:style-name="Source_20_Text"><text:s text:c="8"/>for file_data in universe_data:</text:span></text:p>
      <text:p text:style-name="P108"><text:span text:style-name="Source_20_Text"><text:s text:c="12"/>raw_freq = file_data.pop('_raw_churn_freq', 0.0)</text:span></text:p>
      <text:p text:style-name="P108"><text:span text:style-name="Source_20_Text"><text:s text:c="12"/></text:span></text:p>
      <text:p text:style-name="P108"><text:span text:style-name="Source_20_Text"><text:s text:c="12"/># Relative Scaling (0.0 to 1.0) -&gt; Map to 0-100</text:span></text:p>
      <text:p text:style-name="P108"><text:span text:style-name="Source_20_Text"><text:s text:c="12"/>base_score = (raw_freq / max_f) * 100.0</text:span></text:p>
      <text:p text:style-name="P108"><text:span text:style-name="Source_20_Text"><text:s text:c="12"/></text:span></text:p>
      <text:p text:style-name="P108"><text:span text:style-name="Source_20_Text"><text:s text:c="12"/># Apply Path Modifier (Mp)</text:span></text:p>
      <text:p text:style-name="P108"><text:span text:style-name="Source_20_Text"><text:s text:c="12"/># Fetch Mp for 'Churn Exposure' based on file path</text:span></text:p>
      <text:p text:style-name="P108"><text:span text:style-name="Source_20_Text"><text:s text:c="12"/>mp = self._get_mp(file_data['path'], path_modifiers)</text:span></text:p>
      <text:p text:style-name="P108"><text:span text:style-name="Source_20_Text"><text:s text:c="12"/></text:span></text:p>
      <text:p text:style-name="P108"><text:span text:style-name="Source_20_Text"><text:s text:c="12"/>final_score = min(base_score * mp, 100)</text:span></text:p>
      <text:p text:style-name="P108"><text:span text:style-name="Source_20_Text"><text:s text:c="12"/></text:span></text:p>
      <text:p text:style-name="P108"><text:span text:style-name="Source_20_Text"><text:s text:c="12"/># Inject into Risk Vector (Index 10 per schema)</text:span></text:p>
      <text:p text:style-name="P108"><text:span text:style-name="Source_20_Text"><text:s text:c="12"/>file_data['risk_vector'][10] = int(final_score * 10)</text:span></text:p>
      <text:p text:style-name="P108"/>
      <text:p text:style-name="P108"><text:span text:style-name="Source_20_Text"><text:s text:c="4"/>def _get_mp(self, path, modifiers):</text:span></text:p>
      <text:p text:style-name="P108"><text:span text:style-name="Source_20_Text"><text:s text:c="8"/># Helper to fetch Mp from the PATH_MODIFIERS dictionary</text:span></text:p>
      <text:p text:style-name="P108"><text:soft-page-break/><text:span text:style-name="Source_20_Text"><text:s text:c="8"/># Implementation depends on how modifiers are stored/accessed</text:span></text:p>
      <text:p text:style-name="P109"><text:span text:style-name="Source_20_Text"><text:s text:c="8"/>return modifiers.get('Churn Exposure', 1.0)</text:span></text:p>
      <text:h text:style-name="Heading_20_5" text:outline-level="5"><text:bookmark-start text:name="__RefHeading___Toc11753_959624642 Copy 1 Copy 1 Copy 5"/><text:span text:style-name="Source_20_Text"><text:span text:style-name="T131">2.2.F.</text:span></text:span><text:span text:style-name="T455">F</text:span>. Visual Verification ("The Truth")<text:bookmark-end text:name="__RefHeading___Toc11753_959624642 Copy 1 Copy 1 Copy 5"/></text:h>
      <text:p text:style-name="P112"><text:span text:style-name="Strong_20_Emphasis">Scenario:</text:span> A 5-year-old project (Legacy) vs. a 2-month-old project (Startup).</text:p>
      <text:p text:style-name="P112"><text:span text:style-name="Strong_20_Emphasis">Project A: The Startup (High Velocity)</text:span></text:p>
      <text:list text:style-name="L81">
        <text:list-item>
          <text:p text:style-name="P293"><text:span text:style-name="Strong_20_Emphasis">Most Changed File:</text:span> <text:span text:style-name="Source_20_Text">App.tsx</text:span> (50 commits, 8 weeks old). Freq: 17.6.</text:p>
          <text:list>
            <text:list-item>
              <text:p text:style-name="P293"><text:span text:style-name="Strong_20_Emphasis">Score:</text:span> <text:span text:style-name="Strong_20_Emphasis">100</text:span> (Volatile Orange).</text:p>
            </text:list-item>
          </text:list>
        </text:list-item>
        <text:list-item>
          <text:p text:style-name="P293"><text:span text:style-name="Strong_20_Emphasis">Average File:</text:span> <text:span text:style-name="Source_20_Text">Button.tsx</text:span> (5 commits, 8 weeks old). Freq: 1.76.</text:p>
          <text:list>
            <text:list-item>
              <text:p text:style-name="P293"><text:span text:style-name="Strong_20_Emphasis">Score:</text:span> <text:span text:style-name="Strong_20_Emphasis">10</text:span> (Cool).</text:p>
            </text:list-item>
          </text:list>
        </text:list-item>
      </text:list>
      <text:p text:style-name="P112"><text:span text:style-name="Strong_20_Emphasis">Project B: The Enterprise Monolith (Low Velocity)</text:span></text:p>
      <text:list text:style-name="L82">
        <text:list-item>
          <text:p text:style-name="P294"><text:span text:style-name="Strong_20_Emphasis">Most Changed File:</text:span> <text:span text:style-name="Source_20_Text">TransactionCore.java</text:span> (200 commits, 5 years old). Freq: 12.4.</text:p>
          <text:list>
            <text:list-item>
              <text:p text:style-name="P294"><text:span text:style-name="Strong_20_Emphasis">Score:</text:span> <text:span text:style-name="Strong_20_Emphasis">100</text:span> (Volatile Orange). It is the hotspot <text:span text:style-name="Emphasis">of this repo</text:span>.</text:p>
            </text:list-item>
          </text:list>
        </text:list-item>
        <text:list-item>
          <text:p text:style-name="P294"><text:span text:style-name="Strong_20_Emphasis">Average File:</text:span> <text:span text:style-name="Source_20_Text">Utils.java</text:span> (10 commits, 5 years old). Freq: 0.62.</text:p>
          <text:list>
            <text:list-item>
              <text:p text:style-name="P294"><text:span text:style-name="Strong_20_Emphasis">Score:</text:span> <text:span text:style-name="Strong_20_Emphasis">5</text:span> (Cool).</text:p>
            </text:list-item>
          </text:list>
        </text:list-item>
      </text:list>
      <text:p text:style-name="P112"><text:span text:style-name="Strong_20_Emphasis"><text:span text:style-name="T146">Result:</text:span></text:span><text:span text:style-name="Strong_20_Emphasis"><text:span text:style-name="T47"> The "Hotspot" is clearly identified as a Red/Orange danger zone relative to its surroundings in </text:span></text:span><text:span text:style-name="Emphasis"><text:span text:style-name="T47">both</text:span></text:span><text:span text:style-name="Strong_20_Emphasis"><text:span text:style-name="T47"> projects, despite the massive difference in raw commit counts.</text:span></text:span></text:p>
      <text:h text:style-name="P76" text:outline-level="4"><text:bookmark-start text:name="__RefHeading___Toc560553_2813440148"/>2.2.G. Safety Mode (Metric: Structural Fortification)<text:bookmark-end text:name="__RefHeading___Toc560553_2813440148"/></text:h>
      <text:h text:style-name="Heading_20_5" text:outline-level="5"><text:bookmark-start text:name="__RefHeading___Toc49795_1155106909"/><text:span text:style-name="Source_20_Text"><text:span text:style-name="T186">2.2.G.A</text:span></text:span><text:span text:style-name="Source_20_Text"><text:span text:style-name="T38">. The Philosophy: Structural Integrity </text:span></text:span><text:span text:style-name="Strong_20_Emphasis">"The Load-Bearing Capacity of Code."</text:span><text:bookmark-end text:name="__RefHeading___Toc49795_1155106909"/></text:h>
      <text:p text:style-name="P117">Safety is not about the absence of bugs; it is about the presence of resilience. We treat code like physical infrastructure. A bridge (code) is "Safe" not because it has no cars (complexity), but because it has enough support pillars (guardrails) to hold the traffic.</text:p>
      <text:list text:style-name="L83">
        <text:list-item>
          <text:p text:style-name="P295"><text:span text:style-name="Strong_20_Emphasis">Low Score (0-40, Red):</text:span> <text:span text:style-name="Strong_20_Emphasis">Fragile.</text:span> The structural load (Risk) exceeds the support capacity (Defenses). The code is liable to collapse under edge cases.</text:p>
        </text:list-item>
        <text:list-item>
          <text:p text:style-name="P295"><text:span text:style-name="Strong_20_Emphasis">Neutral Score (41-60, White):</text:span> <text:span text:style-name="Strong_20_Emphasis">Stable.</text:span> Risks and Defenses are roughly balanced.</text:p>
        </text:list-item>
        <text:list-item>
          <text:p text:style-name="P295"><text:span text:style-name="Strong_20_Emphasis">High Score (61-100, Cyan):</text:span> <text:span text:style-name="Strong_20_Emphasis">Fortified.</text:span> The code is over-engineered for safety. Defensive structures (<text:span text:style-name="Source_20_Text">try/catch</text:span>, <text:span text:style-name="Source_20_Text">guards</text:span>) vastly outnumber the risks.</text:p>
        </text:list-item>
      </text:list>
      <text:h text:style-name="Heading_20_5" text:outline-level="5"><text:bookmark-start text:name="__RefHeading___Toc560553_2813440148 Copy 1 Copy 1"/><text:soft-page-break/><text:span text:style-name="Source_20_Text"><text:span text:style-name="T186">2.2.G.</text:span></text:span><text:span text:style-name="T186">B</text:span><text:span text:style-name="T38">. The Inputs (Regex &amp; Heuristics)</text:span><text:bookmark-end text:name="__RefHeading___Toc560553_2813440148 Copy 1 Copy 1"/></text:h>
      <text:p text:style-name="P117">We classify patterns into <text:span text:style-name="Strong_20_Emphasis">Attackers</text:span> (Risk) and <text:span text:style-name="Strong_20_Emphasis">Defenders</text:span> (Safet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6">Input Variable</text:p>
          </table:table-cell>
          <table:table-cell table:style-name="Table7.A1" office:value-type="string">
            <text:p text:style-name="P116">Regex Key</text:p>
          </table:table-cell>
          <table:table-cell table:style-name="Table7.A1" office:value-type="string">
            <text:p text:style-name="P116">Weight</text:p>
          </table:table-cell>
          <table:table-cell table:style-name="Table7.A1" office:value-type="string">
            <text:p text:style-name="P116">Rationale</text:p>
          </table:table-cell>
        </table:table-row>
        <table:table-row>
          <table:table-cell table:style-name="Table7.A1" office:value-type="string">
            <text:p text:style-name="P115"><text:span text:style-name="Strong_20_Emphasis">SafetyHits</text:span></text:p>
          </table:table-cell>
          <table:table-cell table:style-name="Table7.A1" office:value-type="string">
            <text:p text:style-name="P115"><text:span text:style-name="Source_20_Text">safety</text:span></text:p>
          </table:table-cell>
          <table:table-cell table:style-name="Table7.A1" office:value-type="string">
            <text:p text:style-name="P115"><text:span text:style-name="Strong_20_Emphasis">1.0x</text:span></text:p>
          </table:table-cell>
          <table:table-cell table:style-name="Table7.A1" office:value-type="string">
            <text:p text:style-name="P115"><text:span text:style-name="Strong_20_Emphasis">The Pillars.</text:span> Try/catch, assertions, type guards, sanitization.</text:p>
          </table:table-cell>
        </table:table-row>
        <table:table-row>
          <table:table-cell table:style-name="Table7.A1" office:value-type="string">
            <text:p text:style-name="P115"><text:span text:style-name="Strong_20_Emphasis">TestHits</text:span></text:p>
          </table:table-cell>
          <table:table-cell table:style-name="Table7.A1" office:value-type="string">
            <text:p text:style-name="P115"><text:span text:style-name="Source_20_Text">test</text:span></text:p>
          </table:table-cell>
          <table:table-cell table:style-name="Table7.A1" office:value-type="string">
            <text:p text:style-name="P115"><text:span text:style-name="Strong_20_Emphasis">0.5x</text:span></text:p>
          </table:table-cell>
          <table:table-cell table:style-name="Table7.A1" office:value-type="string">
            <text:p text:style-name="P115"><text:span text:style-name="Strong_20_Emphasis">The Blueprint.</text:span> While not runtime safety, proximity to tests implies verification.</text:p>
          </table:table-cell>
        </table:table-row>
        <table:table-row>
          <table:table-cell table:style-name="Table7.A1" office:value-type="string">
            <text:p text:style-name="P115"><text:span text:style-name="Strong_20_Emphasis">RiskHits</text:span></text:p>
          </table:table-cell>
          <table:table-cell table:style-name="Table7.A1" office:value-type="string">
            <text:p text:style-name="P115"><text:span text:style-name="Source_20_Text">danger</text:span></text:p>
          </table:table-cell>
          <table:table-cell table:style-name="Table7.A1" office:value-type="string">
            <text:p text:style-name="P115"><text:span text:style-name="Strong_20_Emphasis">5.0x</text:span></text:p>
          </table:table-cell>
          <table:table-cell table:style-name="Table7.A1" office:value-type="string">
            <text:p text:style-name="P115"><text:span text:style-name="Strong_20_Emphasis">The Heavy Load.</text:span> Critical vulnerabilities (<text:span text:style-name="Source_20_Text">eval</text:span>, <text:span text:style-name="Source_20_Text">exec</text:span>) that exert massive stress.</text:p>
          </table:table-cell>
        </table:table-row>
        <table:table-row>
          <table:table-cell table:style-name="Table7.A1" office:value-type="string">
            <text:p text:style-name="P115"><text:span text:style-name="Strong_20_Emphasis">NegHits</text:span></text:p>
          </table:table-cell>
          <table:table-cell table:style-name="Table7.A1" office:value-type="string">
            <text:p text:style-name="P115"><text:span text:style-name="Source_20_Text">safety_neg</text:span></text:p>
          </table:table-cell>
          <table:table-cell table:style-name="Table7.A1" office:value-type="string">
            <text:p text:style-name="P115"><text:span text:style-name="Strong_20_Emphasis">2.0x</text:span></text:p>
          </table:table-cell>
          <table:table-cell table:style-name="Table7.A1" office:value-type="string">
            <text:p text:style-name="P115"><text:span text:style-name="Strong_20_Emphasis">The Rust.</text:span> Anti-patterns (<text:span text:style-name="Source_20_Text">var</text:span>, <text:span text:style-name="Source_20_Text">any</text:span>, <text:span text:style-name="Source_20_Text">suppress</text:span>) that weaken the structure.</text:p>
          </table:table-cell>
        </table:table-row>
        <table:table-row>
          <table:table-cell table:style-name="Table7.A1" office:value-type="string">
            <text:p text:style-name="P115"><text:span text:style-name="Strong_20_Emphasis">FluxHits</text:span></text:p>
          </table:table-cell>
          <table:table-cell table:style-name="Table7.A1" office:value-type="string">
            <text:p text:style-name="P115"><text:span text:style-name="Source_20_Text">flux</text:span></text:p>
          </table:table-cell>
          <table:table-cell table:style-name="Table7.A1" office:value-type="string">
            <text:p text:style-name="P115"><text:span text:style-name="Strong_20_Emphasis">0.5x</text:span></text:p>
          </table:table-cell>
          <table:table-cell table:style-name="Table7.A1" office:value-type="string">
            <text:p text:style-name="P115"><text:span text:style-name="Strong_20_Emphasis">The Vibration.</text:span> Mutable state introduces entropy, slightly increasing structural stress.</text:p>
          </table:table-cell>
        </table:table-row>
      </table:table>
      <text:h text:style-name="Heading_20_5" text:outline-level="5"><text:bookmark-start text:name="__RefHeading___Toc560553_2813440148 Copy 1 Copy 2"/><text:span text:style-name="Source_20_Text"><text:span text:style-name="T186">2.2.G.</text:span></text:span><text:span text:style-name="T186">C</text:span><text:span text:style-name="T38">. The Universal Framework Integration</text:span><text:bookmark-end text:name="__RefHeading___Toc560553_2813440148 Copy 1 Copy 2"/></text:h>
      <text:list text:style-name="L84">
        <text:list-item>
          <text:p text:style-name="P296"><text:span text:style-name="Source_20_Text">Fc</text:span><text:span text:style-name="Strong_20_Emphasis"> (Fidelity Coefficient):</text:span> Applied to <text:span text:style-name="Strong_20_Emphasis">Defenders</text:span>. We trust a <text:span text:style-name="Source_20_Text">try/catch</text:span> in Java (Explicit) more than a check in Shell (Implicit).</text:p>
        </text:list-item>
        <text:list-item>
          <text:p text:style-name="P296"><text:span text:style-name="Source_20_Text">Irc</text:span><text:span text:style-name="Strong_20_Emphasis"> (Implicit Risk Correction):</text:span> Added to <text:span text:style-name="Strong_20_Emphasis">Attackers</text:span>. Implicit languages start with a "Phantom Load"—a baseline risk inherent to the medium.</text:p>
        </text:list-item>
        <text:list-item>
          <text:p text:style-name="P296"><text:span text:style-name="Source_20_Text">Mp</text:span><text:span text:style-name="Strong_20_Emphasis"> (Path Modifier):</text:span> Applied to <text:span text:style-name="Strong_20_Emphasis">Attackers</text:span>. We keep the discount small to ensure risks are exposed everywhere.</text:p>
          <text:list>
            <text:list-item>
              <text:p text:style-name="P296"><text:span text:style-name="Emphasis">Exp/Tests (</text:span><text:span text:style-name="Source_20_Text">Mp = 0.9</text:span><text:span text:style-name="Emphasis">):</text:span> <text:span text:style-name="Strong_20_Emphasis">Minor Discount.</text:span> Risks are slightly forgiven, but unsafe code will still flash Red.</text:p>
            </text:list-item>
            <text:list-item>
              <text:p text:style-name="P296"><text:span text:style-name="Emphasis">Core/Auth (</text:span><text:span text:style-name="Source_20_Text">Mp = 1.2</text:span><text:span text:style-name="Emphasis">):</text:span> <text:span text:style-name="Strong_20_Emphasis">Amplified.</text:span> Risks are punished heavily. Fragility here is unacceptable.</text:p>
            </text:list-item>
            <text:list-item>
              <text:p text:style-name="P296"><text:span text:style-name="Emphasis">Standard (</text:span><text:span text:style-name="Source_20_Text">Mp = 1.0</text:span><text:span text:style-name="Emphasis">):</text:span> Baseline.</text:p>
            </text:list-item>
          </text:list>
        </text:list-item>
      </text:list>
      <text:h text:style-name="Heading_20_5" text:outline-level="5"><text:bookmark-start text:name="__RefHeading___Toc560553_2813440148 Copy 1 Copy 3"/><text:span text:style-name="Source_20_Text"><text:span text:style-name="T186">2.2.G.</text:span></text:span><text:span text:style-name="T186">D</text:span><text:span text:style-name="T38">. The Equation: The Structural Integrity Sigmoid</text:span><text:bookmark-end text:name="__RefHeading___Toc560553_2813440148 Copy 1 Copy 3"/></text:h>
      <text:p text:style-name="P117">We use a <text:span text:style-name="Strong_20_Emphasis">Net Balance</text:span> approach. We calculate the deficit or surplus of safety density, then map it to a curve.</text:p>
      <text:p text:style-name="Text_20_body"><text:bookmark-start text:name="__RefHeading___Toc42144_730389025"/>Step A: Calculate The Attack Vector (Stress)<text:bookmark-end text:name="__RefHeading___Toc42144_730389025"/></text:p>
      <text:p text:style-name="P117">We sum the risks, apply the <text:span text:style-name="Source_20_Text">Irc</text:span> (Language Tax), and scale by <text:span text:style-name="Source_20_Text">Mp</text:span> (Context).</text:p>
      <text:p text:style-name="Text_20_body"><text:bookmark-start text:name="__RefHeading___Toc42146_730389025"/><text:soft-page-break/>Step B: Calculate The Defense Vector (Support)<text:bookmark-end text:name="__RefHeading___Toc42146_730389025"/></text:p>
      <text:p text:style-name="P117">We sum the fortifications, dampened by <text:span text:style-name="Source_20_Text">Fc</text:span> (Trust).</text:p>
      <text:p text:style-name="Text_20_body"><text:bookmark-start text:name="__RefHeading___Toc42148_730389025"/>Step C: Calculate Net Integrity Density<text:bookmark-end text:name="__RefHeading___Toc42148_730389025"/></text:p>
      <text:p text:style-name="P117">We determine the <text:span text:style-name="Strong_20_Emphasis">Balance of Power</text:span> per line of code.</text:p>
      <text:list text:style-name="L85">
        <text:list-item>
          <text:p text:style-name="P297"><text:span text:style-name="Strong_20_Emphasis">Positive Density:</text:span> Defenses outweigh Risks (Fortified).</text:p>
        </text:list-item>
        <text:list-item>
          <text:p text:style-name="P297"><text:span text:style-name="Strong_20_Emphasis">Negative Density:</text:span> Risks outweigh Defenses (Fragile).</text:p>
        </text:list-item>
        <text:list-item>
          <text:p text:style-name="P297"><text:span text:style-name="Strong_20_Emphasis">Zero:</text:span> Balanced (Stable).</text:p>
        </text:list-item>
      </text:list>
      <text:p text:style-name="Text_20_body"><text:bookmark-start text:name="__RefHeading___Toc42150_730389025"/>Step D: The Sigmoid Score<text:bookmark-end text:name="__RefHeading___Toc42150_730389025"/></text:p>
      <text:p text:style-name="P117">We map the density to a 0-100 scale.</text:p>
      <text:list text:style-name="L86">
        <text:list-item>
          <text:p text:style-name="P298"><text:span text:style-name="Strong_20_Emphasis">Center (50):</text:span> Density is 0 (Balanced).</text:p>
        </text:list-item>
        <text:list-item>
          <text:p text:style-name="P298"><text:span text:style-name="Strong_20_Emphasis">Slope (K):</text:span> <text:span text:style-name="Strong_20_Emphasis">10.0</text:span>. A density of +0.2 (2 extra guards per 10 lines) pushes the score to ~88 (High Safety). A density of -0.2 drops it to ~12 (High Danger).</text:p>
        </text:list-item>
      </text:list>
      <text:h text:style-name="Heading_20_5" text:outline-level="5"><text:bookmark-start text:name="__RefHeading___Toc560553_2813440148 Copy 1 Copy 4"/><text:span text:style-name="Source_20_Text"><text:span text:style-name="T186">2.2.G.</text:span></text:span><text:span text:style-name="T186">E</text:span><text:span text:style-name="T38">. Implementation (Python Reference)</text:span><text:bookmark-end text:name="__RefHeading___Toc560553_2813440148 Copy 1 Copy 4"/></text:h>
      <text:p text:style-name="P113"><text:span text:style-name="Source_20_Text">import math</text:span></text:p>
      <text:p text:style-name="P113"/>
      <text:p text:style-name="P113"><text:span text:style-name="Source_20_Text">def calculate_safety_score(self, data, fc, irc, mp):</text:span></text:p>
      <text:p text:style-name="P113"><text:span text:style-name="Source_20_Text"><text:s text:c="4"/>"""</text:span></text:p>
      <text:p text:style-name="P113"><text:span text:style-name="Source_20_Text"><text:s text:c="4"/>Calculates 2.2.G Safety Mode (Structural Integrity).</text:span></text:p>
      <text:p text:style-name="P113"><text:span text:style-name="Source_20_Text"><text:s text:c="4"/>Returns int 0-100.</text:span></text:p>
      <text:p text:style-name="P113"><text:span text:style-name="Source_20_Text"><text:s text:c="4"/>"""</text:span></text:p>
      <text:p text:style-name="P113"><text:span text:style-name="Source_20_Text"><text:s text:c="4"/># 1. Inputs</text:span></text:p>
      <text:p text:style-name="P113"><text:span text:style-name="Source_20_Text"><text:s text:c="4"/>loc = max(data['meaningful_loc'], 1)</text:span></text:p>
      <text:p text:style-name="P113"><text:span text:style-name="Source_20_Text"><text:s text:c="4"/></text:span></text:p>
      <text:p text:style-name="P113"><text:span text:style-name="Source_20_Text"><text:s text:c="4"/># Defenders</text:span></text:p>
      <text:p text:style-name="P113"><text:span text:style-name="Source_20_Text"><text:s text:c="4"/>hits_safety = data['hits']['safety']</text:span></text:p>
      <text:p text:style-name="P113"><text:span text:style-name="Source_20_Text"><text:s text:c="4"/>hits_test = data['hits']['test']</text:span></text:p>
      <text:p text:style-name="P113"><text:span text:style-name="Source_20_Text"><text:s text:c="4"/></text:span></text:p>
      <text:p text:style-name="P113"><text:span text:style-name="Source_20_Text"><text:s text:c="4"/># Attackers</text:span></text:p>
      <text:p text:style-name="P113"><text:span text:style-name="Source_20_Text"><text:s text:c="4"/>hits_danger = data['hits']['danger']</text:span></text:p>
      <text:p text:style-name="P113"><text:span text:style-name="Source_20_Text"><text:s text:c="4"/>hits_neg = data['hits']['safety_neg']</text:span></text:p>
      <text:p text:style-name="P113"><text:span text:style-name="Source_20_Text"><text:s text:c="4"/>hits_flux = data['hits']['flux']</text:span></text:p>
      <text:p text:style-name="P113"/>
      <text:p text:style-name="P113"><text:span text:style-name="Source_20_Text"><text:s text:c="4"/># 2. Context Modifier (Mp)</text:span></text:p>
      <text:p text:style-name="P113"><text:span text:style-name="Source_20_Text"><text:s text:c="4"/># Applied to RISK.</text:span></text:p>
      <text:p text:style-name="P113"><text:span text:style-name="Source_20_Text"><text:s text:c="4"/># Core (1.2) = Harder to be safe.</text:span></text:p>
      <text:p text:style-name="P113"><text:span text:style-name="Source_20_Text"><text:s text:c="4"/># Tests (0.9) = Slightly easier, but risks still hurt.</text:span></text:p>
      <text:p text:style-name="P113"><text:span text:style-name="Source_20_Text"><text:s text:c="4"/>path_mod = mp.get('Safety Exposure', 1.0)</text:span></text:p>
      <text:p text:style-name="P113"/>
      <text:p text:style-name="P113"><text:span text:style-name="Source_20_Text"><text:s text:c="4"/># 3. Calculate Vectors</text:span></text:p>
      <text:p text:style-name="P113"><text:span text:style-name="Source_20_Text"><text:s text:c="4"/># Attack: Weighted sum of risks + Implicit Risk, scaled by Context</text:span></text:p>
      <text:p text:style-name="P113"><text:span text:style-name="Source_20_Text"><text:s text:c="4"/>attack = ((hits_danger * 5.0) + </text:span></text:p>
      <text:p text:style-name="P113"><text:span text:style-name="Source_20_Text"><text:s text:c="14"/>(hits_neg * 2.0) + </text:span></text:p>
      <text:p text:style-name="P113"><text:span text:style-name="Source_20_Text"><text:s text:c="14"/>(hits_flux * 0.5) + </text:span></text:p>
      <text:p text:style-name="P113"><text:soft-page-break/><text:span text:style-name="Source_20_Text"><text:s text:c="14"/>irc) * path_mod</text:span></text:p>
      <text:p text:style-name="P113"/>
      <text:p text:style-name="P113"><text:span text:style-name="Source_20_Text"><text:s text:c="4"/># Defense: Weighted sum of guards, dampened by Fidelity</text:span></text:p>
      <text:p text:style-name="P113"><text:span text:style-name="Source_20_Text"><text:s text:c="4"/>defense = (hits_safety + (hits_test * 0.5)) * fc</text:span></text:p>
      <text:p text:style-name="P113"/>
      <text:p text:style-name="P113"><text:span text:style-name="Source_20_Text"><text:s text:c="4"/># 4. Net Integrity Density</text:span></text:p>
      <text:p text:style-name="P113"><text:span text:style-name="Source_20_Text"><text:s text:c="4"/># Positive = Surplus Safety. Negative = Safety Deficit.</text:span></text:p>
      <text:p text:style-name="P113"><text:span text:style-name="Source_20_Text"><text:s text:c="4"/># Scaled by 100 for Sigmoid usage.</text:span></text:p>
      <text:p text:style-name="P113"><text:span text:style-name="Source_20_Text"><text:s text:c="4"/>integrity_density = (defense - attack) / loc</text:span></text:p>
      <text:p text:style-name="P113"/>
      <text:p text:style-name="P113"><text:span text:style-name="Source_20_Text"><text:s text:c="4"/># 5. Sigmoid Map (0-100)</text:span></text:p>
      <text:p text:style-name="P113"><text:span text:style-name="Source_20_Text"><text:s text:c="4"/># Center = 0 Density -&gt; Score 50 (Stable/White)</text:span></text:p>
      <text:p text:style-name="P113"><text:span text:style-name="Source_20_Text"><text:s text:c="4"/># Slope = 10 -&gt; Sharp reaction to deficits/surpluses</text:span></text:p>
      <text:p text:style-name="P113"><text:span text:style-name="Source_20_Text"><text:s text:c="4"/>try:</text:span></text:p>
      <text:p text:style-name="P113"><text:span text:style-name="Source_20_Text"><text:s text:c="8"/>score = 100 / (1 + math.exp(-10.0 * integrity_density))</text:span></text:p>
      <text:p text:style-name="P113"><text:span text:style-name="Source_20_Text"><text:s text:c="4"/>except OverflowError:</text:span></text:p>
      <text:p text:style-name="P113"><text:span text:style-name="Source_20_Text"><text:s text:c="8"/>score = 100 if integrity_density &gt; 0 else 0</text:span></text:p>
      <text:p text:style-name="P113"/>
      <text:p text:style-name="P114"><text:span text:style-name="Source_20_Text"><text:s text:c="4"/>return int(score)</text:span></text:p>
      <text:h text:style-name="Heading_20_5" text:outline-level="5"><text:bookmark-start text:name="__RefHeading___Toc560553_2813440148 Copy 1 Copy 5"/><text:span text:style-name="Source_20_Text"><text:span text:style-name="T186">2.2.G.</text:span></text:span><text:span text:style-name="T186">F</text:span><text:span text:style-name="T38">. Visual Verification ("The Truth")</text:span><text:bookmark-end text:name="__RefHeading___Toc560553_2813440148 Copy 1 Copy 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16">Scenario</text:p>
          </table:table-cell>
          <table:table-cell table:style-name="Table23.A1" office:value-type="string">
            <text:p text:style-name="P116">Attack</text:p>
          </table:table-cell>
          <table:table-cell table:style-name="Table23.A1" office:value-type="string">
            <text:p text:style-name="P116">Defense</text:p>
          </table:table-cell>
          <table:table-cell table:style-name="Table23.A1" office:value-type="string">
            <text:p text:style-name="P116">Net / LOC</text:p>
          </table:table-cell>
          <table:table-cell table:style-name="Table23.A1" office:value-type="string">
            <text:p text:style-name="P116">Score</text:p>
          </table:table-cell>
          <table:table-cell table:style-name="Table23.A1" office:value-type="string">
            <text:p text:style-name="P116">Color</text:p>
          </table:table-cell>
          <table:table-cell table:style-name="Table23.A1" office:value-type="string">
            <text:p text:style-name="P116">Interpretation</text:p>
          </table:table-cell>
        </table:table-row>
        <table:table-row>
          <table:table-cell table:style-name="Table23.A1" office:value-type="string">
            <text:p text:style-name="P115"><text:span text:style-name="Strong_20_Emphasis">Stable Logic</text:span></text:p>
          </table:table-cell>
          <table:table-cell table:style-name="Table23.A1" office:value-type="string">
            <text:p text:style-name="P115">5</text:p>
          </table:table-cell>
          <table:table-cell table:style-name="Table23.A1" office:value-type="string">
            <text:p text:style-name="P115">5</text:p>
          </table:table-cell>
          <table:table-cell table:style-name="Table23.A1" office:value-type="string">
            <text:p text:style-name="P115">0.0</text:p>
          </table:table-cell>
          <table:table-cell table:style-name="Table23.A1" office:value-type="string">
            <text:p text:style-name="P115"><text:span text:style-name="Strong_20_Emphasis">50</text:span></text:p>
          </table:table-cell>
          <table:table-cell table:style-name="Table23.A1" office:value-type="string">
            <text:p text:style-name="P115"><text:span text:style-name="Strong_20_Emphasis">White</text:span></text:p>
          </table:table-cell>
          <table:table-cell table:style-name="Table23.A1" office:value-type="string">
            <text:p text:style-name="P115">Balanced. Risks matched by guards.</text:p>
          </table:table-cell>
        </table:table-row>
        <table:table-row>
          <table:table-cell table:style-name="Table23.A1" office:value-type="string">
            <text:p text:style-name="P115"><text:span text:style-name="Strong_20_Emphasis">The Bunker</text:span></text:p>
          </table:table-cell>
          <table:table-cell table:style-name="Table23.A1" office:value-type="string">
            <text:p text:style-name="P115">2</text:p>
          </table:table-cell>
          <table:table-cell table:style-name="Table23.A1" office:value-type="string">
            <text:p text:style-name="P115">20</text:p>
          </table:table-cell>
          <table:table-cell table:style-name="Table23.A1" office:value-type="string">
            <text:p text:style-name="P115">+0.18</text:p>
          </table:table-cell>
          <table:table-cell table:style-name="Table23.A1" office:value-type="string">
            <text:p text:style-name="P115"><text:span text:style-name="Strong_20_Emphasis">86</text:span></text:p>
          </table:table-cell>
          <table:table-cell table:style-name="Table23.A1" office:value-type="string">
            <text:p text:style-name="P115"><text:span text:style-name="Strong_20_Emphasis">Cyan</text:span></text:p>
          </table:table-cell>
          <table:table-cell table:style-name="Table23.A1" office:value-type="string">
            <text:p text:style-name="P115">Highly fortified. Guards vastly outnumber risks.</text:p>
          </table:table-cell>
        </table:table-row>
        <table:table-row>
          <table:table-cell table:style-name="Table23.A1" office:value-type="string">
            <text:p text:style-name="P115"><text:span text:style-name="Strong_20_Emphasis">Glass Cannon</text:span></text:p>
          </table:table-cell>
          <table:table-cell table:style-name="Table23.A1" office:value-type="string">
            <text:p text:style-name="P115">20</text:p>
          </table:table-cell>
          <table:table-cell table:style-name="Table23.A1" office:value-type="string">
            <text:p text:style-name="P115">2</text:p>
          </table:table-cell>
          <table:table-cell table:style-name="Table23.A1" office:value-type="string">
            <text:p text:style-name="P115">-0.18</text:p>
          </table:table-cell>
          <table:table-cell table:style-name="Table23.A1" office:value-type="string">
            <text:p text:style-name="P115"><text:span text:style-name="Strong_20_Emphasis">14</text:span></text:p>
          </table:table-cell>
          <table:table-cell table:style-name="Table23.A1" office:value-type="string">
            <text:p text:style-name="P115"><text:span text:style-name="Strong_20_Emphasis">Red</text:span></text:p>
          </table:table-cell>
          <table:table-cell table:style-name="Table23.A1" office:value-type="string">
            <text:p text:style-name="P115">Fragile. Heavy risks with no support pillars.</text:p>
          </table:table-cell>
        </table:table-row>
        <table:table-row>
          <table:table-cell table:style-name="Table23.A1" office:value-type="string">
            <text:p text:style-name="P115"><text:span text:style-name="Strong_20_Emphasis">Experiment (Old)</text:span></text:p>
          </table:table-cell>
          <table:table-cell table:style-name="Table23.A1" office:value-type="string">
            <text:p text:style-name="P115">20</text:p>
          </table:table-cell>
          <table:table-cell table:style-name="Table23.A1" office:value-type="string">
            <text:p text:style-name="P115">2</text:p>
          </table:table-cell>
          <table:table-cell table:style-name="Table23.A1" office:value-type="string">
            <text:p text:style-name="P115">-0.09</text:p>
          </table:table-cell>
          <table:table-cell table:style-name="Table23.A1" office:value-type="string">
            <text:p text:style-name="P115"><text:span text:style-name="Strong_20_Emphasis">29</text:span></text:p>
          </table:table-cell>
          <table:table-cell table:style-name="Table23.A1" office:value-type="string">
            <text:p text:style-name="P115"><text:span text:style-name="Strong_20_Emphasis">Pale Red</text:span></text:p>
          </table:table-cell>
          <table:table-cell table:style-name="Table23.A1" office:value-type="string">
            <text:p text:style-name="P115"><text:span text:style-name="Emphasis">With Mp=0.5</text:span>. Risk was hidden/dampened.</text:p>
          </table:table-cell>
        </table:table-row>
        <table:table-row>
          <table:table-cell table:style-name="Table23.A1" office:value-type="string">
            <text:p text:style-name="P115"><text:span text:style-name="Strong_20_Emphasis">Experiment (New)</text:span></text:p>
          </table:table-cell>
          <table:table-cell table:style-name="Table23.A1" office:value-type="string">
            <text:p text:style-name="P115">20</text:p>
          </table:table-cell>
          <table:table-cell table:style-name="Table23.A1" office:value-type="string">
            <text:p text:style-name="P115">2</text:p>
          </table:table-cell>
          <table:table-cell table:style-name="Table23.A1" office:value-type="string">
            <text:p text:style-name="P115">-0.16</text:p>
          </table:table-cell>
          <table:table-cell table:style-name="Table23.A1" office:value-type="string">
            <text:p text:style-name="P115"><text:span text:style-name="Strong_20_Emphasis">17</text:span></text:p>
          </table:table-cell>
          <table:table-cell table:style-name="Table23.A1" office:value-type="string">
            <text:p text:style-name="P115"><text:span text:style-name="Strong_20_Emphasis">Red</text:span></text:p>
          </table:table-cell>
          <table:table-cell table:style-name="Table23.A1" office:value-type="string">
            <text:p text:style-name="P115"><text:span text:style-name="Emphasis">With Mp=0.9</text:span>. Risk is now clearly visible.</text:p>
          </table:table-cell>
        </table:table-row>
        <table:table-row>
          <table:table-cell table:style-name="Table23.A1" office:value-type="string">
            <text:p text:style-name="P115"><text:span text:style-name="Strong_20_Emphasis">Implicit Script</text:span></text:p>
          </table:table-cell>
          <table:table-cell table:style-name="Table23.A1" office:value-type="string">
            <text:p text:style-name="P115">5</text:p>
          </table:table-cell>
          <table:table-cell table:style-name="Table23.A1" office:value-type="string">
            <text:p text:style-name="P115">5</text:p>
          </table:table-cell>
          <table:table-cell table:style-name="Table23.A1" office:value-type="string">
            <text:p text:style-name="P115">-0.05</text:p>
          </table:table-cell>
          <table:table-cell table:style-name="Table23.A1" office:value-type="string">
            <text:p text:style-name="P115"><text:span text:style-name="Strong_20_Emphasis">37</text:span></text:p>
          </table:table-cell>
          <table:table-cell table:style-name="Table23.A1" office:value-type="string">
            <text:p text:style-name="P115"><text:span text:style-name="Strong_20_Emphasis">Pale Red</text:span></text:p>
          </table:table-cell>
          <table:table-cell table:style-name="Table23.A1" office:value-type="string">
            <text:p text:style-name="P115"><text:span text:style-name="Emphasis">With Irc=5</text:span>. Even "balanced" code looks fragile due to language opacity.</text:p>
          </table:table-cell>
        </table:table-row>
      </table:table>
      <text:p text:style-name="P118"><text:span text:style-name="Source_20_Text"/></text:p>
      <text:p text:style-name="P118"><text:span text:style-name="Source_20_Text"/></text:p>
      <text:h text:style-name="P34" text:outline-level="4"><text:bookmark-start text:name="__RefHeading___Toc560565_2813440148"/>2.2.I. Technical Debt <text:span text:style-name="T398">Exposure</text:span><text:bookmark-end text:name="__RefHeading___Toc560565_2813440148"/></text:h>
      <text:h text:style-name="Heading_20_5" text:outline-level="5"><text:bookmark-start text:name="__RefHeading___Toc560565_2813440148 Copy 1"/><text:span text:style-name="T186">2.2.I.</text:span><text:span text:style-name="T455">A</text:span>. The Philosophy: Markers of Honesty<text:bookmark-end text:name="__RefHeading___Toc560565_2813440148 Copy 1"/></text:h>
      <text:p text:style-name="P124"><text:span text:style-name="Strong_20_Emphasis">"The Topography of Compromise."</text:span></text:p>
      <text:p text:style-name="P124"><text:soft-page-break/>We view Technical Debt not as a failure, but as a deliberate engineering trade-off. No engineer writes a <text:span text:style-name="Source_20_Text">HACK</text:span> out of laziness; they write it to ship.</text:p>
      <text:p text:style-name="P124">This metric is about <text:span text:style-name="Strong_20_Emphasis">Honesty</text:span>. It relies on the developer's own annotations (in the <text:span text:style-name="Strong_20_Emphasis">Literature/Comment Stream</text:span>) to identify where the "Structural Stress" lies. By visualizing these markers, we move from vague anxiety about "bad code" to a concrete map of where the team <text:span text:style-name="Emphasis">knows</text:span> improvements are needed.</text:p>
      <text:list text:style-name="L87">
        <text:list-item>
          <text:p text:style-name="P299"><text:span text:style-name="Strong_20_Emphasis">Low Score (0-20, White):</text:span> <text:span text:style-name="Strong_20_Emphasis">Polished.</text:span> The code matches the spec. No known shortcuts.</text:p>
        </text:list-item>
        <text:list-item>
          <text:p text:style-name="P299"><text:span text:style-name="Strong_20_Emphasis">High Score (80-100, Red):</text:span> <text:span text:style-name="Strong_20_Emphasis">Fractured.</text:span> The file is held together by temporary fixes (<text:span text:style-name="Source_20_Text">HACK</text:span>) and unfinished thoughts (<text:span text:style-name="Source_20_Text">TODO</text:span>). It is structurally compromised.</text:p>
        </text:list-item>
      </text:list>
      <text:h text:style-name="Heading_20_5" text:outline-level="5"><text:bookmark-start text:name="__RefHeading___Toc560565_2813440148 Copy 2"/><text:span text:style-name="T186">2.2.I.</text:span><text:span text:style-name="T455">B</text:span>. The Inputs (Regex &amp; Heuristics)<text:bookmark-end text:name="__RefHeading___Toc560565_2813440148 Copy 2"/></text:h>
      <text:p text:style-name="P124">We classify debt into two distinct categories based on severity.</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2">Input Variable</text:p>
          </table:table-cell>
          <table:table-cell table:style-name="Table8.A1" office:value-type="string">
            <text:p text:style-name="P122">Regex Key</text:p>
          </table:table-cell>
          <table:table-cell table:style-name="Table8.A1" office:value-type="string">
            <text:p text:style-name="P122">Weight</text:p>
          </table:table-cell>
          <table:table-cell table:style-name="Table8.A1" office:value-type="string">
            <text:p text:style-name="P122">Rationale</text:p>
          </table:table-cell>
        </table:table-row>
        <table:table-row>
          <table:table-cell table:style-name="Table8.A1" office:value-type="string">
            <text:p text:style-name="P121"><text:span text:style-name="Strong_20_Emphasis"><text:span text:style-name="T458">planned</text:span></text:span><text:span text:style-name="Strong_20_Emphasis">DebtHits</text:span></text:p>
          </table:table-cell>
          <table:table-cell table:style-name="Table8.A1" office:value-type="string">
            <text:p text:style-name="P121"><text:span text:style-name="Source_20_Text"><text:span text:style-name="T458">planned</text:span></text:span><text:span text:style-name="Source_20_Text">_debt</text:span></text:p>
          </table:table-cell>
          <table:table-cell table:style-name="Table8.A1" office:value-type="string">
            <text:p text:style-name="P121"><text:span text:style-name="Strong_20_Emphasis">1.0x</text:span></text:p>
          </table:table-cell>
          <table:table-cell table:style-name="Table8.A1" office:value-type="string">
            <text:p text:style-name="P121"><text:span text:style-name="Strong_20_Emphasis">The Promise.</text:span> Future work that doesn't necessarily imply current brokenness. Includes <text:span text:style-name="Source_20_Text">TODO</text:span>, <text:span text:style-name="Source_20_Text">WIP</text:span>, <text:span text:style-name="Source_20_Text">STUB</text:span>, <text:span text:style-name="Source_20_Text">TBD</text:span>, <text:span text:style-name="Source_20_Text">IMPLEMENT</text:span>, <text:span text:style-name="Source_20_Text">PENDING</text:span>, <text:span text:style-name="Source_20_Text">REFACTOR</text:span>, <text:span text:style-name="Source_20_Text">CLEANUP</text:span>, <text:span text:style-name="Source_20_Text">REVIEW</text:span>, <text:span text:style-name="Source_20_Text">UPDATE</text:span>.</text:p>
          </table:table-cell>
        </table:table-row>
        <table:table-row>
          <table:table-cell table:style-name="Table8.A1" office:value-type="string">
            <text:p text:style-name="P121"><text:span text:style-name="Strong_20_Emphasis"><text:span text:style-name="T458">fragile</text:span></text:span><text:span text:style-name="Strong_20_Emphasis">DebtHits</text:span></text:p>
          </table:table-cell>
          <table:table-cell table:style-name="Table8.A1" office:value-type="string">
            <text:p text:style-name="P121"><text:span text:style-name="Source_20_Text"><text:span text:style-name="T458">fragile</text:span></text:span><text:span text:style-name="Source_20_Text">_debt</text:span></text:p>
          </table:table-cell>
          <table:table-cell table:style-name="Table8.A1" office:value-type="string">
            <text:p text:style-name="P121"><text:span text:style-name="Strong_20_Emphasis">3.0x</text:span></text:p>
          </table:table-cell>
          <table:table-cell table:style-name="Table8.A1" office:value-type="string">
            <text:p text:style-name="P121"><text:span text:style-name="Strong_20_Emphasis">The Fracture.</text:span> An explicit admission that the current logic is fragile, dangerous, or ugly. Includes <text:span text:style-name="Source_20_Text">HACK</text:span>, <text:span text:style-name="Source_20_Text">FIXME</text:span>, <text:span text:style-name="Source_20_Text">XXX</text:span>, <text:span text:style-name="Source_20_Text">WORKAROUND</text:span>, <text:span text:style-name="Source_20_Text">KLUDGE</text:span>, <text:span text:style-name="Source_20_Text">OPTIMIZE</text:span>, <text:span text:style-name="Source_20_Text">HARDCODED</text:span>, <text:span text:style-name="Source_20_Text">NOQA</text:span>, <text:span text:style-name="Source_20_Text">IGNORED</text:span>, <text:span text:style-name="Source_20_Text">WTF</text:span>, <text:span text:style-name="Source_20_Text">BROKEN</text:span>, <text:span text:style-name="Source_20_Text">FRAGILE</text:span>, <text:span text:style-name="Source_20_Text">UGLY</text:span>, <text:span text:style-name="Source_20_Text">BAND-AID</text:span>, <text:span text:style-name="Source_20_Text">PATCH</text:span>.</text:p>
          </table:table-cell>
        </table:table-row>
        <table:table-row>
          <table:table-cell table:style-name="Table8.A1" office:value-type="string">
            <text:p text:style-name="P121"><text:span text:style-name="Strong_20_Emphasis">StubHits</text:span></text:p>
          </table:table-cell>
          <table:table-cell table:style-name="Table8.A1" office:value-type="string">
            <text:p text:style-name="P121"><text:span text:style-name="Source_20_Text">func_empty</text:span></text:p>
          </table:table-cell>
          <table:table-cell table:style-name="Table8.A1" office:value-type="string">
            <text:p text:style-name="P121"><text:span text:style-name="Strong_20_Emphasis">0.5x</text:span></text:p>
          </table:table-cell>
          <table:table-cell table:style-name="Table8.A1" office:value-type="string">
            <text:p text:style-name="P121"><text:span text:style-name="Strong_20_Emphasis">The Skeleton.</text:span> Empty functions (<text:span text:style-name="Source_20_Text">{}</text:span>) found in the <text:span text:style-name="Strong_20_Emphasis">Logic Stream</text:span>. Implies placeholder logic independent of comments.</text:p>
          </table:table-cell>
        </table:table-row>
        <table:table-row>
          <table:table-cell table:style-name="Table8.A1" office:value-type="string">
            <text:p text:style-name="P121"><text:span text:style-name="Strong_20_Emphasis">ImplicitRisk</text:span></text:p>
          </table:table-cell>
          <table:table-cell table:style-name="Table8.A1" office:value-type="string">
            <text:p text:style-name="P121"><text:span text:style-name="Source_20_Text">Irc</text:span></text:p>
          </table:table-cell>
          <table:table-cell table:style-name="Table8.A1" office:value-type="string">
            <text:p text:style-name="P121"><text:span text:style-name="Strong_20_Emphasis">Variable</text:span></text:p>
          </table:table-cell>
          <table:table-cell table:style-name="Table8.A1" office:value-type="string">
            <text:p text:style-name="P121"><text:span text:style-name="Strong_20_Emphasis">The Fog.</text:span> Implicit languages (Perl/Shell) hide debt better, so we add a baseline load.</text:p>
          </table:table-cell>
        </table:table-row>
      </table:table>
      <text:p text:style-name="P124"><text:span text:style-name="Emphasis">Note: The scanner applies these regexes to the </text:span><text:span text:style-name="Strong_20_Emphasis">Raw/Comment Stream</text:span><text:span text:style-name="Emphasis"> only.</text:span></text:p>
      <text:h text:style-name="Heading_20_5" text:outline-level="5"><text:bookmark-start text:name="__RefHeading___Toc560565_2813440148 Copy 3"/><text:span text:style-name="T186">2.2.I.</text:span><text:span text:style-name="T455">C</text:span>. The Universal Framework Integration<text:bookmark-end text:name="__RefHeading___Toc560565_2813440148 Copy 3"/></text:h>
      <text:list text:style-name="L88">
        <text:list-item>
          <text:p text:style-name="P300"><text:span text:style-name="Source_20_Text">Fc</text:span><text:span text:style-name="Strong_20_Emphasis"> (Fidelity Coefficient):</text:span> <text:span text:style-name="Strong_20_Emphasis">Not Applied.</text:span> A <text:span text:style-name="Source_20_Text">TODO</text:span> is a <text:span text:style-name="Source_20_Text">TODO</text:span>, regardless of language.</text:p>
        </text:list-item>
        <text:list-item>
          <text:p text:style-name="P300"><text:span text:style-name="Source_20_Text">Irc</text:span><text:span text:style-name="Strong_20_Emphasis"> (Implicit Risk Correction):</text:span> <text:span text:style-name="Strong_20_Emphasis">Applied.</text:span> Added to the Stress Sum.</text:p>
        </text:list-item>
        <text:list-item>
          <text:p text:style-name="P300"><text:soft-page-break/><text:span text:style-name="Source_20_Text">Mp</text:span><text:span text:style-name="Strong_20_Emphasis"> (Path Modifier):</text:span> <text:span text:style-name="Strong_20_Emphasis">Applied.</text:span></text:p>
          <text:list>
            <text:list-item>
              <text:p text:style-name="P300"><text:span text:style-name="Emphasis">Archive/Legacy (</text:span><text:span text:style-name="Source_20_Text">Mp = 0.5</text:span><text:span text:style-name="Emphasis">):</text:span> Debt is expected here. Discount it.</text:p>
            </text:list-item>
            <text:list-item>
              <text:p text:style-name="P300"><text:span text:style-name="Emphasis">Core/Kernel (</text:span><text:span text:style-name="Source_20_Text">Mp = 1.2</text:span><text:span text:style-name="Emphasis">):</text:span> Debt here is dangerous. Amplify it.</text:p>
            </text:list-item>
            <text:list-item>
              <text:p text:style-name="P300"><text:span text:style-name="Emphasis">Scratchpad (</text:span><text:span text:style-name="Source_20_Text">Mp = 0.8</text:span><text:span text:style-name="Emphasis">):</text:span> Allow messy thoughts.</text:p>
            </text:list-item>
          </text:list>
        </text:list-item>
      </text:list>
      <text:h text:style-name="Heading_20_5" text:outline-level="5"><text:bookmark-start text:name="__RefHeading___Toc560565_2813440148 Copy 4"/><text:span text:style-name="T186">2.2.I.</text:span><text:span text:style-name="T455">D</text:span>. The Equation: The Structural Stress Density<text:bookmark-end text:name="__RefHeading___Toc560565_2813440148 Copy 4"/></text:h>
      <text:p text:style-name="P124">We calculate the <text:span text:style-name="Strong_20_Emphasis">Density of Debt</text:span> per line of code.</text:p>
      <text:p text:style-name="Text_20_body"><text:bookmark-start text:name="__RefHeading___Toc42152_730389025"/>Step A: Calculate Stress Sum<text:bookmark-end text:name="__RefHeading___Toc42152_730389025"/></text:p>
      <text:p text:style-name="P124">We sum the markers, applying weights to distinguish "Planned Work" (Good Debt) from "Broken Logic" (Bad Debt).</text:p>
      <text:p text:style-name="Text_20_body"><text:bookmark-start text:name="__RefHeading___Toc42154_730389025"/>Step B: Calculate Stress Density<text:bookmark-end text:name="__RefHeading___Toc42154_730389025"/></text:p>
      <text:p text:style-name="P124">We normalize against the file size. A 1000-line file with 1 <text:span text:style-name="Source_20_Text">TODO</text:span> is fine (Density ~0.001). A 10-line file with 1 <text:span text:style-name="Source_20_Text">HACK</text:span> is structurally critical (Density ~0.3).</text:p>
      <text:p text:style-name="Text_20_body"><text:bookmark-start text:name="__RefHeading___Toc42156_730389025"/>Step C: The Sigmoid Map<text:bookmark-end text:name="__RefHeading___Toc42156_730389025"/></text:p>
      <text:p text:style-name="P124">We use a Sigmoid function to create a "Tolerance Threshold."</text:p>
      <text:list text:style-name="L89">
        <text:list-item>
          <text:p text:style-name="P301"><text:span text:style-name="Strong_20_Emphasis">Threshold (T):</text:span> <text:span text:style-name="Strong_20_Emphasis">5.0</text:span>. We tolerate ~5 points of stress per 100 lines (e.g., 5 TODOs or 1 HACK + 2 TODOs) before the score spikes.</text:p>
        </text:list-item>
        <text:list-item>
          <text:p text:style-name="P301"><text:span text:style-name="Strong_20_Emphasis">Slope (K):</text:span> <text:span text:style-name="Strong_20_Emphasis">0.5</text:span>. A gentle slope allows for nuance.</text:p>
        </text:list-item>
      </text:list>
      <text:p text:style-name="Text_20_body"><text:bookmark-start text:name="__RefHeading___Toc42158_730389025"/>Step D: Final Calculation<text:bookmark-end text:name="__RefHeading___Toc42158_730389025"/></text:p>
      <text:p text:style-name="P124">Apply the Path Modifier (<text:span text:style-name="Source_20_Text">Mp</text:span>).</text:p>
      <text:h text:style-name="Heading_20_5" text:outline-level="5"><text:bookmark-start text:name="__RefHeading___Toc560565_2813440148 Copy 5"/><text:span text:style-name="T186">2.2.I.</text:span><text:span text:style-name="T455">E</text:span>. Implementation (Python Reference)<text:bookmark-end text:name="__RefHeading___Toc560565_2813440148 Copy 5"/></text:h>
      <text:p text:style-name="P119"><text:span text:style-name="Source_20_Text">import math</text:span></text:p>
      <text:p text:style-name="P119"><text:span text:style-name="Source_20_Text">import re</text:span></text:p>
      <text:p text:style-name="P119"/>
      <text:p text:style-name="P119"><text:span text:style-name="Source_20_Text">def calculate_tech_debt(self, raw_content, clean_content, loc, irc, mp):</text:span></text:p>
      <text:p text:style-name="P119"><text:span text:style-name="Source_20_Text"><text:s text:c="4"/>"""</text:span></text:p>
      <text:p text:style-name="P119"><text:span text:style-name="Source_20_Text"><text:s text:c="4"/>Calculates 2.2.I Tech Debt Exposure (Stress Density).</text:span></text:p>
      <text:p text:style-name="P119"><text:span text:style-name="Source_20_Text"><text:s text:c="4"/>Returns int 0-100.</text:span></text:p>
      <text:p text:style-name="P119"><text:span text:style-name="Source_20_Text"><text:s text:c="4"/>"""</text:span></text:p>
      <text:p text:style-name="P119"><text:span text:style-name="Source_20_Text"><text:s text:c="4"/># 1. Literature Stream (Raw Content): Scan for markers in comments</text:span></text:p>
      <text:p text:style-name="P119"><text:span text:style-name="Source_20_Text"><text:s text:c="4"/># We rely on pre-compiled regexes from the config, assumed to be passed in 'rules'</text:span></text:p>
      <text:p text:style-name="P119"><text:span text:style-name="Source_20_Text"><text:s text:c="4"/># good_debt_hits = len(rules['good_debt'].findall(raw_content))</text:span></text:p>
      <text:p text:style-name="P119"><text:span text:style-name="Source_20_Text"><text:s text:c="4"/># bad_debt_hits = len(rules['bad_debt'].findall(raw_content))</text:span></text:p>
      <text:p text:style-name="P119"><text:span text:style-name="Source_20_Text"><text:s text:c="4"/></text:span></text:p>
      <text:p text:style-name="P119"><text:span text:style-name="Source_20_Text"><text:s text:c="4"/># For standalone verification logic:</text:span></text:p>
      <text:p text:style-name="P119"><text:span text:style-name="Source_20_Text"><text:s text:c="4"/>good_debt_hits = len(re.findall(</text:span></text:p>
      <text:p text:style-name="P119"><text:soft-page-break/><text:span text:style-name="Source_20_Text"><text:s text:c="8"/>r'\b(TODO|BUG|TBD|WIP|STUB|PLACEHOLDER|IMPLEMENT|PENDING|REFACTOR|CLEANUP|REVIEW|UPDATE)\b', </text:span></text:p>
      <text:p text:style-name="P119"><text:span text:style-name="Source_20_Text"><text:s text:c="8"/>raw_content, </text:span></text:p>
      <text:p text:style-name="P119"><text:span text:style-name="Source_20_Text"><text:s text:c="8"/>re.I</text:span></text:p>
      <text:p text:style-name="P119"><text:span text:style-name="Source_20_Text"><text:s text:c="4"/>))</text:span></text:p>
      <text:p text:style-name="P119"><text:span text:style-name="Source_20_Text"><text:s text:c="4"/></text:span></text:p>
      <text:p text:style-name="P119"><text:span text:style-name="Source_20_Text"><text:s text:c="4"/>bad_debt_hits = len(re.findall(</text:span></text:p>
      <text:p text:style-name="P119"><text:span text:style-name="Source_20_Text"><text:s text:c="8"/>r'\b(HACK|FIXME|XXX|WORKAROUND|KLUDGE|OPTIMIZE|HARDCODED|NOQA|IGNORED|WTF|BROKEN|FRAGILE|UGLY|MESSY|BAND-AID|PATCH)\b', </text:span></text:p>
      <text:p text:style-name="P119"><text:span text:style-name="Source_20_Text"><text:s text:c="8"/>raw_content, </text:span></text:p>
      <text:p text:style-name="P119"><text:span text:style-name="Source_20_Text"><text:s text:c="8"/>re.I</text:span></text:p>
      <text:p text:style-name="P119"><text:span text:style-name="Source_20_Text"><text:s text:c="4"/>))</text:span></text:p>
      <text:p text:style-name="P119"><text:span text:style-name="Source_20_Text"><text:s text:c="4"/></text:span></text:p>
      <text:p text:style-name="P119"><text:span text:style-name="Source_20_Text"><text:s text:c="4"/># 2. Logic Stream (Clean Content): Scan for structural gaps</text:span></text:p>
      <text:p text:style-name="P119"><text:span text:style-name="Source_20_Text"><text:s text:c="4"/># Stubs: Empty blocks (structural heuristic)</text:span></text:p>
      <text:p text:style-name="P119"><text:span text:style-name="Source_20_Text"><text:s text:c="4"/>stub_hits = len(re.findall(r'\{\s*\}', clean_content))</text:span></text:p>
      <text:p text:style-name="P119"/>
      <text:p text:style-name="P119"><text:span text:style-name="Source_20_Text"><text:s text:c="4"/># 3. Step A: Stress Sum</text:span></text:p>
      <text:p text:style-name="P119"><text:span text:style-name="Source_20_Text"><text:s text:c="4"/>stress = (good_debt_hits * 1.0) + (bad_debt_hits * 3.0) + (stub_hits * 0.5) + irc</text:span></text:p>
      <text:p text:style-name="P119"/>
      <text:p text:style-name="P119"><text:span text:style-name="Source_20_Text"><text:s text:c="4"/># 4. Step B: Density Calculation</text:span></text:p>
      <text:p text:style-name="P119"><text:span text:style-name="Source_20_Text"><text:s text:c="4"/># Scaled by 100 for readability (Stress points per 100 lines)</text:span></text:p>
      <text:p text:style-name="P119"><text:span text:style-name="Source_20_Text"><text:s text:c="4"/>density = (stress / max(loc, 1)) * 100</text:span></text:p>
      <text:p text:style-name="P119"/>
      <text:p text:style-name="P119"><text:span text:style-name="Source_20_Text"><text:s text:c="4"/># 5. Step C: Sigmoid Map</text:span></text:p>
      <text:p text:style-name="P119"><text:span text:style-name="Source_20_Text"><text:s text:c="4"/># Threshold = 5.0 (5 stress points per 100 lines is the "tipping point")</text:span></text:p>
      <text:p text:style-name="P119"><text:span text:style-name="Source_20_Text"><text:s text:c="4"/># Slope = 0.5 (Gentle rise)</text:span></text:p>
      <text:p text:style-name="P119"><text:span text:style-name="Source_20_Text"><text:s text:c="4"/>try:</text:span></text:p>
      <text:p text:style-name="P119"><text:span text:style-name="Source_20_Text"><text:s text:c="8"/>raw_score = 100 / (1 + math.exp(-0.5 * (density - 5.0)))</text:span></text:p>
      <text:p text:style-name="P119"><text:span text:style-name="Source_20_Text"><text:s text:c="4"/>except OverflowError:</text:span></text:p>
      <text:p text:style-name="P119"><text:span text:style-name="Source_20_Text"><text:s text:c="8"/>raw_score = 100 if density &gt; 5.0 else 0</text:span></text:p>
      <text:p text:style-name="P119"/>
      <text:p text:style-name="P119"><text:span text:style-name="Source_20_Text"><text:s text:c="4"/># 6. Step D: Context Modifier</text:span></text:p>
      <text:p text:style-name="P119"><text:span text:style-name="Source_20_Text"><text:s text:c="4"/>path_mod = mp.get('Tech Debt Exposure', 1.0)</text:span></text:p>
      <text:p text:style-name="P119"><text:span text:style-name="Source_20_Text"><text:s text:c="4"/></text:span></text:p>
      <text:p text:style-name="P119"><text:span text:style-name="Source_20_Text"><text:s text:c="4"/>final_score = raw_score * path_mod</text:span></text:p>
      <text:p text:style-name="P119"><text:span text:style-name="Source_20_Text"><text:s text:c="4"/></text:span></text:p>
      <text:p text:style-name="P120"><text:span text:style-name="Source_20_Text"><text:s text:c="4"/>return int(min(final_score, 100))</text:span></text:p>
      <text:h text:style-name="Heading_20_5" text:outline-level="5"><text:bookmark-start text:name="__RefHeading___Toc560565_2813440148 Copy 6"/><text:span text:style-name="T186">2.2.I.</text:span><text:span text:style-name="T455">F</text:span>. Visual Verification ("The Truth")<text:bookmark-end text:name="__RefHeading___Toc560565_2813440148 Copy 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122">Scenario</text:p>
          </table:table-cell>
          <table:table-cell table:style-name="Table24.A1" office:value-type="string">
            <text:p text:style-name="P122">LOC</text:p>
          </table:table-cell>
          <table:table-cell table:style-name="Table24.A1" office:value-type="string">
            <text:p text:style-name="P122">Markers</text:p>
          </table:table-cell>
          <table:table-cell table:style-name="Table24.A1" office:value-type="string">
            <text:p text:style-name="P122">Density</text:p>
          </table:table-cell>
          <table:table-cell table:style-name="Table24.A1" office:value-type="string">
            <text:p text:style-name="P122">Score</text:p>
          </table:table-cell>
          <table:table-cell table:style-name="Table24.A1" office:value-type="string">
            <text:p text:style-name="P122">Interpretation</text:p>
          </table:table-cell>
        </table:table-row>
        <table:table-row>
          <table:table-cell table:style-name="Table24.A1" office:value-type="string">
            <text:p text:style-name="P121"><text:span text:style-name="Strong_20_Emphasis">Clean Core</text:span></text:p>
          </table:table-cell>
          <table:table-cell table:style-name="Table24.A1" office:value-type="string">
            <text:p text:style-name="P121">200</text:p>
          </table:table-cell>
          <table:table-cell table:style-name="Table24.A1" office:value-type="string">
            <text:p text:style-name="P121">0</text:p>
          </table:table-cell>
          <table:table-cell table:style-name="Table24.A1" office:value-type="string">
            <text:p text:style-name="P121">0.0</text:p>
          </table:table-cell>
          <table:table-cell table:style-name="Table24.A1" office:value-type="string">
            <text:p text:style-name="P121"><text:span text:style-name="Strong_20_Emphasis">7</text:span></text:p>
          </table:table-cell>
          <table:table-cell table:style-name="Table24.A1" office:value-type="string">
            <text:p text:style-name="P121"><text:span text:style-name="Strong_20_Emphasis">White.</text:span> Pristine.</text:p>
          </table:table-cell>
        </table:table-row>
        <table:table-row>
          <table:table-cell table:style-name="Table24.A1" office:value-type="string">
            <text:p text:style-name="P121"><text:span text:style-name="Strong_20_Emphasis">Honest Dev</text:span></text:p>
          </table:table-cell>
          <table:table-cell table:style-name="Table24.A1" office:value-type="string">
            <text:p text:style-name="P121">200</text:p>
          </table:table-cell>
          <table:table-cell table:style-name="Table24.A1" office:value-type="string">
            <text:p text:style-name="P121">2 "REFACTOR", 3 "TODO"</text:p>
          </table:table-cell>
          <table:table-cell table:style-name="Table24.A1" office:value-type="string">
            <text:p text:style-name="P121">2.5</text:p>
          </table:table-cell>
          <table:table-cell table:style-name="Table24.A1" office:value-type="string">
            <text:p text:style-name="P121"><text:span text:style-name="Strong_20_Emphasis">22</text:span></text:p>
          </table:table-cell>
          <table:table-cell table:style-name="Table24.A1" office:value-type="string">
            <text:p text:style-name="P121"><text:span text:style-name="Strong_20_Emphasis">Pale Red.</text:span> Good citizenship. Admitting work is needed.</text:p>
          </table:table-cell>
        </table:table-row>
        <table:table-row>
          <table:table-cell table:style-name="Table24.A1" office:value-type="string">
            <text:p text:style-name="P121"><text:span text:style-name="Strong_20_Emphasis">The Prototype</text:span></text:p>
          </table:table-cell>
          <table:table-cell table:style-name="Table24.A1" office:value-type="string">
            <text:p text:style-name="P121">100</text:p>
          </table:table-cell>
          <table:table-cell table:style-name="Table24.A1" office:value-type="string">
            <text:p text:style-name="P121">2 STUBs, 3 WIPs</text:p>
          </table:table-cell>
          <table:table-cell table:style-name="Table24.A1" office:value-type="string">
            <text:p text:style-name="P121">5.0</text:p>
          </table:table-cell>
          <table:table-cell table:style-name="Table24.A1" office:value-type="string">
            <text:p text:style-name="P121"><text:span text:style-name="Strong_20_Emphasis">50</text:span></text:p>
          </table:table-cell>
          <table:table-cell table:style-name="Table24.A1" office:value-type="string">
            <text:p text:style-name="P121"><text:span text:style-name="Strong_20_Emphasis">Soft Red.</text:span> Halfway point. Rough but honest.</text:p>
          </table:table-cell>
        </table:table-row>
        <table:table-row>
          <table:table-cell table:style-name="Table24.A1" office:value-type="string">
            <text:p text:style-name="P121"><text:span text:style-name="Strong_20_Emphasis">Frustrated Dev</text:span></text:p>
          </table:table-cell>
          <table:table-cell table:style-name="Table24.A1" office:value-type="string">
            <text:p text:style-name="P121">50</text:p>
          </table:table-cell>
          <table:table-cell table:style-name="Table24.A1" office:value-type="string">
            <text:p text:style-name="P121">1 "WTF", 1 "HACK"</text:p>
          </table:table-cell>
          <table:table-cell table:style-name="Table24.A1" office:value-type="string">
            <text:p text:style-name="P121">12.0</text:p>
          </table:table-cell>
          <table:table-cell table:style-name="Table24.A1" office:value-type="string">
            <text:p text:style-name="P121"><text:span text:style-name="Strong_20_Emphasis">97</text:span></text:p>
          </table:table-cell>
          <table:table-cell table:style-name="Table24.A1" office:value-type="string">
            <text:p text:style-name="P121"><text:span text:style-name="Strong_20_Emphasis">Red.</text:span> High emotional and structural stress.</text:p>
          </table:table-cell>
        </table:table-row>
        <text:soft-page-break/>
        <table:table-row>
          <table:table-cell table:style-name="Table24.A1" office:value-type="string">
            <text:p text:style-name="P121"><text:span text:style-name="Strong_20_Emphasis">Legacy Dump</text:span></text:p>
          </table:table-cell>
          <table:table-cell table:style-name="Table24.A1" office:value-type="string">
            <text:p text:style-name="P121">1000</text:p>
          </table:table-cell>
          <table:table-cell table:style-name="Table24.A1" office:value-type="string">
            <text:p text:style-name="P121">20 "HARDCODED"</text:p>
          </table:table-cell>
          <table:table-cell table:style-name="Table24.A1" office:value-type="string">
            <text:p text:style-name="P121">6.0</text:p>
          </table:table-cell>
          <table:table-cell table:style-name="Table24.A1" office:value-type="string">
            <text:p text:style-name="P121"><text:span text:style-name="Strong_20_Emphasis">31</text:span></text:p>
          </table:table-cell>
          <table:table-cell table:style-name="Table24.A1" office:value-type="string">
            <text:p text:style-name="P121"><text:span text:style-name="Strong_20_Emphasis">Pale Red.</text:span> <text:span text:style-name="Emphasis">With Mp=0.5</text:span>. Large volume, high debt, but marked as legacy.</text:p>
          </table:table-cell>
        </table:table-row>
      </table:table>
      <text:p text:style-name="P124"/>
      <text:p text:style-name="P123"><text:span text:style-name="Source_20_Text"/></text:p>
      <text:h text:style-name="P76" text:outline-level="4"><text:bookmark-start text:name="__RefHeading___Toc42695_1155106909"/><text:span text:style-name="Source_20_Text"><text:span text:style-name="T38">2.2.J. Documentation Risk Exposure (Metric: Sigmoid Debt)</text:span></text:span><text:bookmark-end text:name="__RefHeading___Toc42695_1155106909"/></text:h>
      <text:h text:style-name="Heading_20_5" text:outline-level="5"><text:bookmark-start text:name="__RefHeading___Toc42697_1155106909"/>2.2.J.1. The Philosophy: The Duty of Care<text:bookmark-end text:name="__RefHeading___Toc42697_1155106909"/></text:h>
      <text:p text:style-name="Text_20_body">"The Map is not the Territory, but without the Map, the Territory is lost."</text:p>
      <text:p text:style-name="Text_20_body">Code instructions define what the machine executes, but documentation defines the "Duty of Care" a developer owes to their future self and the collective. This metric does not reward the raw volume of text; it measures the <text:span text:style-name="Strong_20_Emphasis">Density of Intent</text:span>. We distinguish between "Library-Grade" engineering—where a component is a black box supported by structured metadata—and "Silent Logic," which requires the reader to perform manual mental compilation to understand the 'why' behind the 'what.'</text:p>
      <text:p text:style-name="Text_20_body">In the <text:span text:style-name="Strong_20_Emphasis">Risk Exposure</text:span> model, a score of <text:span text:style-name="Strong_20_Emphasis">0</text:span> represents a "Saturated Map" (Perfect Coverage), while a score of <text:span text:style-name="Strong_20_Emphasis">100</text:span> represents "Total Opacity" (Nothing written).</text:p>
      <text:h text:style-name="Heading_20_5" text:outline-level="5"><text:bookmark-start text:name="__RefHeading___Toc42699_1155106909"/>2.2.J.2. The Inputs (Tiered Efficiency)<text:bookmark-end text:name="__RefHeading___Toc42699_1155106909"/></text:h>
      <text:p text:style-name="Text_20_body">We apply Efficiency Penalties to unstructured documentation. While all commentary is indexed, structured tags are significantly more efficient at reducing risk scor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95">Input Variable</text:p>
          </table:table-cell>
          <table:table-cell table:style-name="Table9.A1" office:value-type="string">
            <text:p text:style-name="P95">Regex Key</text:p>
          </table:table-cell>
          <table:table-cell table:style-name="Table9.A1" office:value-type="string">
            <text:p text:style-name="P95">Weight</text:p>
          </table:table-cell>
          <table:table-cell table:style-name="Table9.A1" office:value-type="string">
            <text:p text:style-name="P95">Efficiency</text:p>
          </table:table-cell>
          <table:table-cell table:style-name="Table9.A1" office:value-type="string">
            <text:p text:style-name="P95">Rationale</text:p>
          </table:table-cell>
        </table:table-row>
        <table:table-row>
          <table:table-cell table:style-name="Table9.A1" office:value-type="string">
            <text:p text:style-name="P94"><text:span text:style-name="Strong_20_Emphasis">DocHits</text:span></text:p>
          </table:table-cell>
          <table:table-cell table:style-name="Table9.A1" office:value-type="string">
            <text:p text:style-name="P94"><text:span text:style-name="Source_20_Text">doc</text:span></text:p>
          </table:table-cell>
          <table:table-cell table:style-name="Table9.A1" office:value-type="string">
            <text:p text:style-name="P94">1.0x</text:p>
          </table:table-cell>
          <table:table-cell table:style-name="Table9.A1" office:value-type="string">
            <text:p text:style-name="P94">High</text:p>
          </table:table-cell>
          <table:table-cell table:style-name="Table9.A1" office:value-type="string">
            <text:p text:style-name="P94"><text:span text:style-name="Strong_20_Emphasis">Tier 1 (The Interface).</text:span> Gold standard tags (@param, ///). 1 hit provides a full point of intent density.</text:p>
          </table:table-cell>
        </table:table-row>
        <table:table-row>
          <table:table-cell table:style-name="Table9.A1" office:value-type="string">
            <text:p text:style-name="P94"><text:span text:style-name="Strong_20_Emphasis">HeaderHits</text:span></text:p>
          </table:table-cell>
          <table:table-cell table:style-name="Table9.A1" office:value-type="string">
            <text:p text:style-name="P94"><text:span text:style-name="Source_20_Text">ownership</text:span></text:p>
          </table:table-cell>
          <table:table-cell table:style-name="Table9.A1" office:value-type="string">
            <text:p text:style-name="P94">0.5x</text:p>
          </table:table-cell>
          <table:table-cell table:style-name="Table9.A1" office:value-type="string">
            <text:p text:style-name="P94">Medium</text:p>
          </table:table-cell>
          <table:table-cell table:style-name="Table9.A1" office:value-type="string">
            <text:p text:style-name="P94"><text:span text:style-name="Strong_20_Emphasis">Tier 2 (The Metadata).</text:span> Attribution and file-level summaries. Valuable context, but less critical for logic comprehension.</text:p>
          </table:table-cell>
        </table:table-row>
        <table:table-row>
          <table:table-cell table:style-name="Table9.A1" office:value-type="string">
            <text:p text:style-name="P94"><text:span text:style-name="Strong_20_Emphasis">CommentLines</text:span></text:p>
          </table:table-cell>
          <table:table-cell table:style-name="Table9.A1" office:value-type="string">
            <text:p text:style-name="P94"><text:span text:style-name="Source_20_Text">Calculated</text:span></text:p>
          </table:table-cell>
          <table:table-cell table:style-name="Table9.A1" office:value-type="string">
            <text:p text:style-name="P94">0.33x</text:p>
          </table:table-cell>
          <table:table-cell table:style-name="Table9.A1" office:value-type="string">
            <text:p text:style-name="P94">Low</text:p>
          </table:table-cell>
          <table:table-cell table:style-name="Table9.A1" office:value-type="string">
            <text:p text:style-name="P94"><text:span text:style-name="Strong_20_Emphasis">Tier 3 (The Narrative).</text:span> General inline comments. Requires 3 lines of text to equal 1 structured tag, honoring effort but demanding volume.</text:p>
          </table:table-cell>
        </table:table-row>
      </table:table>
      <text:p text:style-name="Text_20_body"><text:span text:style-name="Strong_20_Emphasis">Denominator:</text:span> <text:span text:style-name="Source_20_Text">meaningful_loc</text:span> (Lines of Code). We measure density relative to size; a 1000-line file requires significantly more intent-signaling than a 10-line utility.</text:p>
      <text:h text:style-name="Heading_20_5" text:outline-level="5"><text:bookmark-start text:name="__RefHeading___Toc42701_1155106909"/><text:soft-page-break/>2.2.J.3. The Universal Framework Integration<text:bookmark-end text:name="__RefHeading___Toc42701_1155106909"/></text:h>
      <text:list text:style-name="L90">
        <text:list-item>
          <text:p text:style-name="P302"><text:span text:style-name="Strong_20_Emphasis">Fc (Fidelity Coefficient):</text:span> Applied to the final risk reduction. We trust documentation in Explicit languages (e.g., Rust) more than in Implicit languages (e.g., Shell), where comments are prone to "drifting" from the actual logic.</text:p>
        </text:list-item>
        <text:list-item>
          <text:p text:style-name="P302"><text:span text:style-name="Strong_20_Emphasis">Irc (Implicit Risk Correction):</text:span> Applied to the Threshold. Implicit languages require a higher "Opacity Tax." They need more documentation density just to reach a baseline safety level.</text:p>
        </text:list-item>
        <text:list-item>
          <text:p text:style-name="P302"><text:span text:style-name="Strong_20_Emphasis">Mp (Path Modifier):</text:span></text:p>
          <text:list>
            <text:list-item>
              <text:p text:style-name="P302"><text:span text:style-name="Strong_20_Emphasis">Public/API (Mp = 1.5):</text:span> High Bar. This is the face of the system. Lack of docs here is punished more severely.</text:p>
            </text:list-item>
            <text:list-item>
              <text:p text:style-name="P302"><text:span text:style-name="Strong_20_Emphasis">Tests/Experiments (Mp = 0.5):</text:span> Low Bar. Internal logic is more "forgiven" for being silent.</text:p>
            </text:list-item>
          </text:list>
        </text:list-item>
      </text:list>
      <text:h text:style-name="Heading_20_5" text:outline-level="5"><text:bookmark-start text:name="__RefHeading___Toc42703_1155106909"/>2.2.J.4. The Equation: The Dynamic Risk Sigmoid<text:bookmark-end text:name="__RefHeading___Toc42703_1155106909"/></text:h>
      <text:p text:style-name="Text_20_body">We calculate the density of intent and then map it to a "Debt Curve" where the score represents the <text:span text:style-name="Strong_20_Emphasis">Exposure</text:span> caused by missing documentation.</text:p>
      <text:p text:style-name="Text_20_body"><text:bookmark-start text:name="__RefHeading___Toc42705_1155106909"/>Step 1: Calculate Intent Density (D)<text:bookmark-end text:name="__RefHeading___Toc42705_1155106909"/></text:p>
      <text:p text:style-name="Text_20_body">D = ((DocHits * 1.0) + (HeaderHits * 0.5) + (CommentLines * 0.33) / MeaningfulLOC) * 100</text:p>
      <text:p text:style-name="Text_20_body"><text:bookmark-start text:name="__RefHeading___Toc42707_1155106909"/>Step 2: Determine The Risk Threshold (T)<text:bookmark-end text:name="__RefHeading___Toc42707_1155106909"/></text:p>
      <text:p text:style-name="Text_20_body">The "Tipping Point" where a file transitions from "Well-Documented" to "High Risk."</text:p>
      <text:p text:style-name="Text_20_body">T = (10.0 + Irc) * Mp</text:p>
      <text:p text:style-name="Text_20_body"><text:span text:style-name="Emphasis">(Base 10 assumes 10 structured points per 100 lines is the safety standard).</text:span></text:p>
      <text:p text:style-name="Text_20_body"><text:bookmark-start text:name="__RefHeading___Toc42709_1155106909"/>Step 3: The Risk Sigmoid Map (S)<text:bookmark-end text:name="__RefHeading___Toc42709_1155106909"/></text:p>
      <text:p text:style-name="Text_20_body">We use a sigmoid with a <text:span text:style-name="Strong_20_Emphasis">positive</text:span> exponent to ensure that as Documentation Density (D) increases, the Risk Score (S) decreases.</text:p>
      <text:p text:style-name="Text_20_body">S = 100 / (1 + e^(0.2 * (D - T)))</text:p>
      <text:p text:style-name="Text_20_body"><text:span text:style-name="Emphasis">(Slope K = 0.2 creates a smooth "forgiveness" gradient).</text:span></text:p>
      <text:h text:style-name="Heading_20_5" text:outline-level="5"><text:bookmark-start text:name="__RefHeading___Toc42711_1155106909"/>2.2.J.5. Implementation (Python Reference)<text:bookmark-end text:name="__RefHeading___Toc42711_1155106909"/></text:h>
      <text:p text:style-name="Preformatted_20_Text"><text:span text:style-name="Source_20_Text">import math</text:span></text:p>
      <text:p text:style-name="Preformatted_20_Text"><text:span text:style-name="Source_20_Text">import re</text:span></text:p>
      <text:p text:style-name="Preformatted_20_Text"/>
      <text:p text:style-name="Preformatted_20_Text"><text:soft-page-break/><text:span text:style-name="Source_20_Text">def calculate_doc_risk_exposure(self, raw_content, loc, hits_doc, hits_owner, fc, irc, mp):</text:span></text:p>
      <text:p text:style-name="Preformatted_20_Text"><text:span text:style-name="Source_20_Text"><text:s text:c="4"/>"""</text:span></text:p>
      <text:p text:style-name="Preformatted_20_Text"><text:span text:style-name="Source_20_Text"><text:s text:c="4"/>Calculates 2.2.J Documentation Risk Exposure.</text:span></text:p>
      <text:p text:style-name="Preformatted_20_Text"><text:span text:style-name="Source_20_Text"><text:s text:c="4"/>Higher Score = Worse Documentation (Higher Risk).</text:span></text:p>
      <text:p text:style-name="Preformatted_20_Text"><text:span text:style-name="Source_20_Text"><text:s text:c="4"/>"""</text:span></text:p>
      <text:p text:style-name="Preformatted_20_Text"><text:span text:style-name="Source_20_Text"><text:s text:c="4"/># 1. Tier 3 Input: General Comment Lines (Efficiency: 0.33)</text:span></text:p>
      <text:p text:style-name="Preformatted_20_Text"><text:span text:style-name="Source_20_Text"><text:s text:c="4"/>comment_lines = len(re.findall(r'^\s*(?://|#|--|/\*|\*)', raw_content, re.M))</text:span></text:p>
      <text:p text:style-name="Preformatted_20_Text"><text:span text:style-name="Source_20_Text"><text:s text:c="4"/></text:span></text:p>
      <text:p text:style-name="Preformatted_20_Text"><text:span text:style-name="Source_20_Text"><text:s text:c="4"/># 2. Step A: Intent Density Calculation</text:span></text:p>
      <text:p text:style-name="Preformatted_20_Text"><text:span text:style-name="Source_20_Text"><text:s text:c="4"/>weighted_points = (hits_doc * 1.0) + (hits_owner * 0.5) + (comment_lines * 0.33)</text:span></text:p>
      <text:p text:style-name="Preformatted_20_Text"><text:span text:style-name="Source_20_Text"><text:s text:c="4"/>density = (weighted_points / max(loc, 1)) * 100</text:span></text:p>
      <text:p text:style-name="Preformatted_20_Text"><text:span text:style-name="Source_20_Text"><text:s text:c="4"/></text:span></text:p>
      <text:p text:style-name="Preformatted_20_Text"><text:span text:style-name="Source_20_Text"><text:s text:c="4"/># 3. Step B: Dynamic Threshold (The Bar)</text:span></text:p>
      <text:p text:style-name="Preformatted_20_Text"><text:span text:style-name="Source_20_Text"><text:s text:c="4"/># High standard: 10 points per 100 lines. </text:span></text:p>
      <text:p text:style-name="Preformatted_20_Text"><text:span text:style-name="Source_20_Text"><text:s text:c="4"/># mp &gt; 1.0 (Public API) raises the threshold, making it harder to get a low risk score.</text:span></text:p>
      <text:p text:style-name="Preformatted_20_Text"><text:span text:style-name="Source_20_Text"><text:s text:c="4"/>path_mod = mp.get('Documentation Exposure', 1.0)</text:span></text:p>
      <text:p text:style-name="Preformatted_20_Text"><text:span text:style-name="Source_20_Text"><text:s text:c="4"/>threshold = (10.0 + irc) * path_mod</text:span></text:p>
      <text:p text:style-name="Preformatted_20_Text"><text:span text:style-name="Source_20_Text"><text:s text:c="4"/></text:span></text:p>
      <text:p text:style-name="Preformatted_20_Text"><text:span text:style-name="Source_20_Text"><text:s text:c="4"/># 4. Step C: Sigmoid Map (Risk Direction)</text:span></text:p>
      <text:p text:style-name="Preformatted_20_Text"><text:span text:style-name="Source_20_Text"><text:s text:c="4"/># Note the positive 0.2 exponent: Density reduces Risk.</text:span></text:p>
      <text:p text:style-name="Preformatted_20_Text"><text:span text:style-name="Source_20_Text"><text:s text:c="4"/>try:</text:span></text:p>
      <text:p text:style-name="Preformatted_20_Text"><text:span text:style-name="Source_20_Text"><text:s text:c="8"/>raw_risk = 100 / (1 + math.exp(0.2 * (density - threshold)))</text:span></text:p>
      <text:p text:style-name="Preformatted_20_Text"><text:span text:style-name="Source_20_Text"><text:s text:c="4"/>except OverflowError:</text:span></text:p>
      <text:p text:style-name="Preformatted_20_Text"><text:span text:style-name="Source_20_Text"><text:s text:c="8"/>raw_risk = 0 if density &gt; threshold else 100</text:span></text:p>
      <text:p text:style-name="Preformatted_20_Text"><text:span text:style-name="Source_20_Text"><text:s text:c="8"/></text:span></text:p>
      <text:p text:style-name="Preformatted_20_Text"><text:span text:style-name="Source_20_Text"><text:s text:c="4"/># 5. Step D: Fidelity Trust</text:span></text:p>
      <text:p text:style-name="Preformatted_20_Text"><text:span text:style-name="Source_20_Text"><text:s text:c="4"/># Low fidelity languages (high irc) can never reach 0 risk.</text:span></text:p>
      <text:p text:style-name="Preformatted_20_Text"><text:span text:style-name="Source_20_Text"><text:s text:c="4"/>final_risk = raw_risk * (2.0 - fc) # Inverted trust multiplier</text:span></text:p>
      <text:p text:style-name="Preformatted_20_Text"><text:span text:style-name="Source_20_Text"><text:s text:c="4"/></text:span></text:p>
      <text:p text:style-name="P96"><text:span text:style-name="Source_20_Text"><text:s text:c="4"/>return int(min(final_risk, 100))</text:span></text:p>
      <text:h text:style-name="Heading_20_5" text:outline-level="5"><text:bookmark-start text:name="__RefHeading___Toc42713_1155106909"/>2.2.J.6. Visual Verification ("The Risk Audit")<text:bookmark-end text:name="__RefHeading___Toc42713_1155106909"/></text:h>
      <text:p text:style-name="Text_20_body"><text:span text:style-name="Emphasis">Comparison: 100 Line File (Threshold 10)</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5">Scenario</text:p>
          </table:table-cell>
          <table:table-cell table:style-name="Table25.A1" office:value-type="string">
            <text:p text:style-name="P95">Inputs</text:p>
          </table:table-cell>
          <table:table-cell table:style-name="Table25.A1" office:value-type="string">
            <text:p text:style-name="P95">Density</text:p>
          </table:table-cell>
          <table:table-cell table:style-name="Table25.A1" office:value-type="string">
            <text:p text:style-name="P95">Risk Score</text:p>
          </table:table-cell>
          <table:table-cell table:style-name="Table25.A1" office:value-type="string">
            <text:p text:style-name="P95">Interpretation</text:p>
          </table:table-cell>
        </table:table-row>
        <table:table-row>
          <table:table-cell table:style-name="Table25.A1" office:value-type="string">
            <text:p text:style-name="P94"><text:span text:style-name="Strong_20_Emphasis">The Architect</text:span></text:p>
          </table:table-cell>
          <table:table-cell table:style-name="Table25.A1" office:value-type="string">
            <text:p text:style-name="P94">15 @param tags</text:p>
          </table:table-cell>
          <table:table-cell table:style-name="Table25.A1" office:value-type="string">
            <text:p text:style-name="P94">15.0</text:p>
          </table:table-cell>
          <table:table-cell table:style-name="Table25.A1" office:value-type="string">
            <text:p text:style-name="P94"><text:span text:style-name="Strong_20_Emphasis">27</text:span></text:p>
          </table:table-cell>
          <table:table-cell table:style-name="Table25.A1" office:value-type="string">
            <text:p text:style-name="P94"><text:span text:style-name="Strong_20_Emphasis">Safe.</text:span> High documentation density results in low risk exposure.</text:p>
          </table:table-cell>
        </table:table-row>
        <table:table-row>
          <table:table-cell table:style-name="Table25.A1" office:value-type="string">
            <text:p text:style-name="P94"><text:span text:style-name="Strong_20_Emphasis">The Professional</text:span></text:p>
          </table:table-cell>
          <table:table-cell table:style-name="Table25.A1" office:value-type="string">
            <text:p text:style-name="P94">10 @param tags</text:p>
          </table:table-cell>
          <table:table-cell table:style-name="Table25.A1" office:value-type="string">
            <text:p text:style-name="P94">10.0</text:p>
          </table:table-cell>
          <table:table-cell table:style-name="Table25.A1" office:value-type="string">
            <text:p text:style-name="P94"><text:span text:style-name="Strong_20_Emphasis">50</text:span></text:p>
          </table:table-cell>
          <table:table-cell table:style-name="Table25.A1" office:value-type="string">
            <text:p text:style-name="P94"><text:span text:style-name="Strong_20_Emphasis">Stable.</text:span> Hits the threshold exactly; moderate exposure.</text:p>
          </table:table-cell>
        </table:table-row>
        <table:table-row>
          <table:table-cell table:style-name="Table25.A1" office:value-type="string">
            <text:p text:style-name="P94"><text:span text:style-name="Strong_20_Emphasis">The Student</text:span></text:p>
          </table:table-cell>
          <table:table-cell table:style-name="Table25.A1" office:value-type="string">
            <text:p text:style-name="P94">10 lines of comments</text:p>
          </table:table-cell>
          <table:table-cell table:style-name="Table25.A1" office:value-type="string">
            <text:p text:style-name="P94">3.3</text:p>
          </table:table-cell>
          <table:table-cell table:style-name="Table25.A1" office:value-type="string">
            <text:p text:style-name="P94"><text:span text:style-name="Strong_20_Emphasis">79</text:span></text:p>
          </table:table-cell>
          <table:table-cell table:style-name="Table25.A1" office:value-type="string">
            <text:p text:style-name="P94"><text:span text:style-name="Strong_20_Emphasis">Risky.</text:span> Minimal narrative effort fails to clear the safety bar.</text:p>
          </table:table-cell>
        </table:table-row>
        <table:table-row>
          <table:table-cell table:style-name="Table25.A1" office:value-type="string">
            <text:p text:style-name="P94"><text:span text:style-name="Strong_20_Emphasis">The Silent</text:span></text:p>
          </table:table-cell>
          <table:table-cell table:style-name="Table25.A1" office:value-type="string">
            <text:p text:style-name="P94">0 comments</text:p>
          </table:table-cell>
          <table:table-cell table:style-name="Table25.A1" office:value-type="string">
            <text:p text:style-name="P94">0.0</text:p>
          </table:table-cell>
          <table:table-cell table:style-name="Table25.A1" office:value-type="string">
            <text:p text:style-name="P94"><text:span text:style-name="Strong_20_Emphasis">88</text:span></text:p>
          </table:table-cell>
          <table:table-cell table:style-name="Table25.A1" office:value-type="string">
            <text:p text:style-name="P94"><text:span text:style-name="Strong_20_Emphasis">Critical.</text:span> Zero intent density results in high risk exposure.</text:p>
          </table:table-cell>
        </table:table-row>
      </table:table>
      <text:p text:style-name="P83"><text:span text:style-name="Source_20_Text"/></text:p>
      <text:h text:style-name="P36" text:outline-level="4"><text:bookmark-start text:name="__RefHeading___Toc202257_2813440148"/><text:soft-page-break/>2.2.K. <text:span text:style-name="Source_20_Text"><text:span text:style-name="T186">File </text:span></text:span><text:span text:style-name="Source_20_Text"><text:span text:style-name="T187">Stability</text:span></text:span> (<text:span text:style-name="T459">Commit Heat</text:span>)<text:bookmark-end text:name="__RefHeading___Toc202257_2813440148"/></text:h>
      <text:h text:style-name="Heading_20_5" text:outline-level="5"><text:bookmark-start text:name="__RefHeading___Toc202257_2813440148 Copy 1"/><text:span text:style-name="T186">2.2.K.</text:span><text:span text:style-name="T455">A</text:span>. The Philosophy: The Geological Layers<text:bookmark-end text:name="__RefHeading___Toc202257_2813440148 Copy 1"/></text:h>
      <text:p text:style-name="P129"><text:span text:style-name="Strong_20_Emphasis">"From Magma to Bedrock."</text:span></text:p>
      <text:p text:style-name="P129">Instead of measuring "Freshness" (which implies old code is bad/stale), we measure <text:span text:style-name="Strong_20_Emphasis">Stability</text:span>.</text:p>
      <text:list text:style-name="L91">
        <text:list-item>
          <text:p text:style-name="P303"><text:span text:style-name="Strong_20_Emphasis">0 (Newest - Volatile):</text:span> <text:span text:style-name="Strong_20_Emphasis">Solar Yellow / Magma.</text:span> The "Active Front." Code written today.</text:p>
        </text:list-item>
        <text:list-item>
          <text:p text:style-name="P303"><text:span text:style-name="Strong_20_Emphasis">100 (Oldest - Stable):</text:span> <text:span text:style-name="Strong_20_Emphasis">Bedrock Blue / Deep Ice.</text:span> The "Foundation." The oldest files in the repository.</text:p>
        </text:list-item>
      </text:list>
      <text:h text:style-name="Heading_20_5" text:outline-level="5"><text:bookmark-start text:name="__RefHeading___Toc202257_2813440148 Copy 2"/><text:span text:style-name="T186">2.2.K.</text:span><text:span text:style-name="T455">B</text:span>. The Inputs (File System)<text:bookmark-end text:name="__RefHeading___Toc202257_2813440148 Copy 2"/></text:h>
      <text:p text:style-name="P129">We use <text:span text:style-name="Strong_20_Emphasis">Auto-Scaling Normalization</text:span>. We scan the entire repository to find the absolute oldest and newest timestamps, creating a relative time-frame for this specific galaxy.</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8">Input Variable</text:p>
          </table:table-cell>
          <table:table-cell table:style-name="Table10.A1" office:value-type="string">
            <text:p text:style-name="P128">Source</text:p>
          </table:table-cell>
          <table:table-cell table:style-name="Table10.A1" office:value-type="string">
            <text:p text:style-name="P128">Unit</text:p>
          </table:table-cell>
          <table:table-cell table:style-name="Table10.A1" office:value-type="string">
            <text:p text:style-name="P128">Rationale</text:p>
          </table:table-cell>
        </table:table-row>
        <table:table-row>
          <table:table-cell table:style-name="Table10.A1" office:value-type="string">
            <text:p text:style-name="P127"><text:span text:style-name="Strong_20_Emphasis">FileMTime</text:span></text:p>
          </table:table-cell>
          <table:table-cell table:style-name="Table10.A1" office:value-type="string">
            <text:p text:style-name="P127"><text:span text:style-name="Source_20_Text">os.path.getmtime</text:span></text:p>
          </table:table-cell>
          <table:table-cell table:style-name="Table10.A1" office:value-type="string">
            <text:p text:style-name="P127">Epoch</text:p>
          </table:table-cell>
          <table:table-cell table:style-name="Table10.A1" office:value-type="string">
            <text:p text:style-name="P127">The last modified timestamp of the specific file.</text:p>
          </table:table-cell>
        </table:table-row>
        <table:table-row>
          <table:table-cell table:style-name="Table10.A1" office:value-type="string">
            <text:p text:style-name="P127"><text:span text:style-name="Strong_20_Emphasis">RepoMinTime</text:span></text:p>
          </table:table-cell>
          <table:table-cell table:style-name="Table10.A1" office:value-type="string">
            <text:p text:style-name="P127"><text:span text:style-name="Emphasis">Calculated (Pass 1)</text:span></text:p>
          </table:table-cell>
          <table:table-cell table:style-name="Table10.A1" office:value-type="string">
            <text:p text:style-name="P127">Epoch</text:p>
          </table:table-cell>
          <table:table-cell table:style-name="Table10.A1" office:value-type="string">
            <text:p text:style-name="P127">The timestamp of the <text:span text:style-name="Emphasis">oldest</text:span> file in the entire repo.</text:p>
          </table:table-cell>
        </table:table-row>
        <table:table-row>
          <table:table-cell table:style-name="Table10.A1" office:value-type="string">
            <text:p text:style-name="P127"><text:span text:style-name="Strong_20_Emphasis">RepoMaxTime</text:span></text:p>
          </table:table-cell>
          <table:table-cell table:style-name="Table10.A1" office:value-type="string">
            <text:p text:style-name="P127"><text:span text:style-name="Emphasis">Calculated (Pass 1)</text:span></text:p>
          </table:table-cell>
          <table:table-cell table:style-name="Table10.A1" office:value-type="string">
            <text:p text:style-name="P127">Epoch</text:p>
          </table:table-cell>
          <table:table-cell table:style-name="Table10.A1" office:value-type="string">
            <text:p text:style-name="P127">The timestamp of the <text:span text:style-name="Emphasis">newest</text:span> file in the entire repo.</text:p>
          </table:table-cell>
        </table:table-row>
      </table:table>
      <text:h text:style-name="Heading_20_5" text:outline-level="5"><text:bookmark-start text:name="__RefHeading___Toc202257_2813440148 Copy 3"/><text:span text:style-name="T186">2.2.K.</text:span><text:span text:style-name="T455">C</text:span>. The Universal Framework Integration<text:bookmark-end text:name="__RefHeading___Toc202257_2813440148 Copy 3"/></text:h>
      <text:list text:style-name="L92">
        <text:list-item>
          <text:p text:style-name="P304"><text:span text:style-name="Source_20_Text">Fc</text:span><text:span text:style-name="Strong_20_Emphasis"> (Fidelity Coefficient):</text:span> <text:span text:style-name="Strong_20_Emphasis">Not Applied.</text:span> Time is absolute.</text:p>
        </text:list-item>
        <text:list-item>
          <text:p text:style-name="P304"><text:span text:style-name="Source_20_Text">Irc</text:span><text:span text:style-name="Strong_20_Emphasis"> (Implicit Risk Correction):</text:span> <text:span text:style-name="Strong_20_Emphasis">Not Applied.</text:span></text:p>
        </text:list-item>
        <text:list-item>
          <text:p text:style-name="P304"><text:span text:style-name="Source_20_Text">Mp</text:span><text:span text:style-name="Strong_20_Emphasis"> (Path Modifier):</text:span> <text:span text:style-name="Strong_20_Emphasis">Not Applied.</text:span> The age of a file is a physical constant, not a risk factor to be dampened.</text:p>
        </text:list-item>
      </text:list>
      <text:h text:style-name="Heading_20_5" text:outline-level="5"><text:bookmark-start text:name="__RefHeading___Toc202257_2813440148 Copy 4"/><text:span text:style-name="T186">2.2.K.</text:span><text:span text:style-name="T455">D</text:span>. The Equation: Relative Time Normalization<text:bookmark-end text:name="__RefHeading___Toc202257_2813440148 Copy 4"/></text:h>
      <text:p text:style-name="P129">We use a <text:span text:style-name="Strong_20_Emphasis">Two-Pass Approach</text:span> (similar to Churn) to ensure we always utilize the full 0-100 color range, regardless of the project's lifespan.</text:p>
      <text:p text:style-name="Text_20_body"><text:bookmark-start text:name="__RefHeading___Toc42168_730389025"/>Phase 1: Survey (The First Pass)<text:bookmark-end text:name="__RefHeading___Toc42168_730389025"/></text:p>
      <text:p text:style-name="P129">Iterate through all files to find the temporal boundaries of the universe.</text:p>
      <text:list text:style-name="L93">
        <text:list-item>
          <text:p text:style-name="P305"><text:span text:style-name="Source_20_Text">RepoMinTime</text:span> (Oldest)</text:p>
        </text:list-item>
        <text:list-item>
          <text:p text:style-name="P305"><text:soft-page-break/><text:span text:style-name="Source_20_Text">RepoMaxTime</text:span> (Newest)</text:p>
        </text:list-item>
      </text:list>
      <text:p text:style-name="Text_20_body"><text:bookmark-start text:name="__RefHeading___Toc42170_730389025"/>Phase 2: Normalization (The Second Pass)<text:bookmark-end text:name="__RefHeading___Toc42170_730389025"/></text:p>
      <text:p text:style-name="P129">We calculate where each file sits on the timeline.</text:p>
      <text:list text:style-name="L94">
        <text:list-item>
          <text:p text:style-name="P306">We define <text:span text:style-name="Strong_20_Emphasis">Stability</text:span> as "Distance from the Newest moment."</text:p>
        </text:list-item>
        <text:list-item>
          <text:p text:style-name="P306">If <text:span text:style-name="Source_20_Text">FileTime == RepoMaxTime</text:span> (Newest), Stability = 0.</text:p>
        </text:list-item>
        <text:list-item>
          <text:p text:style-name="P306">If <text:span text:style-name="Source_20_Text">FileTime == RepoMinTime</text:span> (Oldest), Stability = 100.</text:p>
        </text:list-item>
      </text:list>
      <text:h text:style-name="Heading_20_5" text:outline-level="5"><text:bookmark-start text:name="__RefHeading___Toc202257_2813440148 Copy 5"/><text:span text:style-name="T186">2.2.K.</text:span><text:span text:style-name="T455">E</text:span>. Implementation (Python Reference)<text:bookmark-end text:name="__RefHeading___Toc202257_2813440148 Copy 5"/></text:h>
      <text:p text:style-name="P129">This fits into the existing <text:span text:style-name="Source_20_Text">scanner2.py</text:span> architecture.</text:p>
      <text:p text:style-name="P125"><text:span text:style-name="Source_20_Text">def calculate_stability_metrics(self, universe_data):</text:span></text:p>
      <text:p text:style-name="P125"><text:span text:style-name="Source_20_Text"><text:s text:c="4"/>"""</text:span></text:p>
      <text:p text:style-name="P125"><text:span text:style-name="Source_20_Text"><text:s text:c="4"/>Pass 2: Auto-Scaling File Stability.</text:span></text:p>
      <text:p text:style-name="P125"><text:span text:style-name="Source_20_Text"><text:s text:c="4"/>Updates 'risk_vector' index 9 (Commit Heat slot) in-place.</text:span></text:p>
      <text:p text:style-name="P125"><text:span text:style-name="Source_20_Text"><text:s text:c="4"/>"""</text:span></text:p>
      <text:p text:style-name="P125"><text:span text:style-name="Source_20_Text"><text:s text:c="4"/></text:span></text:p>
      <text:p text:style-name="P125"><text:span text:style-name="Source_20_Text"><text:s text:c="4"/># 1. Pass A: Find Temporal Boundaries</text:span></text:p>
      <text:p text:style-name="P125"><text:span text:style-name="Source_20_Text"><text:s text:c="4"/>min_ts = float('inf')</text:span></text:p>
      <text:p text:style-name="P125"><text:span text:style-name="Source_20_Text"><text:s text:c="4"/>max_ts = float('-inf')</text:span></text:p>
      <text:p text:style-name="P125"><text:span text:style-name="Source_20_Text"><text:s text:c="4"/></text:span></text:p>
      <text:p text:style-name="P125"><text:span text:style-name="Source_20_Text"><text:s text:c="4"/>for file_data in universe_data:</text:span></text:p>
      <text:p text:style-name="P125"><text:span text:style-name="Source_20_Text"><text:s text:c="8"/># Assuming 'last_updated' (mtime) is stored in the file object</text:span></text:p>
      <text:p text:style-name="P125"><text:span text:style-name="Source_20_Text"><text:s text:c="8"/>ts = file_data.get('last_updated', 0)</text:span></text:p>
      <text:p text:style-name="P125"><text:span text:style-name="Source_20_Text"><text:s text:c="8"/>if ts &lt; min_ts: min_ts = ts</text:span></text:p>
      <text:p text:style-name="P125"><text:span text:style-name="Source_20_Text"><text:s text:c="8"/>if ts &gt; max_ts: max_ts = ts</text:span></text:p>
      <text:p text:style-name="P125"><text:span text:style-name="Source_20_Text"><text:s text:c="12"/></text:span></text:p>
      <text:p text:style-name="P125"><text:span text:style-name="Source_20_Text"><text:s text:c="4"/># Avoid division by zero for single-file or instant repos</text:span></text:p>
      <text:p text:style-name="P125"><text:span text:style-name="Source_20_Text"><text:s text:c="4"/>time_range = max_ts - min_ts</text:span></text:p>
      <text:p text:style-name="P125"><text:span text:style-name="Source_20_Text"><text:s text:c="4"/>if time_range == 0: time_range = 1.0</text:span></text:p>
      <text:p text:style-name="P125"/>
      <text:p text:style-name="P125"><text:span text:style-name="Source_20_Text"><text:s text:c="4"/># 2. Pass B: Normalize</text:span></text:p>
      <text:p text:style-name="P125"><text:span text:style-name="Source_20_Text"><text:s text:c="4"/>for file_data in universe_data:</text:span></text:p>
      <text:p text:style-name="P125"><text:span text:style-name="Source_20_Text"><text:s text:c="8"/>ts = file_data.get('last_updated', 0)</text:span></text:p>
      <text:p text:style-name="P125"><text:span text:style-name="Source_20_Text"><text:s text:c="8"/></text:span></text:p>
      <text:p text:style-name="P125"><text:span text:style-name="Source_20_Text"><text:s text:c="8"/># Calculate Stability (0 = Newest, 100 = Oldest)</text:span></text:p>
      <text:p text:style-name="P125"><text:span text:style-name="Source_20_Text"><text:s text:c="8"/># (Newest - Current) / Range would give 0 for Newest.</text:span></text:p>
      <text:p text:style-name="P125"><text:span text:style-name="Source_20_Text"><text:s text:c="8"/># (Max - File) gives "Seconds since Max". </text:span></text:p>
      <text:p text:style-name="P125"><text:span text:style-name="Source_20_Text"><text:s text:c="8"/># If File == Max, diff is 0. Ratio is 0.</text:span></text:p>
      <text:p text:style-name="P125"><text:span text:style-name="Source_20_Text"><text:s text:c="8"/># If File == Min, diff is Range. Ratio is 1.</text:span></text:p>
      <text:p text:style-name="P125"><text:span text:style-name="Source_20_Text"><text:s text:c="8"/></text:span></text:p>
      <text:p text:style-name="P125"><text:span text:style-name="Source_20_Text"><text:s text:c="8"/>relative_ratio = (max_ts - ts) / time_range</text:span></text:p>
      <text:p text:style-name="P125"><text:span text:style-name="Source_20_Text"><text:s text:c="8"/></text:span></text:p>
      <text:p text:style-name="P125"><text:span text:style-name="Source_20_Text"><text:s text:c="8"/>final_score = int(relative_ratio * 100.0)</text:span></text:p>
      <text:p text:style-name="P125"><text:span text:style-name="Source_20_Text"><text:s text:c="8"/></text:span></text:p>
      <text:p text:style-name="P125"><text:span text:style-name="Source_20_Text"><text:s text:c="8"/># Inject into Risk Vector (Index 9 - Replacing 'Commit Heat')</text:span></text:p>
      <text:p text:style-name="P126"><text:span text:style-name="Source_20_Text"><text:s text:c="8"/>file_data['risk_vector'][9] = final_score</text:span></text:p>
      <text:h text:style-name="Heading_20_5" text:outline-level="5"><text:bookmark-start text:name="__RefHeading___Toc202257_2813440148 Copy 6"/><text:soft-page-break/><text:span text:style-name="T186">2.2.K.</text:span><text:span text:style-name="T455">F</text:span>. Visual Verification ("The Truth")<text:bookmark-end text:name="__RefHeading___Toc202257_2813440148 Copy 6"/></text:h>
      <text:p text:style-name="P129"><text:span text:style-name="Strong_20_Emphasis">Scenario:</text:span> A project started on Jan 1st (<text:span text:style-name="Source_20_Text">Min</text:span>) and released on Dec 31st (<text:span text:style-name="Source_20_Text">Max</text:span>). Range = 365 Days.</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128">File</text:p>
          </table:table-cell>
          <table:table-cell table:style-name="Table28.A1" office:value-type="string">
            <text:p text:style-name="P128">Last Edit</text:p>
          </table:table-cell>
          <table:table-cell table:style-name="Table28.A1" office:value-type="string">
            <text:p text:style-name="P128">Diff from Max</text:p>
          </table:table-cell>
          <table:table-cell table:style-name="Table28.A1" office:value-type="string">
            <text:p text:style-name="P128">Score</text:p>
          </table:table-cell>
          <table:table-cell table:style-name="Table28.A1" office:value-type="string">
            <text:p text:style-name="P128">Color</text:p>
          </table:table-cell>
          <table:table-cell table:style-name="Table28.A1" office:value-type="string">
            <text:p text:style-name="P128">Interpretation</text:p>
          </table:table-cell>
        </table:table-row>
        <table:table-row>
          <table:table-cell table:style-name="Table28.A1" office:value-type="string">
            <text:p text:style-name="P127"><text:span text:style-name="Strong_20_Emphasis">NewFeature.ts</text:span></text:p>
          </table:table-cell>
          <table:table-cell table:style-name="Table28.A1" office:value-type="string">
            <text:p text:style-name="P127">Dec 31st (Today)</text:p>
          </table:table-cell>
          <table:table-cell table:style-name="Table28.A1" office:value-type="string">
            <text:p text:style-name="P127">0 Days</text:p>
          </table:table-cell>
          <table:table-cell table:style-name="Table28.A1" office:value-type="string">
            <text:p text:style-name="P127"><text:span text:style-name="Strong_20_Emphasis">0</text:span></text:p>
          </table:table-cell>
          <table:table-cell table:style-name="Table28.A1" office:value-type="string">
            <text:p text:style-name="P127"><text:span text:style-name="Strong_20_Emphasis">Solar Yellow</text:span></text:p>
          </table:table-cell>
          <table:table-cell table:style-name="Table28.A1" office:value-type="string">
            <text:p text:style-name="P127"><text:span text:style-name="Strong_20_Emphasis">New.</text:span> The active surface layer.</text:p>
          </table:table-cell>
        </table:table-row>
        <table:table-row>
          <table:table-cell table:style-name="Table28.A1" office:value-type="string">
            <text:p text:style-name="P127"><text:span text:style-name="Strong_20_Emphasis">MidYear.ts</text:span></text:p>
          </table:table-cell>
          <table:table-cell table:style-name="Table28.A1" office:value-type="string">
            <text:p text:style-name="P127">July 1st</text:p>
          </table:table-cell>
          <table:table-cell table:style-name="Table28.A1" office:value-type="string">
            <text:p text:style-name="P127">~182 Days</text:p>
          </table:table-cell>
          <table:table-cell table:style-name="Table28.A1" office:value-type="string">
            <text:p text:style-name="P127"><text:span text:style-name="Strong_20_Emphasis">50</text:span></text:p>
          </table:table-cell>
          <table:table-cell table:style-name="Table28.A1" office:value-type="string">
            <text:p text:style-name="P127"><text:span text:style-name="Strong_20_Emphasis">Pale Green</text:span></text:p>
          </table:table-cell>
          <table:table-cell table:style-name="Table28.A1" office:value-type="string">
            <text:p text:style-name="P127"><text:span text:style-name="Strong_20_Emphasis">Settled.</text:span> Halfway down the timeline.</text:p>
          </table:table-cell>
        </table:table-row>
        <table:table-row>
          <table:table-cell table:style-name="Table28.A1" office:value-type="string">
            <text:p text:style-name="P127"><text:span text:style-name="Strong_20_Emphasis">Init.ts</text:span></text:p>
          </table:table-cell>
          <table:table-cell table:style-name="Table28.A1" office:value-type="string">
            <text:p text:style-name="P127">Jan 1st (Start)</text:p>
          </table:table-cell>
          <table:table-cell table:style-name="Table28.A1" office:value-type="string">
            <text:p text:style-name="P127">365 Days</text:p>
          </table:table-cell>
          <table:table-cell table:style-name="Table28.A1" office:value-type="string">
            <text:p text:style-name="P127"><text:span text:style-name="Strong_20_Emphasis">100</text:span></text:p>
          </table:table-cell>
          <table:table-cell table:style-name="Table28.A1" office:value-type="string">
            <text:p text:style-name="P127"><text:span text:style-name="Strong_20_Emphasis">Bedrock Blue</text:span></text:p>
          </table:table-cell>
          <table:table-cell table:style-name="Table28.A1" office:value-type="string">
            <text:p text:style-name="P127"><text:span text:style-name="Strong_20_Emphasis">Foundation.</text:span> The oldest rock in the strata.</text:p>
          </table:table-cell>
        </table:table-row>
      </table:table>
      <text:p text:style-name="P129"><text:span text:style-name="Strong_20_Emphasis">Scenario:</text:span> A "Game Jam" project started 48 hours ago (<text:span text:style-name="Source_20_Text">Min</text:span>) and finished now (<text:span text:style-name="Source_20_Text">Max</text:span>). Range = 48 Hours.</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128">File</text:p>
          </table:table-cell>
          <table:table-cell table:style-name="Table29.A1" office:value-type="string">
            <text:p text:style-name="P128">Last Edit</text:p>
          </table:table-cell>
          <table:table-cell table:style-name="Table29.A1" office:value-type="string">
            <text:p text:style-name="P128">Diff from Max</text:p>
          </table:table-cell>
          <table:table-cell table:style-name="Table29.A1" office:value-type="string">
            <text:p text:style-name="P128">Score</text:p>
          </table:table-cell>
          <table:table-cell table:style-name="Table29.A1" office:value-type="string">
            <text:p text:style-name="P128">Color</text:p>
          </table:table-cell>
          <table:table-cell table:style-name="Table29.A1" office:value-type="string">
            <text:p text:style-name="P128">Interpretation</text:p>
          </table:table-cell>
        </table:table-row>
        <table:table-row>
          <table:table-cell table:style-name="Table29.A1" office:value-type="string">
            <text:p text:style-name="P127"><text:span text:style-name="Strong_20_Emphasis">EndScreen.js</text:span></text:p>
          </table:table-cell>
          <table:table-cell table:style-name="Table29.A1" office:value-type="string">
            <text:p text:style-name="P127">Hour 48</text:p>
          </table:table-cell>
          <table:table-cell table:style-name="Table29.A1" office:value-type="string">
            <text:p text:style-name="P127">0 Hours</text:p>
          </table:table-cell>
          <table:table-cell table:style-name="Table29.A1" office:value-type="string">
            <text:p text:style-name="P127"><text:span text:style-name="Strong_20_Emphasis">0</text:span></text:p>
          </table:table-cell>
          <table:table-cell table:style-name="Table29.A1" office:value-type="string">
            <text:p text:style-name="P127"><text:span text:style-name="Strong_20_Emphasis">Solar Yellow</text:span></text:p>
          </table:table-cell>
          <table:table-cell table:style-name="Table29.A1" office:value-type="string">
            <text:p text:style-name="P127"><text:span text:style-name="Strong_20_Emphasis">New.</text:span> Even in a young project, this is the "Newest."</text:p>
          </table:table-cell>
        </table:table-row>
        <table:table-row>
          <table:table-cell table:style-name="Table29.A1" office:value-type="string">
            <text:p text:style-name="P127"><text:span text:style-name="Strong_20_Emphasis">StartScreen.js</text:span></text:p>
          </table:table-cell>
          <table:table-cell table:style-name="Table29.A1" office:value-type="string">
            <text:p text:style-name="P127">Hour 0</text:p>
          </table:table-cell>
          <table:table-cell table:style-name="Table29.A1" office:value-type="string">
            <text:p text:style-name="P127">48 Hours</text:p>
          </table:table-cell>
          <table:table-cell table:style-name="Table29.A1" office:value-type="string">
            <text:p text:style-name="P127"><text:span text:style-name="Strong_20_Emphasis">100</text:span></text:p>
          </table:table-cell>
          <table:table-cell table:style-name="Table29.A1" office:value-type="string">
            <text:p text:style-name="P127"><text:span text:style-name="Strong_20_Emphasis">Bedrock Blue</text:span></text:p>
          </table:table-cell>
          <table:table-cell table:style-name="Table29.A1" office:value-type="string">
            <text:p text:style-name="P127"><text:span text:style-name="Strong_20_Emphasis">Foundation.</text:span> Relative to <text:span text:style-name="Emphasis">this</text:span> project, this is ancient bedrock.</text:p>
          </table:table-cell>
        </table:table-row>
      </table:table>
      <text:p text:style-name="P129"><text:span text:style-name="Source_20_Text"/></text:p>
      <text:h text:style-name="P34" text:outline-level="4"><text:bookmark-start text:name="__RefHeading___Toc227244_2813440148"/>2.2.L. Test Coverage (Metric: Verification Density)<text:bookmark-end text:name="__RefHeading___Toc227244_2813440148"/></text:h>
      <text:h text:style-name="Heading_20_5" text:outline-level="5"><text:bookmark-start text:name="__RefHeading___Toc227244_2813440148 Copy 1"/><text:span text:style-name="T38">2.2.L.</text:span>A. The Philosophy: Trust vs. Verification<text:bookmark-end text:name="__RefHeading___Toc227244_2813440148 Copy 1"/></text:h>
      <text:p text:style-name="P129"><text:span text:style-name="Strong_20_Emphasis">"The Security Blanket."</text:span></text:p>
      <text:p text:style-name="P129">In GitGalaxy, we distinguish between <text:span text:style-name="Strong_20_Emphasis">Defensive Code</text:span> (handling errors at runtime) and <text:span text:style-name="Strong_20_Emphasis">Verified Code</text:span> (proving correctness at design time).</text:p>
      <text:list text:style-name="L95">
        <text:list-item>
          <text:p text:style-name="P307"><text:span text:style-name="Strong_20_Emphasis">Unverified (Score 0 - Basal White):</text:span> <text:span text:style-name="Strong_20_Emphasis">Speculative.</text:span> The code might work, but there is no programmatic proof. It relies entirely on hope.</text:p>
        </text:list-item>
        <text:list-item>
          <text:p text:style-name="P307"><text:span text:style-name="Strong_20_Emphasis">Verified (Score 100 - Clinical Teal):</text:span> <text:span text:style-name="Strong_20_Emphasis">Fortified.</text:span> The code is backed by assertions, mocks, or a dedicated test suite. It provides a "Clinical Certainty" that allows developers to refactor with confidence.</text:p>
        </text:list-item>
      </text:list>
      <text:h text:style-name="Heading_20_5" text:outline-level="5"><text:bookmark-start text:name="__RefHeading___Toc227244_2813440148 Copy 2"/><text:soft-page-break/><text:span text:style-name="T38">2.2.L.</text:span>B. The Inputs (Verification Signals)<text:bookmark-end text:name="__RefHeading___Toc227244_2813440148 Copy 2"/></text:h>
      <text:p text:style-name="P129">We combine internal evidence (assertions) with external evidence (sibling fil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8">Input Variable</text:p>
          </table:table-cell>
          <table:table-cell table:style-name="Table15.A1" office:value-type="string">
            <text:p text:style-name="P128">Source</text:p>
          </table:table-cell>
          <table:table-cell table:style-name="Table15.A1" office:value-type="string">
            <text:p text:style-name="P128">Weight</text:p>
          </table:table-cell>
          <table:table-cell table:style-name="Table15.A1" office:value-type="string">
            <text:p text:style-name="P128">Rationale</text:p>
          </table:table-cell>
        </table:table-row>
        <table:table-row>
          <table:table-cell table:style-name="Table15.A1" office:value-type="string">
            <text:p text:style-name="P127"><text:span text:style-name="Strong_20_Emphasis">TestHits</text:span></text:p>
          </table:table-cell>
          <table:table-cell table:style-name="Table15.A1" office:value-type="string">
            <text:p text:style-name="P127"><text:span text:style-name="Source_20_Text">test</text:span> Regex</text:p>
          </table:table-cell>
          <table:table-cell table:style-name="Table15.A1" office:value-type="string">
            <text:p text:style-name="P127"><text:span text:style-name="Strong_20_Emphasis">5.0x</text:span></text:p>
          </table:table-cell>
          <table:table-cell table:style-name="Table15.A1" office:value-type="string">
            <text:p text:style-name="P127"><text:span text:style-name="Strong_20_Emphasis">Internal Verification.</text:span> Assertions, mocks, and test definitions inside the file. High weight because one assertion verifies a chunk of logic.</text:p>
          </table:table-cell>
        </table:table-row>
        <table:table-row>
          <table:table-cell table:style-name="Table15.A1" office:value-type="string">
            <text:p text:style-name="P127"><text:span text:style-name="Strong_20_Emphasis">SiblingMatch</text:span></text:p>
          </table:table-cell>
          <table:table-cell table:style-name="Table15.A1" office:value-type="string">
            <text:p text:style-name="P127">File System</text:p>
          </table:table-cell>
          <table:table-cell table:style-name="Table15.A1" office:value-type="string">
            <text:p text:style-name="P127"><text:span text:style-name="Strong_20_Emphasis">30.0</text:span></text:p>
          </table:table-cell>
          <table:table-cell table:style-name="Table15.A1" office:value-type="string">
            <text:p text:style-name="P127"><text:span text:style-name="Strong_20_Emphasis">External Coverage.</text:span> A flat density bonus added if a <text:span text:style-name="Source_20_Text">X.test.js</text:span> or <text:span text:style-name="Source_20_Text">X_spec.rb</text:span> exists next to <text:span text:style-name="Source_20_Text">X.js</text:span>. This is the strongest signal of intent.</text:p>
          </table:table-cell>
        </table:table-row>
        <table:table-row>
          <table:table-cell table:style-name="Table15.A1" office:value-type="string">
            <text:p text:style-name="P127"><text:span text:style-name="Strong_20_Emphasis">LOC</text:span></text:p>
          </table:table-cell>
          <table:table-cell table:style-name="Table15.A1" office:value-type="string">
            <text:p text:style-name="P127"><text:span text:style-name="Source_20_Text">meaningful_loc</text:span></text:p>
          </table:table-cell>
          <table:table-cell table:style-name="Table15.A1" office:value-type="string">
            <text:p text:style-name="P127"><text:span text:style-name="Strong_20_Emphasis">Denominator</text:span></text:p>
          </table:table-cell>
          <table:table-cell table:style-name="Table15.A1" office:value-type="string">
            <text:p text:style-name="P127">We measure density. A huge file needs more tests than a small one.</text:p>
          </table:table-cell>
        </table:table-row>
      </table:table>
      <text:h text:style-name="Heading_20_5" text:outline-level="5"><text:bookmark-start text:name="__RefHeading___Toc227244_2813440148 Copy 3"/><text:span text:style-name="T38">2.2.L.</text:span>C. The Universal Framework Integration<text:bookmark-end text:name="__RefHeading___Toc227244_2813440148 Copy 3"/></text:h>
      <text:list text:style-name="L96">
        <text:list-item>
          <text:p text:style-name="P308"><text:span text:style-name="Source_20_Text">Fc</text:span><text:span text:style-name="Strong_20_Emphasis"> (Fidelity Coefficient):</text:span> <text:span text:style-name="Strong_20_Emphasis">Applied to Score.</text:span> We trust explicit verification (e.g., Rust <text:span text:style-name="Source_20_Text">#[test]</text:span>) more than implicit or loose assertions.</text:p>
        </text:list-item>
        <text:list-item>
          <text:p text:style-name="P308"><text:span text:style-name="Source_20_Text">Irc</text:span><text:span text:style-name="Strong_20_Emphasis"> (Implicit Risk Correction):</text:span> <text:span text:style-name="Strong_20_Emphasis">Applied to Threshold.</text:span> Implicit languages (Python, Ruby) rely <text:span text:style-name="Emphasis">entirely</text:span> on tests for type safety. Therefore, the "Bar" (Threshold) for them is higher. You need <text:span text:style-name="Emphasis">more</text:span> testing in Ruby to achieve the same confidence score as in Go.</text:p>
        </text:list-item>
        <text:list-item>
          <text:p text:style-name="P308"><text:span text:style-name="Source_20_Text">Mp</text:span><text:span text:style-name="Strong_20_Emphasis"> (Path Modifier):</text:span> <text:span text:style-name="Strong_20_Emphasis">Applied to Threshold.</text:span></text:p>
          <text:list>
            <text:list-item>
              <text:p text:style-name="P308"><text:span text:style-name="Emphasis">Core/Kernel (</text:span><text:span text:style-name="Source_20_Text">Mp = 1.2</text:span><text:span text:style-name="Emphasis">):</text:span> <text:span text:style-name="Strong_20_Emphasis">High Bar.</text:span> Critical infrastructure demands rigorous testing.</text:p>
            </text:list-item>
            <text:list-item>
              <text:p text:style-name="P308"><text:span text:style-name="Emphasis">UI/Views (</text:span><text:span text:style-name="Source_20_Text">Mp = 0.8</text:span><text:span text:style-name="Emphasis">):</text:span> <text:span text:style-name="Strong_20_Emphasis">Low Bar.</text:span> UI is notoriously hard to unit test; we lower the threshold to avoid unfair punishment.</text:p>
            </text:list-item>
          </text:list>
        </text:list-item>
      </text:list>
      <text:h text:style-name="Heading_20_5" text:outline-level="5"><text:bookmark-start text:name="__RefHeading___Toc227244_2813440148 Copy 4"/><text:span text:style-name="T38">2.2.L.</text:span>D. The Equation: The Verification Sigmoid<text:bookmark-end text:name="__RefHeading___Toc227244_2813440148 Copy 4"/></text:h>
      <text:p text:style-name="P129">We calculate the density of verification, apply the sibling bonus, and map it to a curve.</text:p>
      <text:p text:style-name="Text_20_body"><text:bookmark-start text:name="__RefHeading___Toc42172_730389025"/>Step 1: Calculate Verification Density<text:bookmark-end text:name="__RefHeading___Toc42172_730389025"/></text:p>
      <text:p text:style-name="P129">We calculate the density of internal tests and add the flat "Sibling Bonus." Note that the Sibling Bonus is added directly to density (it's not divided by LOC again) because the <text:span text:style-name="Emphasis">existence</text:span> of a test file implies coverage of the <text:span text:style-name="Emphasis">whole</text:span> module.</text:p>
      <text:list text:style-name="L97">
        <text:list-item>
          <text:p text:style-name="P309"><text:span text:style-name="Emphasis">SiblingBonus:</text:span> <text:span text:style-name="Strong_20_Emphasis">30.0</text:span> if a sibling test file is found, else <text:span text:style-name="Strong_20_Emphasis">0.0</text:span>.</text:p>
        </text:list-item>
      </text:list>
      <text:p text:style-name="Text_20_body"><text:bookmark-start text:name="__RefHeading___Toc42174_730389025"/><text:soft-page-break/>Step 2: Determine The Bar (Dynamic Threshold)<text:bookmark-end text:name="__RefHeading___Toc42174_730389025"/></text:p>
      <text:p text:style-name="P129">This is the "Passing Grade."</text:p>
      <text:list text:style-name="L98">
        <text:list-item>
          <text:p text:style-name="P310"><text:span text:style-name="Strong_20_Emphasis">Base:</text:span> 15.0 (Targeting ~3 internal assertions per 100 lines, or partial sibling coverage).</text:p>
        </text:list-item>
        <text:list-item>
          <text:p text:style-name="P310"><text:span text:style-name="Strong_20_Emphasis">Language Penalty:</text:span> Add <text:span text:style-name="Source_20_Text">Irc * 3</text:span>. Tier 3 languages need significantly higher coverage.</text:p>
        </text:list-item>
        <text:list-item>
          <text:p text:style-name="P310"><text:span text:style-name="Strong_20_Emphasis">Context:</text:span> Scale by <text:span text:style-name="Source_20_Text">Mp</text:span>.</text:p>
        </text:list-item>
      </text:list>
      <text:p text:style-name="Text_20_body"><text:bookmark-start text:name="__RefHeading___Toc42176_730389025"/>Step 3: The Sigmoid Map<text:bookmark-end text:name="__RefHeading___Toc42176_730389025"/></text:p>
      <text:p text:style-name="P129">We map density against the dynamic threshold.</text:p>
      <text:list text:style-name="L99">
        <text:list-item>
          <text:p text:style-name="P311"><text:span text:style-name="Strong_20_Emphasis">Slope (K):</text:span> <text:span text:style-name="Strong_20_Emphasis">0.25</text:span>. A moderate slope.</text:p>
        </text:list-item>
      </text:list>
      <text:p text:style-name="Text_20_body"><text:bookmark-start text:name="__RefHeading___Toc42178_730389025"/>Step 4: Trust Adjustment<text:bookmark-end text:name="__RefHeading___Toc42178_730389025"/></text:p>
      <text:p text:style-name="P129">Finally, we apply <text:span text:style-name="Source_20_Text">Fc</text:span> (Fidelity) to the score.</text:p>
      <text:h text:style-name="Heading_20_5" text:outline-level="5"><text:bookmark-start text:name="__RefHeading___Toc227244_2813440148 Copy 5"/><text:span text:style-name="T38">2.2.L.</text:span>E. Implementation (Python Reference)<text:bookmark-end text:name="__RefHeading___Toc227244_2813440148 Copy 5"/></text:h>
      <text:p text:style-name="P125"><text:span text:style-name="Source_20_Text">import math</text:span></text:p>
      <text:p text:style-name="P125"><text:span text:style-name="Source_20_Text">import os</text:span></text:p>
      <text:p text:style-name="P125"/>
      <text:p text:style-name="P125"><text:span text:style-name="Source_20_Text">def calculate_test_coverage(self, file_path, loc, hits_test, fc, irc, mp):</text:span></text:p>
      <text:p text:style-name="P125"><text:span text:style-name="Source_20_Text"><text:s text:c="4"/>"""</text:span></text:p>
      <text:p text:style-name="P125"><text:span text:style-name="Source_20_Text"><text:s text:c="4"/>Calculates 2.2.L Test Coverage (Verification Density).</text:span></text:p>
      <text:p text:style-name="P125"><text:span text:style-name="Source_20_Text"><text:s text:c="4"/>Returns int 0-100.</text:span></text:p>
      <text:p text:style-name="P125"><text:span text:style-name="Source_20_Text"><text:s text:c="4"/>"""</text:span></text:p>
      <text:p text:style-name="P125"><text:span text:style-name="Source_20_Text"><text:s text:c="4"/># 1. Check for Sibling Test File (The "Pairing Bonus")</text:span></text:p>
      <text:p text:style-name="P125"><text:span text:style-name="Source_20_Text"><text:s text:c="4"/># Heuristic: Check for .test., .spec., _test, _spec variations</text:span></text:p>
      <text:p text:style-name="P125"><text:span text:style-name="Source_20_Text"><text:s text:c="4"/>sibling_bonus = 0.0</text:span></text:p>
      <text:p text:style-name="P125"><text:span text:style-name="Source_20_Text"><text:s text:c="4"/>base, ext = os.path.splitext(file_path)</text:span></text:p>
      <text:p text:style-name="P125"><text:span text:style-name="Source_20_Text"><text:s text:c="4"/></text:span></text:p>
      <text:p text:style-name="P125"><text:span text:style-name="Source_20_Text"><text:s text:c="4"/># Common test patterns</text:span></text:p>
      <text:p text:style-name="P125"><text:span text:style-name="Source_20_Text"><text:s text:c="4"/>candidates = [</text:span></text:p>
      <text:p text:style-name="P125"><text:span text:style-name="Source_20_Text"><text:s text:c="8"/>f"{base}.test{ext}", </text:span></text:p>
      <text:p text:style-name="P125"><text:span text:style-name="Source_20_Text"><text:s text:c="8"/>f"{base}.spec{ext}", </text:span></text:p>
      <text:p text:style-name="P125"><text:span text:style-name="Source_20_Text"><text:s text:c="8"/>f"{base}_test{ext}", </text:span></text:p>
      <text:p text:style-name="P125"><text:span text:style-name="Source_20_Text"><text:s text:c="8"/>f"{base}Test{ext}"</text:span></text:p>
      <text:p text:style-name="P125"><text:span text:style-name="Source_20_Text"><text:s text:c="4"/>]</text:span></text:p>
      <text:p text:style-name="P125"><text:span text:style-name="Source_20_Text"><text:s text:c="4"/></text:span></text:p>
      <text:p text:style-name="P125"><text:span text:style-name="Source_20_Text"><text:s text:c="4"/># In a real scan, checking os.path.exists is cheap.</text:span></text:p>
      <text:p text:style-name="P125"><text:span text:style-name="Source_20_Text"><text:s text:c="4"/># Alternatively, check against the 'manifest' keys if available.</text:span></text:p>
      <text:p text:style-name="P125"><text:span text:style-name="Source_20_Text"><text:s text:c="4"/>for c in candidates:</text:span></text:p>
      <text:p text:style-name="P125"><text:span text:style-name="Source_20_Text"><text:s text:c="8"/>if os.path.exists(c):</text:span></text:p>
      <text:p text:style-name="P125"><text:span text:style-name="Source_20_Text"><text:s text:c="12"/>sibling_bonus = 30.0</text:span></text:p>
      <text:p text:style-name="P125"><text:span text:style-name="Source_20_Text"><text:s text:c="12"/>break</text:span></text:p>
      <text:p text:style-name="P125"/>
      <text:p text:style-name="P125"><text:span text:style-name="Source_20_Text"><text:s text:c="4"/># 2. Step A: Verification Density</text:span></text:p>
      <text:p text:style-name="P125"><text:span text:style-name="Source_20_Text"><text:s text:c="4"/># Internal hits weighted 5x.</text:span></text:p>
      <text:p text:style-name="P125"><text:span text:style-name="Source_20_Text"><text:s text:c="4"/>internal_density = (hits_test * 5.0 / max(loc, 1)) * 100</text:span></text:p>
      <text:p text:style-name="P125"><text:soft-page-break/><text:span text:style-name="Source_20_Text"><text:s text:c="4"/></text:span></text:p>
      <text:p text:style-name="P125"><text:span text:style-name="Source_20_Text"><text:s text:c="4"/># Add Sibling Bonus directly to density (It's a flat boost)</text:span></text:p>
      <text:p text:style-name="P125"><text:span text:style-name="Source_20_Text"><text:s text:c="4"/>total_density = internal_density + sibling_bonus</text:span></text:p>
      <text:p text:style-name="P125"/>
      <text:p text:style-name="P125"><text:span text:style-name="Source_20_Text"><text:s text:c="4"/># 3. Step B: Dynamic Threshold</text:span></text:p>
      <text:p text:style-name="P125"><text:span text:style-name="Source_20_Text"><text:s text:c="4"/># Base = 15.0. Implicit languages need +15 density (if Irc=5).</text:span></text:p>
      <text:p text:style-name="P125"><text:span text:style-name="Source_20_Text"><text:s text:c="4"/>path_mod = mp.get('Testing Exposure', 1.0)</text:span></text:p>
      <text:p text:style-name="P125"><text:span text:style-name="Source_20_Text"><text:s text:c="4"/>threshold = (15.0 + (irc * 3.0)) * path_mod</text:span></text:p>
      <text:p text:style-name="P125"/>
      <text:p text:style-name="P125"><text:span text:style-name="Source_20_Text"><text:s text:c="4"/># 4. Step C: Sigmoid Map</text:span></text:p>
      <text:p text:style-name="P125"><text:span text:style-name="Source_20_Text"><text:s text:c="4"/>try:</text:span></text:p>
      <text:p text:style-name="P125"><text:span text:style-name="Source_20_Text"><text:s text:c="8"/>raw_score = 100 / (1 + math.exp(-0.25 * (total_density - threshold)))</text:span></text:p>
      <text:p text:style-name="P125"><text:span text:style-name="Source_20_Text"><text:s text:c="4"/>except OverflowError:</text:span></text:p>
      <text:p text:style-name="P125"><text:span text:style-name="Source_20_Text"><text:s text:c="8"/>raw_score = 100 if total_density &gt; threshold else 0</text:span></text:p>
      <text:p text:style-name="P125"/>
      <text:p text:style-name="P125"><text:span text:style-name="Source_20_Text"><text:s text:c="4"/># 5. Step D: Fidelity Trust</text:span></text:p>
      <text:p text:style-name="P125"><text:span text:style-name="Source_20_Text"><text:s text:c="4"/>final_score = raw_score * fc</text:span></text:p>
      <text:p text:style-name="P125"/>
      <text:p text:style-name="P126"><text:span text:style-name="Source_20_Text"><text:s text:c="4"/>return int(min(final_score, 100))</text:span></text:p>
      <text:h text:style-name="Heading_20_5" text:outline-level="5"><text:bookmark-start text:name="__RefHeading___Toc227244_2813440148 Copy 6"/><text:span text:style-name="T38">2.2.L.</text:span>F. Visual Verification ("The Truth")<text:bookmark-end text:name="__RefHeading___Toc227244_2813440148 Copy 6"/></text:h>
      <text:p text:style-name="P129"><text:span text:style-name="Strong_20_Emphasis">Comparison: 100 Line File (Base Threshold 15)</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128">Scenario</text:p>
          </table:table-cell>
          <table:table-cell table:style-name="Table30.A1" office:value-type="string">
            <text:p text:style-name="P128">Hits</text:p>
          </table:table-cell>
          <table:table-cell table:style-name="Table30.A1" office:value-type="string">
            <text:p text:style-name="P128">Sibling?</text:p>
          </table:table-cell>
          <table:table-cell table:style-name="Table30.A1" office:value-type="string">
            <text:p text:style-name="P128">Density</text:p>
          </table:table-cell>
          <table:table-cell table:style-name="Table30.A1" office:value-type="string">
            <text:p text:style-name="P128">Score</text:p>
          </table:table-cell>
          <table:table-cell table:style-name="Table30.A1" office:value-type="string">
            <text:p text:style-name="P128">Interpretation</text:p>
          </table:table-cell>
        </table:table-row>
        <table:table-row>
          <table:table-cell table:style-name="Table30.A1" office:value-type="string">
            <text:p text:style-name="P127"><text:span text:style-name="Strong_20_Emphasis">The Test File</text:span></text:p>
          </table:table-cell>
          <table:table-cell table:style-name="Table30.A1" office:value-type="string">
            <text:p text:style-name="P127">20 <text:span text:style-name="Source_20_Text">asserts</text:span></text:p>
          </table:table-cell>
          <table:table-cell table:style-name="Table30.A1" office:value-type="string">
            <text:p text:style-name="P127">N/A</text:p>
          </table:table-cell>
          <table:table-cell table:style-name="Table30.A1" office:value-type="string">
            <text:p text:style-name="P127">100</text:p>
          </table:table-cell>
          <table:table-cell table:style-name="Table30.A1" office:value-type="string">
            <text:p text:style-name="P127"><text:span text:style-name="Strong_20_Emphasis">100</text:span></text:p>
          </table:table-cell>
          <table:table-cell table:style-name="Table30.A1" office:value-type="string">
            <text:p text:style-name="P127"><text:span text:style-name="Strong_20_Emphasis">Teal.</text:span> It <text:span text:style-name="Emphasis">is</text:span> a test. High internal density.</text:p>
          </table:table-cell>
        </table:table-row>
        <table:table-row>
          <table:table-cell table:style-name="Table30.A1" office:value-type="string">
            <text:p text:style-name="P127"><text:span text:style-name="Strong_20_Emphasis">The Paired Source</text:span></text:p>
          </table:table-cell>
          <table:table-cell table:style-name="Table30.A1" office:value-type="string">
            <text:p text:style-name="P127">0</text:p>
          </table:table-cell>
          <table:table-cell table:style-name="Table30.A1" office:value-type="string">
            <text:p text:style-name="P127">Yes</text:p>
          </table:table-cell>
          <table:table-cell table:style-name="Table30.A1" office:value-type="string">
            <text:p text:style-name="P127">30</text:p>
          </table:table-cell>
          <table:table-cell table:style-name="Table30.A1" office:value-type="string">
            <text:p text:style-name="P127"><text:span text:style-name="Strong_20_Emphasis">98</text:span></text:p>
          </table:table-cell>
          <table:table-cell table:style-name="Table30.A1" office:value-type="string">
            <text:p text:style-name="P127"><text:span text:style-name="Strong_20_Emphasis">Teal.</text:span> Covered by sibling. The bonus (30) clears the threshold (15) easily.</text:p>
          </table:table-cell>
        </table:table-row>
        <table:table-row>
          <table:table-cell table:style-name="Table30.A1" office:value-type="string">
            <text:p text:style-name="P127"><text:span text:style-name="Strong_20_Emphasis">The Orphan</text:span></text:p>
          </table:table-cell>
          <table:table-cell table:style-name="Table30.A1" office:value-type="string">
            <text:p text:style-name="P127">0</text:p>
          </table:table-cell>
          <table:table-cell table:style-name="Table30.A1" office:value-type="string">
            <text:p text:style-name="P127">No</text:p>
          </table:table-cell>
          <table:table-cell table:style-name="Table30.A1" office:value-type="string">
            <text:p text:style-name="P127">0</text:p>
          </table:table-cell>
          <table:table-cell table:style-name="Table30.A1" office:value-type="string">
            <text:p text:style-name="P127"><text:span text:style-name="Strong_20_Emphasis">2</text:span></text:p>
          </table:table-cell>
          <table:table-cell table:style-name="Table30.A1" office:value-type="string">
            <text:p text:style-name="P127"><text:span text:style-name="Strong_20_Emphasis">White.</text:span> Unverified. No internal checks, no sibling.</text:p>
          </table:table-cell>
        </table:table-row>
        <table:table-row>
          <table:table-cell table:style-name="Table30.A1" office:value-type="string">
            <text:p text:style-name="P127"><text:span text:style-name="Strong_20_Emphasis">Defensive Code</text:span></text:p>
          </table:table-cell>
          <table:table-cell table:style-name="Table30.A1" office:value-type="string">
            <text:p text:style-name="P127">3 <text:span text:style-name="Source_20_Text">asserts</text:span></text:p>
          </table:table-cell>
          <table:table-cell table:style-name="Table30.A1" office:value-type="string">
            <text:p text:style-name="P127">No</text:p>
          </table:table-cell>
          <table:table-cell table:style-name="Table30.A1" office:value-type="string">
            <text:p text:style-name="P127">15</text:p>
          </table:table-cell>
          <table:table-cell table:style-name="Table30.A1" office:value-type="string">
            <text:p text:style-name="P127"><text:span text:style-name="Strong_20_Emphasis">50</text:span></text:p>
          </table:table-cell>
          <table:table-cell table:style-name="Table30.A1" office:value-type="string">
            <text:p text:style-name="P127"><text:span text:style-name="Strong_20_Emphasis">Pale Teal.</text:span> Internal checks meet the bare minimum threshold.</text:p>
          </table:table-cell>
        </table:table-row>
        <table:table-row>
          <table:table-cell table:style-name="Table30.A1" office:value-type="string">
            <text:p text:style-name="P127"><text:span text:style-name="Strong_20_Emphasis">Implicit Code</text:span></text:p>
          </table:table-cell>
          <table:table-cell table:style-name="Table30.A1" office:value-type="string">
            <text:p text:style-name="P127">0</text:p>
          </table:table-cell>
          <table:table-cell table:style-name="Table30.A1" office:value-type="string">
            <text:p text:style-name="P127">Yes</text:p>
          </table:table-cell>
          <table:table-cell table:style-name="Table30.A1" office:value-type="string">
            <text:p text:style-name="P127">30</text:p>
          </table:table-cell>
          <table:table-cell table:style-name="Table30.A1" office:value-type="string">
            <text:p text:style-name="P127"><text:span text:style-name="Strong_20_Emphasis">5</text:span></text:p>
          </table:table-cell>
          <table:table-cell table:style-name="Table30.A1" office:value-type="string">
            <text:p text:style-name="P127"><text:span text:style-name="Strong_20_Emphasis">White.</text:span> <text:span text:style-name="Emphasis">With Irc=5 (Shell)</text:span>. Threshold rises to ~30. Sibling bonus barely scratches the surface. Needs internal checks too.</text:p>
          </table:table-cell>
        </table:table-row>
      </table:table>
      <text:p text:style-name="P129"><text:span text:style-name="Source_20_Text"><text:span text:style-name="T38"/></text:span></text:p>
      <text:h text:style-name="P34" text:outline-level="4"><text:bookmark-start text:name="__RefHeading___Toc11769_959624642"/><text:span text:style-name="T261">2.2.M</text:span>. The "Civil War" Algorithm: Tabs vs. Spaces<text:bookmark-end text:name="__RefHeading___Toc11769_959624642"/></text:h>
      <text:list text:style-name="L100">
        <text:list-item>
          <text:p text:style-name="P312"><text:span text:style-name="Strong_20_Emphasis"><text:span text:style-name="T38">Visual Mapping:</text:span></text:span></text:p>
          <text:list>
            <text:list-item>
              <text:p text:style-name="P312"><text:span text:style-name="Strong_20_Emphasis"><text:span text:style-name="T38">Score 0 (Pure Tabs):</text:span></text:span><text:span text:style-name="T38"> Visual: </text:span><text:span text:style-name="Strong_20_Emphasis"><text:span text:style-name="T38">Glowing Green</text:span></text:span><text:span text:style-name="T38"> (#00FF00). Emissive intensity is maxed.</text:span></text:p>
            </text:list-item>
            <text:list-item>
              <text:p text:style-name="P312"><text:soft-page-break/><text:span text:style-name="Strong_20_Emphasis"><text:span text:style-name="T38">Score 100 (Pure Spaces):</text:span></text:span><text:span text:style-name="T38"> Visual: </text:span><text:span text:style-name="Strong_20_Emphasis"><text:span text:style-name="T38">Glowing Yellow</text:span></text:span><text:span text:style-name="T38"> (#FFFF00). Emissive intensity is maxed.</text:span></text:p>
            </text:list-item>
            <text:list-item>
              <text:p text:style-name="P312"><text:span text:style-name="Strong_20_Emphasis"><text:span text:style-name="T38">Score 50 (Maximum Conflict):</text:span></text:span><text:span text:style-name="T38"> Visual: </text:span><text:span text:style-name="Strong_20_Emphasis"><text:span text:style-name="T38">Deep Blue</text:span></text:span><text:span text:style-name="T38"> (#0000FF). 50/50 split triggers the "Bifurcation Shimmer" (geometry flickering).</text:span></text:p>
            </text:list-item>
            <text:list-item>
              <text:p text:style-name="P312"><text:span text:style-name="Strong_20_Emphasis"><text:span text:style-name="T38">Gradient:</text:span></text:span><text:span text:style-name="T38"> Linear transition from Green (0) → Blue (50) → Yellow (100).</text:span></text:p>
            </text:list-item>
          </text:list>
        </text:list-item>
        <text:list-item>
          <text:p text:style-name="P312"><text:span text:style-name="Strong_20_Emphasis"><text:span text:style-name="T38">Equation:</text:span></text:span></text:p>
          <text:p text:style-name="P194"><text:span text:style-name="Source_20_Text"># 1. Gather Indentation Context:</text:span></text:p>
          <text:p text:style-name="P194"><text:span text:style-name="Source_20_Text"># Lt = Count of lines starting with Tabs</text:span></text:p>
          <text:p text:style-name="P194"><text:span text:style-name="Source_20_Text"># Ls = Count of lines starting with Spaces</text:span></text:p>
          <text:p text:style-name="P194"><text:span text:style-name="Source_20_Text"># Ltotal = Total lines with indentation context</text:span></text:p>
          <text:p text:style-name="P194"><text:span text:style-name="Source_20_Text">Ltotal = TabLines + SpaceLines</text:span></text:p>
          <text:p text:style-name="P194"/>
          <text:p text:style-name="P194"><text:span text:style-name="Source_20_Text"># 2. Calculate Space-Ratio (R):</text:span></text:p>
          <text:p text:style-name="P194"><text:span text:style-name="Source_20_Text"># 0.0 means 100% Tabs. 1.0 means 100% Spaces.</text:span></text:p>
          <text:p text:style-name="P194"><text:span text:style-name="Source_20_Text">R = SpaceLines / max(Ltotal, 1)</text:span></text:p>
          <text:p text:style-name="P194"/>
          <text:p text:style-name="P194"><text:span text:style-name="Source_20_Text"># 3. Final Score Mapping (0-100):</text:span></text:p>
          <text:p text:style-name="P195"><text:span text:style-name="Source_20_Text">FinalScore = R * 100</text:span></text:p>
        </text:list-item>
        <text:list-item>
          <text:p text:style-name="P312"><text:span text:style-name="Strong_20_Emphasis"><text:span text:style-name="T38">Range:</text:span></text:span><text:span text:style-name="T38"> </text:span><text:span text:style-name="Source_20_Text"><text:span text:style-name="T38">0</text:span></text:span><text:span text:style-name="T38"> (Pure Tabs) to </text:span><text:span text:style-name="Source_20_Text"><text:span text:style-name="T38">100</text:span></text:span><text:span text:style-name="T38"> (Pure Spaces).</text:span></text:p>
        </text:list-item>
        <text:list-item>
          <text:p text:style-name="P312"><text:span text:style-name="Strong_20_Emphasis"><text:span text:style-name="T38">Why this works:</text:span></text:span><text:span text:style-name="T38"> This is a </text:span><text:span text:style-name="Strong_20_Emphasis"><text:span text:style-name="T38">Linear Polarization Model</text:span></text:span><text:span text:style-name="T38">.</text:span></text:p>
          <text:list>
            <text:list-item>
              <text:p text:style-name="P312"><text:span text:style-name="Strong_20_Emphasis"><text:span text:style-name="T38">Terminology:</text:span></text:span><text:span text:style-name="T38"> While colloquially referred to as "Civil War," the equation measures </text:span><text:span text:style-name="Strong_20_Emphasis"><text:span text:style-name="T38">Layout Unity</text:span></text:span><text:span text:style-name="T38">.</text:span></text:p>
            </text:list-item>
            <text:list-item>
              <text:p text:style-name="P312"><text:span text:style-name="Strong_20_Emphasis"><text:span text:style-name="T38">Logic:</text:span></text:span><text:span text:style-name="T38"> By mapping Tabs to 0 and Spaces to 100, the "War Zone" (50/50 mix) naturally sits at the center of the spectrum (Score 50).</text:span><text:span text:style-name="T147"> </text:span></text:p>
            </text:list-item>
          </text:list>
        </text:list-item>
      </text:list>
      <text:h text:style-name="P76" text:outline-level="4"><text:bookmark-start text:name="__RefHeading___Toc560575_2813440148"/>2.2.N. The "Graveyard" Detector (Metric: Architectural Transparency)<text:bookmark-end text:name="__RefHeading___Toc560575_2813440148"/></text:h>
      <text:h text:style-name="Heading_20_5" text:outline-level="5"><text:bookmark-start text:name="__RefHeading___Toc560575_2813440148 Copy 1"/>2.2.N.A. The Philosophy: Code Necrosis<text:bookmark-end text:name="__RefHeading___Toc560575_2813440148 Copy 1"/></text:h>
      <text:p text:style-name="P129"><text:span text:style-name="Strong_20_Emphasis">"The Fear of Deletion."</text:span></text:p>
      <text:p text:style-name="P129">Commented-out code ("Ghost Logic") is not documentation; it is hesitation. It implies a lack of trust in Version Control. It creates cognitive noise, forcing the reader to mentally parse and discard logic that is no longer active.</text:p>
      <text:p text:style-name="P129">In GitGalaxy, we visualize this as <text:span text:style-name="Strong_20_Emphasis">Necrosis</text:span>.</text:p>
      <text:list text:style-name="L101">
        <text:list-item>
          <text:p text:style-name="P313"><text:span text:style-name="Strong_20_Emphasis">Living Code (0 - White):</text:span> Active, clean, executed.</text:p>
        </text:list-item>
        <text:list-item>
          <text:p text:style-name="P313"><text:span text:style-name="Strong_20_Emphasis">Zombified Code (100 - Purple):</text:span> Heavily polluted with dead blocks. The file is "Haunted" by its past.</text:p>
        </text:list-item>
      </text:list>
      <text:h text:style-name="Heading_20_5" text:outline-level="5"><text:bookmark-start text:name="__RefHeading___Toc560575_2813440148 Copy 2"/><text:soft-page-break/>2.2.N.B. The Inputs (Heuristic Detection)<text:bookmark-end text:name="__RefHeading___Toc560575_2813440148 Copy 2"/></text:h>
      <text:p text:style-name="P129">We distinguish between <text:span text:style-name="Strong_20_Emphasis">Documentation</text:span> (English text) and <text:span text:style-name="Strong_20_Emphasis">Graveyards</text:span> (Inactive Code) by scanning for syntax density within comment block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8">Input Variable</text:p>
          </table:table-cell>
          <table:table-cell table:style-name="Table11.A1" office:value-type="string">
            <text:p text:style-name="P128">Regex/Logic</text:p>
          </table:table-cell>
          <table:table-cell table:style-name="Table11.A1" office:value-type="string">
            <text:p text:style-name="P128">Weight</text:p>
          </table:table-cell>
          <table:table-cell table:style-name="Table11.A1" office:value-type="string">
            <text:p text:style-name="P128">Rationale</text:p>
          </table:table-cell>
        </table:table-row>
        <table:table-row>
          <table:table-cell table:style-name="Table11.A1" office:value-type="string">
            <text:p text:style-name="P127"><text:span text:style-name="Strong_20_Emphasis">GhostLines</text:span></text:p>
          </table:table-cell>
          <table:table-cell table:style-name="Table11.A1" office:value-type="string">
            <text:p text:style-name="P127"><text:span text:style-name="Source_20_Text">graveyard</text:span></text:p>
          </table:table-cell>
          <table:table-cell table:style-name="Table11.A1" office:value-type="string">
            <text:p text:style-name="P127"><text:span text:style-name="Strong_20_Emphasis">1.0x</text:span></text:p>
          </table:table-cell>
          <table:table-cell table:style-name="Table11.A1" office:value-type="string">
            <text:p text:style-name="P127"><text:span text:style-name="Strong_20_Emphasis">The Necrosis.</text:span> Lines that are commented out but contain high-density syntax (<text:span text:style-name="Source_20_Text">{</text:span>, <text:span text:style-name="Source_20_Text">}</text:span>, <text:span text:style-name="Source_20_Text">;</text:span>, <text:span text:style-name="Source_20_Text">=</text:span>, <text:span text:style-name="Source_20_Text">return</text:span>). We require blocks of 3+ lines to avoid flagging inline code examples.</text:p>
          </table:table-cell>
        </table:table-row>
        <table:table-row>
          <table:table-cell table:style-name="Table11.A1" office:value-type="string">
            <text:p text:style-name="P127"><text:span text:style-name="Strong_20_Emphasis">LOC</text:span></text:p>
          </table:table-cell>
          <table:table-cell table:style-name="Table11.A1" office:value-type="string">
            <text:p text:style-name="P127"><text:span text:style-name="Source_20_Text">meaningful_loc</text:span></text:p>
          </table:table-cell>
          <table:table-cell table:style-name="Table11.A1" office:value-type="string">
            <text:p text:style-name="P127"><text:span text:style-name="Strong_20_Emphasis">Denominator</text:span></text:p>
          </table:table-cell>
          <table:table-cell table:style-name="Table11.A1" office:value-type="string">
            <text:p text:style-name="P127">We measure density. A 5-line ghost block in a 2000-line file is negligible. In a 50-line file, it's 10% waste.</text:p>
          </table:table-cell>
        </table:table-row>
      </table:table>
      <text:p text:style-name="P129"><text:span text:style-name="Emphasis">Note: The scanner's </text:span><text:span text:style-name="Source_20_Text">graveyard</text:span><text:span text:style-name="Emphasis"> regex must be robust enough to ignore Javadoc code samples (</text:span><text:span text:style-name="Source_20_Text">@code</text:span><text:span text:style-name="Emphasis">, ```) and focus on "commented-out logic blocks."</text:span></text:p>
      <text:h text:style-name="Heading_20_5" text:outline-level="5"><text:bookmark-start text:name="__RefHeading___Toc560575_2813440148 Copy 3"/>2.2.N.C. The Universal Framework Integration<text:bookmark-end text:name="__RefHeading___Toc560575_2813440148 Copy 3"/></text:h>
      <text:list text:style-name="L102">
        <text:list-item>
          <text:p text:style-name="P314"><text:span text:style-name="Source_20_Text">Fc</text:span><text:span text:style-name="Strong_20_Emphasis"> (Fidelity Coefficient):</text:span> <text:span text:style-name="Strong_20_Emphasis">Not Applied.</text:span> Dead code is language-agnostic.</text:p>
        </text:list-item>
        <text:list-item>
          <text:p text:style-name="P314"><text:span text:style-name="Source_20_Text">Irc</text:span><text:span text:style-name="Strong_20_Emphasis"> (Implicit Risk Correction):</text:span> <text:span text:style-name="Strong_20_Emphasis">Not Applied.</text:span></text:p>
        </text:list-item>
        <text:list-item>
          <text:p text:style-name="P314"><text:span text:style-name="Source_20_Text">Mp</text:span><text:span text:style-name="Strong_20_Emphasis"> (Path Modifier):</text:span> <text:span text:style-name="Strong_20_Emphasis">Applied to Threshold.</text:span></text:p>
          <text:list>
            <text:list-item>
              <text:p text:style-name="P314"><text:span text:style-name="Emphasis">Experiments/Scratch (</text:span><text:span text:style-name="Source_20_Text">Mp = 2.0</text:span><text:span text:style-name="Emphasis">):</text:span> <text:span text:style-name="Strong_20_Emphasis">High Tolerance.</text:span> It is acceptable to keep snippets while prototyping.</text:p>
            </text:list-item>
            <text:list-item>
              <text:p text:style-name="P314"><text:span text:style-name="Emphasis">Core/Kernel (</text:span><text:span text:style-name="Source_20_Text">Mp = 0.5</text:span><text:span text:style-name="Emphasis">):</text:span> <text:span text:style-name="Strong_20_Emphasis">Zero Tolerance.</text:span> Production architecture must be clean.</text:p>
            </text:list-item>
            <text:list-item>
              <text:p text:style-name="P314"><text:span text:style-name="Emphasis">Legacy (</text:span><text:span text:style-name="Source_20_Text">Mp = 1.5</text:span><text:span text:style-name="Emphasis">):</text:span> <text:span text:style-name="Strong_20_Emphasis">Moderate Tolerance.</text:span> We expect some rot in the archives.</text:p>
            </text:list-item>
          </text:list>
        </text:list-item>
      </text:list>
      <text:h text:style-name="Heading_20_5" text:outline-level="5"><text:bookmark-start text:name="__RefHeading___Toc560575_2813440148 Copy 4"/>2.2.N.D. The Equation: The Necrosis Sigmoid<text:bookmark-end text:name="__RefHeading___Toc560575_2813440148 Copy 4"/></text:h>
      <text:p text:style-name="P129">We calculate the density of dead code and map it to a curve that forgives minor "scraps" but punishes "hoarding."</text:p>
      <text:p text:style-name="Text_20_body"><text:bookmark-start text:name="__RefHeading___Toc42180_730389025"/>Step 1: Calculate Necrosis Density<text:bookmark-end text:name="__RefHeading___Toc42180_730389025"/></text:p>
      <text:p text:style-name="P129">We determine what percentage of the file is dead.</text:p>
      <text:p text:style-name="P129"><text:span text:style-name="Source_20_Text">Density = (GhostLines / max(MeaningfulLOC, 1)) * 100</text:span></text:p>
      <text:p text:style-name="Text_20_body"><text:bookmark-start text:name="__RefHeading___Toc42182_730389025"/><text:soft-page-break/>Step 2: Determine The Tolerance (Dynamic Threshold)<text:bookmark-end text:name="__RefHeading___Toc42182_730389025"/></text:p>
      <text:p text:style-name="P129">This is the "Tipping Point" where the file is considered "Haunted."</text:p>
      <text:list text:style-name="L103">
        <text:list-item>
          <text:p text:style-name="P315"><text:span text:style-name="Strong_20_Emphasis">Base:</text:span> 10.0 (We tolerate up to 10% dead code before flagging it as a problem).</text:p>
        </text:list-item>
        <text:list-item>
          <text:p text:style-name="P315"><text:span text:style-name="Strong_20_Emphasis">Context:</text:span> Scaled by <text:span text:style-name="Source_20_Text">Mp</text:span>.</text:p>
          <text:list>
            <text:list-item>
              <text:p text:style-name="P315">In <text:span text:style-name="Source_20_Text">core/</text:span> (Mp 0.5), tolerance drops to 5%.</text:p>
            </text:list-item>
            <text:list-item>
              <text:p text:style-name="P315">In <text:span text:style-name="Source_20_Text">experiments/</text:span> (Mp 2.0), tolerance rises to 20%.</text:p>
            </text:list-item>
          </text:list>
        </text:list-item>
      </text:list>
      <text:p text:style-name="P129"><text:span text:style-name="Source_20_Text">Threshold = 10.0 * Mp</text:span></text:p>
      <text:p text:style-name="Text_20_body"><text:bookmark-start text:name="__RefHeading___Toc42184_730389025"/>Step 3: The Sigmoid Map<text:bookmark-end text:name="__RefHeading___Toc42184_730389025"/></text:p>
      <text:p text:style-name="P129">We map density against the threshold.</text:p>
      <text:list text:style-name="L104">
        <text:list-item>
          <text:p text:style-name="P316"><text:span text:style-name="Strong_20_Emphasis">Slope (K):</text:span> <text:span text:style-name="Strong_20_Emphasis">0.3</text:span>. A moderate slope. It creates a smooth transition from "Clean" to "Haunted."</text:p>
        </text:list-item>
      </text:list>
      <text:p text:style-name="P129"><text:span text:style-name="Source_20_Text">RawScore = 100 / (1 + e^(-0.3 * (Density - Threshold)))</text:span></text:p>
      <text:h text:style-name="Heading_20_5" text:outline-level="5"><text:bookmark-start text:name="__RefHeading___Toc560575_2813440148 Copy 5"/>2.2.N.E. Implementation (Python Reference)<text:bookmark-end text:name="__RefHeading___Toc560575_2813440148 Copy 5"/></text:h>
      <text:p text:style-name="P125"><text:span text:style-name="Source_20_Text">import math</text:span></text:p>
      <text:p text:style-name="P125"><text:span text:style-name="Source_20_Text">import re</text:span></text:p>
      <text:p text:style-name="P125"/>
      <text:p text:style-name="P125"><text:span text:style-name="Source_20_Text">def calculate_graveyard_score(self, raw_content, loc, hits_grave, mp):</text:span></text:p>
      <text:p text:style-name="P125"><text:span text:style-name="Source_20_Text"><text:s text:c="4"/>"""</text:span></text:p>
      <text:p text:style-name="P125"><text:span text:style-name="Source_20_Text"><text:s text:c="4"/>Calculates 2.2.N Graveyard Exposure (Necrosis Density).</text:span></text:p>
      <text:p text:style-name="P125"><text:span text:style-name="Source_20_Text"><text:s text:c="4"/>Returns int 0-100.</text:span></text:p>
      <text:p text:style-name="P125"><text:span text:style-name="Source_20_Text"><text:s text:c="4"/>"""</text:span></text:p>
      <text:p text:style-name="P125"><text:span text:style-name="Source_20_Text"><text:s text:c="4"/># 1. Inputs</text:span></text:p>
      <text:p text:style-name="P125"><text:span text:style-name="Source_20_Text"><text:s text:c="4"/># Note: 'hits_grave' from scanner usually counts BLOCKS of dead code.</text:span></text:p>
      <text:p text:style-name="P125"><text:span text:style-name="Source_20_Text"><text:s text:c="4"/># To get lines, we might need a rough estimate or a specific line-counting regex.</text:span></text:p>
      <text:p text:style-name="P125"><text:span text:style-name="Source_20_Text"><text:s text:c="4"/># For this model, let's assume 'hits_grave' = roughly count of Ghost Lines</text:span></text:p>
      <text:p text:style-name="P125"><text:span text:style-name="Source_20_Text"><text:s text:c="4"/># derived from the raw content scan.</text:span></text:p>
      <text:p text:style-name="P125"><text:span text:style-name="Source_20_Text"><text:s text:c="4"/></text:span></text:p>
      <text:p text:style-name="P125"><text:span text:style-name="Source_20_Text"><text:s text:c="4"/># Refined Heuristic: Count lines in raw_content that look like code comments</text:span></text:p>
      <text:p text:style-name="P125"><text:span text:style-name="Source_20_Text"><text:s text:c="4"/># (e.g., // var x = 1;) but exclude obvious docs.</text:span></text:p>
      <text:p text:style-name="P125"><text:span text:style-name="Source_20_Text"><text:s text:c="4"/># This logic belongs in the scanner, but here is the calculation logic.</text:span></text:p>
      <text:p text:style-name="P125"><text:span text:style-name="Source_20_Text"><text:s text:c="4"/></text:span></text:p>
      <text:p text:style-name="P125"><text:span text:style-name="Source_20_Text"><text:s text:c="4"/># Fallback if scanner provides blocks: estimate 3 lines per block</text:span></text:p>
      <text:p text:style-name="P125"><text:span text:style-name="Source_20_Text"><text:s text:c="4"/>estimated_ghost_lines = hits_grave * 3.0</text:span></text:p>
      <text:p text:style-name="P125"><text:span text:style-name="Source_20_Text"><text:s text:c="4"/></text:span></text:p>
      <text:p text:style-name="P125"><text:span text:style-name="Source_20_Text"><text:s text:c="4"/># 2. Step A: Necrosis Density</text:span></text:p>
      <text:p text:style-name="P125"><text:span text:style-name="Source_20_Text"><text:s text:c="4"/>density = (estimated_ghost_lines / max(loc, 1)) * 100</text:span></text:p>
      <text:p text:style-name="P125"/>
      <text:p text:style-name="P125"><text:span text:style-name="Source_20_Text"><text:s text:c="4"/># 3. Step B: Dynamic Threshold</text:span></text:p>
      <text:p text:style-name="P125"><text:span text:style-name="Source_20_Text"><text:s text:c="4"/># Base = 10% tolerance.</text:span></text:p>
      <text:p text:style-name="P125"><text:span text:style-name="Source_20_Text"><text:s text:c="4"/># Mp adjusts tolerance (High Mp = More lenient).</text:span></text:p>
      <text:p text:style-name="P125"><text:span text:style-name="Source_20_Text"><text:s text:c="4"/># Note: Logic Inversion -&gt; If Mp &gt; 1 (e.g. Exp), we want HIGHER Threshold.</text:span></text:p>
      <text:p text:style-name="P125"><text:span text:style-name="Source_20_Text"><text:s text:c="4"/># If Mp &lt; 1 (e.g. Core), we want LOWER Threshold.</text:span></text:p>
      <text:p text:style-name="P125"><text:span text:style-name="Source_20_Text"><text:s text:c="4"/># Standard Mp usage: Mp &gt; 1 usually means "Riskier/Punish".</text:span></text:p>
      <text:p text:style-name="P125"><text:soft-page-break/><text:span text:style-name="Source_20_Text"><text:s text:c="4"/># So we need to invert the Mp logic for THIS specific equation or ensure </text:span></text:p>
      <text:p text:style-name="P125"><text:span text:style-name="Source_20_Text"><text:s text:c="4"/># the dictionary provides the correct scalar.</text:span></text:p>
      <text:p text:style-name="P125"><text:span text:style-name="Source_20_Text"><text:s text:c="4"/></text:span></text:p>
      <text:p text:style-name="P125"><text:span text:style-name="Source_20_Text"><text:s text:c="4"/># Let's assume standard Mp:</text:span></text:p>
      <text:p text:style-name="P125"><text:span text:style-name="Source_20_Text"><text:s text:c="4"/># Core = 1.2 (Strict/Punish) -&gt; Should LOWER threshold.</text:span></text:p>
      <text:p text:style-name="P125"><text:span text:style-name="Source_20_Text"><text:s text:c="4"/># Exp = 0.5 (Forgiving) -&gt; Should RAISE threshold.</text:span></text:p>
      <text:p text:style-name="P125"><text:span text:style-name="Source_20_Text"><text:s text:c="4"/># Therefore: Threshold = Base / Mp</text:span></text:p>
      <text:p text:style-name="P125"><text:span text:style-name="Source_20_Text"><text:s text:c="4"/></text:span></text:p>
      <text:p text:style-name="P125"><text:span text:style-name="Source_20_Text"><text:s text:c="4"/>path_mod = mp.get('Dead Code Exposure', 1.0)</text:span></text:p>
      <text:p text:style-name="P125"><text:span text:style-name="Source_20_Text"><text:s text:c="4"/></text:span></text:p>
      <text:p text:style-name="P125"><text:span text:style-name="Source_20_Text"><text:s text:c="4"/># Safety clamp for division</text:span></text:p>
      <text:p text:style-name="P125"><text:span text:style-name="Source_20_Text"><text:s text:c="4"/>safe_mp = max(path_mod, 0.1)</text:span></text:p>
      <text:p text:style-name="P125"><text:span text:style-name="Source_20_Text"><text:s text:c="4"/>threshold = 10.0 / safe_mp</text:span></text:p>
      <text:p text:style-name="P125"/>
      <text:p text:style-name="P125"><text:span text:style-name="Source_20_Text"><text:s text:c="4"/># 4. Step C: Sigmoid Map</text:span></text:p>
      <text:p text:style-name="P125"><text:span text:style-name="Source_20_Text"><text:s text:c="4"/>try:</text:span></text:p>
      <text:p text:style-name="P125"><text:span text:style-name="Source_20_Text"><text:s text:c="8"/>raw_score = 100 / (1 + math.exp(-0.3 * (density - threshold)))</text:span></text:p>
      <text:p text:style-name="P125"><text:span text:style-name="Source_20_Text"><text:s text:c="4"/>except OverflowError:</text:span></text:p>
      <text:p text:style-name="P125"><text:span text:style-name="Source_20_Text"><text:s text:c="8"/>raw_score = 100 if density &gt; threshold else 0</text:span></text:p>
      <text:p text:style-name="P125"/>
      <text:p text:style-name="P126"><text:span text:style-name="Source_20_Text"><text:s text:c="4"/>return int(min(raw_score, 100))</text:span></text:p>
      <text:h text:style-name="Heading_20_5" text:outline-level="5"><text:bookmark-start text:name="__RefHeading___Toc560575_2813440148 Copy 6"/>2.2.N.F. Visual Verification ("The Truth")<text:bookmark-end text:name="__RefHeading___Toc560575_2813440148 Copy 6"/></text:h>
      <text:p text:style-name="P129"><text:span text:style-name="Strong_20_Emphasis">Comparison: 200 Line Fi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28">Scenario</text:p>
          </table:table-cell>
          <table:table-cell table:style-name="Table12.A1" office:value-type="string">
            <text:p text:style-name="P128">Ghost Lines</text:p>
          </table:table-cell>
          <table:table-cell table:style-name="Table12.A1" office:value-type="string">
            <text:p text:style-name="P128">Density</text:p>
          </table:table-cell>
          <table:table-cell table:style-name="Table12.A1" office:value-type="string">
            <text:p text:style-name="P128">Context</text:p>
          </table:table-cell>
          <table:table-cell table:style-name="Table12.A1" office:value-type="string">
            <text:p text:style-name="P128">Threshold</text:p>
          </table:table-cell>
          <table:table-cell table:style-name="Table12.A1" office:value-type="string">
            <text:p text:style-name="P128">Score</text:p>
          </table:table-cell>
          <table:table-cell table:style-name="Table12.A1" office:value-type="string">
            <text:p text:style-name="P128">Interpretation</text:p>
          </table:table-cell>
        </table:table-row>
        <table:table-row>
          <table:table-cell table:style-name="Table12.A1" office:value-type="string">
            <text:p text:style-name="P127"><text:span text:style-name="Strong_20_Emphasis">Clean Core</text:span></text:p>
          </table:table-cell>
          <table:table-cell table:style-name="Table12.A1" office:value-type="string">
            <text:p text:style-name="P127">0</text:p>
          </table:table-cell>
          <table:table-cell table:style-name="Table12.A1" office:value-type="string">
            <text:p text:style-name="P127">0%</text:p>
          </table:table-cell>
          <table:table-cell table:style-name="Table12.A1" office:value-type="string">
            <text:p text:style-name="P127">Core (1.2)</text:p>
          </table:table-cell>
          <table:table-cell table:style-name="Table12.A1" office:value-type="string">
            <text:p text:style-name="P127">8.3%</text:p>
          </table:table-cell>
          <table:table-cell table:style-name="Table12.A1" office:value-type="string">
            <text:p text:style-name="P127"><text:span text:style-name="Strong_20_Emphasis">7</text:span></text:p>
          </table:table-cell>
          <table:table-cell table:style-name="Table12.A1" office:value-type="string">
            <text:p text:style-name="P127"><text:span text:style-name="Strong_20_Emphasis">White.</text:span> Pure life.</text:p>
          </table:table-cell>
        </table:table-row>
        <table:table-row>
          <table:table-cell table:style-name="Table12.A1" office:value-type="string">
            <text:p text:style-name="P127"><text:span text:style-name="Strong_20_Emphasis">Standard Dev</text:span></text:p>
          </table:table-cell>
          <table:table-cell table:style-name="Table12.A1" office:value-type="string">
            <text:p text:style-name="P127">10</text:p>
          </table:table-cell>
          <table:table-cell table:style-name="Table12.A1" office:value-type="string">
            <text:p text:style-name="P127">5%</text:p>
          </table:table-cell>
          <table:table-cell table:style-name="Table12.A1" office:value-type="string">
            <text:p text:style-name="P127">Standard (1.0)</text:p>
          </table:table-cell>
          <table:table-cell table:style-name="Table12.A1" office:value-type="string">
            <text:p text:style-name="P127">10.0%</text:p>
          </table:table-cell>
          <table:table-cell table:style-name="Table12.A1" office:value-type="string">
            <text:p text:style-name="P127"><text:span text:style-name="Strong_20_Emphasis">18</text:span></text:p>
          </table:table-cell>
          <table:table-cell table:style-name="Table12.A1" office:value-type="string">
            <text:p text:style-name="P127"><text:span text:style-name="Strong_20_Emphasis">White.</text:span> Minor scraps. Tolerated.</text:p>
          </table:table-cell>
        </table:table-row>
        <table:table-row>
          <table:table-cell table:style-name="Table12.A1" office:value-type="string">
            <text:p text:style-name="P127"><text:span text:style-name="Strong_20_Emphasis">The Hoarder</text:span></text:p>
          </table:table-cell>
          <table:table-cell table:style-name="Table12.A1" office:value-type="string">
            <text:p text:style-name="P127">40</text:p>
          </table:table-cell>
          <table:table-cell table:style-name="Table12.A1" office:value-type="string">
            <text:p text:style-name="P127">20%</text:p>
          </table:table-cell>
          <table:table-cell table:style-name="Table12.A1" office:value-type="string">
            <text:p text:style-name="P127">Standard (1.0)</text:p>
          </table:table-cell>
          <table:table-cell table:style-name="Table12.A1" office:value-type="string">
            <text:p text:style-name="P127">10.0%</text:p>
          </table:table-cell>
          <table:table-cell table:style-name="Table12.A1" office:value-type="string">
            <text:p text:style-name="P127"><text:span text:style-name="Strong_20_Emphasis">95</text:span></text:p>
          </table:table-cell>
          <table:table-cell table:style-name="Table12.A1" office:value-type="string">
            <text:p text:style-name="P127"><text:span text:style-name="Strong_20_Emphasis">Purple.</text:span> 20% dead code is clearly necrotic.</text:p>
          </table:table-cell>
        </table:table-row>
        <table:table-row>
          <table:table-cell table:style-name="Table12.A1" office:value-type="string">
            <text:p text:style-name="P127"><text:span text:style-name="Strong_20_Emphasis">The Prototype</text:span></text:p>
          </table:table-cell>
          <table:table-cell table:style-name="Table12.A1" office:value-type="string">
            <text:p text:style-name="P127">40</text:p>
          </table:table-cell>
          <table:table-cell table:style-name="Table12.A1" office:value-type="string">
            <text:p text:style-name="P127">20%</text:p>
          </table:table-cell>
          <table:table-cell table:style-name="Table12.A1" office:value-type="string">
            <text:p text:style-name="P127">Exp (0.5)</text:p>
          </table:table-cell>
          <table:table-cell table:style-name="Table12.A1" office:value-type="string">
            <text:p text:style-name="P127">20.0%</text:p>
          </table:table-cell>
          <table:table-cell table:style-name="Table12.A1" office:value-type="string">
            <text:p text:style-name="P127"><text:span text:style-name="Strong_20_Emphasis">50</text:span></text:p>
          </table:table-cell>
          <table:table-cell table:style-name="Table12.A1" office:value-type="string">
            <text:p text:style-name="P127"><text:span text:style-name="Strong_20_Emphasis">Pale Purple.</text:span> High necrosis, but context allows it (Threshold 20%).</text:p>
          </table:table-cell>
        </table:table-row>
        <table:table-row>
          <table:table-cell table:style-name="Table12.A1" office:value-type="string">
            <text:p text:style-name="P127"><text:span text:style-name="Strong_20_Emphasis">Haunted Core</text:span></text:p>
          </table:table-cell>
          <table:table-cell table:style-name="Table12.A1" office:value-type="string">
            <text:p text:style-name="P127">20</text:p>
          </table:table-cell>
          <table:table-cell table:style-name="Table12.A1" office:value-type="string">
            <text:p text:style-name="P127">10%</text:p>
          </table:table-cell>
          <table:table-cell table:style-name="Table12.A1" office:value-type="string">
            <text:p text:style-name="P127">Core (1.2)</text:p>
          </table:table-cell>
          <table:table-cell table:style-name="Table12.A1" office:value-type="string">
            <text:p text:style-name="P127">8.3%</text:p>
          </table:table-cell>
          <table:table-cell table:style-name="Table12.A1" office:value-type="string">
            <text:p text:style-name="P127"><text:span text:style-name="Strong_20_Emphasis">62</text:span></text:p>
          </table:table-cell>
          <table:table-cell table:style-name="Table12.A1" office:value-type="string">
            <text:p text:style-name="P127"><text:span text:style-name="Strong_20_Emphasis">Purple.</text:span> 10% is "OK" elsewhere, but "Haunted" in the core.</text:p>
          </table:table-cell>
        </table:table-row>
      </table:table>
      <text:p text:style-name="P125"><text:bookmark text:name="__RefHeading___Toc11771_959624642"/><text:span text:style-name="Source_20_Text"/></text:p>
      <text:h text:style-name="P76" text:outline-level="4"><text:bookmark-start text:name="__RefHeading___Toc227256_2813440148"/>2.2.O. API Exposure (Metric: The Event Horizon)<text:bookmark-end text:name="__RefHeading___Toc227256_2813440148"/></text:h>
      <text:h text:style-name="Heading_20_5" text:outline-level="5"><text:bookmark-start text:name="__RefHeading___Toc227256_2813440148 Copy 1"/>2.2.O.A. The Philosophy: The Event Horizon<text:bookmark-end text:name="__RefHeading___Toc227256_2813440148 Copy 1"/></text:h>
      <text:p text:style-name="P129"><text:span text:style-name="Strong_20_Emphasis">"The Surface Area of Logic."</text:span></text:p>
      <text:p text:style-name="P129"><text:soft-page-break/>Every module has an Event Horizon: the boundary between its internal mechanics and the outside world. API Exposure measures how permeable this boundary is.</text:p>
      <text:list text:style-name="L105">
        <text:list-item>
          <text:p text:style-name="P317"><text:span text:style-name="Strong_20_Emphasis">Vault (0 - White):</text:span> <text:span text:style-name="Strong_20_Emphasis">Internal.</text:span> The logic is encapsulated. It exists to support other code but does not offer a public face.</text:p>
        </text:list-item>
        <text:list-item>
          <text:p text:style-name="P317"><text:span text:style-name="Strong_20_Emphasis">Quasar (100 - Electric Rose):</text:span> <text:span text:style-name="Strong_20_Emphasis">Public.</text:span> The module exists primarily to be consumed by others. It broadcasts its functionality to the galaxy.</text:p>
        </text:list-item>
      </text:list>
      <text:p text:style-name="P129">This metric allows developers to instantly distinguish "Library/Interface" code (Rose) from "Implementation/Utility" code (White) simply by looking at the galaxy map.</text:p>
      <text:h text:style-name="Heading_20_5" text:outline-level="5"><text:bookmark-start text:name="__RefHeading___Toc227256_2813440148 Copy 2"/>2.2.O.B. The Inputs (Surface Detection)<text:bookmark-end text:name="__RefHeading___Toc227256_2813440148 Copy 2"/></text:h>
      <text:p text:style-name="P129">We compare the count of <text:span text:style-name="Strong_20_Emphasis">Public Signatures</text:span> against the <text:span text:style-name="Strong_20_Emphasis">Total Definitions</text:span> to calculate the ratio of exposure. We explicitly sum Functions and Classes to get the total "Entity Count."</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8">Input Variable</text:p>
          </table:table-cell>
          <table:table-cell table:style-name="Table13.A1" office:value-type="string">
            <text:p text:style-name="P128">Regex Key</text:p>
          </table:table-cell>
          <table:table-cell table:style-name="Table13.A1" office:value-type="string">
            <text:p text:style-name="P128">Weight</text:p>
          </table:table-cell>
          <table:table-cell table:style-name="Table13.A1" office:value-type="string">
            <text:p text:style-name="P128">Rationale</text:p>
          </table:table-cell>
        </table:table-row>
        <table:table-row>
          <table:table-cell table:style-name="Table13.A1" office:value-type="string">
            <text:p text:style-name="P127"><text:span text:style-name="Strong_20_Emphasis">ApiHits</text:span></text:p>
          </table:table-cell>
          <table:table-cell table:style-name="Table13.A1" office:value-type="string">
            <text:p text:style-name="P127"><text:span text:style-name="Source_20_Text">api</text:span></text:p>
          </table:table-cell>
          <table:table-cell table:style-name="Table13.A1" office:value-type="string">
            <text:p text:style-name="P127"><text:span text:style-name="Strong_20_Emphasis">Numerator</text:span></text:p>
          </table:table-cell>
          <table:table-cell table:style-name="Table13.A1" office:value-type="string">
            <text:p text:style-name="P127"><text:span text:style-name="Strong_20_Emphasis">The Broadcast.</text:span> Keywords that explicitly expose logic: <text:span text:style-name="Source_20_Text">export</text:span>, <text:span text:style-name="Source_20_Text">public</text:span>, <text:span text:style-name="Source_20_Text">module.exports</text:span>, or capitalization rules (Go/Python).</text:p>
          </table:table-cell>
        </table:table-row>
        <table:table-row>
          <table:table-cell table:style-name="Table13.A1" office:value-type="string">
            <text:p text:style-name="P127"><text:span text:style-name="Strong_20_Emphasis">TotalDeclarations</text:span></text:p>
          </table:table-cell>
          <table:table-cell table:style-name="Table13.A1" office:value-type="string">
            <text:p text:style-name="P127"><text:span text:style-name="Source_20_Text">func_start</text:span> + <text:span text:style-name="Source_20_Text">class_start</text:span></text:p>
          </table:table-cell>
          <table:table-cell table:style-name="Table13.A1" office:value-type="string">
            <text:p text:style-name="P127"><text:span text:style-name="Strong_20_Emphasis">Denominator</text:span></text:p>
          </table:table-cell>
          <table:table-cell table:style-name="Table13.A1" office:value-type="string">
            <text:p text:style-name="P127"><text:span text:style-name="Strong_20_Emphasis">The Mass.</text:span> The total count of logical units (Functions + Classes). We need to sum both regex hits to ensure we don't undercount files that define many classes/structs but few methods.</text:p>
          </table:table-cell>
        </table:table-row>
      </table:table>
      <text:h text:style-name="Heading_20_5" text:outline-level="5"><text:bookmark-start text:name="__RefHeading___Toc227256_2813440148 Copy 3"/>2.2.O.C. The Universal Framework Integration<text:bookmark-end text:name="__RefHeading___Toc227256_2813440148 Copy 3"/></text:h>
      <text:list text:style-name="L106">
        <text:list-item>
          <text:p text:style-name="P318"><text:span text:style-name="Source_20_Text">Fc</text:span><text:span text:style-name="Strong_20_Emphasis"> (Fidelity Coefficient):</text:span> <text:span text:style-name="Strong_20_Emphasis">Not Applied.</text:span> Public is public.</text:p>
        </text:list-item>
        <text:list-item>
          <text:p text:style-name="P318"><text:span text:style-name="Source_20_Text">Irc</text:span><text:span text:style-name="Strong_20_Emphasis"> (Implicit Risk Correction):</text:span> <text:span text:style-name="Strong_20_Emphasis">Not Applied.</text:span> The concept of "Public Ratio" is language-agnostic.</text:p>
        </text:list-item>
        <text:list-item>
          <text:p text:style-name="P318"><text:span text:style-name="Source_20_Text">Mp</text:span><text:span text:style-name="Strong_20_Emphasis"> (Path Modifier):</text:span> <text:span text:style-name="Strong_20_Emphasis">Applied to Score (Amplifier).</text:span></text:p>
          <text:list>
            <text:list-item>
              <text:p text:style-name="P318"><text:span text:style-name="Emphasis">API/Public (</text:span><text:span text:style-name="Source_20_Text">Mp = 1.2</text:span><text:span text:style-name="Emphasis">):</text:span> <text:span text:style-name="Strong_20_Emphasis">Amplify.</text:span> We want these files to shine brighter. They are the intended entry points.</text:p>
            </text:list-item>
            <text:list-item>
              <text:p text:style-name="P318"><text:span text:style-name="Emphasis">Internal/Private (</text:span><text:span text:style-name="Source_20_Text">Mp = 0.8</text:span><text:span text:style-name="Emphasis">):</text:span> <text:span text:style-name="Strong_20_Emphasis">Dampen.</text:span> We want these to remain background noise unless they are egregiously leaking.</text:p>
            </text:list-item>
          </text:list>
        </text:list-item>
      </text:list>
      <text:h text:style-name="Heading_20_5" text:outline-level="5"><text:bookmark-start text:name="__RefHeading___Toc227256_2813440148 Copy 4"/><text:soft-page-break/>2.2.O.D. The Equation: Linear Surface Density<text:bookmark-end text:name="__RefHeading___Toc227256_2813440148 Copy 4"/></text:h>
      <text:p text:style-name="P129">We calculate the direct percentage of public logic. Unlike risk metrics that require a "tipping point" (Sigmoid), Surface Area is a linear physical property. A file that is 50% public should look 50% exposed.</text:p>
      <text:p text:style-name="Text_20_body"><text:bookmark-start text:name="__RefHeading___Toc42186_730389025"/>Step 1: Calculate Exposure Ratio<text:bookmark-end text:name="__RefHeading___Toc42186_730389025"/></text:p>
      <text:p text:style-name="P129">We determine what percentage of the file's defined logic is accessible from the outside. We clamp the ratio to 1.0 to handle rare edge cases where heuristics might over-count exports.</text:p>
      <text:p text:style-name="Text_20_body"><text:bookmark-start text:name="__RefHeading___Toc42188_730389025"/>Step 2: Linear Map to Score<text:bookmark-end text:name="__RefHeading___Toc42188_730389025"/></text:p>
      <text:p text:style-name="P129">We map the ratio directly to the 0-100 scale.</text:p>
      <text:p text:style-name="Text_20_body"><text:bookmark-start text:name="__RefHeading___Toc42190_730389025"/>Step 3: Context Adjustment<text:bookmark-end text:name="__RefHeading___Toc42190_730389025"/></text:p>
      <text:p text:style-name="P129">We apply the Path Modifier (<text:span text:style-name="Source_20_Text">Mp</text:span>) to highlight intended APIs and dampen internal utilities.</text:p>
      <text:h text:style-name="Heading_20_5" text:outline-level="5"><text:bookmark-start text:name="__RefHeading___Toc227256_2813440148 Copy 5"/>2.2.O.E. Implementation (Python Reference)<text:bookmark-end text:name="__RefHeading___Toc227256_2813440148 Copy 5"/></text:h>
      <text:p text:style-name="P125"><text:span text:style-name="Source_20_Text">import math</text:span></text:p>
      <text:p text:style-name="P125"/>
      <text:p text:style-name="P125"><text:span text:style-name="Source_20_Text">def calculate_api_exposure(self, hits_api, hits_func, hits_class, mp):</text:span></text:p>
      <text:p text:style-name="P125"><text:span text:style-name="Source_20_Text"><text:s text:c="4"/>"""</text:span></text:p>
      <text:p text:style-name="P125"><text:span text:style-name="Source_20_Text"><text:s text:c="4"/>Calculates 2.2.O API Exposure (Linear Surface Density).</text:span></text:p>
      <text:p text:style-name="P125"><text:span text:style-name="Source_20_Text"><text:s text:c="4"/>Returns int 0-100.</text:span></text:p>
      <text:p text:style-name="P125"><text:span text:style-name="Source_20_Text"><text:s text:c="4"/>"""</text:span></text:p>
      <text:p text:style-name="P125"><text:span text:style-name="Source_20_Text"><text:s text:c="4"/># 1. Step A: Exposure Ratio</text:span></text:p>
      <text:p text:style-name="P125"><text:span text:style-name="Source_20_Text"><text:s text:c="4"/># Total Declarations = Functions + Classes</text:span></text:p>
      <text:p text:style-name="P125"><text:span text:style-name="Source_20_Text"><text:s text:c="4"/># Note: Scanner must be updated to count 'class_start' regex hits.</text:span></text:p>
      <text:p text:style-name="P125"><text:span text:style-name="Source_20_Text"><text:s text:c="4"/>total_declarations = hits_func + hits_class</text:span></text:p>
      <text:p text:style-name="P125"><text:span text:style-name="Source_20_Text"><text:s text:c="4"/></text:span></text:p>
      <text:p text:style-name="P125"><text:span text:style-name="Source_20_Text"><text:s text:c="4"/># Ensure we don't divide by zero.</text:span></text:p>
      <text:p text:style-name="P125"><text:span text:style-name="Source_20_Text"><text:s text:c="4"/>safe_total = max(total_declarations, 1)</text:span></text:p>
      <text:p text:style-name="P125"><text:span text:style-name="Source_20_Text"><text:s text:c="4"/></text:span></text:p>
      <text:p text:style-name="P125"><text:span text:style-name="Source_20_Text"><text:s text:c="4"/># Calculate ratio (0.0 to 1.0)</text:span></text:p>
      <text:p text:style-name="P125"><text:span text:style-name="Source_20_Text"><text:s text:c="4"/>ratio = hits_api / safe_total</text:span></text:p>
      <text:p text:style-name="P125"><text:span text:style-name="Source_20_Text"><text:s text:c="4"/></text:span></text:p>
      <text:p text:style-name="P125"><text:span text:style-name="Source_20_Text"><text:s text:c="4"/># Clamp to 1.0 (100%)</text:span></text:p>
      <text:p text:style-name="P125"><text:span text:style-name="Source_20_Text"><text:s text:c="4"/>safe_ratio = min(ratio, 1.0)</text:span></text:p>
      <text:p text:style-name="P125"/>
      <text:p text:style-name="P125"><text:span text:style-name="Source_20_Text"><text:s text:c="4"/># 2. Step B: Linear Score</text:span></text:p>
      <text:p text:style-name="P125"><text:span text:style-name="Source_20_Text"><text:s text:c="4"/>raw_score = safe_ratio * 100.0</text:span></text:p>
      <text:p text:style-name="P125"/>
      <text:p text:style-name="P125"><text:span text:style-name="Source_20_Text"><text:s text:c="4"/># 3. Step C: Context Amplifier</text:span></text:p>
      <text:p text:style-name="P125"><text:span text:style-name="Source_20_Text"><text:s text:c="4"/># API folders (Mp 1.2) glow brighter/easier.</text:span></text:p>
      <text:p text:style-name="P125"><text:span text:style-name="Source_20_Text"><text:s text:c="4"/># Internal folders (Mp 0.8) stay dimmer.</text:span></text:p>
      <text:p text:style-name="P125"><text:span text:style-name="Source_20_Text"><text:s text:c="4"/>path_mod = mp.get('API Exposure', 1.0)</text:span></text:p>
      <text:p text:style-name="P125"><text:span text:style-name="Source_20_Text"><text:s text:c="4"/></text:span></text:p>
      <text:p text:style-name="P125"><text:span text:style-name="Source_20_Text"><text:s text:c="4"/>final_score = raw_score * path_mod</text:span></text:p>
      <text:p text:style-name="P125"/>
      <text:p text:style-name="P126"><text:span text:style-name="Source_20_Text"><text:s text:c="4"/>return int(min(final_score, 100))</text:span></text:p>
      <text:h text:style-name="Heading_20_5" text:outline-level="5"><text:bookmark-start text:name="__RefHeading___Toc227256_2813440148 Copy 6"/><text:soft-page-break/>2.2.O.F. Visual Verification ("The Truth")<text:bookmark-end text:name="__RefHeading___Toc227256_2813440148 Copy 6"/></text:h>
      <text:p text:style-name="P129"><text:span text:style-name="Strong_20_Emphasis">Comparison: 20 Entity File (Functions + Classes)</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128">Scenario</text:p>
          </table:table-cell>
          <table:table-cell table:style-name="Table14.A1" office:value-type="string">
            <text:p text:style-name="P128">Public</text:p>
          </table:table-cell>
          <table:table-cell table:style-name="Table14.A1" office:value-type="string">
            <text:p text:style-name="P128">Ratio</text:p>
          </table:table-cell>
          <table:table-cell table:style-name="Table14.A1" office:value-type="string">
            <text:p text:style-name="P128">Context</text:p>
          </table:table-cell>
          <table:table-cell table:style-name="Table14.A1" office:value-type="string">
            <text:p text:style-name="P128">Score</text:p>
          </table:table-cell>
          <table:table-cell table:style-name="Table14.A1" office:value-type="string">
            <text:p text:style-name="P128">Interpretation</text:p>
          </table:table-cell>
        </table:table-row>
        <table:table-row>
          <table:table-cell table:style-name="Table14.A1" office:value-type="string">
            <text:p text:style-name="P127"><text:span text:style-name="Strong_20_Emphasis">The Utility</text:span></text:p>
          </table:table-cell>
          <table:table-cell table:style-name="Table14.A1" office:value-type="string">
            <text:p text:style-name="P127">2</text:p>
          </table:table-cell>
          <table:table-cell table:style-name="Table14.A1" office:value-type="string">
            <text:p text:style-name="P127">10%</text:p>
          </table:table-cell>
          <table:table-cell table:style-name="Table14.A1" office:value-type="string">
            <text:p text:style-name="P127">Internal (0.8)</text:p>
          </table:table-cell>
          <table:table-cell table:style-name="Table14.A1" office:value-type="string">
            <text:p text:style-name="P127"><text:span text:style-name="Strong_20_Emphasis">8</text:span></text:p>
          </table:table-cell>
          <table:table-cell table:style-name="Table14.A1" office:value-type="string">
            <text:p text:style-name="P127"><text:span text:style-name="Strong_20_Emphasis">White.</text:span> Mostly private helpers. Correctly dim.</text:p>
          </table:table-cell>
        </table:table-row>
        <table:table-row>
          <table:table-cell table:style-name="Table14.A1" office:value-type="string">
            <text:p text:style-name="P127"><text:span text:style-name="Strong_20_Emphasis">The Interface</text:span></text:p>
          </table:table-cell>
          <table:table-cell table:style-name="Table14.A1" office:value-type="string">
            <text:p text:style-name="P127">10</text:p>
          </table:table-cell>
          <table:table-cell table:style-name="Table14.A1" office:value-type="string">
            <text:p text:style-name="P127">50%</text:p>
          </table:table-cell>
          <table:table-cell table:style-name="Table14.A1" office:value-type="string">
            <text:p text:style-name="P127">API (1.2)</text:p>
          </table:table-cell>
          <table:table-cell table:style-name="Table14.A1" office:value-type="string">
            <text:p text:style-name="P127"><text:span text:style-name="Strong_20_Emphasis">60</text:span></text:p>
          </table:table-cell>
          <table:table-cell table:style-name="Table14.A1" office:value-type="string">
            <text:p text:style-name="P127"><text:span text:style-name="Strong_20_Emphasis">Rose.</text:span> Half the file is public. It glows brightly as an entry point.</text:p>
          </table:table-cell>
        </table:table-row>
        <table:table-row>
          <table:table-cell table:style-name="Table14.A1" office:value-type="string">
            <text:p text:style-name="P127"><text:span text:style-name="Strong_20_Emphasis">The Leaky Core</text:span></text:p>
          </table:table-cell>
          <table:table-cell table:style-name="Table14.A1" office:value-type="string">
            <text:p text:style-name="P127">8</text:p>
          </table:table-cell>
          <table:table-cell table:style-name="Table14.A1" office:value-type="string">
            <text:p text:style-name="P127">40%</text:p>
          </table:table-cell>
          <table:table-cell table:style-name="Table14.A1" office:value-type="string">
            <text:p text:style-name="P127">Internal (0.8)</text:p>
          </table:table-cell>
          <table:table-cell table:style-name="Table14.A1" office:value-type="string">
            <text:p text:style-name="P127"><text:span text:style-name="Strong_20_Emphasis">32</text:span></text:p>
          </table:table-cell>
          <table:table-cell table:style-name="Table14.A1" office:value-type="string">
            <text:p text:style-name="P127"><text:span text:style-name="Strong_20_Emphasis">Pale Rose.</text:span> High exposure in an internal folder. Visible, but dampened because it shouldn't be public.</text:p>
          </table:table-cell>
        </table:table-row>
        <table:table-row>
          <table:table-cell table:style-name="Table14.A1" office:value-type="string">
            <text:p text:style-name="P127"><text:span text:style-name="Strong_20_Emphasis">The Library</text:span></text:p>
          </table:table-cell>
          <table:table-cell table:style-name="Table14.A1" office:value-type="string">
            <text:p text:style-name="P127">20</text:p>
          </table:table-cell>
          <table:table-cell table:style-name="Table14.A1" office:value-type="string">
            <text:p text:style-name="P127">100%</text:p>
          </table:table-cell>
          <table:table-cell table:style-name="Table14.A1" office:value-type="string">
            <text:p text:style-name="P127">Standard (1.0)</text:p>
          </table:table-cell>
          <table:table-cell table:style-name="Table14.A1" office:value-type="string">
            <text:p text:style-name="P127"><text:span text:style-name="Strong_20_Emphasis">100</text:span></text:p>
          </table:table-cell>
          <table:table-cell table:style-name="Table14.A1" office:value-type="string">
            <text:p text:style-name="P127"><text:span text:style-name="Strong_20_Emphasis">Electric Rose.</text:span> Pure public interface.</text:p>
          </table:table-cell>
        </table:table-row>
      </table:table>
      <text:p text:style-name="P129"/>
      <text:p text:style-name="P129"><text:bookmark text:name="__RefHeading___Toc186412_2813440148"/><text:span text:style-name="Strong_20_Emphasis"><text:span text:style-name="T188"/></text:span></text:p>
      <text:h text:style-name="P76" text:outline-level="4"><text:bookmark-start text:name="__RefHeading___Toc227268_2813440148"/>2.2.P. Concurrency Exposure<text:bookmark-end text:name="__RefHeading___Toc227268_2813440148"/></text:h>
      <text:h text:style-name="Heading_20_5" text:outline-level="5"><text:bookmark-start text:name="__RefHeading___Toc227268_2813440148 Copy 1"/>2.2.P.A. The Philosophy: The Signal-to-Noise Ratio<text:bookmark-end text:name="__RefHeading___Toc227268_2813440148 Copy 1"/></text:h>
      <text:p text:style-name="P134"><text:span text:style-name="Strong_20_Emphasis">"Temporal Static."</text:span></text:p>
      <text:p text:style-name="P134">In GitGalaxy, concurrency is treated as "Information Static."</text:p>
      <text:list text:style-name="L107">
        <text:list-item>
          <text:p text:style-name="P319"><text:span text:style-name="Strong_20_Emphasis">Basal State (Score 0 - White):</text:span> <text:span text:style-name="Strong_20_Emphasis">Linear.</text:span> The code executes sequentially. 1, then 2, then 3. The signal is clear and stable.</text:p>
        </text:list-item>
        <text:list-item>
          <text:p text:style-name="P319"><text:span text:style-name="Strong_20_Emphasis">Concurrent State (Score 100 - Electric Ultraviolet):</text:span> <text:span text:style-name="Strong_20_Emphasis">Noisy.</text:span> The code manages multiple parallel timelines (Promises, threads, channels). The signal is fractured. Visually, it vibrates with static, signaling that execution timing is non-deterministic.</text:p>
        </text:list-item>
      </text:list>
      <text:p text:style-name="P134"><text:span text:style-name="Strong_20_Emphasis">The Tiger in the Cage:</text:span> We do not discount concurrency just because it lives in a "Worker" or "API" folder. A tiger in a cage is still dangerous. High concurrency is <text:span text:style-name="Emphasis">always</text:span> high cognitive load and high risk, regardless of where it lives. We want these files to "Scream" their truth.</text:p>
      <text:h text:style-name="Heading_20_5" text:outline-level="5"><text:bookmark-start text:name="__RefHeading___Toc227268_2813440148 Copy 2"/>2.2.P.B. The Inputs (Temporal Markers)<text:bookmark-end text:name="__RefHeading___Toc227268_2813440148 Copy 2"/></text:h>
      <text:p text:style-name="P134">We count the keywords that "Fork" time.</text:p>
      <table:table table:name="Table31" table:style-name="Table31">
        <table:table-column table:style-name="Table31.A"/>
        <table:table-column table:style-name="Table31.B"/>
        <table:table-column table:style-name="Table31.C"/>
        <table:table-column table:style-name="Table31.D"/>
        <text:soft-page-break/>
        <table:table-row>
          <table:table-cell table:style-name="Table31.A1" office:value-type="string">
            <text:p text:style-name="P133">Input Variable</text:p>
          </table:table-cell>
          <table:table-cell table:style-name="Table31.A1" office:value-type="string">
            <text:p text:style-name="P133">Regex Key</text:p>
          </table:table-cell>
          <table:table-cell table:style-name="Table31.A1" office:value-type="string">
            <text:p text:style-name="P133">Weight</text:p>
          </table:table-cell>
          <table:table-cell table:style-name="Table31.A1" office:value-type="string">
            <text:p text:style-name="P133">Rationale</text:p>
          </table:table-cell>
        </table:table-row>
        <table:table-row>
          <table:table-cell table:style-name="Table31.A1" office:value-type="string">
            <text:p text:style-name="P132"><text:span text:style-name="Strong_20_Emphasis">AsyncHits</text:span></text:p>
          </table:table-cell>
          <table:table-cell table:style-name="Table31.A1" office:value-type="string">
            <text:p text:style-name="P132"><text:span text:style-name="Source_20_Text">concurrency</text:span></text:p>
          </table:table-cell>
          <table:table-cell table:style-name="Table31.A1" office:value-type="string">
            <text:p text:style-name="P132"><text:span text:style-name="Strong_20_Emphasis">1.0x</text:span></text:p>
          </table:table-cell>
          <table:table-cell table:style-name="Table31.A1" office:value-type="string">
            <text:p text:style-name="P132"><text:span text:style-name="Strong_20_Emphasis">The Fork.</text:span> Keywords that spawn or manage parallel execution: <text:span text:style-name="Source_20_Text">async</text:span>, <text:span text:style-name="Source_20_Text">await</text:span>, <text:span text:style-name="Source_20_Text">Promise</text:span>, <text:span text:style-name="Source_20_Text">thread</text:span>, <text:span text:style-name="Source_20_Text">spawn</text:span>, <text:span text:style-name="Source_20_Text">go</text:span>, <text:span text:style-name="Source_20_Text">chan</text:span>, <text:span text:style-name="Source_20_Text">synchronized</text:span>.</text:p>
          </table:table-cell>
        </table:table-row>
        <table:table-row>
          <table:table-cell table:style-name="Table31.A1" office:value-type="string">
            <text:p text:style-name="P132"><text:span text:style-name="Strong_20_Emphasis">LOC</text:span></text:p>
          </table:table-cell>
          <table:table-cell table:style-name="Table31.A1" office:value-type="string">
            <text:p text:style-name="P132"><text:span text:style-name="Source_20_Text">meaningful_loc</text:span></text:p>
          </table:table-cell>
          <table:table-cell table:style-name="Table31.A1" office:value-type="string">
            <text:p text:style-name="P132"><text:span text:style-name="Strong_20_Emphasis">Denominator</text:span></text:p>
          </table:table-cell>
          <table:table-cell table:style-name="Table31.A1" office:value-type="string">
            <text:p text:style-name="P132">We measure density. A 1000-line file with 1 <text:span text:style-name="Source_20_Text">await</text:span> is linear. A 10-line file with 5 <text:span text:style-name="Source_20_Text">await</text:span>s is a temporal knot.</text:p>
          </table:table-cell>
        </table:table-row>
      </table:table>
      <text:h text:style-name="Heading_20_5" text:outline-level="5"><text:bookmark-start text:name="__RefHeading___Toc227268_2813440148 Copy 3"/>2.2.P.C. The Universal Framework Integration<text:bookmark-end text:name="__RefHeading___Toc227268_2813440148 Copy 3"/></text:h>
      <text:list text:style-name="L108">
        <text:list-item>
          <text:p text:style-name="P320"><text:span text:style-name="Source_20_Text">Fc</text:span><text:span text:style-name="Strong_20_Emphasis"> (Fidelity Coefficient):</text:span> <text:span text:style-name="Strong_20_Emphasis">Not Applied.</text:span> Time is absolute.</text:p>
        </text:list-item>
        <text:list-item>
          <text:p text:style-name="P320"><text:span text:style-name="Source_20_Text">Irc</text:span><text:span text:style-name="Strong_20_Emphasis"> (Implicit Risk Correction):</text:span> <text:span text:style-name="Strong_20_Emphasis">Applied to Numerator (Dampened).</text:span> Implicit languages (JS, Python) hide race conditions better than explicit ones (Rust, Go). We add a small "Ghost Load" to density, but we scale it down (<text:span text:style-name="Source_20_Text">Irc * 0.1</text:span>) so it acts as a "Tie Breaker" rather than a false positive generator.</text:p>
        </text:list-item>
        <text:list-item>
          <text:p text:style-name="P320"><text:span text:style-name="Source_20_Text">Mp</text:span><text:span text:style-name="Strong_20_Emphasis"> (Path Modifier):</text:span> <text:span text:style-name="Strong_20_Emphasis">Applied to Threshold.</text:span></text:p>
          <text:list>
            <text:list-item>
              <text:p text:style-name="P320"><text:span text:style-name="Emphasis">UI/Views (</text:span><text:span text:style-name="Source_20_Text">Mp = 0.5</text:span><text:span text:style-name="Emphasis">):</text:span> <text:span text:style-name="Strong_20_Emphasis">Low Tolerance (High Scream).</text:span> Async logic in UI code is a primary source of bugs (race conditions, jank). We lower the bar so even minor concurrency glows here.</text:p>
            </text:list-item>
            <text:list-item>
              <text:p text:style-name="P320"><text:span text:style-name="Emphasis">Standard/Workers (</text:span><text:span text:style-name="Source_20_Text">Mp = 1.0</text:span><text:span text:style-name="Emphasis">):</text:span> <text:span text:style-name="Strong_20_Emphasis">Standard Tolerance.</text:span> We do NOT discount workers. If a worker is complex, it should look complex.</text:p>
            </text:list-item>
          </text:list>
        </text:list-item>
      </text:list>
      <text:h text:style-name="Heading_20_5" text:outline-level="5"><text:bookmark-start text:name="__RefHeading___Toc227268_2813440148 Copy 4"/>2.2.P.D. The Equation: The Tipping Point Sigmoid<text:bookmark-end text:name="__RefHeading___Toc227268_2813440148 Copy 4"/></text:h>
      <text:p text:style-name="P134">Concurrency complexity is non-linear. A single <text:span text:style-name="Source_20_Text">await</text:span> is standard. Ten <text:span text:style-name="Source_20_Text">await</text:span> calls in a small function is a "Logic Tangle." We use a Sigmoid to create a visual "Tipping Point."</text:p>
      <text:p text:style-name="Text_20_body"><text:bookmark-start text:name="__RefHeading___Toc42192_730389025"/>Step 1: Pre-Filter (The Zero Check)<text:bookmark-end text:name="__RefHeading___Toc42192_730389025"/></text:p>
      <text:p text:style-name="P134">If the file contains <text:span text:style-name="Strong_20_Emphasis">Zero</text:span> async hits, the score is <text:span text:style-name="Strong_20_Emphasis">0</text:span>. No amount of implicit risk can turn synchronous code into concurrent code.</text:p>
      <text:p text:style-name="P134"><text:span text:style-name="Source_20_Text">If AsyncHits == 0 -&gt; Score = 0</text:span></text:p>
      <text:p text:style-name="Text_20_body"><text:bookmark-start text:name="__RefHeading___Toc42194_730389025"/>Step 2: Calculate Temporal Density<text:bookmark-end text:name="__RefHeading___Toc42194_730389025"/></text:p>
      <text:p text:style-name="P134">We determine what percentage of the code is dedicated to managing time. We add a <text:span text:style-name="Emphasis">fraction</text:span> of <text:span text:style-name="Source_20_Text">Irc</text:span> (0.1x) to penalize implicit safety gaps without creating noise.</text:p>
      <text:p text:style-name="P134"><text:soft-page-break/><text:span text:style-name="Source_20_Text">Density = ((AsyncHits + (Irc * 0.1)) / max(MeaningfulLOC, 1)) * 100</text:span></text:p>
      <text:p text:style-name="Text_20_body"><text:bookmark-start text:name="__RefHeading___Toc42196_730389025"/>Step 3: Determine The Threshold (The Breakdown)<text:bookmark-end text:name="__RefHeading___Toc42196_730389025"/></text:p>
      <text:p text:style-name="P134">This is the density required to "Fracture" the signal.</text:p>
      <text:list text:style-name="L109">
        <text:list-item>
          <text:p text:style-name="P321"><text:span text:style-name="Strong_20_Emphasis">Base:</text:span> 4.0 (4% density). This provides a safe buffer for standard async patterns before triggering warnings.</text:p>
        </text:list-item>
        <text:list-item>
          <text:p text:style-name="P321"><text:span text:style-name="Strong_20_Emphasis">Context:</text:span> Scaled by <text:span text:style-name="Source_20_Text">Mp</text:span>. In UI (<text:span text:style-name="Source_20_Text">Mp=0.5</text:span>), the threshold drops to 2.0%.</text:p>
        </text:list-item>
      </text:list>
      <text:p text:style-name="P134"><text:span text:style-name="Source_20_Text">Threshold = 4.0 * Mp</text:span></text:p>
      <text:p text:style-name="Text_20_body"><text:bookmark-start text:name="__RefHeading___Toc42198_730389025"/>Step 4: The Sigmoid Map<text:bookmark-end text:name="__RefHeading___Toc42198_730389025"/></text:p>
      <text:p text:style-name="P134">We map density against the threshold.</text:p>
      <text:list text:style-name="L110">
        <text:list-item>
          <text:p text:style-name="P322"><text:span text:style-name="Strong_20_Emphasis">Slope (K):</text:span> <text:span text:style-name="Strong_20_Emphasis">0.4</text:span>. A moderately steep slope. Concurrency risk escalates quickly.</text:p>
        </text:list-item>
      </text:list>
      <text:p text:style-name="P134"><text:span text:style-name="Source_20_Text">RawScore = 100 / (1 + e^(-0.4 * (Density - Threshold)))</text:span></text:p>
      <text:p text:style-name="Text_20_body"><text:bookmark-start text:name="__RefHeading___Toc42200_730389025"/>Step 5: Final Clamp<text:bookmark-end text:name="__RefHeading___Toc42200_730389025"/></text:p>
      <text:p text:style-name="P134"><text:span text:style-name="Source_20_Text">FinalScore = min(RawScore, 100)</text:span></text:p>
      <text:h text:style-name="Heading_20_5" text:outline-level="5"><text:bookmark-start text:name="__RefHeading___Toc227268_2813440148 Copy 5"/>2.2.P.E. Implementation (Python Reference)<text:bookmark-end text:name="__RefHeading___Toc227268_2813440148 Copy 5"/></text:h>
      <text:p text:style-name="P130"><text:span text:style-name="Source_20_Text">import math</text:span></text:p>
      <text:p text:style-name="P130"/>
      <text:p text:style-name="P130"><text:span text:style-name="Source_20_Text">def calculate_concurrency_exposure(self, hits_async, loc, irc, mp):</text:span></text:p>
      <text:p text:style-name="P130"><text:span text:style-name="Source_20_Text"><text:s text:c="4"/>"""</text:span></text:p>
      <text:p text:style-name="P130"><text:span text:style-name="Source_20_Text"><text:s text:c="4"/>Calculates 2.2.P Concurrency Exposure (Temporal Static).</text:span></text:p>
      <text:p text:style-name="P130"><text:span text:style-name="Source_20_Text"><text:s text:c="4"/>Returns int 0-100.</text:span></text:p>
      <text:p text:style-name="P130"><text:span text:style-name="Source_20_Text"><text:s text:c="4"/>"""</text:span></text:p>
      <text:p text:style-name="P130"><text:span text:style-name="Source_20_Text"><text:s text:c="4"/># 1. Step A: Pre-Filter (Zero Check)</text:span></text:p>
      <text:p text:style-name="P130"><text:span text:style-name="Source_20_Text"><text:s text:c="4"/>if hits_async == 0:</text:span></text:p>
      <text:p text:style-name="P130"><text:span text:style-name="Source_20_Text"><text:s text:c="8"/>return 0</text:span></text:p>
      <text:p text:style-name="P130"/>
      <text:p text:style-name="P130"><text:span text:style-name="Source_20_Text"><text:s text:c="4"/># 2. Step B: Temporal Density</text:span></text:p>
      <text:p text:style-name="P130"><text:span text:style-name="Source_20_Text"><text:s text:c="4"/># Scaled Irc (0.1x) prevents false positives in small files</text:span></text:p>
      <text:p text:style-name="P130"><text:span text:style-name="Source_20_Text"><text:s text:c="4"/>weighted_hits = hits_async + (irc * 0.1)</text:span></text:p>
      <text:p text:style-name="P130"><text:span text:style-name="Source_20_Text"><text:s text:c="4"/>density = (weighted_hits / max(loc, 1)) * 100</text:span></text:p>
      <text:p text:style-name="P130"/>
      <text:p text:style-name="P130"><text:span text:style-name="Source_20_Text"><text:s text:c="4"/># 3. Step C: Dynamic Threshold</text:span></text:p>
      <text:p text:style-name="P130"><text:span text:style-name="Source_20_Text"><text:s text:c="4"/># Base = 4% density.</text:span></text:p>
      <text:p text:style-name="P130"><text:span text:style-name="Source_20_Text"><text:s text:c="4"/># UI (Mp 0.5) -&gt; Threshold 2.0%.</text:span></text:p>
      <text:p text:style-name="P130"><text:span text:style-name="Source_20_Text"><text:s text:c="4"/># Workers/Standard (Mp 1.0) -&gt; Threshold 4.0%.</text:span></text:p>
      <text:p text:style-name="P130"><text:span text:style-name="Source_20_Text"><text:s text:c="4"/>path_mod = mp.get('Concurrency Exposure', 1.0)</text:span></text:p>
      <text:p text:style-name="P130"><text:span text:style-name="Source_20_Text"><text:s text:c="4"/>threshold = 4.0 * path_mod</text:span></text:p>
      <text:p text:style-name="P130"/>
      <text:p text:style-name="P130"><text:span text:style-name="Source_20_Text"><text:s text:c="4"/># 4. Step D: Sigmoid Map</text:span></text:p>
      <text:p text:style-name="P130"><text:span text:style-name="Source_20_Text"><text:s text:c="4"/>try:</text:span></text:p>
      <text:p text:style-name="P130"><text:span text:style-name="Source_20_Text"><text:s text:c="8"/>raw_score = 100 / (1 + math.exp(-0.4 * (density - threshold)))</text:span></text:p>
      <text:p text:style-name="P130"><text:span text:style-name="Source_20_Text"><text:s text:c="4"/>except OverflowError:</text:span></text:p>
      <text:p text:style-name="P130"><text:span text:style-name="Source_20_Text"><text:s text:c="8"/>raw_score = 100 if density &gt; threshold else 0</text:span></text:p>
      <text:p text:style-name="P130"/>
      <text:p text:style-name="P131"><text:soft-page-break/><text:span text:style-name="Source_20_Text"><text:s text:c="4"/>return int(min(raw_score, 100))</text:span></text:p>
      <text:h text:style-name="Heading_20_5" text:outline-level="5"><text:bookmark-start text:name="__RefHeading___Toc227268_2813440148 Copy 6"/>2.2.P.F. Visual Verification ("The Truth")<text:bookmark-end text:name="__RefHeading___Toc227268_2813440148 Copy 6"/></text:h>
      <text:p text:style-name="P134"><text:span text:style-name="Strong_20_Emphasis">Comparison: 100 Line Fi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33">Scenario</text:p>
          </table:table-cell>
          <table:table-cell table:style-name="Table32.A1" office:value-type="string">
            <text:p text:style-name="P133">Async Hits</text:p>
          </table:table-cell>
          <table:table-cell table:style-name="Table32.A1" office:value-type="string">
            <text:p text:style-name="P133">Density</text:p>
          </table:table-cell>
          <table:table-cell table:style-name="Table32.A1" office:value-type="string">
            <text:p text:style-name="P133">Context</text:p>
          </table:table-cell>
          <table:table-cell table:style-name="Table32.A1" office:value-type="string">
            <text:p text:style-name="P133">Threshold</text:p>
          </table:table-cell>
          <table:table-cell table:style-name="Table32.A1" office:value-type="string">
            <text:p text:style-name="P133">Score</text:p>
          </table:table-cell>
          <table:table-cell table:style-name="Table32.A1" office:value-type="string">
            <text:p text:style-name="P133">Interpretation</text:p>
          </table:table-cell>
        </table:table-row>
        <table:table-row>
          <table:table-cell table:style-name="Table32.A1" office:value-type="string">
            <text:p text:style-name="P132"><text:span text:style-name="Strong_20_Emphasis">Synchronous JS</text:span></text:p>
          </table:table-cell>
          <table:table-cell table:style-name="Table32.A1" office:value-type="string">
            <text:p text:style-name="P132">0</text:p>
          </table:table-cell>
          <table:table-cell table:style-name="Table32.A1" office:value-type="string">
            <text:p text:style-name="P132">0.5%</text:p>
          </table:table-cell>
          <table:table-cell table:style-name="Table32.A1" office:value-type="string">
            <text:p text:style-name="P132">Any</text:p>
          </table:table-cell>
          <table:table-cell table:style-name="Table32.A1" office:value-type="string">
            <text:p text:style-name="P132">4.0%</text:p>
          </table:table-cell>
          <table:table-cell table:style-name="Table32.A1" office:value-type="string">
            <text:p text:style-name="P132"><text:span text:style-name="Strong_20_Emphasis">0</text:span></text:p>
          </table:table-cell>
          <table:table-cell table:style-name="Table32.A1" office:value-type="string">
            <text:p text:style-name="P132"><text:span text:style-name="Strong_20_Emphasis">White.</text:span> Zero hits = Zero score. (Irc ignored due to pre-filter).</text:p>
          </table:table-cell>
        </table:table-row>
        <table:table-row>
          <table:table-cell table:style-name="Table32.A1" office:value-type="string">
            <text:p text:style-name="P132"><text:span text:style-name="Strong_20_Emphasis">The Worker</text:span></text:p>
          </table:table-cell>
          <table:table-cell table:style-name="Table32.A1" office:value-type="string">
            <text:p text:style-name="P132">10</text:p>
          </table:table-cell>
          <table:table-cell table:style-name="Table32.A1" office:value-type="string">
            <text:p text:style-name="P132">10.5%</text:p>
          </table:table-cell>
          <table:table-cell table:style-name="Table32.A1" office:value-type="string">
            <text:p text:style-name="P132">Worker (1.0)</text:p>
          </table:table-cell>
          <table:table-cell table:style-name="Table32.A1" office:value-type="string">
            <text:p text:style-name="P132">4.0%</text:p>
          </table:table-cell>
          <table:table-cell table:style-name="Table32.A1" office:value-type="string">
            <text:p text:style-name="P132"><text:span text:style-name="Strong_20_Emphasis">92</text:span></text:p>
          </table:table-cell>
          <table:table-cell table:style-name="Table32.A1" office:value-type="string">
            <text:p text:style-name="P132"><text:span text:style-name="Strong_20_Emphasis">Electric UV.</text:span> High density. Even though it's a worker, it is objectively complex/dangerous. Correctly screaming.</text:p>
          </table:table-cell>
        </table:table-row>
        <table:table-row>
          <table:table-cell table:style-name="Table32.A1" office:value-type="string">
            <text:p text:style-name="P132"><text:span text:style-name="Strong_20_Emphasis">The UI Tangle</text:span></text:p>
          </table:table-cell>
          <table:table-cell table:style-name="Table32.A1" office:value-type="string">
            <text:p text:style-name="P132">5</text:p>
          </table:table-cell>
          <table:table-cell table:style-name="Table32.A1" office:value-type="string">
            <text:p text:style-name="P132">5.5%</text:p>
          </table:table-cell>
          <table:table-cell table:style-name="Table32.A1" office:value-type="string">
            <text:p text:style-name="P132">UI (0.5)</text:p>
          </table:table-cell>
          <table:table-cell table:style-name="Table32.A1" office:value-type="string">
            <text:p text:style-name="P132">2.0%</text:p>
          </table:table-cell>
          <table:table-cell table:style-name="Table32.A1" office:value-type="string">
            <text:p text:style-name="P132"><text:span text:style-name="Strong_20_Emphasis">80</text:span></text:p>
          </table:table-cell>
          <table:table-cell table:style-name="Table32.A1" office:value-type="string">
            <text:p text:style-name="P132"><text:span text:style-name="Strong_20_Emphasis">Bright UV.</text:span> Moderate async in UI triggers a high warning.</text:p>
          </table:table-cell>
        </table:table-row>
        <table:table-row>
          <table:table-cell table:style-name="Table32.A1" office:value-type="string">
            <text:p text:style-name="P132"><text:span text:style-name="Strong_20_Emphasis">Standard Async</text:span></text:p>
          </table:table-cell>
          <table:table-cell table:style-name="Table32.A1" office:value-type="string">
            <text:p text:style-name="P132">4</text:p>
          </table:table-cell>
          <table:table-cell table:style-name="Table32.A1" office:value-type="string">
            <text:p text:style-name="P132">4.5%</text:p>
          </table:table-cell>
          <table:table-cell table:style-name="Table32.A1" office:value-type="string">
            <text:p text:style-name="P132">Standard (1.0)</text:p>
          </table:table-cell>
          <table:table-cell table:style-name="Table32.A1" office:value-type="string">
            <text:p text:style-name="P132">4.0%</text:p>
          </table:table-cell>
          <table:table-cell table:style-name="Table32.A1" office:value-type="string">
            <text:p text:style-name="P132"><text:span text:style-name="Strong_20_Emphasis">55</text:span></text:p>
          </table:table-cell>
          <table:table-cell table:style-name="Table32.A1" office:value-type="string">
            <text:p text:style-name="P132"><text:span text:style-name="Strong_20_Emphasis">Pale Purple.</text:span> Tipping point. Just crossing the threshold.</text:p>
          </table:table-cell>
        </table:table-row>
        <table:table-row>
          <table:table-cell table:style-name="Table32.A1" office:value-type="string">
            <text:p text:style-name="P132"><text:span text:style-name="Strong_20_Emphasis">Implicit Mess</text:span></text:p>
          </table:table-cell>
          <table:table-cell table:style-name="Table32.A1" office:value-type="string">
            <text:p text:style-name="P132">4</text:p>
          </table:table-cell>
          <table:table-cell table:style-name="Table32.A1" office:value-type="string">
            <text:p text:style-name="P132">4.5%</text:p>
          </table:table-cell>
          <table:table-cell table:style-name="Table32.A1" office:value-type="string">
            <text:p text:style-name="P132">Standard (1.0)</text:p>
          </table:table-cell>
          <table:table-cell table:style-name="Table32.A1" office:value-type="string">
            <text:p text:style-name="P132">4.0%</text:p>
          </table:table-cell>
          <table:table-cell table:style-name="Table32.A1" office:value-type="string">
            <text:p text:style-name="P132"><text:span text:style-name="Strong_20_Emphasis">55</text:span></text:p>
          </table:table-cell>
          <table:table-cell table:style-name="Table32.A1" office:value-type="string">
            <text:p text:style-name="P132"><text:span text:style-name="Strong_20_Emphasis">Pale Purple.</text:span> The <text:span text:style-name="Source_20_Text">Irc</text:span> (0.5 extra) slightly pushes the score up, acknowledging the higher risk of implicit languages.</text:p>
          </table:table-cell>
        </table:table-row>
      </table:table>
      <text:p text:style-name="P134"/>
      <text:p text:style-name="P134"><text:bookmark text:name="__RefHeading___Toc186414_2813440148"/><text:span text:style-name="Emphasis"/></text:p>
      <text:h text:style-name="P40" text:outline-level="4"><text:bookmark-start text:name="__RefHeading___Toc227280_2813440148"/>2.2.Q. State Flux Exposure (Metric: Boiling Plasma)<text:bookmark-end text:name="__RefHeading___Toc227280_2813440148"/></text:h>
      <text:h text:style-name="Heading_20_5" text:outline-level="5"><text:bookmark-start text:name="__RefHeading___Toc227280_2813440148 Copy 1"/><text:span text:style-name="T260">2.2.Q.</text:span>A. The Philosophy: Data Volatility<text:bookmark-end text:name="__RefHeading___Toc227280_2813440148 Copy 1"/></text:h>
      <text:p text:style-name="P134"><text:span text:style-name="Strong_20_Emphasis">"Boiling Plasma."</text:span></text:p>
      <text:p text:style-name="P134">State Flux measures the <text:span text:style-name="Strong_20_Emphasis">Density of Mutation</text:span>. It answers the question: <text:span text:style-name="Emphasis">"How stable is the data in this file?"</text:span></text:p>
      <text:list text:style-name="L111">
        <text:list-item>
          <text:p text:style-name="P323"><text:span text:style-name="Strong_20_Emphasis">Immutable (Score 0 - White):</text:span> <text:span text:style-name="Strong_20_Emphasis">Frozen.</text:span> Variables are defined once and never changed (<text:span text:style-name="Source_20_Text">const</text:span>, <text:span text:style-name="Source_20_Text">final</text:span>). The logic is predictable and referentially transparent.</text:p>
        </text:list-item>
        <text:list-item>
          <text:p text:style-name="P323"><text:span text:style-name="Strong_20_Emphasis">Volatile (Score 100 - Clyde Orange):</text:span> <text:span text:style-name="Strong_20_Emphasis">Boiling.</text:span> Variables are constantly reassigned, properties are updated, and side effects are triggered. The data state is in constant flux, making it difficult to track "who changed what and when."</text:p>
        </text:list-item>
      </text:list>
      <text:p text:style-name="P134"><text:soft-page-break/><text:span text:style-name="Strong_20_Emphasis">The Tiger in the Cage:</text:span> We do <text:span text:style-name="Emphasis">not</text:span> dampen the signal for state management folders (<text:span text:style-name="Source_20_Text">store/</text:span>, <text:span text:style-name="Source_20_Text">reducers/</text:span>). A file dedicated to mutating state <text:span text:style-name="Emphasis">is</text:span> a high-flux file. It should glow Orange to reflect its nature as a volatility engine.</text:p>
      <text:h text:style-name="Heading_20_5" text:outline-level="5"><text:bookmark-start text:name="__RefHeading___Toc227280_2813440148 Copy 2"/><text:span text:style-name="T260">2.2.Q.</text:span>B. The Inputs (Mutation Markers)<text:bookmark-end text:name="__RefHeading___Toc227280_2813440148 Copy 2"/></text:h>
      <text:p text:style-name="P134">We count the keywords that imply reassignment or side effects.</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33">Input Variable</text:p>
          </table:table-cell>
          <table:table-cell table:style-name="Table33.A1" office:value-type="string">
            <text:p text:style-name="P133">Regex Key</text:p>
          </table:table-cell>
          <table:table-cell table:style-name="Table33.A1" office:value-type="string">
            <text:p text:style-name="P133">Weight</text:p>
          </table:table-cell>
          <table:table-cell table:style-name="Table33.A1" office:value-type="string">
            <text:p text:style-name="P133">Rationale</text:p>
          </table:table-cell>
        </table:table-row>
        <table:table-row>
          <table:table-cell table:style-name="Table33.A1" office:value-type="string">
            <text:p text:style-name="P132"><text:span text:style-name="Strong_20_Emphasis">FluxHits</text:span></text:p>
          </table:table-cell>
          <table:table-cell table:style-name="Table33.A1" office:value-type="string">
            <text:p text:style-name="P132"><text:span text:style-name="Source_20_Text">flux</text:span></text:p>
          </table:table-cell>
          <table:table-cell table:style-name="Table33.A1" office:value-type="string">
            <text:p text:style-name="P132"><text:span text:style-name="Strong_20_Emphasis">1.0x</text:span></text:p>
          </table:table-cell>
          <table:table-cell table:style-name="Table33.A1" office:value-type="string">
            <text:p text:style-name="P132"><text:span text:style-name="Strong_20_Emphasis">The Change.</text:span> Keywords that mutate data: <text:span text:style-name="Source_20_Text">let</text:span>, <text:span text:style-name="Source_20_Text">var</text:span>, <text:span text:style-name="Source_20_Text">mut</text:span>, <text:span text:style-name="Source_20_Text">setState</text:span>, <text:span text:style-name="Source_20_Text">reassign</text:span>, <text:span text:style-name="Source_20_Text">push</text:span>, <text:span text:style-name="Source_20_Text">pop</text:span>, <text:span text:style-name="Source_20_Text">+=</text:span>, <text:span text:style-name="Source_20_Text">=</text:span>.</text:p>
          </table:table-cell>
        </table:table-row>
        <table:table-row>
          <table:table-cell table:style-name="Table33.A1" office:value-type="string">
            <text:p text:style-name="P132"><text:span text:style-name="Strong_20_Emphasis">LOC</text:span></text:p>
          </table:table-cell>
          <table:table-cell table:style-name="Table33.A1" office:value-type="string">
            <text:p text:style-name="P132"><text:span text:style-name="Source_20_Text">meaningful_loc</text:span></text:p>
          </table:table-cell>
          <table:table-cell table:style-name="Table33.A1" office:value-type="string">
            <text:p text:style-name="P132"><text:span text:style-name="Strong_20_Emphasis">Denominator</text:span></text:p>
          </table:table-cell>
          <table:table-cell table:style-name="Table33.A1" office:value-type="string">
            <text:p text:style-name="P132">We measure density. A loop counter <text:span text:style-name="Source_20_Text">i++</text:span> in a 1000-line file is negligible. 50 setters in a 100-line file is a "Boiling" class.</text:p>
          </table:table-cell>
        </table:table-row>
      </table:table>
      <text:h text:style-name="Heading_20_5" text:outline-level="5"><text:bookmark-start text:name="__RefHeading___Toc227280_2813440148 Copy 3"/><text:span text:style-name="T260">2.2.Q.</text:span>C. The Universal Framework Integration<text:bookmark-end text:name="__RefHeading___Toc227280_2813440148 Copy 3"/></text:h>
      <text:list text:style-name="L112">
        <text:list-item>
          <text:p text:style-name="P324"><text:span text:style-name="Source_20_Text">Fc</text:span><text:span text:style-name="Strong_20_Emphasis"> (Fidelity Coefficient):</text:span> <text:span text:style-name="Strong_20_Emphasis">Not Applied.</text:span> Mutation is an absolute action.</text:p>
        </text:list-item>
        <text:list-item>
          <text:p text:style-name="P324"><text:span text:style-name="Source_20_Text">Irc</text:span><text:span text:style-name="Strong_20_Emphasis"> (Implicit Risk Correction):</text:span> <text:span text:style-name="Strong_20_Emphasis">Applied to Numerator (Dampened).</text:span> Implicit languages (JS, Python) default to mutability. We add a small "Ghost Load" (<text:span text:style-name="Source_20_Text">Irc * 0.1</text:span>) to the density. This acts as a tie-breaker, pushing implicit code slightly higher on the volatility scale than explicit immutable languages (Rust/Haskell) for the same operation count.</text:p>
        </text:list-item>
        <text:list-item>
          <text:p text:style-name="P324"><text:span text:style-name="Source_20_Text">Mp</text:span><text:span text:style-name="Strong_20_Emphasis"> (Path Modifier):</text:span> <text:span text:style-name="Strong_20_Emphasis">Applied to Threshold.</text:span></text:p>
          <text:list>
            <text:list-item>
              <text:p text:style-name="P324"><text:span text:style-name="Emphasis">UI/Views (</text:span><text:span text:style-name="Source_20_Text">Mp = 0.8</text:span><text:span text:style-name="Emphasis">):</text:span> <text:span text:style-name="Strong_20_Emphasis">Low Tolerance.</text:span> Heavy internal state mutation in UI components (<text:span text:style-name="Source_20_Text">setState</text:span> spaghetti) is a prime source of bugs. We lower the bar to highlight this risk.</text:p>
            </text:list-item>
            <text:list-item>
              <text:p text:style-name="P324"><text:span text:style-name="Emphasis">Standard/Store (</text:span><text:span text:style-name="Source_20_Text">Mp = 1.0</text:span><text:span text:style-name="Emphasis">):</text:span> <text:span text:style-name="Strong_20_Emphasis">Standard Tolerance.</text:span> We accept that Stores exist to mutate data. We let them show their true colors (Orange) without artificial dampening.</text:p>
            </text:list-item>
          </text:list>
        </text:list-item>
      </text:list>
      <text:h text:style-name="Heading_20_5" text:outline-level="5"><text:bookmark-start text:name="__RefHeading___Toc227280_2813440148 Copy 4"/><text:span text:style-name="T260">2.2.Q.</text:span>D. The Equation: The Mutation Threshold Sigmoid<text:bookmark-end text:name="__RefHeading___Toc227280_2813440148 Copy 4"/></text:h>
      <text:p text:style-name="P134">Most code requires <text:span text:style-name="Emphasis">some</text:span> local mutation (loop counters). We use a Sigmoid to ignore this background noise but react sharply once mutation becomes a structural pattern.</text:p>
      <text:p text:style-name="Text_20_body"><text:bookmark-start text:name="__RefHeading___Toc42202_730389025"/>Step 1: Pre-Filter (The Zero Check)<text:bookmark-end text:name="__RefHeading___Toc42202_730389025"/></text:p>
      <text:p text:style-name="P134"><text:soft-page-break/>If the file contains <text:span text:style-name="Strong_20_Emphasis">Zero</text:span> flux hits, the score is <text:span text:style-name="Strong_20_Emphasis">0</text:span>.</text:p>
      <text:p text:style-name="P134"><text:span text:style-name="Source_20_Text">If FluxHits == 0 -&gt; Score = 0</text:span></text:p>
      <text:p text:style-name="Text_20_body"><text:bookmark-start text:name="__RefHeading___Toc42204_730389025"/>Step 2: Calculate Volatility Density<text:bookmark-end text:name="__RefHeading___Toc42204_730389025"/></text:p>
      <text:p text:style-name="P134">We determine what percentage of the code involves changing data.</text:p>
      <text:p text:style-name="P134"><text:span text:style-name="Source_20_Text">Density = ((FluxHits + (Irc * 0.1)) / max(MeaningfulLOC, 1)) * 100</text:span></text:p>
      <text:p text:style-name="Text_20_body"><text:bookmark-start text:name="__RefHeading___Toc42206_730389025"/>Step 3: Determine The Threshold (The Boiling Point)<text:bookmark-end text:name="__RefHeading___Toc42206_730389025"/></text:p>
      <text:p text:style-name="P134">This is the density required to "Boil" the file.</text:p>
      <text:list text:style-name="L113">
        <text:list-item>
          <text:p text:style-name="P325"><text:span text:style-name="Strong_20_Emphasis">Base:</text:span> 5.0 (5% density). Roughly 5 mutations per 100 lines. This allows for standard loops and local vars without triggering a warning.</text:p>
        </text:list-item>
        <text:list-item>
          <text:p text:style-name="P325"><text:span text:style-name="Strong_20_Emphasis">Context:</text:span> Scaled by <text:span text:style-name="Source_20_Text">Mp</text:span>.</text:p>
        </text:list-item>
      </text:list>
      <text:p text:style-name="P134"><text:span text:style-name="Source_20_Text">Threshold = 5.0 * Mp</text:span></text:p>
      <text:p text:style-name="Text_20_body"><text:bookmark-start text:name="__RefHeading___Toc42208_730389025"/>Step 4: The Sigmoid Map<text:bookmark-end text:name="__RefHeading___Toc42208_730389025"/></text:p>
      <text:p text:style-name="P134">We map density against the threshold.</text:p>
      <text:list text:style-name="L114">
        <text:list-item>
          <text:p text:style-name="P326"><text:span text:style-name="Strong_20_Emphasis">Slope (K):</text:span> <text:span text:style-name="Strong_20_Emphasis">0.35</text:span>. A smooth curve that ramps up as mutation becomes dominant.</text:p>
        </text:list-item>
      </text:list>
      <text:p text:style-name="P134"><text:span text:style-name="Source_20_Text">RawScore = 100 / (1 + e^(-0.35 * (Density - Threshold)))</text:span></text:p>
      <text:p text:style-name="Text_20_body"><text:bookmark-start text:name="__RefHeading___Toc42210_730389025"/>Step 5: Final Clamp<text:bookmark-end text:name="__RefHeading___Toc42210_730389025"/></text:p>
      <text:p text:style-name="P134"><text:span text:style-name="Source_20_Text">FinalScore = min(RawScore, 100)</text:span></text:p>
      <text:h text:style-name="Heading_20_5" text:outline-level="5"><text:bookmark-start text:name="__RefHeading___Toc227280_2813440148 Copy 5"/><text:span text:style-name="T260">2.2.Q.</text:span>E. Implementation (Python Reference)<text:bookmark-end text:name="__RefHeading___Toc227280_2813440148 Copy 5"/></text:h>
      <text:p text:style-name="P130"><text:span text:style-name="Source_20_Text">import math</text:span></text:p>
      <text:p text:style-name="P130"/>
      <text:p text:style-name="P130"><text:span text:style-name="Source_20_Text">def calculate_state_flux_exposure(self, hits_flux, loc, irc, mp):</text:span></text:p>
      <text:p text:style-name="P130"><text:span text:style-name="Source_20_Text"><text:s text:c="4"/>"""</text:span></text:p>
      <text:p text:style-name="P130"><text:span text:style-name="Source_20_Text"><text:s text:c="4"/>Calculates 2.2.Q State Flux Exposure (Data Volatility).</text:span></text:p>
      <text:p text:style-name="P130"><text:span text:style-name="Source_20_Text"><text:s text:c="4"/>Returns int 0-100.</text:span></text:p>
      <text:p text:style-name="P130"><text:span text:style-name="Source_20_Text"><text:s text:c="4"/>"""</text:span></text:p>
      <text:p text:style-name="P130"><text:span text:style-name="Source_20_Text"><text:s text:c="4"/># 1. Step A: Pre-Filter</text:span></text:p>
      <text:p text:style-name="P130"><text:span text:style-name="Source_20_Text"><text:s text:c="4"/>if hits_flux == 0:</text:span></text:p>
      <text:p text:style-name="P130"><text:span text:style-name="Source_20_Text"><text:s text:c="8"/>return 0</text:span></text:p>
      <text:p text:style-name="P130"/>
      <text:p text:style-name="P130"><text:span text:style-name="Source_20_Text"><text:s text:c="4"/># 2. Step B: Volatility Density</text:span></text:p>
      <text:p text:style-name="P130"><text:span text:style-name="Source_20_Text"><text:s text:c="4"/># Irc * 0.1 adds a small penalty for implicit mutability defaults</text:span></text:p>
      <text:p text:style-name="P130"><text:span text:style-name="Source_20_Text"><text:s text:c="4"/>weighted_hits = hits_flux + (irc * 0.1)</text:span></text:p>
      <text:p text:style-name="P130"><text:span text:style-name="Source_20_Text"><text:s text:c="4"/>density = (weighted_hits / max(loc, 1)) * 100</text:span></text:p>
      <text:p text:style-name="P130"/>
      <text:p text:style-name="P130"><text:span text:style-name="Source_20_Text"><text:s text:c="4"/># 3. Step C: Dynamic Threshold</text:span></text:p>
      <text:p text:style-name="P130"><text:span text:style-name="Source_20_Text"><text:s text:c="4"/># Base = 5% density.</text:span></text:p>
      <text:p text:style-name="P130"><text:span text:style-name="Source_20_Text"><text:s text:c="4"/>path_mod = mp.get('State Flux Exposure', 1.0)</text:span></text:p>
      <text:p text:style-name="P130"><text:span text:style-name="Source_20_Text"><text:s text:c="4"/>threshold = 5.0 * path_mod</text:span></text:p>
      <text:p text:style-name="P130"><text:soft-page-break/></text:p>
      <text:p text:style-name="P130"><text:span text:style-name="Source_20_Text"><text:s text:c="4"/># 4. Step D: Sigmoid Map</text:span></text:p>
      <text:p text:style-name="P130"><text:span text:style-name="Source_20_Text"><text:s text:c="4"/>try:</text:span></text:p>
      <text:p text:style-name="P130"><text:span text:style-name="Source_20_Text"><text:s text:c="8"/>raw_score = 100 / (1 + math.exp(-0.35 * (density - threshold)))</text:span></text:p>
      <text:p text:style-name="P130"><text:span text:style-name="Source_20_Text"><text:s text:c="4"/>except OverflowError:</text:span></text:p>
      <text:p text:style-name="P130"><text:span text:style-name="Source_20_Text"><text:s text:c="8"/>raw_score = 100 if density &gt; threshold else 0</text:span></text:p>
      <text:p text:style-name="P130"/>
      <text:p text:style-name="P131"><text:span text:style-name="Source_20_Text"><text:s text:c="4"/>return int(min(raw_score, 100))</text:span></text:p>
      <text:h text:style-name="Heading_20_5" text:outline-level="5"><text:bookmark-start text:name="__RefHeading___Toc227280_2813440148 Copy 6"/><text:span text:style-name="T260">2.2.Q.</text:span>F. Visual Verification ("The Truth")<text:bookmark-end text:name="__RefHeading___Toc227280_2813440148 Copy 6"/></text:h>
      <text:p text:style-name="P134"><text:span text:style-name="Strong_20_Emphasis">Comparison: 100 Line Fi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33">Scenario</text:p>
          </table:table-cell>
          <table:table-cell table:style-name="Table34.A1" office:value-type="string">
            <text:p text:style-name="P133">Flux Hits</text:p>
          </table:table-cell>
          <table:table-cell table:style-name="Table34.A1" office:value-type="string">
            <text:p text:style-name="P133">Density</text:p>
          </table:table-cell>
          <table:table-cell table:style-name="Table34.A1" office:value-type="string">
            <text:p text:style-name="P133">Context</text:p>
          </table:table-cell>
          <table:table-cell table:style-name="Table34.A1" office:value-type="string">
            <text:p text:style-name="P133">Threshold</text:p>
          </table:table-cell>
          <table:table-cell table:style-name="Table34.A1" office:value-type="string">
            <text:p text:style-name="P133">Score</text:p>
          </table:table-cell>
          <table:table-cell table:style-name="Table34.A1" office:value-type="string">
            <text:p text:style-name="P133">Interpretation</text:p>
          </table:table-cell>
        </table:table-row>
        <table:table-row>
          <table:table-cell table:style-name="Table34.A1" office:value-type="string">
            <text:p text:style-name="P132"><text:span text:style-name="Strong_20_Emphasis">Pure Functional</text:span></text:p>
          </table:table-cell>
          <table:table-cell table:style-name="Table34.A1" office:value-type="string">
            <text:p text:style-name="P132">0</text:p>
          </table:table-cell>
          <table:table-cell table:style-name="Table34.A1" office:value-type="string">
            <text:p text:style-name="P132">0.5%</text:p>
          </table:table-cell>
          <table:table-cell table:style-name="Table34.A1" office:value-type="string">
            <text:p text:style-name="P132">Any</text:p>
          </table:table-cell>
          <table:table-cell table:style-name="Table34.A1" office:value-type="string">
            <text:p text:style-name="P132">5.0%</text:p>
          </table:table-cell>
          <table:table-cell table:style-name="Table34.A1" office:value-type="string">
            <text:p text:style-name="P132"><text:span text:style-name="Strong_20_Emphasis">0</text:span></text:p>
          </table:table-cell>
          <table:table-cell table:style-name="Table34.A1" office:value-type="string">
            <text:p text:style-name="P132"><text:span text:style-name="Strong_20_Emphasis">White.</text:span> Zero hits = Zero score.</text:p>
          </table:table-cell>
        </table:table-row>
        <table:table-row>
          <table:table-cell table:style-name="Table34.A1" office:value-type="string">
            <text:p text:style-name="P132"><text:span text:style-name="Strong_20_Emphasis">Standard Logic</text:span></text:p>
          </table:table-cell>
          <table:table-cell table:style-name="Table34.A1" office:value-type="string">
            <text:p text:style-name="P132">3</text:p>
          </table:table-cell>
          <table:table-cell table:style-name="Table34.A1" office:value-type="string">
            <text:p text:style-name="P132">3.5%</text:p>
          </table:table-cell>
          <table:table-cell table:style-name="Table34.A1" office:value-type="string">
            <text:p text:style-name="P132">Standard</text:p>
          </table:table-cell>
          <table:table-cell table:style-name="Table34.A1" office:value-type="string">
            <text:p text:style-name="P132">5.0%</text:p>
          </table:table-cell>
          <table:table-cell table:style-name="Table34.A1" office:value-type="string">
            <text:p text:style-name="P132"><text:span text:style-name="Strong_20_Emphasis">37</text:span></text:p>
          </table:table-cell>
          <table:table-cell table:style-name="Table34.A1" office:value-type="string">
            <text:p text:style-name="P132"><text:span text:style-name="Strong_20_Emphasis">White/Pale Orange.</text:span> Local loops/vars. Below the boiling point.</text:p>
          </table:table-cell>
        </table:table-row>
        <table:table-row>
          <table:table-cell table:style-name="Table34.A1" office:value-type="string">
            <text:p text:style-name="P132"><text:span text:style-name="Strong_20_Emphasis">The Redux Store</text:span></text:p>
          </table:table-cell>
          <table:table-cell table:style-name="Table34.A1" office:value-type="string">
            <text:p text:style-name="P132">10</text:p>
          </table:table-cell>
          <table:table-cell table:style-name="Table34.A1" office:value-type="string">
            <text:p text:style-name="P132">10.5%</text:p>
          </table:table-cell>
          <table:table-cell table:style-name="Table34.A1" office:value-type="string">
            <text:p text:style-name="P132">Store (1.0)</text:p>
          </table:table-cell>
          <table:table-cell table:style-name="Table34.A1" office:value-type="string">
            <text:p text:style-name="P132">5.0%</text:p>
          </table:table-cell>
          <table:table-cell table:style-name="Table34.A1" office:value-type="string">
            <text:p text:style-name="P132"><text:span text:style-name="Strong_20_Emphasis">87</text:span></text:p>
          </table:table-cell>
          <table:table-cell table:style-name="Table34.A1" office:value-type="string">
            <text:p text:style-name="P132"><text:span text:style-name="Strong_20_Emphasis">Bright Orange.</text:span> High flux. Correctly identified as a volatile state engine.</text:p>
          </table:table-cell>
        </table:table-row>
        <table:table-row>
          <table:table-cell table:style-name="Table34.A1" office:value-type="string">
            <text:p text:style-name="P132"><text:span text:style-name="Strong_20_Emphasis">The UI Spaghetti</text:span></text:p>
          </table:table-cell>
          <table:table-cell table:style-name="Table34.A1" office:value-type="string">
            <text:p text:style-name="P132">8</text:p>
          </table:table-cell>
          <table:table-cell table:style-name="Table34.A1" office:value-type="string">
            <text:p text:style-name="P132">8.5%</text:p>
          </table:table-cell>
          <table:table-cell table:style-name="Table34.A1" office:value-type="string">
            <text:p text:style-name="P132">UI (0.8)</text:p>
          </table:table-cell>
          <table:table-cell table:style-name="Table34.A1" office:value-type="string">
            <text:p text:style-name="P132">4.0%</text:p>
          </table:table-cell>
          <table:table-cell table:style-name="Table34.A1" office:value-type="string">
            <text:p text:style-name="P132"><text:span text:style-name="Strong_20_Emphasis">83</text:span></text:p>
          </table:table-cell>
          <table:table-cell table:style-name="Table34.A1" office:value-type="string">
            <text:p text:style-name="P132"><text:span text:style-name="Strong_20_Emphasis">Bright Orange.</text:span> Same density, but lower threshold in UI makes it scream louder.</text:p>
          </table:table-cell>
        </table:table-row>
        <table:table-row>
          <table:table-cell table:style-name="Table34.A1" office:value-type="string">
            <text:p text:style-name="P132"><text:span text:style-name="Strong_20_Emphasis">Implicit Script</text:span></text:p>
          </table:table-cell>
          <table:table-cell table:style-name="Table34.A1" office:value-type="string">
            <text:p text:style-name="P132">5</text:p>
          </table:table-cell>
          <table:table-cell table:style-name="Table34.A1" office:value-type="string">
            <text:p text:style-name="P132">5.5%</text:p>
          </table:table-cell>
          <table:table-cell table:style-name="Table34.A1" office:value-type="string">
            <text:p text:style-name="P132">Standard</text:p>
          </table:table-cell>
          <table:table-cell table:style-name="Table34.A1" office:value-type="string">
            <text:p text:style-name="P132">5.0%</text:p>
          </table:table-cell>
          <table:table-cell table:style-name="Table34.A1" office:value-type="string">
            <text:p text:style-name="P132"><text:span text:style-name="Strong_20_Emphasis">54</text:span></text:p>
          </table:table-cell>
          <table:table-cell table:style-name="Table34.A1" office:value-type="string">
            <text:p text:style-name="P132"><text:span text:style-name="Strong_20_Emphasis">Pale Orange.</text:span> <text:span text:style-name="Emphasis">With Irc=5</text:span>. The implicit penalty pushes it just over the tipping point.</text:p>
          </table:table-cell>
        </table:table-row>
      </table:table>
      <text:p text:style-name="P134"/>
      <text:p text:style-name="P134"><text:span text:style-name="Emphasis"/></text:p>
      <text:h text:style-name="P72" text:outline-level="3"><text:bookmark-start text:name="__RefHeading___Toc560587_2813440148"/>2.2.R. Language Identity<text:bookmark-end text:name="__RefHeading___Toc560587_2813440148"/></text:h>
      <text:p text:style-name="P83"><text:span text:style-name="Strong_20_Emphasis">Summary:</text:span> Visualizes the <text:span text:style-name="Strong_20_Emphasis">"Linguistic DNA"</text:span> of the galaxy. Modern systems are rarely mono-cultural; they are diverse ecosystems where different languages handle different layers of the stack. This mode toggles the star's color to represent its language family, allowing the team to instantly distinguish the "Frontend Continents" from the "Backend Deep Space" without reading file extensions.</text:p>
      <text:p text:style-name="P83"><text:soft-page-break/><text:span text:style-name="Strong_20_Emphasis">Effect:</text:span> Overrides the basal color with a standardized <text:span text:style-name="Strong_20_Emphasis">Language Identity Palette</text:span>.</text:p>
      <text:h text:style-name="P76" text:outline-level="4"><text:bookmark-start text:name="__RefHeading___Toc560589_2813440148"/>2.2.R.1. The Philosophy: The Right Tool for the Job<text:bookmark-end text:name="__RefHeading___Toc560589_2813440148"/></text:h>
      <text:p text:style-name="P83">In GitGalaxy, we visualize this distribution to reveal the <text:span text:style-name="Strong_20_Emphasis">Architectural Stratification</text:span> of the system. It answers the question: "What languages are we using to solve these problems?"</text:p>
      <text:h text:style-name="P77" text:outline-level="5"><text:bookmark-start text:name="__RefHeading___Toc560591_2813440148"/>2.2.R.2. The Inputs: Identifying the Species<text:bookmark-end text:name="__RefHeading___Toc560591_2813440148"/></text:h>
      <text:p text:style-name="P83">The scanner uses a two-step identification process to ensure accuracy even in "headless" scripts:</text:p>
      <text:list text:style-name="L115">
        <text:list-item>
          <text:p text:style-name="P327"><text:span text:style-name="Strong_20_Emphasis">Primary Signal:</text:span> File Extension (e.g., <text:span text:style-name="Source_20_Text">.ts</text:span>, <text:span text:style-name="Source_20_Text">.rs</text:span>, <text:span text:style-name="Source_20_Text">.py</text:span>).</text:p>
        </text:list-item>
        <text:list-item>
          <text:p text:style-name="P327"><text:span text:style-name="Strong_20_Emphasis">Secondary Signal:</text:span> Shebang Analysis (e.g., <text:span text:style-name="Source_20_Text">#!/bin/bash</text:span>, <text:span text:style-name="Source_20_Text">#!/usr/bin/env python3</text:span>) for files lacking extensions.</text:p>
        </text:list-item>
      </text:list>
      <text:h text:style-name="P77" text:outline-level="5"><text:bookmark-start text:name="__RefHeading___Toc560593_2813440148"/>2.2.R.3. The Logic: The Identity Map &amp; Exo-Protocol<text:bookmark-end text:name="__RefHeading___Toc560593_2813440148"/></text:h>
      <text:p text:style-name="P83">Language Identity uses a <text:span text:style-name="Strong_20_Emphasis">Hybrid Lookup System</text:span>:</text:p>
      <text:p text:style-name="P83"><text:span text:style-name="Strong_20_Emphasis">A. The Standard Protocol (Explicit)</text:span> For known major languages (listed below), we use a curated, industry-standard palette designed for instant recognition (e.g., TypeScript = Blue).</text:p>
      <text:p text:style-name="P83"><text:span text:style-name="Strong_20_Emphasis">B. The Exo-Species Protocol (Implicit)</text:span> For unknown or exotic file extensions, we do not default to white. Instead, we generate a <text:span text:style-name="Strong_20_Emphasis">Deterministic High-Contrast Color</text:span> based on the file extension's string hash.</text:p>
      <text:list text:style-name="L116">
        <text:list-item>
          <text:p text:style-name="P328"><text:span text:style-name="Strong_20_Emphasis">The Algorithm:</text:span> We hash the extension string to an integer and map it to a specific HSL range optimized for the "Void Black" background.</text:p>
        </text:list-item>
        <text:list-item>
          <text:p text:style-name="P328"><text:span text:style-name="Strong_20_Emphasis">Visibility Constraint:</text:span> Generated colors are locked to <text:span text:style-name="Strong_20_Emphasis">High Saturation (80-100%)</text:span> and <text:span text:style-name="Strong_20_Emphasis">High Lightness (60-80%)</text:span>. This prevents "muddy" or dark colors from being generated, ensuring that even the rarest file type shines brightly in the galaxy.</text:p>
        </text:list-item>
      </text:list>
      <text:h text:style-name="P77" text:outline-level="5"><text:bookmark-start text:name="__RefHeading___Toc560595_2813440148"/>2.2.R.4. Why This Approach is Effective ("The Visual Truth")<text:bookmark-end text:name="__RefHeading___Toc560595_2813440148"/></text:h>
      <text:p text:style-name="P83">This visualization acts as the "Political Map" of the galaxy:</text:p>
      <text:list text:style-name="L117">
        <text:list-item>
          <text:p text:style-name="P329"><text:span text:style-name="Strong_20_Emphasis">Visualizes the "Glue":</text:span> It instantly highlights the "Ops Layer" (Shell/Docker/Yaml) that wraps around the application logic.</text:p>
        </text:list-item>
        <text:list-item>
          <text:p text:style-name="P329"><text:soft-page-break/><text:span text:style-name="Strong_20_Emphasis">Exposes "Foreign Objects":</text:span> It makes it impossible to hide a random PHP file inside a Java project. If a file doesn't belong, its color will clash violently with its neighbors, prompting an honest conversation about architectural consistency.</text:p>
        </text:list-item>
        <text:list-item>
          <text:p text:style-name="P329"><text:span text:style-name="Strong_20_Emphasis">Separates Concerns:</text:span> In a full-stack repo, it creates a clean visual separation between the Client (Yellow/Blue) and the Server (Green/Gray).</text:p>
        </text:list-item>
      </text:list>
      <text:h text:style-name="P77" text:outline-level="5"><text:bookmark-start text:name="__RefHeading___Toc560597_2813440148"/>2.2.R.5. Visual Summary Table (High-Contrast Palette)<text:bookmark-end text:name="__RefHeading___Toc560597_2813440148"/></text:h>
      <text:p text:style-name="P83"><text:span text:style-name="Emphasis">Note: All colors have been tuned for maximum visibility against a Void Black (</text:span><text:span text:style-name="Source_20_Text">#050508</text:span><text:span text:style-name="Emphasis">) background.</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80">Language Family</text:p>
          </table:table-cell>
          <table:table-cell table:style-name="Table17.A1" office:value-type="string">
            <text:p text:style-name="P80">Hex Code</text:p>
          </table:table-cell>
          <table:table-cell table:style-name="Table17.A1" office:value-type="string">
            <text:p text:style-name="P80">Visual Color</text:p>
          </table:table-cell>
          <table:table-cell table:style-name="Table17.A1" office:value-type="string">
            <text:p text:style-name="P80">Cultural Association</text:p>
          </table:table-cell>
        </table:table-row>
        <table:table-row>
          <table:table-cell table:style-name="Table17.A1" office:value-type="string">
            <text:p text:style-name="P79"><text:span text:style-name="Strong_20_Emphasis">JavaScript</text:span></text:p>
          </table:table-cell>
          <table:table-cell table:style-name="Table17.A1" office:value-type="string">
            <text:p text:style-name="P79"><text:span text:style-name="Source_20_Text">#F1E05A</text:span></text:p>
          </table:table-cell>
          <table:table-cell table:style-name="Table17.A1" office:value-type="string">
            <text:p text:style-name="P79">Electric Yellow</text:p>
          </table:table-cell>
          <table:table-cell table:style-name="Table17.A1" office:value-type="string">
            <text:p text:style-name="P79">The Frontend Core / Ubiquity.</text:p>
          </table:table-cell>
        </table:table-row>
        <table:table-row>
          <table:table-cell table:style-name="Table17.A1" office:value-type="string">
            <text:p text:style-name="P79"><text:span text:style-name="Strong_20_Emphasis">TypeScript</text:span></text:p>
          </table:table-cell>
          <table:table-cell table:style-name="Table17.A1" office:value-type="string">
            <text:p text:style-name="P79"><text:span text:style-name="Source_20_Text">#0099FF</text:span></text:p>
          </table:table-cell>
          <table:table-cell table:style-name="Table17.A1" office:value-type="string">
            <text:p text:style-name="P79">Neon Azure</text:p>
          </table:table-cell>
          <table:table-cell table:style-name="Table17.A1" office:value-type="string">
            <text:p text:style-name="P79">Structural Web / Typed Logic.</text:p>
          </table:table-cell>
        </table:table-row>
        <table:table-row>
          <table:table-cell table:style-name="Table17.A1" office:value-type="string">
            <text:p text:style-name="P79"><text:span text:style-name="Strong_20_Emphasis">Python</text:span></text:p>
          </table:table-cell>
          <table:table-cell table:style-name="Table17.A1" office:value-type="string">
            <text:p text:style-name="P79"><text:span text:style-name="Source_20_Text">#5C95FF</text:span></text:p>
          </table:table-cell>
          <table:table-cell table:style-name="Table17.A1" office:value-type="string">
            <text:p text:style-name="P79">Plasma Blue</text:p>
          </table:table-cell>
          <table:table-cell table:style-name="Table17.A1" office:value-type="string">
            <text:p text:style-name="P79">Data Science &amp; Backend Scripting.</text:p>
          </table:table-cell>
        </table:table-row>
        <table:table-row>
          <table:table-cell table:style-name="Table17.A1" office:value-type="string">
            <text:p text:style-name="P79"><text:span text:style-name="Strong_20_Emphasis">Java</text:span></text:p>
          </table:table-cell>
          <table:table-cell table:style-name="Table17.A1" office:value-type="string">
            <text:p text:style-name="P79"><text:span text:style-name="Source_20_Text">#E69F50</text:span></text:p>
          </table:table-cell>
          <table:table-cell table:style-name="Table17.A1" office:value-type="string">
            <text:p text:style-name="P79">Solar Orange</text:p>
          </table:table-cell>
          <table:table-cell table:style-name="Table17.A1" office:value-type="string">
            <text:p text:style-name="P79">Enterprise Scale / Android.</text:p>
          </table:table-cell>
        </table:table-row>
        <table:table-row>
          <table:table-cell table:style-name="Table17.A1" office:value-type="string">
            <text:p text:style-name="P79"><text:span text:style-name="Strong_20_Emphasis">C</text:span></text:p>
          </table:table-cell>
          <table:table-cell table:style-name="Table17.A1" office:value-type="string">
            <text:p text:style-name="P79"><text:span text:style-name="Source_20_Text">#A8B9CC</text:span></text:p>
          </table:table-cell>
          <table:table-cell table:style-name="Table17.A1" office:value-type="string">
            <text:p text:style-name="P79">Bright Alloy</text:p>
          </table:table-cell>
          <table:table-cell table:style-name="Table17.A1" office:value-type="string">
            <text:p text:style-name="P79">Embedded / Kernel / Legacy Foundation.</text:p>
          </table:table-cell>
        </table:table-row>
        <table:table-row>
          <table:table-cell table:style-name="Table17.A1" office:value-type="string">
            <text:p text:style-name="P79"><text:span text:style-name="Strong_20_Emphasis">C++</text:span></text:p>
          </table:table-cell>
          <table:table-cell table:style-name="Table17.A1" office:value-type="string">
            <text:p text:style-name="P79"><text:span text:style-name="Source_20_Text">#FF2E8C</text:span></text:p>
          </table:table-cell>
          <table:table-cell table:style-name="Table17.A1" office:value-type="string">
            <text:p text:style-name="P79">Cyber Pink</text:p>
          </table:table-cell>
          <table:table-cell table:style-name="Table17.A1" office:value-type="string">
            <text:p text:style-name="P79">High Performance / Game Engines.</text:p>
          </table:table-cell>
        </table:table-row>
        <table:table-row>
          <table:table-cell table:style-name="Table17.A1" office:value-type="string">
            <text:p text:style-name="P79"><text:span text:style-name="Strong_20_Emphasis">Rust</text:span></text:p>
          </table:table-cell>
          <table:table-cell table:style-name="Table17.A1" office:value-type="string">
            <text:p text:style-name="P79"><text:span text:style-name="Source_20_Text">#FF7B00</text:span></text:p>
          </table:table-cell>
          <table:table-cell table:style-name="Table17.A1" office:value-type="string">
            <text:p text:style-name="P79">Safety Neon</text:p>
          </table:table-cell>
          <table:table-cell table:style-name="Table17.A1" office:value-type="string">
            <text:p text:style-name="P79">Safety &amp; Systems Programming.</text:p>
          </table:table-cell>
        </table:table-row>
        <table:table-row>
          <table:table-cell table:style-name="Table17.A1" office:value-type="string">
            <text:p text:style-name="P79"><text:span text:style-name="Strong_20_Emphasis">Go</text:span></text:p>
          </table:table-cell>
          <table:table-cell table:style-name="Table17.A1" office:value-type="string">
            <text:p text:style-name="P79"><text:span text:style-name="Source_20_Text">#00E0FF</text:span></text:p>
          </table:table-cell>
          <table:table-cell table:style-name="Table17.A1" office:value-type="string">
            <text:p text:style-name="P79">Tron Cyan</text:p>
          </table:table-cell>
          <table:table-cell table:style-name="Table17.A1" office:value-type="string">
            <text:p text:style-name="P79">Cloud Infrastructure / Microservices.</text:p>
          </table:table-cell>
        </table:table-row>
        <table:table-row>
          <table:table-cell table:style-name="Table17.A1" office:value-type="string">
            <text:p text:style-name="P79"><text:span text:style-name="Strong_20_Emphasis">C#</text:span></text:p>
          </table:table-cell>
          <table:table-cell table:style-name="Table17.A1" office:value-type="string">
            <text:p text:style-name="P79"><text:span text:style-name="Source_20_Text">#49E33B</text:span></text:p>
          </table:table-cell>
          <table:table-cell table:style-name="Table17.A1" office:value-type="string">
            <text:p text:style-name="P79">Toxic Green</text:p>
          </table:table-cell>
          <table:table-cell table:style-name="Table17.A1" office:value-type="string">
            <text:p text:style-name="P79">Enterprise / Unity / .NET.</text:p>
          </table:table-cell>
        </table:table-row>
        <table:table-row>
          <table:table-cell table:style-name="Table17.A1" office:value-type="string">
            <text:p text:style-name="P79"><text:span text:style-name="Strong_20_Emphasis">PHP</text:span></text:p>
          </table:table-cell>
          <table:table-cell table:style-name="Table17.A1" office:value-type="string">
            <text:p text:style-name="P79"><text:span text:style-name="Source_20_Text">#9B86FF</text:span></text:p>
          </table:table-cell>
          <table:table-cell table:style-name="Table17.A1" office:value-type="string">
            <text:p text:style-name="P79">Magic Violet</text:p>
          </table:table-cell>
          <table:table-cell table:style-name="Table17.A1" office:value-type="string">
            <text:p text:style-name="P79">Server-Side Web / Legacy CMS.</text:p>
          </table:table-cell>
        </table:table-row>
        <table:table-row>
          <table:table-cell table:style-name="Table17.A1" office:value-type="string">
            <text:p text:style-name="P79"><text:span text:style-name="Strong_20_Emphasis">Ruby</text:span></text:p>
          </table:table-cell>
          <table:table-cell table:style-name="Table17.A1" office:value-type="string">
            <text:p text:style-name="P79"><text:span text:style-name="Source_20_Text">#FF4040</text:span></text:p>
          </table:table-cell>
          <table:table-cell table:style-name="Table17.A1" office:value-type="string">
            <text:p text:style-name="P79">Laser Red</text:p>
          </table:table-cell>
          <table:table-cell table:style-name="Table17.A1" office:value-type="string">
            <text:p text:style-name="P79">Web Startups / Rapid Prototyping.</text:p>
          </table:table-cell>
        </table:table-row>
        <table:table-row>
          <table:table-cell table:style-name="Table17.A1" office:value-type="string">
            <text:p text:style-name="P79"><text:span text:style-name="Strong_20_Emphasis">Swift</text:span></text:p>
          </table:table-cell>
          <table:table-cell table:style-name="Table17.A1" office:value-type="string">
            <text:p text:style-name="P79"><text:span text:style-name="Source_20_Text">#FF6A00</text:span></text:p>
          </table:table-cell>
          <table:table-cell table:style-name="Table17.A1" office:value-type="string">
            <text:p text:style-name="P79">Bird Orange</text:p>
          </table:table-cell>
          <table:table-cell table:style-name="Table17.A1" office:value-type="string">
            <text:p text:style-name="P79">Modern Apple / iOS.</text:p>
          </table:table-cell>
        </table:table-row>
        <table:table-row>
          <table:table-cell table:style-name="Table17.A1" office:value-type="string">
            <text:p text:style-name="P79"><text:span text:style-name="Strong_20_Emphasis">Kotlin</text:span></text:p>
          </table:table-cell>
          <table:table-cell table:style-name="Table17.A1" office:value-type="string">
            <text:p text:style-name="P79"><text:span text:style-name="Source_20_Text">#C792EA</text:span></text:p>
          </table:table-cell>
          <table:table-cell table:style-name="Table17.A1" office:value-type="string">
            <text:p text:style-name="P79">Synthetic Purple</text:p>
          </table:table-cell>
          <table:table-cell table:style-name="Table17.A1" office:value-type="string">
            <text:p text:style-name="P79">Modern Android / JVM.</text:p>
          </table:table-cell>
        </table:table-row>
        <table:table-row>
          <table:table-cell table:style-name="Table17.A1" office:value-type="string">
            <text:p text:style-name="P79"><text:span text:style-name="Strong_20_Emphasis">Objective-C</text:span></text:p>
          </table:table-cell>
          <table:table-cell table:style-name="Table17.A1" office:value-type="string">
            <text:p text:style-name="P79"><text:span text:style-name="Source_20_Text">#4DA6FF</text:span></text:p>
          </table:table-cell>
          <table:table-cell table:style-name="Table17.A1" office:value-type="string">
            <text:p text:style-name="P79">NeXT Blue</text:p>
          </table:table-cell>
          <table:table-cell table:style-name="Table17.A1" office:value-type="string">
            <text:p text:style-name="P79">Legacy Apple / Foundation.</text:p>
          </table:table-cell>
        </table:table-row>
        <table:table-row>
          <table:table-cell table:style-name="Table17.A1" office:value-type="string">
            <text:p text:style-name="P79"><text:span text:style-name="Strong_20_Emphasis">Shell / Bash</text:span></text:p>
          </table:table-cell>
          <table:table-cell table:style-name="Table17.A1" office:value-type="string">
            <text:p text:style-name="P79"><text:span text:style-name="Source_20_Text">#00FF00</text:span></text:p>
          </table:table-cell>
          <table:table-cell table:style-name="Table17.A1" office:value-type="string">
            <text:p text:style-name="P79">Terminal Green</text:p>
          </table:table-cell>
          <table:table-cell table:style-name="Table17.A1" office:value-type="string">
            <text:p text:style-name="P79">DevOps / Glue Code.</text:p>
          </table:table-cell>
        </table:table-row>
        <text:soft-page-break/>
        <table:table-row>
          <table:table-cell table:style-name="Table17.A1" office:value-type="string">
            <text:p text:style-name="P79"><text:span text:style-name="Strong_20_Emphasis">Perl</text:span></text:p>
          </table:table-cell>
          <table:table-cell table:style-name="Table17.A1" office:value-type="string">
            <text:p text:style-name="P79"><text:span text:style-name="Source_20_Text">#00C4FF</text:span></text:p>
          </table:table-cell>
          <table:table-cell table:style-name="Table17.A1" office:value-type="string">
            <text:p text:style-name="P79">Raptor Blue</text:p>
          </table:table-cell>
          <table:table-cell table:style-name="Table17.A1" office:value-type="string">
            <text:p text:style-name="P79">Scripting / Legacy Glue.</text:p>
          </table:table-cell>
        </table:table-row>
        <table:table-row>
          <table:table-cell table:style-name="Table17.A1" office:value-type="string">
            <text:p text:style-name="P79"><text:span text:style-name="Strong_20_Emphasis">Lua</text:span></text:p>
          </table:table-cell>
          <table:table-cell table:style-name="Table17.A1" office:value-type="string">
            <text:p text:style-name="P79"><text:span text:style-name="Source_20_Text">#5E80FF</text:span></text:p>
          </table:table-cell>
          <table:table-cell table:style-name="Table17.A1" office:value-type="string">
            <text:p text:style-name="P79">Moon Cobalt</text:p>
          </table:table-cell>
          <table:table-cell table:style-name="Table17.A1" office:value-type="string">
            <text:p text:style-name="P79">Embedded / Game Logic.</text:p>
          </table:table-cell>
        </table:table-row>
        <table:table-row>
          <table:table-cell table:style-name="Table17.A1" office:value-type="string">
            <text:p text:style-name="P79"><text:span text:style-name="Strong_20_Emphasis">Haskell</text:span></text:p>
          </table:table-cell>
          <table:table-cell table:style-name="Table17.A1" office:value-type="string">
            <text:p text:style-name="P79"><text:span text:style-name="Source_20_Text">#D0A0FF</text:span></text:p>
          </table:table-cell>
          <table:table-cell table:style-name="Table17.A1" office:value-type="string">
            <text:p text:style-name="P79">Lambda Lilac</text:p>
          </table:table-cell>
          <table:table-cell table:style-name="Table17.A1" office:value-type="string">
            <text:p text:style-name="P79">Functional Purity / Academic.</text:p>
          </table:table-cell>
        </table:table-row>
        <table:table-row>
          <table:table-cell table:style-name="Table17.A1" office:value-type="string">
            <text:p text:style-name="P79"><text:span text:style-name="Strong_20_Emphasis">SQL</text:span></text:p>
          </table:table-cell>
          <table:table-cell table:style-name="Table17.A1" office:value-type="string">
            <text:p text:style-name="P79"><text:span text:style-name="Source_20_Text">#FF9900</text:span></text:p>
          </table:table-cell>
          <table:table-cell table:style-name="Table17.A1" office:value-type="string">
            <text:p text:style-name="P79">Query Gold</text:p>
          </table:table-cell>
          <table:table-cell table:style-name="Table17.A1" office:value-type="string">
            <text:p text:style-name="P79">Data Persistence / Queries.</text:p>
          </table:table-cell>
        </table:table-row>
        <table:table-row>
          <table:table-cell table:style-name="Table17.A1" office:value-type="string">
            <text:p text:style-name="P79"><text:span text:style-name="Strong_20_Emphasis">HTML/CSS</text:span></text:p>
          </table:table-cell>
          <table:table-cell table:style-name="Table17.A1" office:value-type="string">
            <text:p text:style-name="P79"><text:span text:style-name="Source_20_Text">#FF5500</text:span></text:p>
          </table:table-cell>
          <table:table-cell table:style-name="Table17.A1" office:value-type="string">
            <text:p text:style-name="P79">Magma Orange</text:p>
          </table:table-cell>
          <table:table-cell table:style-name="Table17.A1" office:value-type="string">
            <text:p text:style-name="P79">Structure &amp; Presentation.</text:p>
          </table:table-cell>
        </table:table-row>
        <table:table-row>
          <table:table-cell table:style-name="Table17.A1" office:value-type="string">
            <text:p text:style-name="P79"><text:span text:style-name="Strong_20_Emphasis">Fortran</text:span></text:p>
          </table:table-cell>
          <table:table-cell table:style-name="Table17.A1" office:value-type="string">
            <text:p text:style-name="P79"><text:span text:style-name="Source_20_Text">#9A72FF</text:span></text:p>
          </table:table-cell>
          <table:table-cell table:style-name="Table17.A1" office:value-type="string">
            <text:p text:style-name="P79">Science Violet</text:p>
          </table:table-cell>
          <table:table-cell table:style-name="Table17.A1" office:value-type="string">
            <text:p text:style-name="P79">Scientific Computing / Meteorology.</text:p>
          </table:table-cell>
        </table:table-row>
        <table:table-row>
          <table:table-cell table:style-name="Table17.A1" office:value-type="string">
            <text:p text:style-name="P79"><text:span text:style-name="Strong_20_Emphasis">Assembly</text:span></text:p>
          </table:table-cell>
          <table:table-cell table:style-name="Table17.A1" office:value-type="string">
            <text:p text:style-name="P79"><text:span text:style-name="Source_20_Text">#FFD080</text:span></text:p>
          </table:table-cell>
          <table:table-cell table:style-name="Table17.A1" office:value-type="string">
            <text:p text:style-name="P79">Bright Bronze</text:p>
          </table:table-cell>
          <table:table-cell table:style-name="Table17.A1" office:value-type="string">
            <text:p text:style-name="P79">Machine Code / Bare Metal.</text:p>
          </table:table-cell>
        </table:table-row>
        <table:table-row>
          <table:table-cell table:style-name="Table17.A1" office:value-type="string">
            <text:p text:style-name="P79"><text:span text:style-name="Strong_20_Emphasis">COBOL</text:span></text:p>
          </table:table-cell>
          <table:table-cell table:style-name="Table17.A1" office:value-type="string">
            <text:p text:style-name="P79"><text:span text:style-name="Source_20_Text">#66AAFF</text:span></text:p>
          </table:table-cell>
          <table:table-cell table:style-name="Table17.A1" office:value-type="string">
            <text:p text:style-name="P79">Legacy Steel</text:p>
          </table:table-cell>
          <table:table-cell table:style-name="Table17.A1" office:value-type="string">
            <text:p text:style-name="P79">Banking / Mainframe / Global Economy.</text:p>
          </table:table-cell>
        </table:table-row>
        <table:table-row>
          <table:table-cell table:style-name="Table17.A1" office:value-type="string">
            <text:p text:style-name="P79"><text:span text:style-name="Strong_20_Emphasis">AGC Assembly</text:span></text:p>
          </table:table-cell>
          <table:table-cell table:style-name="Table17.A1" office:value-type="string">
            <text:p text:style-name="P79"><text:span text:style-name="Source_20_Text">#FFE066</text:span></text:p>
          </table:table-cell>
          <table:table-cell table:style-name="Table17.A1" office:value-type="string">
            <text:p text:style-name="P79">Lunar Gold</text:p>
          </table:table-cell>
          <table:table-cell table:style-name="Table17.A1" office:value-type="string">
            <text:p text:style-name="P79">Apollo 11 / Historical Significance.</text:p>
          </table:table-cell>
        </table:table-row>
        <table:table-row>
          <table:table-cell table:style-name="Table17.A1" office:value-type="string">
            <text:p text:style-name="P79"><text:span text:style-name="Strong_20_Emphasis">HyperTalk</text:span></text:p>
          </table:table-cell>
          <table:table-cell table:style-name="Table17.A1" office:value-type="string">
            <text:p text:style-name="P79"><text:span text:style-name="Source_20_Text">#EEDD82</text:span></text:p>
          </table:table-cell>
          <table:table-cell table:style-name="Table17.A1" office:value-type="string">
            <text:p text:style-name="P79">Retro Brass</text:p>
          </table:table-cell>
          <table:table-cell table:style-name="Table17.A1" office:value-type="string">
            <text:p text:style-name="P79">Multimedia Art / Early UI.</text:p>
          </table:table-cell>
        </table:table-row>
        <table:table-row>
          <table:table-cell table:style-name="Table17.A1" office:value-type="string">
            <text:p text:style-name="P79"><text:span text:style-name="Strong_20_Emphasis">MicroPython</text:span></text:p>
          </table:table-cell>
          <table:table-cell table:style-name="Table17.A1" office:value-type="string">
            <text:p text:style-name="P79"><text:span text:style-name="Source_20_Text">#2B95FF</text:span></text:p>
          </table:table-cell>
          <table:table-cell table:style-name="Table17.A1" office:value-type="string">
            <text:p text:style-name="P79">Micro Azure</text:p>
          </table:table-cell>
          <table:table-cell table:style-name="Table17.A1" office:value-type="string">
            <text:p text:style-name="P79">IoT / Embedded Scripting.</text:p>
          </table:table-cell>
        </table:table-row>
        <table:table-row>
          <table:table-cell table:style-name="Table17.A1" office:value-type="string">
            <text:p text:style-name="P79"><text:span text:style-name="Strong_20_Emphasis">Config (JSON/YAML)</text:span></text:p>
          </table:table-cell>
          <table:table-cell table:style-name="Table17.A1" office:value-type="string">
            <text:p text:style-name="P79"><text:span text:style-name="Source_20_Text">#00FFFF</text:span></text:p>
          </table:table-cell>
          <table:table-cell table:style-name="Table17.A1" office:value-type="string">
            <text:p text:style-name="P79">Cyber Cyan</text:p>
          </table:table-cell>
          <table:table-cell table:style-name="Table17.A1" office:value-type="string">
            <text:p text:style-name="P79">Configuration / Metadata.</text:p>
          </table:table-cell>
        </table:table-row>
        <table:table-row>
          <table:table-cell table:style-name="Table17.A1" office:value-type="string">
            <text:p text:style-name="P79"><text:span text:style-name="Strong_20_Emphasis">Docs (MD/TXT)</text:span></text:p>
          </table:table-cell>
          <table:table-cell table:style-name="Table17.A1" office:value-type="string">
            <text:p text:style-name="P79"><text:span text:style-name="Source_20_Text">#FFFFE0</text:span></text:p>
          </table:table-cell>
          <table:table-cell table:style-name="Table17.A1" office:value-type="string">
            <text:p text:style-name="P79">Bright Parchment</text:p>
          </table:table-cell>
          <table:table-cell table:style-name="Table17.A1" office:value-type="string">
            <text:p text:style-name="P79">Knowledge / Human Readable.</text:p>
          </table:table-cell>
        </table:table-row>
        <table:table-row>
          <table:table-cell table:style-name="Table17.A1" office:value-type="string">
            <text:p text:style-name="P79"><text:span text:style-name="Strong_20_Emphasis">Infrastructure</text:span></text:p>
          </table:table-cell>
          <table:table-cell table:style-name="Table17.A1" office:value-type="string">
            <text:p text:style-name="P79"><text:span text:style-name="Source_20_Text">#00B0FF</text:span></text:p>
          </table:table-cell>
          <table:table-cell table:style-name="Table17.A1" office:value-type="string">
            <text:p text:style-name="P79">Docker Blue</text:p>
          </table:table-cell>
          <table:table-cell table:style-name="Table17.A1" office:value-type="string">
            <text:p text:style-name="P79">Docker / Kubernetes / CI.</text:p>
          </table:table-cell>
        </table:table-row>
        <table:table-row>
          <table:table-cell table:style-name="Table17.A1" office:value-type="string">
            <text:p text:style-name="P79"><text:span text:style-name="Strong_20_Emphasis">Binaries (.bin/.exe)</text:span></text:p>
          </table:table-cell>
          <table:table-cell table:style-name="Table17.A1" office:value-type="string">
            <text:p text:style-name="P79"><text:span text:style-name="Source_20_Text">#505050</text:span></text:p>
          </table:table-cell>
          <table:table-cell table:style-name="Table17.A1" office:value-type="string">
            <text:p text:style-name="P79">Tungsten</text:p>
          </table:table-cell>
          <table:table-cell table:style-name="Table17.A1" office:value-type="string">
            <text:p text:style-name="P79"><text:span text:style-name="Strong_20_Emphasis">Dense Matter.</text:span> Opaque/Compiled Artifacts.</text:p>
          </table:table-cell>
        </table:table-row>
        <table:table-row>
          <table:table-cell table:style-name="Table17.A1" office:value-type="string">
            <text:p text:style-name="P79"><text:span text:style-name="Strong_20_Emphasis">Any Other Extension</text:span></text:p>
          </table:table-cell>
          <table:table-cell table:style-name="Table17.A1" office:value-type="string">
            <text:p text:style-name="P79"><text:span text:style-name="Strong_20_Emphasis">Auto-Hash</text:span></text:p>
          </table:table-cell>
          <table:table-cell table:style-name="Table17.A1" office:value-type="string">
            <text:p text:style-name="P79"><text:span text:style-name="Strong_20_Emphasis">Exo-Protocol</text:span></text:p>
          </table:table-cell>
          <table:table-cell table:style-name="Table17.A1" office:value-type="string">
            <text:p text:style-name="P79">Algorithmic High-Contrast Assignment.</text:p>
          </table:table-cell>
        </table:table-row>
      </table:table>
      <text:p text:style-name="P41"/>
      <text:h text:style-name="P72" text:outline-level="3"><text:bookmark-start text:name="__RefHeading___Toc42715_1155106909"/>2.2.S. Specification Exposure Risk<text:bookmark-end text:name="__RefHeading___Toc42715_1155106909"/></text:h>
      <text:p text:style-name="Text_20_body"><text:span text:style-name="Strong_20_Emphasis">Summary:</text:span> Visualizes the Traceability of Intent. In a mature engineering culture, code exists on a spectrum between Exploration and Specification. This metric measures the bond between your written requirements (The Map) and your actual code (The Territory). It highlights "Anchored" logic that implements a specific spec, versus "Exploratory" logic that exists to test ideas or prototype features.</text:p>
      <text:p text:style-name="Text_20_body"><text:soft-page-break/><text:span text:style-name="Strong_20_Emphasis">Effect:</text:span> Modulates the star's color using a Bi-Polar Gradient (<text:span text:style-name="Strong_20_Emphasis">Blueprint Indigo</text:span> for Low Risk to <text:span text:style-name="Strong_20_Emphasis">Rogue Red</text:span> for High Risk).</text:p>
      <text:h text:style-name="Heading_20_4" text:outline-level="4"><text:bookmark-start text:name="__RefHeading___Toc42717_1155106909"/>2.2.S.1. The Philosophy: The Map vs. The Territory<text:bookmark-end text:name="__RefHeading___Toc42717_1155106909"/></text:h>
      <text:p text:style-name="Text_20_body">We reject the idea that "Unplanned Code" is always bad. In a mature engineering culture, code exists on a spectrum between Exploration and Specification. However, for production-grade reliability, logic must eventually be anchored to a contract.</text:p>
      <text:list text:style-name="L118">
        <text:list-item>
          <text:p text:style-name="P330"><text:span text:style-name="Strong_20_Emphasis">Anchored (Score 0 - Blueprint Indigo):</text:span> Low Risk. The code explicitly references a written requirement. Every major function can be traced back to a specific line in the documentation.</text:p>
        </text:list-item>
        <text:list-item>
          <text:p text:style-name="P330"><text:span text:style-name="Strong_20_Emphasis">Exploratory (Score 100 - Rogue Red):</text:span> High Risk. Rogue logic. The code exists without a contract. It is "Wild West" logic written to test ideas or prototype features without formal traceability.</text:p>
        </text:list-item>
      </text:list>
      <text:p text:style-name="Text_20_body">This metric allows a team to instantly audit their "Architectural Maturity." It is not about catching "bad" code, but about recognizing when a prototype has graduated to production reliability.</text:p>
      <text:h text:style-name="Heading_20_4" text:outline-level="4"><text:bookmark-start text:name="__RefHeading___Toc42719_1155106909"/>2.2.S.2. The Inputs (The Breadcrumbs)<text:bookmark-end text:name="__RefHeading___Toc42719_1155106909"/></text:h>
      <text:p text:style-name="Text_20_body">We look for explicit links between the documentation and the code logic unit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5">Input Variable</text:p>
          </table:table-cell>
          <table:table-cell table:style-name="Table18.A1" office:value-type="string">
            <text:p text:style-name="P95">Regex/Logic</text:p>
          </table:table-cell>
          <table:table-cell table:style-name="Table18.A1" office:value-type="string">
            <text:p text:style-name="P95">Weight</text:p>
          </table:table-cell>
          <table:table-cell table:style-name="Table18.A1" office:value-type="string">
            <text:p text:style-name="P95">Rationale</text:p>
          </table:table-cell>
        </table:table-row>
        <table:table-row>
          <table:table-cell table:style-name="Table18.A1" office:value-type="string">
            <text:p text:style-name="P94"><text:span text:style-name="Strong_20_Emphasis">SpecHits</text:span></text:p>
          </table:table-cell>
          <table:table-cell table:style-name="Table18.A1" office:value-type="string">
            <text:p text:style-name="P94"><text:span text:style-name="Source_20_Text">spec_tag</text:span></text:p>
          </table:table-cell>
          <table:table-cell table:style-name="Table18.A1" office:value-type="string">
            <text:p text:style-name="P94">Numerator</text:p>
          </table:table-cell>
          <table:table-cell table:style-name="Table18.A1" office:value-type="string">
            <text:p text:style-name="P94"><text:span text:style-name="Strong_20_Emphasis">The Link.</text:span> Comments containing <text:span text:style-name="Source_20_Text">[SPEC ...]</text:span>, <text:span text:style-name="Source_20_Text">Ref: SPEC-...</text:span>, or <text:span text:style-name="Source_20_Text">Implements: ...</text:span>. Each hit represents a claimed link to a requirement.</text:p>
          </table:table-cell>
        </table:table-row>
        <table:table-row>
          <table:table-cell table:style-name="Table18.A1" office:value-type="string">
            <text:p text:style-name="P94"><text:span text:style-name="Strong_20_Emphasis">TotalEntities</text:span></text:p>
          </table:table-cell>
          <table:table-cell table:style-name="Table18.A1" office:value-type="string">
            <text:p text:style-name="P94"><text:span text:style-name="Source_20_Text">func_start</text:span> + <text:span text:style-name="Source_20_Text">class_start</text:span></text:p>
          </table:table-cell>
          <table:table-cell table:style-name="Table18.A1" office:value-type="string">
            <text:p text:style-name="P94">Denominator</text:p>
          </table:table-cell>
          <table:table-cell table:style-name="Table18.A1" office:value-type="string">
            <text:p text:style-name="P94"><text:span text:style-name="Strong_20_Emphasis">The Territory.</text:span> The total count of logical units (Functions + Classes). We measure coverage against units of logic, not lines of code, to avoid penalizing verbose languages.</text:p>
          </table:table-cell>
        </table:table-row>
      </table:table>
      <text:h text:style-name="Heading_20_4" text:outline-level="4"><text:bookmark-start text:name="__RefHeading___Toc42721_1155106909"/>2.2.S.3. The Universal Framework Integration<text:bookmark-end text:name="__RefHeading___Toc42721_1155106909"/></text:h>
      <text:list text:style-name="L119">
        <text:list-item>
          <text:p text:style-name="P331"><text:span text:style-name="Strong_20_Emphasis">Fc (Fidelity Coefficient):</text:span> Not Applied. A tag is a manual intent marker; its presence is language-agnostic.</text:p>
        </text:list-item>
        <text:list-item>
          <text:p text:style-name="P331"><text:span text:style-name="Strong_20_Emphasis">Irc (Implicit Risk Correction):</text:span> Not Applied.</text:p>
        </text:list-item>
        <text:list-item>
          <text:p text:style-name="P331"><text:span text:style-name="Strong_20_Emphasis">Mp (Path Modifier):</text:span> Applied to the Risk Score (Amplify/Dampen).</text:p>
          <text:list>
            <text:list-item>
              <text:p text:style-name="P331"><text:soft-page-break/><text:span text:style-name="Strong_20_Emphasis">Core/Business Logic (Mp = 1.0):</text:span> Standard expectation.</text:p>
            </text:list-item>
            <text:list-item>
              <text:p text:style-name="P331"><text:span text:style-name="Strong_20_Emphasis">Utils/Helpers (Mp = 1.5):</text:span> Penalty. It is harder to spec generic utils; failing to do so represents a higher architectural risk.</text:p>
            </text:list-item>
            <text:list-item>
              <text:p text:style-name="P331"><text:span text:style-name="Strong_20_Emphasis">Tests (Mp = 0.8):</text:span> Discount. Tests often act as their own spec; low alignment here is less critical.</text:p>
            </text:list-item>
          </text:list>
        </text:list-item>
      </text:list>
      <text:h text:style-name="Heading_20_4" text:outline-level="4"><text:bookmark-start text:name="__RefHeading___Toc42723_1155106909"/>2.2.S.4. The Equation: The Alignment Debt<text:bookmark-end text:name="__RefHeading___Toc42723_1155106909"/></text:h>
      <text:p text:style-name="Text_20_body">We calculate the ratio of "Tagged Units" to "Total Units" and invert it to determine the <text:span text:style-name="Strong_20_Emphasis">Risk Exposure</text:span>.</text:p>
      <text:p text:style-name="Text_20_body"><text:bookmark-start text:name="__RefHeading___Toc42725_1155106909"/>Step 1: Calculate Alignment Ratio<text:bookmark-end text:name="__RefHeading___Toc42725_1155106909"/></text:p>
      <text:p text:style-name="Text_20_body">We determine what percentage of the file's logical units are anchored to a spec. We clamp the result to 100% (1.0) to ensure over-achieving doesn't result in "negative" risk.</text:p>
      <text:list text:style-name="L120">
        <text:list-item>
          <text:p text:style-name="P332"><text:span text:style-name="Emphasis">Note:</text:span> We use <text:span text:style-name="Strong_20_Emphasis">TotalEntities</text:span> (Functions + Classes) as the denominator because it is the most accurate proxy for implemented "Features."</text:p>
        </text:list-item>
      </text:list>
      <text:p text:style-name="Text_20_body"><text:bookmark-start text:name="__RefHeading___Toc42727_1155106909"/>Step 2: Invert for Risk Score<text:bookmark-end text:name="__RefHeading___Toc42727_1155106909"/></text:p>
      <text:p text:style-name="Text_20_body">The risk score represents the "Debt" of missing documentation.</text:p>
      <text:list text:style-name="L121">
        <text:list-item>
          <text:p text:style-name="P333"><text:span text:style-name="Strong_20_Emphasis">Score = 100 * (1.0 - AlignmentRatio)</text:span></text:p>
        </text:list-item>
      </text:list>
      <text:p text:style-name="Text_20_body"><text:bookmark-start text:name="__RefHeading___Toc42729_1155106909"/>Step 3: Context Adjustment<text:bookmark-end text:name="__RefHeading___Toc42729_1155106909"/></text:p>
      <text:p text:style-name="Text_20_body">We apply the Path Modifier (Mp) to the resulting debt.</text:p>
      <text:h text:style-name="Heading_20_4" text:outline-level="4"><text:bookmark-start text:name="__RefHeading___Toc42731_1155106909"/>2.2.S.5. Implementation (Python Reference)<text:bookmark-end text:name="__RefHeading___Toc42731_1155106909"/></text:h>
      <text:p text:style-name="Preformatted_20_Text"><text:span text:style-name="Source_20_Text">import math</text:span></text:p>
      <text:p text:style-name="Preformatted_20_Text"><text:span text:style-name="Source_20_Text">import re</text:span></text:p>
      <text:p text:style-name="Preformatted_20_Text"/>
      <text:p text:style-name="Preformatted_20_Text"><text:span text:style-name="Source_20_Text">def calculate_spec_exposure_risk(self, raw_content, hits_func, hits_class, mp):</text:span></text:p>
      <text:p text:style-name="Preformatted_20_Text"><text:span text:style-name="Source_20_Text"><text:s text:c="4"/>"""</text:span></text:p>
      <text:p text:style-name="Preformatted_20_Text"><text:span text:style-name="Source_20_Text"><text:s text:c="4"/>Calculates 2.2.S Specification Exposure Risk (Alignment Debt).</text:span></text:p>
      <text:p text:style-name="Preformatted_20_Text"><text:span text:style-name="Source_20_Text"><text:s text:c="4"/>Higher Score = Rogue Logic (Bad).</text:span></text:p>
      <text:p text:style-name="Preformatted_20_Text"><text:span text:style-name="Source_20_Text"><text:s text:c="4"/>Lower Score = Anchored Logic (Good).</text:span></text:p>
      <text:p text:style-name="Preformatted_20_Text"><text:span text:style-name="Source_20_Text"><text:s text:c="4"/>"""</text:span></text:p>
      <text:p text:style-name="Preformatted_20_Text"><text:span text:style-name="Source_20_Text"><text:s text:c="4"/># 1. Inputs: Scan for [SPEC ...] tags in the raw content</text:span></text:p>
      <text:p text:style-name="Preformatted_20_Text"><text:span text:style-name="Source_20_Text"><text:s text:c="4"/>spec_hits = len(re.findall(r'\[(?:SPEC|REF|IMPLEMENTS).*?\]', raw_content, re.I))</text:span></text:p>
      <text:p text:style-name="Preformatted_20_Text"/>
      <text:p text:style-name="Preformatted_20_Text"><text:span text:style-name="Source_20_Text"><text:s text:c="4"/># 2. Step A: Alignment Ratio</text:span></text:p>
      <text:p text:style-name="Preformatted_20_Text"><text:span text:style-name="Source_20_Text"><text:s text:c="4"/># Total Entities = Functions + Classes</text:span></text:p>
      <text:p text:style-name="Preformatted_20_Text"><text:span text:style-name="Source_20_Text"><text:s text:c="4"/>total_entities = max(hits_func + hits_class, 1)</text:span></text:p>
      <text:p text:style-name="Preformatted_20_Text"><text:span text:style-name="Source_20_Text"><text:s text:c="4"/>ratio = min(spec_hits / total_entities, 1.0)</text:span></text:p>
      <text:p text:style-name="Preformatted_20_Text"/>
      <text:p text:style-name="Preformatted_20_Text"><text:span text:style-name="Source_20_Text"><text:s text:c="4"/># 3. Step B: Calculate Risk (Inversion)</text:span></text:p>
      <text:p text:style-name="Preformatted_20_Text"><text:soft-page-break/><text:span text:style-name="Source_20_Text"><text:s text:c="4"/># 1.0 Ratio (Perfect) = 0 Risk</text:span></text:p>
      <text:p text:style-name="Preformatted_20_Text"><text:span text:style-name="Source_20_Text"><text:s text:c="4"/># 0.0 Ratio (Rogue) = 100 Risk</text:span></text:p>
      <text:p text:style-name="Preformatted_20_Text"><text:span text:style-name="Source_20_Text"><text:s text:c="4"/>base_risk = (1.0 - ratio) * 100.0</text:span></text:p>
      <text:p text:style-name="Preformatted_20_Text"/>
      <text:p text:style-name="Preformatted_20_Text"><text:span text:style-name="Source_20_Text"><text:s text:c="4"/># 4. Step C: Context Adjustment</text:span></text:p>
      <text:p text:style-name="Preformatted_20_Text"><text:span text:style-name="Source_20_Text"><text:s text:c="4"/>path_mod = mp.get('Specification Exposure', 1.0)</text:span></text:p>
      <text:p text:style-name="Preformatted_20_Text"><text:span text:style-name="Source_20_Text"><text:s text:c="4"/>final_score = base_risk * path_mod</text:span></text:p>
      <text:p text:style-name="Preformatted_20_Text"/>
      <text:p text:style-name="P96"><text:span text:style-name="Source_20_Text"><text:s text:c="4"/>return int(min(final_score, 100))</text:span></text:p>
      <text:h text:style-name="Heading_20_4" text:outline-level="4"><text:bookmark-start text:name="__RefHeading___Toc42733_1155106909"/>2.2.S.6. Visual Verification ("The Audit")<text:bookmark-end text:name="__RefHeading___Toc42733_1155106909"/></text:h>
      <text:p text:style-name="Text_20_body"><text:span text:style-name="Emphasis">Comparison: File with 10 Functions (Mp = 1.0)</text:span></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95">Scenario</text:p>
          </table:table-cell>
          <table:table-cell table:style-name="Table35.A1" office:value-type="string">
            <text:p text:style-name="P95">Spec Tags</text:p>
          </table:table-cell>
          <table:table-cell table:style-name="Table35.A1" office:value-type="string">
            <text:p text:style-name="P95">Ratio</text:p>
          </table:table-cell>
          <table:table-cell table:style-name="Table35.A1" office:value-type="string">
            <text:p text:style-name="P95">Risk Score</text:p>
          </table:table-cell>
          <table:table-cell table:style-name="Table35.A1" office:value-type="string">
            <text:p text:style-name="P95">Interpretation</text:p>
          </table:table-cell>
        </table:table-row>
        <table:table-row>
          <table:table-cell table:style-name="Table35.A1" office:value-type="string">
            <text:p text:style-name="P94"><text:span text:style-name="Strong_20_Emphasis">The Blueprint</text:span></text:p>
          </table:table-cell>
          <table:table-cell table:style-name="Table35.A1" office:value-type="string">
            <text:p text:style-name="P94">10</text:p>
          </table:table-cell>
          <table:table-cell table:style-name="Table35.A1" office:value-type="string">
            <text:p text:style-name="P94">100%</text:p>
          </table:table-cell>
          <table:table-cell table:style-name="Table35.A1" office:value-type="string">
            <text:p text:style-name="P94"><text:span text:style-name="Strong_20_Emphasis">0</text:span></text:p>
          </table:table-cell>
          <table:table-cell table:style-name="Table35.A1" office:value-type="string">
            <text:p text:style-name="P94"><text:span text:style-name="Strong_20_Emphasis">Blueprint Indigo.</text:span> Fully aligned. Every function implements a requirement.</text:p>
          </table:table-cell>
        </table:table-row>
        <table:table-row>
          <table:table-cell table:style-name="Table35.A1" office:value-type="string">
            <text:p text:style-name="P94"><text:span text:style-name="Strong_20_Emphasis">Over-Achiever</text:span></text:p>
          </table:table-cell>
          <table:table-cell table:style-name="Table35.A1" office:value-type="string">
            <text:p text:style-name="P94">15</text:p>
          </table:table-cell>
          <table:table-cell table:style-name="Table35.A1" office:value-type="string">
            <text:p text:style-name="P94">150%</text:p>
          </table:table-cell>
          <table:table-cell table:style-name="Table35.A1" office:value-type="string">
            <text:p text:style-name="P94"><text:span text:style-name="Strong_20_Emphasis">0</text:span></text:p>
          </table:table-cell>
          <table:table-cell table:style-name="Table35.A1" office:value-type="string">
            <text:p text:style-name="P94"><text:span text:style-name="Strong_20_Emphasis">Blueprint Indigo.</text:span> Clamped to max safety. Multiple specs per function is fine.</text:p>
          </table:table-cell>
        </table:table-row>
        <table:table-row>
          <table:table-cell table:style-name="Table35.A1" office:value-type="string">
            <text:p text:style-name="P94"><text:span text:style-name="Strong_20_Emphasis">Partial Audit</text:span></text:p>
          </table:table-cell>
          <table:table-cell table:style-name="Table35.A1" office:value-type="string">
            <text:p text:style-name="P94">5</text:p>
          </table:table-cell>
          <table:table-cell table:style-name="Table35.A1" office:value-type="string">
            <text:p text:style-name="P94">50%</text:p>
          </table:table-cell>
          <table:table-cell table:style-name="Table35.A1" office:value-type="string">
            <text:p text:style-name="P94"><text:span text:style-name="Strong_20_Emphasis">50</text:span></text:p>
          </table:table-cell>
          <table:table-cell table:style-name="Table35.A1" office:value-type="string">
            <text:p text:style-name="P94"><text:span text:style-name="Strong_20_Emphasis">Muted Purple.</text:span> Half the logic is anchored. Work in progress.</text:p>
          </table:table-cell>
        </table:table-row>
        <table:table-row>
          <table:table-cell table:style-name="Table35.A1" office:value-type="string">
            <text:p text:style-name="P94"><text:span text:style-name="Strong_20_Emphasis">The Prototype</text:span></text:p>
          </table:table-cell>
          <table:table-cell table:style-name="Table35.A1" office:value-type="string">
            <text:p text:style-name="P94">0</text:p>
          </table:table-cell>
          <table:table-cell table:style-name="Table35.A1" office:value-type="string">
            <text:p text:style-name="P94">0%</text:p>
          </table:table-cell>
          <table:table-cell table:style-name="Table35.A1" office:value-type="string">
            <text:p text:style-name="P94"><text:span text:style-name="Strong_20_Emphasis">100</text:span></text:p>
          </table:table-cell>
          <table:table-cell table:style-name="Table35.A1" office:value-type="string">
            <text:p text:style-name="P94"><text:span text:style-name="Strong_20_Emphasis">Rogue Red.</text:span> Pure exploration. No paper trail; maximum exposure.</text:p>
          </table:table-cell>
        </table:table-row>
      </table:table>
      <text:p text:style-name="P83"><text:bookmark text:name="__RefHeading___Toc186416_2813440148"/></text:p>
      <text:h text:style-name="P84" text:outline-level="3"><text:bookmark-start text:name="__RefHeading___Toc11737_959624642"/><text:span text:style-name="T157">2</text:span><text:span text:style-name="T38">.</text:span><text:span text:style-name="T158">3</text:span><text:span text:style-name="T38"> </text:span><text:span text:style-name="Source_20_Text"><text:span text:style-name="T177">Data Analysis Pipeline </text:span></text:span><text:bookmark-end text:name="__RefHeading___Toc11737_959624642"/></text:h>
      <text:p text:style-name="P154"><text:span text:style-name="Source_20_Text"><text:span text:style-name="T177">Sometimes code is art. Right now, its data, and </text:span></text:span><text:span text:style-name="Source_20_Text"><text:span text:style-name="T189">it’s gotta be cleaned up to be meaningful.</text:span></text:span><text:span text:style-name="Source_20_Text"><text:span text:style-name="T177"> Basically, we need to assess </text:span></text:span><text:span text:style-name="Source_20_Text"><text:span text:style-name="T189">what to assess, find what language its in, strip out the comments,</text:span></text:span><text:span text:style-name="Source_20_Text"><text:span text:style-name="T177"> regex count </text:span></text:span><text:span text:style-name="Source_20_Text"><text:span text:style-name="T189">and then calculate risk based on standardization metrics. </text:span></text:span><text:span text:style-name="Source_20_Text"><text:span text:style-name="T177"><text:s/>The GalaxyScope is a modular computational instrument designed to resolve raw source code into intuitive 3D physical structures. Rather than a standard "scanner," the system operates as an optical pipeline where each module serves as a discrete <text:s/>component housed within the </text:span></text:span><text:span text:style-name="Source_20_Text"><text:span text:style-name="Strong_20_Emphasis"><text:span text:style-name="T177">GalaxyScope Chassis</text:span></text:span></text:span><text:span text:style-name="Source_20_Text"><text:span text:style-name="T177">. </text:span></text:span><text:span text:style-name="Source_20_Text"><text:span text:style-name="T190">Just as light flows through a telescope, data flows through our GalaxyScope. We adjust the aperture (what files are blocked), we use guidestars (creator’s READMEs), each file’s language is brought into focus, the data stream is sent through a prism to split the coding_stream from the comment_stream (comment parsing), each info stream is fed to a detector (regex count data), analyzed by a signal processor (2</text:span></text:span><text:span text:style-name="Source_20_Text"><text:span text:style-name="T396">nd</text:span></text:span><text:span text:style-name="Source_20_Text"><text:span text:style-name="T190"> pass calculations, equations), and then </text:span></text:span><text:soft-page-break/><text:span text:style-name="Source_20_Text"><text:span text:style-name="T190">validated by a spectral auditor (statistical anomaly analysis), where it is finally packaged by a record keeper (saved into a vectorized json). Just as different telescopes can have different lens and prisms to see different things, I hope this architecture inspires people to build better versions of these things and view data analysis through the lens of scientific instrumentation. </text:span></text:span></text:p>
      <text:p text:style-name="P87">Incoming data is treated as raw light. To resolve a clear image of the codebase, it must pass through the following interchangeable part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5">The Component</text:p>
          </table:table-cell>
          <table:table-cell table:style-name="Table19.A1" office:value-type="string">
            <text:p text:style-name="P95">Digital Module (<text:span text:style-name="Source_20_Text">.py</text:span>)</text:p>
          </table:table-cell>
          <table:table-cell table:style-name="Table19.A1" office:value-type="string">
            <text:p text:style-name="P95">Operational Function</text:p>
          </table:table-cell>
          <table:table-cell table:style-name="Table19.A1" office:value-type="string">
            <text:p text:style-name="P95">"Optical" Result</text:p>
          </table:table-cell>
        </table:table-row>
        <table:table-row>
          <table:table-cell table:style-name="Table19.A1" office:value-type="string">
            <text:p text:style-name="P65">The Adaptive Light Path System</text:p>
          </table:table-cell>
          <table:table-cell table:style-name="Table19.A1" office:value-type="string">
            <text:p text:style-name="P180"><text:span text:style-name="Source_20_Text"><text:span text:style-name="T479">galaxyscope.py</text:span></text:span></text:p>
          </table:table-cell>
          <table:table-cell table:style-name="Table19.A1" office:value-type="string">
            <text:p text:style-name="P179">Orchestrator. Parses data through specific files and functions <text:span text:style-name="T480">during the analysis. </text:span></text:p>
          </table:table-cell>
          <table:table-cell table:style-name="Table19.A1" office:value-type="string">
            <text:p text:style-name="P179">The adaptive <text:span text:style-name="T480">light path is able to swap lenses on the fly to ensure focus and visibility. </text:span></text:p>
          </table:table-cell>
        </table:table-row>
        <table:table-row>
          <table:table-cell table:style-name="Table19.A1" office:value-type="string">
            <text:p text:style-name="P94"><text:span text:style-name="Strong_20_Emphasis">The Aperture Filter</text:span></text:p>
          </table:table-cell>
          <table:table-cell table:style-name="Table19.A1" office:value-type="string">
            <text:p text:style-name="P94"><text:span text:style-name="Source_20_Text">aperture_filter.py</text:span></text:p>
          </table:table-cell>
          <table:table-cell table:style-name="Table19.A1" office:value-type="string">
            <text:p text:style-name="P94">Noise reduction; strips <text:span text:style-name="Source_20_Text">.gitignore</text:span> noise, binaries, and minified artifacts.</text:p>
          </table:table-cell>
          <table:table-cell table:style-name="Table19.A1" office:value-type="string">
            <text:p text:style-name="P94"><text:span text:style-name="Strong_20_Emphasis">Clear Field:</text:span> Eliminates "Radio Noise" before it hits the sensors.</text:p>
          </table:table-cell>
        </table:table-row>
        <table:table-row>
          <table:table-cell table:style-name="Table19.A1" office:value-type="string">
            <text:p text:style-name="P94"><text:span text:style-name="Strong_20_Emphasis">The GuideStar Protocol</text:span></text:p>
          </table:table-cell>
          <table:table-cell table:style-name="Table19.A1" office:value-type="string">
            <text:p text:style-name="P94"><text:span text:style-name="Source_20_Text">guidestar_protocol.py</text:span></text:p>
          </table:table-cell>
          <table:table-cell table:style-name="Table19.A1" office:value-type="string">
            <text:p text:style-name="P94">Calibration and indexing; ensures the instrument is focused on core architectural importance. <text:span text:style-name="T480">Reads git lists, package.json, etc. </text:span></text:p>
          </table:table-cell>
          <table:table-cell table:style-name="Table19.A1" office:value-type="string">
            <text:p text:style-name="P94"><text:span text:style-name="Strong_20_Emphasis">Alignment:</text:span> Establishes the coordinate center of the survey.</text:p>
          </table:table-cell>
        </table:table-row>
        <table:table-row>
          <table:table-cell table:style-name="Table19.A1" office:value-type="string">
            <text:p text:style-name="P94"><text:span text:style-name="Strong_20_Emphasis">The Language Lens</text:span></text:p>
          </table:table-cell>
          <table:table-cell table:style-name="Table19.A1" office:value-type="string">
            <text:p text:style-name="P94"><text:span text:style-name="Source_20_Text">language_lens.py</text:span></text:p>
          </table:table-cell>
          <table:table-cell table:style-name="Table19.A1" office:value-type="string">
            <text:p text:style-name="P182">Language identification. Compares lines of evidence (ext/shebang), system context to assign a language to each file along with a confidence score based on the quality of that evidence to allow us later more thoroughly assess if our determinations seem plausible for that evidence.</text:p>
          </table:table-cell>
          <table:table-cell table:style-name="Table19.A1" office:value-type="string">
            <text:p text:style-name="P181"><text:span text:style-name="Strong_20_Emphasis">Focus:</text:span> Spectral identification; <text:span text:style-name="T480">determines if we have a lens</text:span> to <text:span text:style-name="T480">best focus that wavelength of light</text:span>. </text:p>
          </table:table-cell>
        </table:table-row>
        <table:table-row>
          <table:table-cell table:style-name="Table19.A1" office:value-type="string">
            <text:p text:style-name="P94"><text:span text:style-name="Strong_20_Emphasis">The </text:span><text:span text:style-name="Strong_20_Emphasis"><text:span text:style-name="T470">Prism</text:span></text:span></text:p>
          </table:table-cell>
          <table:table-cell table:style-name="Table19.A1" office:value-type="string">
            <text:p text:style-name="P94"><text:span text:style-name="Source_20_Text"><text:span text:style-name="T470">prism</text:span></text:span><text:span text:style-name="Source_20_Text">.py</text:span></text:p>
          </table:table-cell>
          <table:table-cell table:style-name="Table19.A1" office:value-type="string">
            <text:p text:style-name="P167">Once the language has been identified the correct comment style can be applied to parse comments from code</text:p>
          </table:table-cell>
          <table:table-cell table:style-name="Table19.A1" office:value-type="string">
            <text:p text:style-name="P94"><text:span text:style-name="Strong_20_Emphasis"><text:span text:style-name="T470">Spectral Splitting</text:span></text:span><text:span text:style-name="Strong_20_Emphasis">:</text:span> <text:s/><text:span text:style-name="T470">Splits the wavelength of light into two streams that can be analyzed separately from each other</text:span></text:p>
          </table:table-cell>
        </table:table-row>
        <table:table-row>
          <table:table-cell table:style-name="Table19.A1" office:value-type="string">
            <text:p text:style-name="P94"><text:span text:style-name="Strong_20_Emphasis">The Primary Detector</text:span></text:p>
          </table:table-cell>
          <table:table-cell table:style-name="Table19.A1" office:value-type="string">
            <text:p text:style-name="P94"><text:span text:style-name="Source_20_Text">detector.py</text:span></text:p>
          </table:table-cell>
          <table:table-cell table:style-name="Table19.A1" office:value-type="string">
            <text:p text:style-name="P94">Heuristic sensor; performs high-speed regex counting to detect functional intent.</text:p>
          </table:table-cell>
          <table:table-cell table:style-name="Table19.A1" office:value-type="string">
            <text:p text:style-name="P94"><text:span text:style-name="Strong_20_Emphasis">Raw Signal:</text:span> Captures the discrete counts of logic hits. <text:span text:style-name="T469">Where the photons hit the </text:span><text:soft-page-break/><text:span text:style-name="T469">EMCCD chip. </text:span></text:p>
          </table:table-cell>
        </table:table-row>
        <table:table-row>
          <table:table-cell table:style-name="Table19.A1" office:value-type="string">
            <text:p text:style-name="P94"><text:span text:style-name="Strong_20_Emphasis">The Signal Processor</text:span></text:p>
          </table:table-cell>
          <table:table-cell table:style-name="Table19.A1" office:value-type="string">
            <text:p text:style-name="P94"><text:span text:style-name="Source_20_Text">signal_processor.py</text:span></text:p>
          </table:table-cell>
          <table:table-cell table:style-name="Table19.A1" office:value-type="string">
            <text:p text:style-name="P94">Equation engine; converts raw counts into non-linear risk exposures and physical mass.</text:p>
          </table:table-cell>
          <table:table-cell table:style-name="Table19.A1" office:value-type="string">
            <text:p text:style-name="P94"><text:span text:style-name="Strong_20_Emphasis"><text:span text:style-name="T470">Analyzed Signal</text:span></text:span><text:span text:style-name="Strong_20_Emphasis">:</text:span> Transforms hits into meaningful 0-100 exposure scores.</text:p>
          </table:table-cell>
        </table:table-row>
        <table:table-row>
          <table:table-cell table:style-name="Table19.A1" office:value-type="string">
            <text:p text:style-name="P168"><text:span text:style-name="Strong_20_Emphasis">The Spectral Auditor</text:span></text:p>
          </table:table-cell>
          <table:table-cell table:style-name="Table19.A1" office:value-type="string">
            <text:p text:style-name="P168"><text:span text:style-name="Source_20_Text">spectral_auditor.py</text:span></text:p>
          </table:table-cell>
          <table:table-cell table:style-name="Table19.A1" office:value-type="string">
            <text:p text:style-name="P168"><text:span text:style-name="T481">Bayesian </text:span>Quality control. <text:span text:style-name="T480">I</text:span><text:span text:style-name="T472">f sample size permits,</text:span> performs statistical Z-<text:span text:style-name="T480">s</text:span>core checks to <text:span text:style-name="T480">assess if files with low confidence language determinations have further evidence that they </text:span><text:span text:style-name="T481">have code written in </text:span><text:span text:style-name="T480">that language. </text:span><text:span text:style-name="T481">T</text:span><text:span text:style-name="T480">hat an extension-less shebang-less file that we </text:span><text:span text:style-name="T481">labeled as</text:span><text:span text:style-name="T480"> shell actually contains shell related regex hits </text:span><text:span text:style-name="T481">at an expected regex hit density, as measured from your other files. </text:span></text:p>
          </table:table-cell>
          <table:table-cell table:style-name="Table19.A1" office:value-type="string">
            <text:p text:style-name="P94"><text:span text:style-name="Strong_20_Emphasis">Integrity:</text:span> Relegates <text:span text:style-name="T481">Mysterious</text:span> <text:span text:style-name="T481">signals </text:span>to the <text:span text:style-name="T2">Singularity of Ambiguity, </text:span><text:span text:style-name="T231">to highlight that the system was unable to analyze these signals. </text:span></text:p>
          </table:table-cell>
        </table:table-row>
        <table:table-row>
          <table:table-cell table:style-name="Table19.A1" office:value-type="string">
            <text:p text:style-name="P179">The Audit Recorder</text:p>
          </table:table-cell>
          <table:table-cell table:style-name="Table19.A1" office:value-type="string">
            <text:p text:style-name="P94"><text:span text:style-name="Source_20_Text"><text:span text:style-name="T479">audit_recorder</text:span></text:span><text:span text:style-name="Source_20_Text">.py</text:span></text:p>
          </table:table-cell>
          <table:table-cell table:style-name="Table19.A1" office:value-type="string">
            <text:p text:style-name="P180"><text:span text:style-name="T479">Full level audit record of every file scanned, results and hits</text:span>; <text:span text:style-name="T479">into a large</text:span> JSON archive. <text:span text:style-name="T481">To make your lawyers happy. </text:span></text:p>
          </table:table-cell>
          <table:table-cell table:style-name="Table19.A1" office:value-type="string">
            <text:p text:style-name="P180"><text:span text:style-name="Strong_20_Emphasis"><text:span text:style-name="T26">The SHBOM</text:span></text:span><text:span text:style-name="Strong_20_Emphasis"><text:span text:style-name="T230">: A permanent "Black Box" record (Structural Health Bill of Materials). </text:span></text:span></text:p>
          </table:table-cell>
        </table:table-row>
        <table:table-row>
          <table:table-cell table:style-name="Table19.A1" office:value-type="string">
            <text:p text:style-name="P180"><text:span text:style-name="Strong_20_Emphasis"><text:span text:style-name="T479">The GPU Recorder</text:span></text:span></text:p>
          </table:table-cell>
          <table:table-cell table:style-name="Table19.A1" office:value-type="string">
            <text:p text:style-name="P94"><text:span text:style-name="Source_20_Text"><text:span text:style-name="T479">gpu_recorder</text:span></text:span><text:span text:style-name="Source_20_Text">.py</text:span></text:p>
          </table:table-cell>
          <table:table-cell table:style-name="Table19.A1" office:value-type="string">
            <text:p text:style-name="P94">Vectorization; seals the processed signal into a lightweight, high-density JSON archive.</text:p>
          </table:table-cell>
          <table:table-cell table:style-name="Table19.A1" office:value-type="string">
            <text:p text:style-name="P94"><text:span text:style-name="T2">The Starmap</text:span>: Converts analyzed data into <text:span text:style-name="T479">galaxy format</text:span> for the 3D rendering engine.</text:p>
          </table:table-cell>
        </table:table-row>
      </table:table>
      <text:p text:style-name="P87"/>
      <text:h text:style-name="P88" text:outline-level="4"><text:bookmark-start text:name="__RefHeading___Toc44242_2214491331"/>2.3.0. The GalaxyScope Chassis – Optical Orchestration<text:bookmark-end text:name="__RefHeading___Toc44242_2214491331"/></text:h>
      <text:p text:style-name="Text_20_body">The GalaxyScope (implemented as the Orchestrator class in galaxyscope.py) is the primary structural frame of the GitGalaxy engine. It serves as the physical chassis that houses and synchronizes every optical module, ensuring that raw source code flows through the system in a deterministic, scientific sequence. Without a central chassis, the individual sensors and lenses would lack the synchronization required to build a cohesive 3D map; the Orchestrator ensures that data is refracted, analyzed, and recorded with perfect temporal alignment.</text:p>
      <text:h text:style-name="Heading_20_5" text:outline-level="5"><text:bookmark-start text:name="__RefHeading___Toc44244_2214491331"/>2.3.0.A. The Adaptive Lightpath System<text:bookmark-end text:name="__RefHeading___Toc44244_2214491331"/></text:h>
      <text:p text:style-name="Text_20_body">The analysis is executed as a series of "Lightpath Phases," moving from focusing the instrument to detecting regex hits to recording the data. By organizing the pipeline into <text:soft-page-break/>distinct phases, the system can discard noise early in the lightpath, allowing the high-compute detectors to focus exclusively on verified, logical matter. We can also optimize each lens in the system over time.</text:p>
      <text:h text:style-name="Heading_20_6" text:outline-level="6"><text:bookmark-start text:name="__RefHeading___Toc44246_2214491331"/>2.3.0.A.1. Phase 0: The Radar Scan (Ignition)<text:bookmark-end text:name="__RefHeading___Toc44246_2214491331"/></text:h>
      <text:p text:style-name="Text_20_body">The engine initiates by building a project "Census" using Git Authority or a standard filesystem walk. The Radar Scan identifies every artifact in the repository and tallies extension frequencies, creating the global context needed to calculate "Ecosystem Gravity" before the primary lenses engage.</text:p>
      <text:h text:style-name="Heading_20_6" text:outline-level="6"><text:bookmark-start text:name="__RefHeading___Toc44248_2214491331"/>2.3.0.A.2. Phase 1: Parallel Refraction (Map-Reduce)<text:bookmark-end text:name="__RefHeading___Toc44248_2214491331"/></text:h>
      <text:p text:style-name="Text_20_body">The chassis utilizes a multi-core <text:span text:style-name="Source_20_Text">ProcessPoolExecutor</text:span> to scatter artifacts into isolated worker memory spaces for concurrent analysis.</text:p>
      <text:p text:style-name="Text_20_body"><text:span text:style-name="Strong_20_Emphasis">The "Why": Hardware-Level Performance</text:span> By isolating the refraction process into worker pools, the engine bypasses the Python Global Interpreter Lock (GIL), enabling the instrument to scan tens of thousands of files across all available CPU cores simultaneously.</text:p>
      <text:h text:style-name="Heading_20_6" text:outline-level="6"><text:bookmark-start text:name="__RefHeading___Toc44250_2214491331"/>2.3.0.A.3. Phase 2: Relational Physics (Global Aggregation)<text:bookmark-end text:name="__RefHeading___Toc44250_2214491331"/></text:h>
      <text:p text:style-name="Text_20_body">Once workers return their individual refraction data, the chassis executes a Second Pass to calculate project-wide relationships, such as the "Global Test Umbrella" and "Popularity Ranks." A single file cannot know how "popular" it is without context; Phase 2 aggregates individual "Popularity Hits" into a global score, allowing the Cartographer to determine which files act as the gravitational center of the galaxy.</text:p>
      <text:h text:style-name="Heading_20_5" text:outline-level="5"><text:bookmark-start text:name="__RefHeading___Toc44252_2214491331"/>2.3.0.B. Adaptive Features and Hardware Overrides<text:bookmark-end text:name="__RefHeading___Toc44252_2214491331"/></text:h>
      <text:p text:style-name="Text_20_body">The GalaxyScope is designed as an "Open Chassis," capable of swapping lenses and patching logic on the fly based on the specific "Atmospheric Conditions" of the target repository.</text:p>
      <text:h text:style-name="Heading_20_6" text:outline-level="6"><text:bookmark-start text:name="__RefHeading___Toc44254_2214491331"/>2.3.0.B.1. The Domain Dialect Pre-Flight Patch<text:bookmark-end text:name="__RefHeading___Toc44254_2214491331"/></text:h>
      <text:p text:style-name="Text_20_body">Before ignition, the chassis checks for "Project Overrides" in the scanning configuration. If a project name matches a registered Dialect, the engine live-patches the language regex geometry. Standard language rules often fail in projects with unique coding standards or internal DSLs. Dialect patching allows the instrument to recalibrate its "Spectral Focus" to match the local reality of a specific project without breaking the global standard.</text:p>
      <text:h text:style-name="Heading_20_6" text:outline-level="6"><text:bookmark-start text:name="__RefHeading___Toc44256_2214491331"/><text:soft-page-break/>2.3.0.B.2. Splicer Pre-loading<text:bookmark-end text:name="__RefHeading___Toc44256_2214491331"/></text:h>
      <text:p text:style-name="Text_20_body">To prevent performance lag, the chassis "Force-Warms" the workers by pre-compiling all necessary regular expressions (the search patterns for functions and logic) as soon as the worker starts. In a massive scan of 10,000 files, if a worker had to "think" about and compile the rules for every file individually, it would create a repetitive look up loop that we entitled "Unwanted refraction loop." Pre-loading the splicer ensures the rules are machine-ready before the work begins, allowing the data to flow through the pipeline without interruption.</text:p>
      <text:h text:style-name="Heading_20_6" text:outline-level="6"><text:bookmark-start text:name="__RefHeading___Toc44258_2214491331"/>2.3.0.B.3. Shared Metadata Locking (The Session Lock)<text:bookmark-end text:name="__RefHeading___Toc44258_2214491331"/></text:h>
      <text:p text:style-name="Text_20_body">As the mission concludes, the chassis generates a <text:span text:style-name="Source_20_Text">session_meta</text:span> payload containing the Engine Identity, Scan Duration, and an immutable Git Audit (Branch and SHA-1 Hash). The Session Lock ensures that every architectural map is anchored to a specific point in the project's history, providing the "Black Box" data required for SBOM compliance and legal audits.</text:p>
      <text:p text:style-name="P87"/>
      <text:h text:style-name="P155" text:outline-level="4"/>
      <text:h text:style-name="P155" text:outline-level="4"><text:bookmark-start text:name="__RefHeading___Toc44038_2214491331"/>2.3.1. The Aperture Filter: Adjusting the Telescope’s Filter and Focus<text:bookmark-end text:name="__RefHeading___Toc44038_2214491331"/></text:h>
      <text:p text:style-name="Text_20_body">To prevent "Radio Noise" from blinding the telescope, the pipeline initiates Phase 0.1: <text:span text:style-name="Strong_20_Emphasis">The Solar Shield</text:span>. In modern repositories, artifacts like 50MB <text:span text:style-name="Source_20_Text">node_modules</text:span> folders or massive minified data dumps create enough radiation to obscure the actual logic of the system. By applying a strict <text:span text:style-name="Strong_20_Emphasis">v6.2.0 perimeter gate</text:span>, we ensure that only high-quality, maintainable source code enters the refraction pipeline. If an artifact isn't something a human actively manages, it is treated as out-of-scope, protecting the Physics Engine from wasting cycles on "Junk Matter."</text:p>
      <text:h text:style-name="Heading_20_5" text:outline-level="5"><text:bookmark-start text:name="__RefHeading___Toc44040_2214491331"/>2.3.1.A. Blocking the Radio Noise (The Lead Shield)<text:bookmark-end text:name="__RefHeading___Toc44040_2214491331"/></text:h>
      <text:p text:style-name="Text_20_body">The Solar Shield operates through a multi-tiered hierarchy of suppression, moving from physical constraints to logical intent.</text:p>
      <text:h text:style-name="Heading_20_6" text:outline-level="6"><text:bookmark-start text:name="__RefHeading___Toc44042_2214491331"/>2.3.1.A.1. Tier 0: Resource Guarding<text:bookmark-end text:name="__RefHeading___Toc44042_2214491331"/></text:h>
      <text:p text:style-name="Text_20_body">Before any code is read, the file's physical mass is measured. Any artifact exceeding the <text:span text:style-name="Source_20_Text">MAX_FILE_SIZE_MB</text:span> (default 50MB) is rejected immediately. These are classified as "Saturated Signals" to prevent memory overflow during the refraction process.</text:p>
      <text:h text:style-name="Heading_20_6" text:outline-level="6"><text:bookmark-start text:name="__RefHeading___Toc44044_2214491331"/><text:soft-page-break/>2.3.1.A.2. Tier 1: Path &amp; Black Hole Suppression<text:bookmark-end text:name="__RefHeading___Toc44044_2214491331"/></text:h>
      <text:p text:style-name="Text_20_body">We calibrate the field of view using <text:span text:style-name="Strong_20_Emphasis">Path Integrity Evaluation</text:span>. The shield integrates <text:span text:style-name="Source_20_Text">.gitignore</text:span> patterns and a hard-coded <text:span text:style-name="Source_20_Text">BLACK_HOLES</text:span> registry to block known debris. Any folder starting with a period (like <text:span text:style-name="Source_20_Text">.git/</text:span> or <text:span text:style-name="Source_20_Text">.vscode/</text:span>) is masked as administrative noise unless granted an override.</text:p>
      <text:h text:style-name="Heading_20_6" text:outline-level="6"><text:bookmark-start text:name="__RefHeading___Toc44046_2214491331"/>2.3.1.A.3. Bayesian Intent Overrides &amp; Stateful Caching<text:bookmark-end text:name="__RefHeading___Toc44046_2214491331"/></text:h>
      <text:p text:style-name="Text_20_body">If the <text:span text:style-name="Strong_20_Emphasis">GuideStar Protocol</text:span> identifies an artifact as structurally critical during the Phase 0 Radar Walk, it grants an <text:span text:style-name="Strong_20_Emphasis">Intent Lock</text:span>. The filter utilizes <text:span text:style-name="Strong_20_Emphasis">Stateful Caching</text:span> to remember these locks between the Census and Ingestion phases. This allows specific, high-priority "Dark Matter" (like <text:span text:style-name="Source_20_Text">.hooks/</text:span> or custom config files) to bypass the Solar Shield, ensuring vital logic is captured in the 3D census.</text:p>
      <text:h text:style-name="Heading_20_5" text:outline-level="5"><text:bookmark-start text:name="__RefHeading___Toc44048_2214491331"/>2.3.1.B. The Visible Spectrum (Linguistic &amp; Integrity Gates)<text:bookmark-end text:name="__RefHeading___Toc44048_2214491331"/></text:h>
      <text:p text:style-name="Text_20_body">Once the scope is clear, we tune the sensors to the <text:span text:style-name="Strong_20_Emphasis">Visible Spectrum</text:span>. We use the <text:span text:style-name="Source_20_Text">LANGUAGE_DEFINITIONS</text:span> registry as a primary whitelist for ecosystem anchors (like <text:span text:style-name="Source_20_Text">package.json</text:span>) or known extensions.</text:p>
      <text:h text:style-name="Heading_20_6" text:outline-level="6"><text:bookmark-start text:name="__RefHeading___Toc44050_2214491331"/>2.3.1.B.1. Rule 2.1: If no file extension, check for shebangs<text:bookmark-end text:name="__RefHeading___Toc44050_2214491331"/></text:h>
      <text:p text:style-name="Text_20_body">To handle artifacts without a trailing extension (such as executable scripts or unique configurations), the filter allows these "Deep Space Remnants" through for secondary evaluation. These are eventually identified by the <text:span text:style-name="Strong_20_Emphasis">Shebang Scanner</text:span> rather than simple extension matching.</text:p>
      <text:h text:style-name="Heading_20_6" text:outline-level="6"><text:bookmark-start text:name="__RefHeading___Toc44052_2214491331"/>2.3.1.B.2. Binary Detection<text:bookmark-end text:name="__RefHeading___Toc44052_2214491331"/></text:h>
      <text:p text:style-name="Text_20_body">We scan the first 1024 bytes of the content buffer for null bytes (<text:span text:style-name="Source_20_Text">\x00</text:span>). If detected, the file is discarded as <text:span text:style-name="Strong_20_Emphasis">Microwave Debris</text:span> (Opaque Binaries), as these signals cannot be refracted into human-readable logic.</text:p>
      <text:h text:style-name="Heading_20_6" text:outline-level="6"><text:bookmark-start text:name="__RefHeading___Toc44054_2214491331"/>2.3.1.B.3. Minified Code<text:bookmark-end text:name="__RefHeading___Toc44054_2214491331"/></text:h>
      <text:p text:style-name="Text_20_body">We inspect the "Photon Buffer" for minification. If a line exceeds the <text:span text:style-name="Source_20_Text">MAX_LINE_LENGTH</text:span> (default 500 characters) within the initial scan limit, the signal is considered "Saturated" and discarded. If the code is too compressed for a human to read, we assume that the user doesn’t want to analyze what is in it. Minified code, beyond this length, is considered non-human-readable and therefore omitted from the visible spectrum.</text:p>
      <text:h text:style-name="Heading_20_5" text:outline-level="5"><text:bookmark-start text:name="__RefHeading___Toc44056_2214491331"/><text:soft-page-break/>2.3.1.C. Data Classification Matrix<text:bookmark-end text:name="__RefHeading___Toc44056_2214491331"/></text:h>
      <text:p text:style-name="Text_20_body">Filtering categorizes project data by its "Wavelength." Only artifacts in the <text:span text:style-name="Strong_20_Emphasis">Visible</text:span> band proceed to the Entity Census and the math tracks.</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95">Band</text:p>
          </table:table-cell>
          <table:table-cell table:style-name="Table37.A1" office:value-type="string">
            <text:p text:style-name="P95">Artifact Type</text:p>
          </table:table-cell>
          <table:table-cell table:style-name="Table37.A1" office:value-type="string">
            <text:p text:style-name="P95">Action</text:p>
          </table:table-cell>
          <table:table-cell table:style-name="Table37.A1" office:value-type="string">
            <text:p text:style-name="P95">Galaxy Manifestation</text:p>
          </table:table-cell>
        </table:table-row>
        <table:table-row>
          <table:table-cell table:style-name="Table37.A1" office:value-type="string">
            <text:p text:style-name="P94"><text:span text:style-name="Strong_20_Emphasis">Radio</text:span></text:p>
          </table:table-cell>
          <table:table-cell table:style-name="Table37.A1" office:value-type="string">
            <text:p text:style-name="P94"><text:span text:style-name="Source_20_Text">.gitignore</text:span>, Black Holes, <text:span text:style-name="Source_20_Text">node_modules</text:span></text:p>
          </table:table-cell>
          <table:table-cell table:style-name="Table37.A1" office:value-type="string">
            <text:p text:style-name="P94">Block</text:p>
          </table:table-cell>
          <table:table-cell table:style-name="Table37.A1" office:value-type="string">
            <text:p text:style-name="P94">Not Rendered</text:p>
          </table:table-cell>
        </table:table-row>
        <table:table-row>
          <table:table-cell table:style-name="Table37.A1" office:value-type="string">
            <text:p text:style-name="P94"><text:span text:style-name="Strong_20_Emphasis">Microwave</text:span></text:p>
          </table:table-cell>
          <table:table-cell table:style-name="Table37.A1" office:value-type="string">
            <text:p text:style-name="P94">Opaque Binaries, Assets, Fonts</text:p>
          </table:table-cell>
          <table:table-cell table:style-name="Table37.A1" office:value-type="string">
            <text:p text:style-name="P94">Discard</text:p>
          </table:table-cell>
          <table:table-cell table:style-name="Table37.A1" office:value-type="string">
            <text:p text:style-name="P94">Not Rendered</text:p>
          </table:table-cell>
        </table:table-row>
        <table:table-row>
          <table:table-cell table:style-name="Table37.A1" office:value-type="string">
            <text:p text:style-name="P94"><text:span text:style-name="Strong_20_Emphasis">Dark Matter</text:span></text:p>
          </table:table-cell>
          <table:table-cell table:style-name="Table37.A1" office:value-type="string">
            <text:p text:style-name="P94">Unknown Extensions (Images, Logs)</text:p>
          </table:table-cell>
          <table:table-cell table:style-name="Table37.A1" office:value-type="string">
            <text:p text:style-name="P94">Ignore</text:p>
          </table:table-cell>
          <table:table-cell table:style-name="Table37.A1" office:value-type="string">
            <text:p text:style-name="P94">Not Rendered (Unless Intent-Locked)</text:p>
          </table:table-cell>
        </table:table-row>
        <table:table-row>
          <table:table-cell table:style-name="Table37.A1" office:value-type="string">
            <text:p text:style-name="P94"><text:span text:style-name="Strong_20_Emphasis">Infrared</text:span></text:p>
          </table:table-cell>
          <table:table-cell table:style-name="Table37.A1" office:value-type="string">
            <text:p text:style-name="P94">Saturated/Minified Code, Massive Files</text:p>
          </table:table-cell>
          <table:table-cell table:style-name="Table37.A1" office:value-type="string">
            <text:p text:style-name="P94">Discard</text:p>
          </table:table-cell>
          <table:table-cell table:style-name="Table37.A1" office:value-type="string">
            <text:p text:style-name="P94">Not Rendered</text:p>
          </table:table-cell>
        </table:table-row>
        <table:table-row>
          <table:table-cell table:style-name="Table37.A1" office:value-type="string">
            <text:p text:style-name="P94"><text:span text:style-name="Strong_20_Emphasis">Visible</text:span></text:p>
          </table:table-cell>
          <table:table-cell table:style-name="Table37.A1" office:value-type="string">
            <text:p text:style-name="P94">Whitelisted Source Code</text:p>
          </table:table-cell>
          <table:table-cell table:style-name="Table37.A1" office:value-type="string">
            <text:p text:style-name="P94">Process</text:p>
          </table:table-cell>
          <table:table-cell table:style-name="Table37.A1" office:value-type="string">
            <text:p text:style-name="P94"><text:span text:style-name="Strong_20_Emphasis">Star Mass / Galaxy Body</text:span></text:p>
          </table:table-cell>
        </table:table-row>
      </table:table>
      <text:p text:style-name="P154"/>
      <text:h text:style-name="Heading_20_4" text:outline-level="4"/>
      <text:h text:style-name="Heading_20_4" text:outline-level="4"><text:bookmark-start text:name="__RefHeading___Toc44058_2214491331"/>2.3.2. The GuideStar Protocol: Contextual Intelligence<text:bookmark-end text:name="__RefHeading___Toc44058_2214491331"/></text:h>
      <text:p text:style-name="Text_20_body">The GuideStar Protocol acts as the "Intelligence Officer" of the GitGalaxy observatory. While the Aperture Filter (Phase 0.1) serves as a Shield—a wavelength filter designed to block out binaries and noise—it is fundamentally a removing files from analysis. To ensure we get what is important, we use user defined whitelists. The GuideStar Protocol (Phase 0.5) is an adaptive intelligence engine that tunes the observatory to the unique atmospheric conditions of a repository by analyzing the artifacts created by the user.</text:p>
      <text:p text:style-name="Text_20_body">By reading a project’s own roadmap (manifests, documentation, and architecture), GuideStar tells the telescope which signals are intentional logic and which are mere debris. This transforms a rigid exclusion filter into a dynamic system that understands the <text:span text:style-name="Strong_20_Emphasis">Social Proof</text:span> of a file before the Language Lens begins its atomic scan.</text:p>
      <text:h text:style-name="Heading_20_5" text:outline-level="5"><text:bookmark-start text:name="__RefHeading___Toc44060_2214491331"/>2.3.2.A. The Prior Probability Vector<text:bookmark-end text:name="__RefHeading___Toc44060_2214491331"/></text:h>
      <text:p text:style-name="Text_20_body">In the GitGalaxy pipeline, every file in the CensusArray begins as an uninitialized artifact with a base probability of "Deep Space Mystery." Because the observatory operates on a Bayesian logic of "Proof over Assumption," the GuideStar Protocol is responsible for the first major update to this <text:span text:style-name="Strong_20_Emphasis">Prior Vector</text:span>.</text:p>
      <text:p text:style-name="Text_20_body"><text:soft-page-break/>This update is performed to establish a baseline of <text:span text:style-name="Strong_20_Emphasis">Contextual Certainty</text:span>. By searching for multiple lines of evidence—ranging from hardcoded build manifests to informal documentation—the protocol categorizes files into distinct <text:span text:style-name="Strong_20_Emphasis">Quality Tiers</text:span>. These tiers allow the telescope to prioritize its instrumentation: high-tier evidence (like a Roadmap Lock) allows for an immediate focus lock, while low-tier or absent evidence flags an artifact for a more intensive spectral audit later in the pipeline.</text:p>
      <text:h text:style-name="Heading_20_6" text:outline-level="6"><text:bookmark-start text:name="__RefHeading___Toc44062_2214491331"/>2.3.2.A.1. Selective Injection<text:bookmark-end text:name="__RefHeading___Toc44062_2214491331"/></text:h>
      <text:p text:style-name="Text_20_body">GuideStar only updates priors for files it explicitly "touches" during its environmental scan. It does not perform a blanket sweep; instead, it looks for specific evidence of intent within Manifests, READMEs, and Sector Biases.</text:p>
      <text:h text:style-name="Heading_20_6" text:outline-level="6"><text:bookmark-start text:name="__RefHeading___Toc44064_2214491331"/>2.3.2.A.2. Contextual Tagging<text:bookmark-end text:name="__RefHeading___Toc44064_2214491331"/></text:h>
      <text:p text:style-name="Text_20_body">When GuideStar identifies a file, it attaches a <text:span text:style-name="Strong_20_Emphasis">Data Vector</text:span> to the file's metadata. This vector contains the predicted <text:span text:style-name="Source_20_Text">lang_id</text:span>, the <text:span text:style-name="Source_20_Text">prior_confidence</text:span> (intensity), and the <text:span text:style-name="Source_20_Text">source_proof</text:span> (e.g., "Roadmap Lock").</text:p>
      <text:h text:style-name="Heading_20_6" text:outline-level="6"><text:bookmark-start text:name="__RefHeading___Toc44066_2214491331"/>2.3.2.A.3. Whitelist Trust Bonus<text:bookmark-end text:name="__RefHeading___Toc44066_2214491331"/></text:h>
      <text:p text:style-name="Text_20_body">If an artifact's filename appears in a user-provided <text:span text:style-name="Strong_20_Emphasis">Priority Whitelist</text:span>, the GuideStar applies a <text:span text:style-name="Strong_20_Emphasis">Confidence Boost</text:span>. The prior intensity is increased by <text:span text:style-name="Strong_20_Emphasis">+0.10</text:span> (capped at 0.99), signaling to the pipeline that this specific file has explicit human-validated importance.</text:p>
      <text:h text:style-name="Heading_20_5" text:outline-level="5"><text:bookmark-start text:name="__RefHeading___Toc44068_2214491331"/>2.3.2.B. The Handover: Intent vs. Identity<text:bookmark-end text:name="__RefHeading___Toc44068_2214491331"/></text:h>
      <text:p text:style-name="Text_20_body">This separation of concerns allows the pipeline to maintain a "Scan Once" efficiency by distinguishing between two different types of intelligence:</text:p>
      <text:list text:style-name="L122">
        <text:list-item>
          <text:p text:style-name="P334"><text:span text:style-name="Strong_20_Emphasis">GuideStar (The Scout):</text:span> Identifies <text:span text:style-name="Strong_20_Emphasis">Intent</text:span> (Why this file exists). It says: "I found this file referenced in a Makefile and it has a known C-extension; I predict it is a C-target with 0.90 confidence."</text:p>
        </text:list-item>
        <text:list-item>
          <text:p text:style-name="P334"><text:span text:style-name="Strong_20_Emphasis">Language Lens (The Scientist):</text:span> Identifies <text:span text:style-name="Strong_20_Emphasis">Identity</text:span> (What this file is). It updates the prior for the "Standard Galaxy" (files with known extensions) and performs the atomic scan to verify all claims.</text:p>
        </text:list-item>
      </text:list>
      <text:h text:style-name="Heading_20_5" text:outline-level="5"><text:bookmark-start text:name="__RefHeading___Toc44070_2214491331"/>2.3.2.C. The Evidence Hierarchy: Identifying Social Proof<text:bookmark-end text:name="__RefHeading___Toc44070_2214491331"/></text:h>
      <text:p text:style-name="Text_20_body">GuideStar v6.3.0 prioritizes evidence based on its <text:span text:style-name="Strong_20_Emphasis">"Proximity to Computer Code."</text:span> This principle assumes that the closer an artifact is to a machine-executable instruction (a build script or manifest), the more authoritative it is as a signal of intent. Conversely, <text:soft-page-break/>human-authored documentation is treated with slightly higher skepticism. This hierarchy creates three distinct <text:span text:style-name="Strong_20_Emphasis">Quality Tiers</text:span> that guide the telescope's sensors.</text:p>
      <text:h text:style-name="Heading_20_6" text:outline-level="6"><text:bookmark-start text:name="__RefHeading___Toc44072_2214491331"/>2.3.2.C.1. Tier 1: Machine Roadmap (Authoritative Proof)<text:bookmark-end text:name="__RefHeading___Toc44072_2214491331"/></text:h>
      <text:p text:style-name="Text_20_body">These are machine-readable build manifests where a developer has explicitly declared an artifact's role in the system. Because these files are essential for successful execution, they provide the highest proximity to logic. Detection results in a <text:span text:style-name="Strong_20_Emphasis">0.90 to 0.95 Prior</text:span>:</text:p>
      <text:list text:style-name="L123">
        <text:list-item>
          <text:p text:style-name="P335"><text:span text:style-name="Strong_20_Emphasis">Javascript:</text:span> <text:span text:style-name="Source_20_Text">package.json</text:span> (Main entry points and binary targets).</text:p>
        </text:list-item>
        <text:list-item>
          <text:p text:style-name="P335"><text:span text:style-name="Strong_20_Emphasis">Python:</text:span> <text:span text:style-name="Source_20_Text">pyproject.toml</text:span>, <text:span text:style-name="Source_20_Text">setup.py</text:span>.</text:p>
        </text:list-item>
        <text:list-item>
          <text:p text:style-name="P335"><text:span text:style-name="Strong_20_Emphasis">C/C++:</text:span> <text:span text:style-name="Source_20_Text">Makefile</text:span>, <text:span text:style-name="Source_20_Text">CMakeLists.txt</text:span>.</text:p>
        </text:list-item>
        <text:list-item>
          <text:p text:style-name="P335"><text:span text:style-name="Strong_20_Emphasis">Rust/Go:</text:span> <text:span text:style-name="Source_20_Text">Cargo.toml</text:span>, <text:span text:style-name="Source_20_Text">go.mod</text:span>.</text:p>
        </text:list-item>
        <text:list-item>
          <text:p text:style-name="P335"><text:span text:style-name="Strong_20_Emphasis">Ruby/Java:</text:span> <text:span text:style-name="Source_20_Text">Gemfile</text:span>, <text:span text:style-name="Source_20_Text">Rakefile</text:span>, <text:span text:style-name="Source_20_Text">pom.xml</text:span>.</text:p>
        </text:list-item>
      </text:list>
      <text:h text:style-name="Heading_20_6" text:outline-level="6"><text:bookmark-start text:name="__RefHeading___Toc44074_2214491331"/>2.3.2.C.2. Tier 2: Functional Motion (Dynamic Triggers)<text:bookmark-end text:name="__RefHeading___Toc44074_2214491331"/></text:h>
      <text:p text:style-name="Text_20_body">This tier captures evidence of a file "in motion." If a file is used as an argument in a command-line example or resides in a functionally-named execution sector, its role is highlighted but slightly less definitive. Detection results in a <text:span text:style-name="Strong_20_Emphasis">0.75 to 0.85 Prior</text:span>:</text:p>
      <text:list text:style-name="L124">
        <text:list-item>
          <text:p text:style-name="P336"><text:span text:style-name="Strong_20_Emphasis">Execution Triggers:</text:span> Command-line examples extracted from documentation (e.g., <text:span text:style-name="Source_20_Text">npm run</text:span>, <text:span text:style-name="Source_20_Text">python3 main.py</text:span>, <text:span text:style-name="Source_20_Text">./setup</text:span>).</text:p>
        </text:list-item>
        <text:list-item>
          <text:p text:style-name="P336"><text:span text:style-name="Strong_20_Emphasis">Intent-Biased Sectors:</text:span> Files residing in execution-heavy directories like <text:span text:style-name="Source_20_Text">/bin</text:span>, <text:span text:style-name="Source_20_Text">/scripts</text:span>, <text:span text:style-name="Source_20_Text">/hooks</text:span>, and <text:span text:style-name="Source_20_Text">/libexec</text:span>.</text:p>
        </text:list-item>
      </text:list>
      <text:h text:style-name="Heading_20_6" text:outline-level="6"><text:bookmark-start text:name="__RefHeading___Toc44076_2214491331"/>2.3.2.C.3. Tier 3: Informational Context (Heuristic Labels)<text:bookmark-end text:name="__RefHeading___Toc44076_2214491331"/></text:h>
      <text:p text:style-name="Text_20_body">The lowest tier relies on "Human-to-Human" instructions or general organizational patterns. While useful for establishing focus, these signals have the lowest proximity to machine logic and higher potential for obsolescence. Detection results in a <text:span text:style-name="Strong_20_Emphasis">0.70 to 0.75 Prior</text:span>:</text:p>
      <text:list text:style-name="L125">
        <text:list-item>
          <text:p text:style-name="P337"><text:span text:style-name="Strong_20_Emphasis">Documentation:</text:span> Backticked filenames in <text:span text:style-name="Source_20_Text">README</text:span> or <text:span text:style-name="Source_20_Text">INSTALL</text:span> files.</text:p>
        </text:list-item>
        <text:list-item>
          <text:p text:style-name="P337"><text:span text:style-name="Strong_20_Emphasis">General Sector Bias:</text:span> Files located in <text:span text:style-name="Source_20_Text">/src</text:span>, <text:span text:style-name="Source_20_Text">/tools</text:span>, or <text:span text:style-name="Source_20_Text">/utils</text:span>.</text:p>
        </text:list-item>
        <text:list-item>
          <text:p text:style-name="P337"><text:span text:style-name="Strong_20_Emphasis">Makefile Targets:</text:span> Non-reserved targets identified in build files (e.g., <text:span text:style-name="Source_20_Text">build-assets:</text:span>).</text:p>
        </text:list-item>
      </text:list>
      <text:h text:style-name="Heading_20_5" text:outline-level="5"><text:bookmark-start text:name="__RefHeading___Toc44078_2214491331"/><text:soft-page-break/>2.3.2.D. Rules for Deep Manifest &amp; README Analysis<text:bookmark-end text:name="__RefHeading___Toc44078_2214491331"/></text:h>
      <text:h text:style-name="Heading_20_6" text:outline-level="6"><text:bookmark-start text:name="__RefHeading___Toc44080_2214491331"/>2.3.2.D.1. Deep Manifest Inspection (v6.3.0)<text:bookmark-end text:name="__RefHeading___Toc44080_2214491331"/></text:h>
      <text:p text:style-name="Text_20_body">GuideStar dispatches specific scouts to extract internal references:</text:p>
      <text:list text:style-name="L126">
        <text:list-item>
          <text:p text:style-name="P338"><text:span text:style-name="Strong_20_Emphasis">Node.js:</text:span> Scans <text:span text:style-name="Source_20_Text">main</text:span>, <text:span text:style-name="Source_20_Text">bin</text:span>, and the values within <text:span text:style-name="Source_20_Text">scripts</text:span> blocks for potential filenames.</text:p>
        </text:list-item>
        <text:list-item>
          <text:p text:style-name="P338"><text:span text:style-name="Strong_20_Emphasis">Makefiles:</text:span> Extracts variable assignments (e.g., <text:span text:style-name="Source_20_Text">SRCS</text:span>, <text:span text:style-name="Source_20_Text">SOURCES</text:span>, <text:span text:style-name="Source_20_Text">FILES</text:span>, <text:span text:style-name="Source_20_Text">TARGET</text:span>).</text:p>
        </text:list-item>
        <text:list-item>
          <text:p text:style-name="P338"><text:span text:style-name="Strong_20_Emphasis">Makefile Target Heuristics:</text:span> Identifies custom targets. If a target name is not a generic reserved word (like <text:span text:style-name="Source_20_Text">all</text:span> or <text:span text:style-name="Source_20_Text">clean</text:span>), it is injected as a valid artifact with a <text:span text:style-name="Strong_20_Emphasis">0.70 Prior</text:span>.</text:p>
        </text:list-item>
        <text:list-item>
          <text:p text:style-name="P338"><text:span text:style-name="Strong_20_Emphasis">TOML/Cargo:</text:span> Parses <text:span text:style-name="Source_20_Text">path =</text:span> assignments and Python colon-delimited entry points.</text:p>
        </text:list-item>
      </text:list>
      <text:h text:style-name="Heading_20_6" text:outline-level="6"><text:bookmark-start text:name="__RefHeading___Toc44082_2214491331"/>2.3.2.D.2. Tactful README Scanning<text:bookmark-end text:name="__RefHeading___Toc44082_2214491331"/></text:h>
      <text:p text:style-name="Text_20_body">GuideStar limits ingestion to the first <text:span text:style-name="Strong_20_Emphasis">20KB</text:span>. It utilizes a case-insensitive regex to identify <text:span text:style-name="Strong_20_Emphasis">Target Headers</text:span> (e.g., <text:span text:style-name="Emphasis">Usage</text:span>, <text:span text:style-name="Emphasis">Layout</text:span>, <text:span text:style-name="Emphasis">Architecture</text:span>) and focuses its pattern extraction exclusively on these high-signal sectors.</text:p>
      <text:h text:style-name="Heading_20_5" text:outline-level="5"><text:bookmark-start text:name="__RefHeading___Toc44084_2214491331"/>2.3.2.E. Determinism and Inventory Integrity<text:bookmark-end text:name="__RefHeading___Toc44084_2214491331"/></text:h>
      <text:list text:style-name="L127">
        <text:list-item>
          <text:p text:style-name="P339"><text:span text:style-name="Strong_20_Emphasis">Traceability:</text:span> Every file in the final inventory indicates whether its prior was provided by Context (GuideStar) or Signature (Language Lens).</text:p>
        </text:list-item>
        <text:list-item>
          <text:p text:style-name="P339"><text:span text:style-name="Strong_20_Emphasis">Clean Room Normalization:</text:span> Before injection, GuideStar cleans and normalizes all filenames (stripping <text:span text:style-name="Source_20_Text">./</text:span> and leading whitespace) to ensure manifest references align perfectly with physical file paths.</text:p>
        </text:list-item>
      </text:list>
      <text:h text:style-name="Heading_20_5" text:outline-level="5"><text:bookmark-start text:name="__RefHeading___Toc44086_2214491331"/>2.3.2.F. Escalation to the Language Lens<text:bookmark-end text:name="__RefHeading___Toc44086_2214491331"/></text:h>
      <text:p text:style-name="Text_20_body">Once the GuideStar has mapped the "Known Sector,", the list of files whitelisted from these sources, it hands the census to the Language Lens for spectral analysis.</text:p>
      <text:list text:style-name="L128">
        <text:list-item>
          <text:p text:style-name="P340"><text:span text:style-name="Strong_20_Emphasis">Prior Preservation:</text:span> If a file already has a GuideStar Prior, the Lens uses it as the "Prior Probability" for its Bayesian calculation.</text:p>
        </text:list-item>
        <text:list-item>
          <text:p text:style-name="P340"><text:span text:style-name="Strong_20_Emphasis">Gap Filling:</text:span> If a file is "Prior-Empty," the Lens assesses engages a full suite of heuristic rules to determine the identity with each heuristic outcome having a unique confidence score representing how convincing the method is. </text:p>
        </text:list-item>
        <text:list-item>
          <text:p text:style-name="P340"><text:span text:style-name="Strong_20_Emphasis">Audit Trigger:</text:span> After regex scanning, we assess our evidence ( regex hits / LOC ) in relation to our confidence score to determine if the language ID seems plausible <text:soft-page-break/>or not as a final sanity check. “If we think this file was written in German, we should have found so many German words in it, if not that means our guess was likely wrong that this isn’t German and therefore we can’t read it”. </text:p>
        </text:list-item>
      </text:list>
      <text:p text:style-name="Text_20_body"/>
      <text:h text:style-name="P89" text:outline-level="4"><text:bookmark-start text:name="__RefHeading___Toc42222_730389025"/>2.3.<text:span text:style-name="T466">3</text:span>. <text:span text:style-name="T473">Focusing the </text:span>Language <text:span text:style-name="T473">Lens</text:span><text:bookmark-end text:name="__RefHeading___Toc42222_730389025"/></text:h>
      <text:p text:style-name="P178">Before the GitGalaxy pipeline can apply its mechanical stripping families or calculate the physics of Star Mass, it must perform a comprehensive <text:span text:style-name="Strong_20_Emphasis"><text:span text:style-name="T195">Entity Census</text:span></text:span>. This phase is responsible for assigning a unique <text:span text:style-name="Source_20_Text">lang_id</text:span> to every artifact in the repository. The process is designed to be "Signal-First," meaning it seeks the most computationally inexpensive evidence of identity before committing to deep-packet inspection of the file content. <text:span text:style-name="T465">The language lens</text:span> doesn’t assess facts; it <text:span text:style-name="T2">assesses</text:span> <text:span text:style-name="T2">evidence</text:span> <text:span text:style-name="T2">to build a confidence score for every file</text:span>. We use standard info (file extensions, shebangs), context from the user (file paths, READMEs, package.json, etc.), and expected syntax density to assess if our designation was correct. <text:span text:style-name="T2">We live in a world where we can no longer assume a file’s language based on its extension; that is just one AI hallucination away from disaster. </text:span>By <text:span text:style-name="T465">connecting an identification with </text:span>a confidence identity at the start of the pipeline, <text:span text:style-name="T466">we can analyze the data and use both comparative population statistics for the whole repo along with our confidence score to decide if the evidence matched with our prediction. If not, </text:span><text:span text:style-name="T23">we </text:span><text:span text:style-name="T24">banish</text:span><text:span text:style-name="T23"> those files into the singularity of ambiguity</text:span><text:span text:style-name="T466"> at the center of the galaxy for easy identification.</text:span></text:p>
      <text:h text:style-name="P174" text:outline-level="5"><text:bookmark-start text:name="__RefHeading___Toc49719_1155106909"/>2.3.3.A. The Bayesian Engine: Prediction vs. Audit<text:bookmark-end text:name="__RefHeading___Toc49719_1155106909"/></text:h>
      <text:p text:style-name="P178">In the era of AI-generated code and automated refactoring, single-point metadata is no longer a source of absolute truth. The Language Lens operates on a Bayesian model of <text:span text:style-name="Strong_20_Emphasis">Contextual Convergence</text:span>, treating every repository as a "noisy" environment where the true identity of a file is hidden behind metadata that can be outdated or misleading. This strategy relies on a two-part handshake between individual file signals and population-level statistics.</text:p>
      <text:list text:style-name="L129">
        <text:list-item>
          <text:p text:style-name="P341"><text:span text:style-name="Strong_20_Emphasis">The Prediction (The Prior):</text:span> Every file in the repository begins its journey at a baseline of near-zero confidence. It is a "Dark Matter" artifact until it begins to present signals to the telescope. Before scanning a single line of code, the lens receives an "Intelligence Briefing" from the GuideStar Lens which updates this initial prior based on external context. This includes roadmap status, folder bias, and user-priority flags. We treat every piece of metadata—whether it is a file <text:soft-page-break/>extension, a shebang, or a manifest entry—not as an absolute fact, but as a "claim" or a "signal." We are not just identifying a language; we are stating a Bayesian hypothesis: <text:span text:style-name="Emphasis">"Based on the signals presented (e.g., Folder: /bin, Extension: .py), I predict this file is Python with 80% certainty."</text:span> This prediction serves as the foundation for the file's "Right to be Code," setting the initial skepticism threshold.</text:p>
        </text:list-item>
        <text:list-item>
          <text:p text:style-name="P341"><text:span text:style-name="Strong_20_Emphasis">The Population Audit (The Evidence):</text:span> The strategy moves from the individual to the collective. Once the Lens has made predictions for the entire repository, the <text:span text:style-name="Strong_20_Emphasis">Spectral Auditor</text:span> (Phase 7) aggregates the regex hits—the "user intent" signals—across the entire population of files sharing a predicted language. By analyzing the group as a whole, the Auditor establishes a statistical "Linguistic Baseline" (Median Intent Density).</text:p>
        </text:list-item>
        <text:list-item>
          <text:p text:style-name="P341"><text:span text:style-name="Strong_20_Emphasis">Outlier Assessment:</text:span> This is where the prediction is held to account. The Auditor asks: <text:span text:style-name="Emphasis">"Does this individual file act like its peers?"</text:span> If a file has a <text:span text:style-name="Strong_20_Emphasis">0.95 Convergent Lock</text:span> (Prediction) but displays an "Intent Density" that is a statistical outlier compared to the rest of the Python population in that specific codebase, the focus is lost. This level of scrutiny requires a population of files to function; it uses the "wisdom of the codebase" to detect "Hollow Stars"—artifacts that have the right metadata but lacks the structural integrity found in the rest of the project.</text:p>
        </text:list-item>
      </text:list>
      <text:h text:style-name="P174" text:outline-level="5"><text:bookmark-start text:name="__RefHeading___Toc49721_1155106909"/>2.3.3.B. The Three-Stage Scanning Sequence<text:bookmark-end text:name="__RefHeading___Toc49721_1155106909"/></text:h>
      <text:p text:style-name="P178">To maximize performance and accuracy, the telescope processes the repository in a deliberate sequence:</text:p>
      <text:list text:style-name="L130">
        <text:list-item>
          <text:p text:style-name="P342"><text:span text:style-name="Strong_20_Emphasis">Standard Identification:</text:span> The Lens first processes files with clear extensions. These are "Known Entities" where the extension provides a strong initial signal, though they remain subject to spectral verification. When <text:span text:style-name="T468">the language_lens</text:span> identifies a file, it attaches a <text:span text:style-name="Strong_20_Emphasis">Data Vector</text:span> to the file's metadata. This vector contains the predicted <text:span text:style-name="Source_20_Text">lang_id</text:span>, the <text:span text:style-name="Source_20_Text">prior_confidence</text:span>, and the <text:span text:style-name="Source_20_Text">source_proof</text:span>.</text:p>
        </text:list-item>
        <text:list-item>
          <text:p text:style-name="P342"><text:span text:style-name="Strong_20_Emphasis">Context-Enhanced Scanning:</text:span> The Lens then focuses on the subset of files identified by the <text:span text:style-name="Strong_20_Emphasis">GuideStar Lens</text:span>. These carry an "Updated Prior" because they were explicitly mentioned in the README, manifests, or project folders.</text:p>
        </text:list-item>
        <text:list-item>
          <text:p text:style-name="P342"><text:span text:style-name="Strong_20_Emphasis">Remnant Discovery (Deep Space):</text:span> Finally, the system assesses the remaining extensionless files that had no updated prior. These start with a base confidence <text:soft-page-break/>of <text:span text:style-name="Strong_20_Emphasis">0.10</text:span> and must overcome the most rigorous spectral floor to be brought into focus.</text:p>
        </text:list-item>
      </text:list>
      <text:h text:style-name="P174" text:outline-level="5"><text:bookmark-start text:name="__RefHeading___Toc49723_1155106909"/>2.3.3.C. The Trust Matrix: Multi-Signal Verification<text:bookmark-end text:name="__RefHeading___Toc49723_1155106909"/></text:h>
      <text:p text:style-name="P178">GitGalaxy adopts a rigorous "Hot Take" on identity: <text:span text:style-name="Strong_20_Emphasis">True confidence requires convergence.</text:span> In the AI era, a single metadata signature (like an extension alone) is merely a "claim," not a "fact." Unless two or more independent signals agree, the system maintains a "Skepticism Ceiling" of 0.80.</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77">Tier</text:p>
          </table:table-cell>
          <table:table-cell table:style-name="Table39.A1" office:value-type="string">
            <text:p text:style-name="P177">Category</text:p>
          </table:table-cell>
          <table:table-cell table:style-name="Table39.A1" office:value-type="string">
            <text:p text:style-name="P177">Evidence Required</text:p>
          </table:table-cell>
          <table:table-cell table:style-name="Table39.A1" office:value-type="string">
            <text:p text:style-name="P177">Confidence</text:p>
          </table:table-cell>
          <table:table-cell table:style-name="Table39.A1" office:value-type="string">
            <text:p text:style-name="P177">Operational Logic</text:p>
          </table:table-cell>
        </table:table-row>
        <table:table-row>
          <table:table-cell table:style-name="Table39.A1" office:value-type="string">
            <text:p text:style-name="P176"><text:span text:style-name="Strong_20_Emphasis">0</text:span></text:p>
          </table:table-cell>
          <table:table-cell table:style-name="Table39.A1" office:value-type="string">
            <text:p text:style-name="P176"><text:span text:style-name="Strong_20_Emphasis">Convergent Lock</text:span></text:p>
          </table:table-cell>
          <table:table-cell table:style-name="Table39.A1" office:value-type="string">
            <text:p text:style-name="P176">Dual Evidence (e.g. Ext + Shebang)</text:p>
          </table:table-cell>
          <table:table-cell table:style-name="Table39.A1" office:value-type="string">
            <text:p text:style-name="P176"><text:span text:style-name="Strong_20_Emphasis">0.95</text:span></text:p>
          </table:table-cell>
          <table:table-cell table:style-name="Table39.A1" office:value-type="string">
            <text:p text:style-name="P176"><text:span text:style-name="Strong_20_Emphasis">Verified Identity:</text:span> Two independent signals match. The system has achieved perfect focus.</text:p>
          </table:table-cell>
        </table:table-row>
        <table:table-row>
          <table:table-cell table:style-name="Table39.A1" office:value-type="string">
            <text:p text:style-name="P176"><text:span text:style-name="Strong_20_Emphasis">1</text:span></text:p>
          </table:table-cell>
          <table:table-cell table:style-name="Table39.A1" office:value-type="string">
            <text:p text:style-name="P176"><text:span text:style-name="Strong_20_Emphasis">Roadmap Lock</text:span></text:p>
          </table:table-cell>
          <table:table-cell table:style-name="Table39.A1" office:value-type="string">
            <text:p text:style-name="P176">Aligned Reference (Manifest)</text:p>
          </table:table-cell>
          <table:table-cell table:style-name="Table39.A1" office:value-type="string">
            <text:p text:style-name="P176"><text:span text:style-name="Strong_20_Emphasis">0.90</text:span></text:p>
          </table:table-cell>
          <table:table-cell table:style-name="Table39.A1" office:value-type="string">
            <text:p text:style-name="P176"><text:span text:style-name="Strong_20_Emphasis">Authoritative Proof:</text:span> The project's own build system (Makefile/package.json) defines the file.</text:p>
          </table:table-cell>
        </table:table-row>
        <table:table-row>
          <table:table-cell table:style-name="Table39.A1" office:value-type="string">
            <text:p text:style-name="P176"><text:span text:style-name="Strong_20_Emphasis">2</text:span></text:p>
          </table:table-cell>
          <table:table-cell table:style-name="Table39.A1" office:value-type="string">
            <text:p text:style-name="P176"><text:span text:style-name="Strong_20_Emphasis">Single Signature</text:span></text:p>
          </table:table-cell>
          <table:table-cell table:style-name="Table39.A1" office:value-type="string">
            <text:p text:style-name="P176">Extension OR Shebang</text:p>
          </table:table-cell>
          <table:table-cell table:style-name="Table39.A1" office:value-type="string">
            <text:p text:style-name="P176"><text:span text:style-name="Strong_20_Emphasis">0.80</text:span></text:p>
          </table:table-cell>
          <table:table-cell table:style-name="Table39.A1" office:value-type="string">
            <text:p text:style-name="P176"><text:span text:style-name="Strong_20_Emphasis">Unverified Claim:</text:span> Single-point metadata is a suggestion. Requires mandatory spectral verification.</text:p>
          </table:table-cell>
        </table:table-row>
        <table:table-row>
          <table:table-cell table:style-name="Table39.A1" office:value-type="string">
            <text:p text:style-name="P176"><text:span text:style-name="Strong_20_Emphasis">3</text:span></text:p>
          </table:table-cell>
          <table:table-cell table:style-name="Table39.A1" office:value-type="string">
            <text:p text:style-name="P176"><text:span text:style-name="Strong_20_Emphasis">Contextual Proof</text:span></text:p>
          </table:table-cell>
          <table:table-cell table:style-name="Table39.A1" office:value-type="string">
            <text:p text:style-name="P176">README / Folder Bias</text:p>
          </table:table-cell>
          <table:table-cell table:style-name="Table39.A1" office:value-type="string">
            <text:p text:style-name="P176"><text:span text:style-name="Strong_20_Emphasis">0.</text:span><text:span text:style-name="Strong_20_Emphasis"><text:span text:style-name="T468">7</text:span></text:span><text:span text:style-name="Strong_20_Emphasis">5</text:span></text:p>
          </table:table-cell>
          <table:table-cell table:style-name="Table39.A1" office:value-type="string">
            <text:p text:style-name="P176"><text:span text:style-name="Strong_20_Emphasis">Suggested Intent:</text:span> Context suggests importance, but the language identity is still blurred.</text:p>
          </table:table-cell>
        </table:table-row>
        <table:table-row>
          <table:table-cell table:style-name="Table39.A1" office:value-type="string">
            <text:p text:style-name="P176"><text:span text:style-name="Strong_20_Emphasis">4</text:span></text:p>
          </table:table-cell>
          <table:table-cell table:style-name="Table39.A1" office:value-type="string">
            <text:p text:style-name="P176"><text:span text:style-name="Strong_20_Emphasis">Discovery</text:span></text:p>
          </table:table-cell>
          <table:table-cell table:style-name="Table39.A1" office:value-type="string">
            <text:p text:style-name="P176">Spectral Audit (Zero Context)</text:p>
          </table:table-cell>
          <table:table-cell table:style-name="Table39.A1" office:value-type="string">
            <text:p text:style-name="P176"><text:span text:style-name="Strong_20_Emphasis">0.10</text:span></text:p>
          </table:table-cell>
          <table:table-cell table:style-name="Table39.A1" office:value-type="string">
            <text:p text:style-name="P176"><text:span text:style-name="Strong_20_Emphasis">Deep Space Mystery:</text:span> No roadmap or extension. Must pass a rigorous <text:span text:style-name="Strong_20_Emphasis">0.92 floor</text:span> to be acknowledged.</text:p>
          </table:table-cell>
        </table:table-row>
      </table:table>
      <text:p text:style-name="P178"/>
      <text:h text:style-name="P174" text:outline-level="5"><text:bookmark-start text:name="__RefHeading___Toc42228_730389025 Copy 1"/>2.3.<text:span text:style-name="T467">3</text:span>.<text:span text:style-name="T482">D</text:span>. <text:span text:style-name="T482">What banishment to the Singularity actually does</text:span><text:bookmark-end text:name="__RefHeading___Toc42228_730389025 Copy 1"/></text:h>
      <text:p text:style-name="P178">By <text:span text:style-name="T482">employing threshold of evidence for language determination and location for failed files to reside</text:span>, GitGalaxy effectively eliminates <text:span text:style-name="T27">Language</text:span><text:span text:style-name="T482"> </text:span><text:span text:style-name="Strong_20_Emphasis">Identity </text:span><text:span text:style-name="Strong_20_Emphasis"><text:span text:style-name="T482">False Positives</text:span></text:span>. By "throwing in the towel" and using the <text:span text:style-name="Strong_20_Emphasis">Singularity </text:span><text:span text:style-name="Strong_20_Emphasis"><text:span text:style-name="T461">of Ambiguity</text:span></text:span>, the system achieves near <text:span text:style-name="Strong_20_Emphasis">99%+ cumulative accuracy</text:span> for the files it <text:span text:style-name="Emphasis">does</text:span> analyze. This changes the core utility of the map from an "Estimated Projection" to a "Verified Model," where every star's mass and risk scale is based on <text:span text:style-name="T482">traceable</text:span> <text:span text:style-name="T482">lines of evidence</text:span> rather than probabilistic guesswork. <text:span text:style-name="T482">After the spectral audit is completed later on in the pipeline, we will have two or three corroborating pieces of evidence for a file’s specific language. </text:span></text:p>
      <text:h text:style-name="P156" text:outline-level="5"><text:bookmark-start text:name="__RefHeading___Toc42735_1155106909 Copy 1"/><text:soft-page-break/>2.3.<text:span text:style-name="T467">3</text:span>.<text:span text:style-name="T482">E</text:span>. How we handle files that switch languages part way through<text:bookmark-end text:name="__RefHeading___Toc42735_1155106909 Copy 1"/></text:h>
      <text:p text:style-name="P178"><text:span text:style-name="T466">M</text:span><text:span text:style-name="T462">any </text:span><text:span text:style-name="T466">files </text:span><text:span text:style-name="T462">are multi-language. Regex is great for handling this. As every language shift employs specific “keywords” we can scan for them and shift our regex language lens mid-</text:span>file (e.g., JavaScript inside HTML, or SQL inside Python). To <text:span text:style-name="T462">see the complexity of modern code,</text:span> the engine implements <text:span text:style-name="T22">Mid-File </text:span><text:span text:style-name="Strong_20_Emphasis">Language Sliding. </text:span></text:p>
      <text:h text:style-name="P175" text:outline-level="6"><text:bookmark-start text:name="__RefHeading___Toc42737_1155106909 Copy 1"/>2.3.<text:span text:style-name="T467">3</text:span>.<text:span text:style-name="T482">E</text:span>.1. The Handshake Protocol (Detection)<text:bookmark-end text:name="__RefHeading___Toc42737_1155106909 Copy 1"/></text:h>
      <text:p text:style-name="P178">As the engine processes the logic stream, it monitors for <text:span text:style-name="Strong_20_Emphasis">Linguistic Handshakes</text:span>. These are specific tokens that broadcast a transition into a secondary spectrum, signaling the detector to swap its "Regex Lens" and define the boundaries of the secondary star.</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177">Linguistic Transition (X -&gt; Y)</text:p>
          </table:table-cell>
          <table:table-cell table:style-name="Table45.A1" office:value-type="string">
            <text:p text:style-name="P177">Start Marker (Trigger)</text:p>
          </table:table-cell>
          <table:table-cell table:style-name="Table45.A1" office:value-type="string">
            <text:p text:style-name="P177">End Trigger</text:p>
          </table:table-cell>
          <table:table-cell table:style-name="Table45.A1" office:value-type="string">
            <text:p text:style-name="P177">Assessment Logic</text:p>
          </table:table-cell>
        </table:table-row>
        <table:table-row>
          <table:table-cell table:style-name="Table45.A1" office:value-type="string">
            <text:p text:style-name="P176"><text:span text:style-name="Strong_20_Emphasis">HTML </text:span><text:span text:style-name="Strong_20_Emphasis"><text:span text:style-name="T469">to</text:span></text:span> <text:span text:style-name="Strong_20_Emphasis">JavaScript</text:span></text:p>
          </table:table-cell>
          <table:table-cell table:style-name="Table45.A1" office:value-type="string">
            <text:p text:style-name="P176"><text:span text:style-name="Source_20_Text">&lt;script</text:span></text:p>
          </table:table-cell>
          <table:table-cell table:style-name="Table45.A1" office:value-type="string">
            <text:p text:style-name="P176"><text:span text:style-name="Source_20_Text">&lt;/script&gt;</text:span></text:p>
          </table:table-cell>
          <table:table-cell table:style-name="Table45.A1" office:value-type="string">
            <text:p text:style-name="P176">Pause HTML; activate JS Registry.</text:p>
          </table:table-cell>
        </table:table-row>
        <table:table-row>
          <table:table-cell table:style-name="Table45.A1" office:value-type="string">
            <text:p text:style-name="P176"><text:span text:style-name="Strong_20_Emphasis">HTML</text:span> <text:span text:style-name="T469">to </text:span><text:span text:style-name="Strong_20_Emphasis">CSS</text:span></text:p>
          </table:table-cell>
          <table:table-cell table:style-name="Table45.A1" office:value-type="string">
            <text:p text:style-name="P176"><text:span text:style-name="Source_20_Text">&lt;style</text:span></text:p>
          </table:table-cell>
          <table:table-cell table:style-name="Table45.A1" office:value-type="string">
            <text:p text:style-name="P176"><text:span text:style-name="Source_20_Text">&lt;/style&gt;</text:span></text:p>
          </table:table-cell>
          <table:table-cell table:style-name="Table45.A1" office:value-type="string">
            <text:p text:style-name="P176">Pause HTML; activate CSS Registry.</text:p>
          </table:table-cell>
        </table:table-row>
        <table:table-row>
          <table:table-cell table:style-name="Table45.A1" office:value-type="string">
            <text:p text:style-name="P176"><text:span text:style-name="Strong_20_Emphasis">Any Logic</text:span> <text:span text:style-name="T469">to </text:span><text:span text:style-name="Strong_20_Emphasis">SQLite</text:span></text:p>
          </table:table-cell>
          <table:table-cell table:style-name="Table45.A1" office:value-type="string">
            <text:p text:style-name="P176"><text:span text:style-name="Source_20_Text">SELECT\s+.*\s+FROM</text:span></text:p>
          </table:table-cell>
          <table:table-cell table:style-name="Table45.A1" office:value-type="string">
            <text:p text:style-name="P176"><text:span text:style-name="Source_20_Text">["']</text:span> (String End)</text:p>
          </table:table-cell>
          <table:table-cell table:style-name="Table45.A1" office:value-type="string">
            <text:p text:style-name="P176">Scan segment with SQL registry.</text:p>
          </table:table-cell>
        </table:table-row>
        <table:table-row>
          <table:table-cell table:style-name="Table45.A1" office:value-type="string">
            <text:p text:style-name="P176"><text:span text:style-name="Strong_20_Emphasis">Config</text:span> <text:span text:style-name="T469">to </text:span><text:span text:style-name="Strong_20_Emphasis">Shell</text:span></text:p>
          </table:table-cell>
          <table:table-cell table:style-name="Table45.A1" office:value-type="string">
            <text:p text:style-name="P176"><text:span text:style-name="Source_20_Text">RUN\s+</text:span> | <text:span text:style-name="Source_20_Text">script:</text:span></text:p>
          </table:table-cell>
          <table:table-cell table:style-name="Table45.A1" office:value-type="string">
            <text:p text:style-name="P176">De-indentation | <text:span text:style-name="Source_20_Text">\n</text:span></text:p>
          </table:table-cell>
          <table:table-cell table:style-name="Table45.A1" office:value-type="string">
            <text:p text:style-name="P176">Switch to Shell for the block.</text:p>
          </table:table-cell>
        </table:table-row>
        <table:table-row>
          <table:table-cell table:style-name="Table45.A1" office:value-type="string">
            <text:p text:style-name="P176"><text:span text:style-name="Strong_20_Emphasis">Systems</text:span> <text:span text:style-name="T469">to </text:span><text:span text:style-name="Strong_20_Emphasis">Assembly</text:span></text:p>
          </table:table-cell>
          <table:table-cell table:style-name="Table45.A1" office:value-type="string">
            <text:p text:style-name="P176"><text:span text:style-name="Source_20_Text">asm!\\(</text:span> | <text:span text:style-name="Source_20_Text">__asm__</text:span></text:p>
          </table:table-cell>
          <table:table-cell table:style-name="Table45.A1" office:value-type="string">
            <text:p text:style-name="P176"><text:span text:style-name="Strong_20_Emphasis">Balanced Scoping</text:span></text:p>
          </table:table-cell>
          <table:table-cell table:style-name="Table45.A1" office:value-type="string">
            <text:p text:style-name="P176">Switch to Assembly for logic block.</text:p>
          </table:table-cell>
        </table:table-row>
      </table:table>
      <text:p text:style-name="P178"/>
      <text:h text:style-name="P175" text:outline-level="6"><text:bookmark-start text:name="__RefHeading___Toc42739_1155106909 Copy 1"/>2.3.<text:span text:style-name="T467">3</text:span>.<text:span text:style-name="T482">E</text:span>.2. The Fluid State Counter (Language Sliding)<text:bookmark-end text:name="__RefHeading___Toc42739_1155106909 Copy 1"/></text:h>
      <text:p text:style-name="P178">Because the <text:span text:style-name="T469">40+ </text:span><text:span text:style-name="T466">regex </text:span>key schema is standardized across all languages, the results dictionary acts as a <text:span text:style-name="Strong_20_Emphasis">Universal Vessel</text:span>. This allows for "Fluid State" counting:</text:p>
      <text:list text:style-name="L131">
        <text:list-item>
          <text:p text:style-name="P343"><text:span text:style-name="Strong_20_Emphasis">Lens Swapping:</text:span> When a handshake is detected, the engine pauses the primary registry and activates the secondary registry.</text:p>
        </text:list-item>
        <text:list-item>
          <text:p text:style-name="P343"><text:span text:style-name="Strong_20_Emphasis">Bucket Continuation:</text:span> Hits in the secondary language feed the <text:span text:style-name="Strong_20_Emphasis">same </text:span><text:span text:style-name="Strong_20_Emphasis"><text:span text:style-name="T466">regex</text:span></text:span><text:span text:style-name="Strong_20_Emphasis"> buckets</text:span> as the primary language. For example, an <text:span text:style-name="Source_20_Text">if</text:span> statement in an embedded JS block increments the same <text:span text:style-name="Source_20_Text">branch</text:span> counter that the parent HTML tags were previously feeding.</text:p>
        </text:list-item>
        <text:list-item>
          <text:p text:style-name="P343"><text:soft-page-break/><text:span text:style-name="Strong_20_Emphasis">Fidelity Handover:</text:span> The <text:span text:style-name="Strong_20_Emphasis">Fidelity Coefficient (Fc)</text:span> and <text:span text:style-name="Strong_20_Emphasis">Implicit Risk (Irc)</text:span> parameters are swapped dynamically to reflect the trust levels of the active segment (e.g., switching from Tier 3 HTML trust to Tier 2 JS trust mid-file).</text:p>
        </text:list-item>
      </text:list>
      <text:h text:style-name="P175" text:outline-level="6"><text:bookmark-start text:name="__RefHeading___Toc42741_1155106909 Copy 1"/>2.3.<text:span text:style-name="T467">3</text:span>.<text:span text:style-name="T482">E</text:span>.3. The Polyglot Advantage<text:bookmark-end text:name="__RefHeading___Toc42741_1155106909 Copy 1"/></text:h>
      <text:p text:style-name="P178">This fluid transition ensures that <text:span text:style-name="T463">regex can switch languages with the user</text:span>. Without Language Sliding, a file that is 50% <text:span text:style-name="T464">HTML</text:span> and 50% <text:span text:style-name="T464">javascript</text:span> would appear <text:span text:style-name="T464">falsely lower in exposure risk (false security)</text:span>. By sliding the focus, GitGalaxy captures the full <text:span text:style-name="T463">score</text:span> of the <text:span text:style-name="T463">file</text:span>, capturing every <text:span text:style-name="Source_20_Text">await</text:span>, <text:span text:style-name="Source_20_Text">fetch</text:span>, and <text:span text:style-name="Source_20_Text">try/catch</text:span> across linguistic boundaries with less than 5% extra compute overhead. <text:span text:style-name="T464">Note, this version does not offer triple nested language recognition at this point. </text:span></text:p>
      <text:h text:style-name="P175" text:outline-level="6"><text:bookmark-start text:name="__RefHeading___Toc42743_1155106909 Copy 1"/>2.3.<text:span text:style-name="T467">3</text:span>.<text:span text:style-name="T482">E</text:span>.4. Scoping Integrity (The Termination Logic)<text:bookmark-end text:name="__RefHeading___Toc42743_1155106909 Copy 1"/></text:h>
      <text:p text:style-name="P178">To prevent premature lens-swapping—particularly in complex, multi-line Assembly or Logic-to-SQL shifts—the engine employs <text:span text:style-name="Strong_20_Emphasis">Balanced Scoping</text:span>. Instead of stopping at the first closing character, the detector maintains a "Handshake Stack."</text:p>
      <text:list text:style-name="L132">
        <text:list-item>
          <text:p text:style-name="P344"><text:span text:style-name="Strong_20_Emphasis">Balanced Pairs:</text:span> For triggers using braces <text:span text:style-name="Source_20_Text">{}</text:span> or parentheses <text:span text:style-name="Source_20_Text">()</text:span>, the engine tracks the nesting depth. The lens only reverts to the primary spectrum when the stack depth returns to zero.</text:p>
        </text:list-item>
        <text:list-item>
          <text:p text:style-name="P344"><text:span text:style-name="Strong_20_Emphasis">Heuristic Confidence:</text:span> In ambiguous scenarios (like SQL embedded in dynamic strings), the engine uses a <text:span text:style-name="Strong_20_Emphasis">Logic Anchor Check</text:span>. If the scanner encounters the end-trigger but the next few tokens significantly deviate from the primary language’s frequency, it maintains the focus until a higher-confidence "Safe Exit" is found.</text:p>
        </text:list-item>
      </text:list>
      <text:h text:style-name="P174" text:outline-level="5"><text:bookmark-start text:name="__RefHeading___Toc49725_1155106909 Copy 1"/>2.3.3.<text:span text:style-name="T482">F</text:span>. Determinism and Inventory Integrity<text:bookmark-end text:name="__RefHeading___Toc49725_1155106909 Copy 1"/></text:h>
      <text:p text:style-name="P178">For enterprise file inventory management, the Language Lens provides a fundamentally <text:span text:style-name="Strong_20_Emphasis">deterministic and repeatable</text:span> framework. Unlike "black-box" AI models that might return varying results based on floating-point drift or model versioning, GitGalaxy's Bayesian engine is anchored in traceable linguistic physics.</text:p>
      <text:list text:style-name="L133">
        <text:list-item>
          <text:p text:style-name="P345"><text:span text:style-name="Strong_20_Emphasis">Absolute Repeatability:</text:span> The same file, scanned under the same Roadmap context, will <text:span text:style-name="Emphasis">always</text:span> yield the exact same Identity Lock and Confidence Score. This level of consistency is vital for security compliance and Software Bill of Materials (SBOM) generation, ensuring that inventory lists do not fluctuate during repeated scans of static repositories.</text:p>
        </text:list-item>
        <text:list-item>
          <text:p text:style-name="P345"><text:soft-page-break/><text:span text:style-name="Strong_20_Emphasis">Traceable Inventory Logic:</text:span> Every identification <text:span text:style-name="T467">could be</text:span> accompanied by its "Lock Tier" (0–4). This <text:span text:style-name="T467">could </text:span>provide a forensic audit trail for every artifact in the galaxy. If a script is flagged as Python, the user can see precisely why (e.g., "Tier 1: Roadmap Lock via package.json"). This transparency allows inventory managers to distinguish between "Contextual Certainty" and "Spectral Discovery," enabling high-integrity auditing of the codebase.</text:p>
        </text:list-item>
      </text:list>
      <text:h text:style-name="Heading_20_6" text:outline-level="6"/>
      <text:h text:style-name="P172" text:outline-level="4"><text:bookmark-start text:name="__RefHeading___Toc44088_2214491331"/><text:span text:style-name="Strong_20_Emphasis">2.3.4. The Prism – Splitting the comments from the code</text:span><text:bookmark-end text:name="__RefHeading___Toc44088_2214491331"/></text:h>
      <text:p text:style-name="Text_20_body">Following the successful completion of the language identification, the engine performs a <text:span text:style-name="Strong_20_Emphasis">Structural Refraction</text:span>—splitting a single source file into two mutually exclusive streams: the <text:span text:style-name="Source_20_Text">code_stream</text:span> (Active Matter) and the <text:span text:style-name="Source_20_Text">comment_stream</text:span> (Ghost Mass).</text:p>
      <text:p text:style-name="Text_20_body">This phase is critical for preventing <text:span text:style-name="Strong_20_Emphasis">"Logic Erosion,"</text:span> where documentation or URLs inside strings might otherwise inflate the perceived mass or branching density of the star. The split is a non-destructive, dual-capture process that allows the system to analyze the skeleton of the code and the spirit of the documentation independently.</text:p>
      <text:h text:style-name="Heading_20_5" text:outline-level="5"><text:bookmark-start text:name="__RefHeading___Toc44090_2214491331"/>2.3.4.A. The Refraction Mechanics (The Prism Protocol)<text:bookmark-end text:name="__RefHeading___Toc44090_2214491331"/></text:h>
      <text:p text:style-name="Text_20_body">The refraction process relies on the linguistic parameters established by the Language Lens. By operating on verified signals, the Prism eliminates the "Neighborhood Guessing" common in standard scanners, achieving near-perfect accuracy in its separation of code from comments.</text:p>
      <text:h text:style-name="Heading_20_6" text:outline-level="6"><text:bookmark-start text:name="__RefHeading___Toc44092_2214491331"/>2.3.4.A.1. Verified Hand-off &amp; Singularity Bypass<text:bookmark-end text:name="__RefHeading___Toc44092_2214491331"/></text:h>
      <text:p text:style-name="Text_20_body">The Optical Splitter is the primary "Refraction Gate" in the physics pipeline. It relies on the Language Lens to provide the validated <text:span text:style-name="Source_20_Text">lang_id</text:span> and <text:span text:style-name="Source_20_Text">lexical_family</text:span> required for a clean split.</text:p>
      <text:list text:style-name="L134">
        <text:list-item>
          <text:p text:style-name="P346"><text:span text:style-name="Strong_20_Emphasis">The Singularity Bypass:</text:span> Any file identified as <text:span text:style-name="Source_20_Text">undeterminable</text:span>, <text:span text:style-name="Source_20_Text">plaintext</text:span>, or <text:span text:style-name="Source_20_Text">unknown</text:span> (falling below the 90% confidence floor) bypasses the split entirely. These files are relegated to the <text:span text:style-name="Strong_20_Emphasis">Singularity Orb</text:span> as unrefracted "Dark Matter," where 100% of their content is treated as active logic to ensure no potentially vital signals are lost.</text:p>
        </text:list-item>
        <text:list-item>
          <text:p text:style-name="P346"><text:span text:style-name="Strong_20_Emphasis">Family-Driven Routing:</text:span> The splitter receives a direct mechanical key from the <text:span text:style-name="Source_20_Text">COMMENT_DEFINITIONS</text:span>. This allows the engine to load the specific "Prism" (the regex protection matrix) instantly without re-scanning for identity markers.</text:p>
        </text:list-item>
      </text:list>
      <text:h text:style-name="Heading_20_6" text:outline-level="6"><text:bookmark-start text:name="__RefHeading___Toc44094_2214491331"/><text:soft-page-break/>2.3.4.A.2. The 8 Mechanical Families (COMMENT_DEFINITIONS)<text:bookmark-end text:name="__RefHeading___Toc44094_2214491331"/></text:h>
      <text:p text:style-name="Text_20_body">The engine utilizes a standardized execution matrix to route files based on their mechanical stripping requirement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95">ID</text:p>
          </table:table-cell>
          <table:table-cell table:style-name="Table36.A1" office:value-type="string">
            <text:p text:style-name="P95">Key</text:p>
          </table:table-cell>
          <table:table-cell table:style-name="Table36.A1" office:value-type="string">
            <text:p text:style-name="P95">Refraction Strategy</text:p>
          </table:table-cell>
          <table:table-cell table:style-name="Table36.A1" office:value-type="string">
            <text:p text:style-name="P95">Coverage</text:p>
          </table:table-cell>
        </table:table-row>
        <table:table-row>
          <table:table-cell table:style-name="Table36.A1" office:value-type="string">
            <text:p text:style-name="P94"><text:span text:style-name="Strong_20_Emphasis">1</text:span></text:p>
          </table:table-cell>
          <table:table-cell table:style-name="Table36.A1" office:value-type="string">
            <text:p text:style-name="P94"><text:span text:style-name="Strong_20_Emphasis">std_c</text:span></text:p>
          </table:table-cell>
          <table:table-cell table:style-name="Table36.A1" office:value-type="string">
            <text:p text:style-name="P94">Standard Line (<text:span text:style-name="Source_20_Text">//</text:span>) and Block (<text:span text:style-name="Source_20_Text">/* */</text:span>)</text:p>
          </table:table-cell>
          <table:table-cell table:style-name="Table36.A1" office:value-type="string">
            <text:p text:style-name="P94">JS, TS, Java, C#, C++, C, Go, Kotlin, Obj-C, Apex, Dart, CSS</text:p>
          </table:table-cell>
        </table:table-row>
        <table:table-row>
          <table:table-cell table:style-name="Table36.A1" office:value-type="string">
            <text:p text:style-name="P94"><text:span text:style-name="Strong_20_Emphasis">2</text:span></text:p>
          </table:table-cell>
          <table:table-cell table:style-name="Table36.A1" office:value-type="string">
            <text:p text:style-name="P94"><text:span text:style-name="Strong_20_Emphasis">nested_c</text:span></text:p>
          </table:table-cell>
          <table:table-cell table:style-name="Table36.A1" office:value-type="string">
            <text:p text:style-name="P94">Recursive "While-Peel" extraction for nested blocks</text:p>
          </table:table-cell>
          <table:table-cell table:style-name="Table36.A1" office:value-type="string">
            <text:p text:style-name="P94">Rust, Swift, Scala</text:p>
          </table:table-cell>
        </table:table-row>
        <table:table-row>
          <table:table-cell table:style-name="Table36.A1" office:value-type="string">
            <text:p text:style-name="P94"><text:span text:style-name="Strong_20_Emphasis">3</text:span></text:p>
          </table:table-cell>
          <table:table-cell table:style-name="Table36.A1" office:value-type="string">
            <text:p text:style-name="P94"><text:span text:style-name="Strong_20_Emphasis">pure_hash</text:span></text:p>
          </table:table-cell>
          <table:table-cell table:style-name="Table36.A1" office:value-type="string">
            <text:p text:style-name="P94">Single-pass hash (<text:span text:style-name="Source_20_Text">#</text:span>) extraction</text:p>
          </table:table-cell>
          <table:table-cell table:style-name="Table36.A1" office:value-type="string">
            <text:p text:style-name="P94">Python, MicroPython, Shell, AGC, Dockerfile, Makefile</text:p>
          </table:table-cell>
        </table:table-row>
        <table:table-row>
          <table:table-cell table:style-name="Table36.A1" office:value-type="string">
            <text:p text:style-name="P94"><text:span text:style-name="Strong_20_Emphasis">4</text:span></text:p>
          </table:table-cell>
          <table:table-cell table:style-name="Table36.A1" office:value-type="string">
            <text:p text:style-name="P94"><text:span text:style-name="Strong_20_Emphasis">hybrid_hash</text:span></text:p>
          </table:table-cell>
          <table:table-cell table:style-name="Table36.A1" office:value-type="string">
            <text:p text:style-name="P94">Hash line + Custom blocks (<text:span text:style-name="Source_20_Text">&lt;#</text:span>, <text:span text:style-name="Source_20_Text">=pod</text:span>)</text:p>
          </table:table-cell>
          <table:table-cell table:style-name="Table36.A1" office:value-type="string">
            <text:p text:style-name="P94">PowerShell, Perl, Ruby</text:p>
          </table:table-cell>
        </table:table-row>
        <table:table-row>
          <table:table-cell table:style-name="Table36.A1" office:value-type="string">
            <text:p text:style-name="P94"><text:span text:style-name="Strong_20_Emphasis">5</text:span></text:p>
          </table:table-cell>
          <table:table-cell table:style-name="Table36.A1" office:value-type="string">
            <text:p text:style-name="P94"><text:span text:style-name="Strong_20_Emphasis">hybrid_dash</text:span></text:p>
          </table:table-cell>
          <table:table-cell table:style-name="Table36.A1" office:value-type="string">
            <text:p text:style-name="P94">Double-dash (<text:span text:style-name="Source_20_Text">--</text:span>) + Unique blocks (<text:span text:style-name="Source_20_Text">{-</text:span>)</text:p>
          </table:table-cell>
          <table:table-cell table:style-name="Table36.A1" office:value-type="string">
            <text:p text:style-name="P94">SQL, Lua, Haskell</text:p>
          </table:table-cell>
        </table:table-row>
        <table:table-row>
          <table:table-cell table:style-name="Table36.A1" office:value-type="string">
            <text:p text:style-name="P94"><text:span text:style-name="Strong_20_Emphasis">6</text:span></text:p>
          </table:table-cell>
          <table:table-cell table:style-name="Table36.A1" office:value-type="string">
            <text:p text:style-name="P94"><text:span text:style-name="Strong_20_Emphasis">polyglot</text:span></text:p>
          </table:table-cell>
          <table:table-cell table:style-name="Table36.A1" office:value-type="string">
            <text:p text:style-name="P94">Multi-token extraction (<text:span text:style-name="Source_20_Text">//</text:span>, <text:span text:style-name="Source_20_Text">#</text:span>, <text:span text:style-name="Source_20_Text">/*</text:span>)</text:p>
          </table:table-cell>
          <table:table-cell table:style-name="Table36.A1" office:value-type="string">
            <text:p text:style-name="P94">PHP, LiveCode</text:p>
          </table:table-cell>
        </table:table-row>
        <table:table-row>
          <table:table-cell table:style-name="Table36.A1" office:value-type="string">
            <text:p text:style-name="P94"><text:span text:style-name="Strong_20_Emphasis">7</text:span></text:p>
          </table:table-cell>
          <table:table-cell table:style-name="Table36.A1" office:value-type="string">
            <text:p text:style-name="P94"><text:span text:style-name="Strong_20_Emphasis">positional</text:span></text:p>
          </table:table-cell>
          <table:table-cell table:style-name="Table36.A1" office:value-type="string">
            <text:p text:style-name="P94">Column-Anchored (Col 1/7) extraction</text:p>
          </table:table-cell>
          <table:table-cell table:style-name="Table36.A1" office:value-type="string">
            <text:p text:style-name="P94">COBOL, Fortran, ABAP</text:p>
          </table:table-cell>
        </table:table-row>
        <table:table-row>
          <table:table-cell table:style-name="Table36.A1" office:value-type="string">
            <text:p text:style-name="P94"><text:span text:style-name="Strong_20_Emphasis">8</text:span></text:p>
          </table:table-cell>
          <table:table-cell table:style-name="Table36.A1" office:value-type="string">
            <text:p text:style-name="P94"><text:span text:style-name="Strong_20_Emphasis">singular</text:span></text:p>
          </table:table-cell>
          <table:table-cell table:style-name="Table36.A1" office:value-type="string">
            <text:p text:style-name="P94">Unique markup/logic delimiters (<text:span text:style-name="Source_20_Text">&lt;!--</text:span>, <text:span text:style-name="Source_20_Text">;</text:span>)</text:p>
          </table:table-cell>
          <table:table-cell table:style-name="Table36.A1" office:value-type="string">
            <text:p text:style-name="P94">HTML, Assembly, Zig</text:p>
          </table:table-cell>
        </table:table-row>
      </table:table>
      <text:h text:style-name="Heading_20_6" text:outline-level="6"><text:bookmark-start text:name="__RefHeading___Toc44096_2214491331"/>2.3.4.A.3. The Integrated Protection Shields<text:bookmark-end text:name="__RefHeading___Toc44096_2214491331"/></text:h>
      <text:p text:style-name="Text_20_body">To preserve the mathematical integrity of the Logic Stream, the Prism implements surgical extraction via specialized hardware-level filters.</text:p>
      <text:list text:style-name="L135">
        <text:list-item>
          <text:p text:style-name="P347"><text:span text:style-name="Strong_20_Emphasis">The String Literal Shield:</text:span> The engine employs a Tier 1 <text:span text:style-name="Strong_20_Emphasis">Match-and-Bypass</text:span> regex. Sequence data (URLs, file paths, regex strings) caught by the shield are routed exclusively to the <text:span text:style-name="Source_20_Text">code_stream</text:span>. This prevents the engine from accidentally stripping a "comment marker" found inside a legitimate string (e.g., <text:span text:style-name="Source_20_Text">const url = "http://..."</text:span>).</text:p>
        </text:list-item>
        <text:list-item>
          <text:p text:style-name="P347"><text:span text:style-name="Strong_20_Emphasis">The Metadata Guard:</text:span> The first line of the file (metadata intent) is extracted and cached. Explicit guards for Shebangs (<text:span text:style-name="Source_20_Text">#!</text:span>), PHP tags (<text:span text:style-name="Source_20_Text">&lt;?php</text:span>), and XML headers (<text:span text:style-name="Source_20_Text">&lt;?xml</text:span>) ensure this "Metadata Logic" is re-attached to the <text:span text:style-name="Source_20_Text">code_stream</text:span> so downstream risk-scaling engines maintain execution context.</text:p>
        </text:list-item>
        <text:list-item>
          <text:p text:style-name="P347"><text:soft-page-break/><text:span text:style-name="Strong_20_Emphasis">Nested Recursion (While-Peel Loop):</text:span> For languages in the <text:span text:style-name="Source_20_Text">nested_c</text:span> family (Rust, Swift), the engine uses a programmatic loop to "peel" literature from the innermost layers outward. This prevents the "Regex Greedy" bug from collapsing valid logic that happens to sit between nested comment delimiters.</text:p>
        </text:list-item>
        <text:list-item>
          <text:p text:style-name="P347"><text:span text:style-name="Strong_20_Emphasis">Hardened Python Post-Processing:</text:span> Standalone triple-quoted blocks (<text:span text:style-name="Source_20_Text">"""</text:span> or <text:span text:style-name="Source_20_Text">'''</text:span>) are surgically identified and diverted to the Ghost Mass. This prevents large docstring blocks from inflating the <text:span text:style-name="Source_20_Text">coding_loc</text:span> metric.</text:p>
        </text:list-item>
      </text:list>
      <text:h text:style-name="Heading_20_6" text:outline-level="6"><text:bookmark-start text:name="__RefHeading___Toc44098_2214491331"/>2.3.4.A.4. Polyglot Partitioning &amp; Language Sliding<text:bookmark-end text:name="__RefHeading___Toc44098_2214491331"/></text:h>
      <text:p text:style-name="Text_20_body">Modern codebases frequently shift wavelengths mid-file. The Prism implements <text:span text:style-name="Strong_20_Emphasis">Mid-File Language Sliding</text:span> to maintain accuracy across linguistic boundaries.</text:p>
      <text:list text:style-name="L136">
        <text:list-item>
          <text:p text:style-name="P348"><text:span text:style-name="Strong_20_Emphasis">The Handshake Protocol:</text:span> The engine monitors for transitions (e.g., <text:span text:style-name="Source_20_Text">&lt;script&gt;</text:span>, <text:span text:style-name="Source_20_Text">asm!()</text:span>, or <text:span text:style-name="Source_20_Text">SELECT</text:span>). When a handshake is detected, the engine pauses the primary prism and activates the secondary spectrum's lens for that specific segment.</text:p>
        </text:list-item>
        <text:list-item>
          <text:p text:style-name="P348"><text:span text:style-name="Strong_20_Emphasis">Balanced Scoping:</text:span> For paired-bracket segments (like Assembly blocks or embedded SQL), the Prism tracks nesting depth via a <text:span text:style-name="Strong_20_Emphasis">Handshake Stack</text:span>. The lens only reverts to the primary spectrum when the stack depth returns to zero, preventing premature refraction termination.</text:p>
        </text:list-item>
        <text:list-item>
          <text:p text:style-name="P348"><text:span text:style-name="Strong_20_Emphasis">Optical Partitioning:</text:span> The file is split into distinct segments, each refracted using its native mechanical family, before being synthesized into the final dual-stream result.</text:p>
        </text:list-item>
      </text:list>
      <text:h text:style-name="Heading_20_6" text:outline-level="6"><text:bookmark-start text:name="__RefHeading___Toc44100_2214491331"/>2.3.4.A.5. Output Streams: The Dual-Mass Result<text:bookmark-end text:name="__RefHeading___Toc44100_2214491331"/></text:h>
      <text:p text:style-name="Text_20_body">The refraction results in two high-fidelity data channels that feed independent analysis tracks:</text:p>
      <text:list text:style-name="L137">
        <text:list-item>
          <text:p text:style-name="P349"><text:span text:style-name="Strong_20_Emphasis">code_stream (Active Matter):</text:span> This is the pure executable information of the file. It directly drives <text:span text:style-name="Strong_20_Emphasis">Meaningful LOC</text:span>, <text:span text:style-name="Strong_20_Emphasis">Branch Angle</text:span>, and <text:span text:style-name="Strong_20_Emphasis">Structural Flux</text:span>. Its integrity is guaranteed by the absolute removal of all documentation noise.</text:p>
        </text:list-item>
        <text:list-item>
          <text:p text:style-name="P349"><text:span text:style-name="Strong_20_Emphasis">comment_stream (Ghost Mass):</text:span> The literature of the project. It is scanned for Technical Debt markers (<text:span text:style-name="Source_20_Text">TODO</text:span>, <text:span text:style-name="Source_20_Text">HACK</text:span>), authorship, and compliance tags. It serves as the baseline for <text:span text:style-name="Strong_20_Emphasis">Trust Dampening</text:span>, measuring the delta between the logic's behavior and the author's stated intent.</text:p>
        </text:list-item>
      </text:list>
      <text:p text:style-name="P173"><text:span text:style-name="Strong_20_Emphasis"/></text:p>
      <text:h text:style-name="P163" text:outline-level="4"><text:soft-page-break/><text:span text:style-name="Strong_20_Emphasis"/></text:h>
      <text:h text:style-name="P163" text:outline-level="4"><text:bookmark-start text:name="__RefHeading___Toc44102_2214491331"/><text:span text:style-name="Strong_20_Emphasis">2.3.5. The Detector – The Logic Splicer &amp; Cartographer</text:span><text:bookmark-end text:name="__RefHeading___Toc44102_2214491331"/></text:h>
      <text:h text:style-name="Heading_20_5" text:outline-level="5"><text:bookmark-start text:name="__RefHeading___Toc44104_2214491331"/>2.3.5.A. Overview: The EMCCD Sensor &amp; Galactic Cartography<text:bookmark-end text:name="__RefHeading___Toc44104_2214491331"/></text:h>
      <text:p text:style-name="Text_20_body">The Primary Detector (implemented as the LogicSplicer class) acts as the instrument’s high-sensitivity EMCCD chip. Its objective is to capture discrete "photons" of intent—regex hits—from the incoming data stream. In the Strategy v6.3.0 Protocol, the detector is augmented by the Cartographer engine, which translates these logical signals into a deterministic 3D star map using Fractal Fibonacci geometry.</text:p>
      <text:h text:style-name="Heading_20_6" text:outline-level="6"><text:bookmark-start text:name="__RefHeading___Toc44106_2214491331"/>2.3.5.A.1. Hardware Role: The Signal Converter (detector.py)<text:bookmark-end text:name="__RefHeading___Toc44106_2214491331"/></text:h>
      <text:p text:style-name="Text_20_body">The Detector performs Spectral Resolution, receiving the code_stream and comment_stream to resolve the architecture into digital telemetry.</text:p>
      <text:list text:style-name="L138">
        <text:list-item>
          <text:p text:style-name="P350"><text:span text:style-name="Strong_20_Emphasis">Sensitivity Range:</text:span> Resolves up to 250 individual satellites (functional blocks) per file.</text:p>
        </text:list-item>
        <text:list-item>
          <text:p text:style-name="P350"><text:span text:style-name="Strong_20_Emphasis">Aperture Depth:</text:span> Tracks signal nesting up to 50 levels deep to prevent "Saturation Overflow" in high-density logic.</text:p>
        </text:list-item>
        <text:list-item>
          <text:p text:style-name="P350"><text:span text:style-name="Strong_20_Emphasis">Handshake Lookahead:</text:span> Scans up to 50,000 characters for polyglot script boundaries (e.g., &lt;script&gt;, asm!).</text:p>
        </text:list-item>
      </text:list>
      <text:h text:style-name="Heading_20_6" text:outline-level="6"><text:bookmark-start text:name="__RefHeading___Toc44108_2214491331"/>2.3.5.A.2. Pre-Processing Guardrails: The Singularity Bypass<text:bookmark-end text:name="__RefHeading___Toc44108_2214491331"/></text:h>
      <text:p text:style-name="Text_20_body">Before initiating structural physics, the instrument enforces a Custom Singularity Bypass. This rule rejects unverified artifacts to preserve compute resources while maintaining spectral inclusivity.</text:p>
      <text:h text:style-name="Heading_20_5" text:outline-level="5"><text:bookmark-start text:name="__RefHeading___Toc44110_2214491331"/>2.3.5.B. Sensory Mapping: The Charge-Coupled Registry<text:bookmark-end text:name="__RefHeading___Toc44110_2214491331"/></text:h>
      <text:p text:style-name="Text_20_body">To translate raw photon strikes into scientific data, the Detector utilizes a CORE_MAPPING registry. This serves as the instrument's "Analog-to-Digital Converter," mapping patterns into universal architectural categories.</text:p>
      <text:h text:style-name="Heading_20_6" text:outline-level="6"><text:bookmark-start text:name="__RefHeading___Toc44112_2214491331"/>2.3.5.B.1. The Spectral Categories (Core Mapping)<text:bookmark-end text:name="__RefHeading___Toc44112_2214491331"/></text:h>
      <text:p text:style-name="Text_20_body">The detector normalizes diverse language-specific rules into eight standardized buckets:</text:p>
      <text:list text:style-name="L139">
        <text:list-item>
          <text:p text:style-name="P351"><text:span text:style-name="Strong_20_Emphasis">Branching (branching -&gt; branch):</text:span> Decision-making photons (if/else, switch).</text:p>
        </text:list-item>
        <text:list-item>
          <text:p text:style-name="P351"><text:span text:style-name="Strong_20_Emphasis">I/O Operations (io_ops -&gt; io):</text:span> Data exchange signatures.</text:p>
        </text:list-item>
        <text:list-item>
          <text:p text:style-name="P351"><text:soft-page-break/><text:span text:style-name="Strong_20_Emphasis">Safety &amp; Danger (safety/danger):</text:span> Protective structures vs. high-risk execution zones.</text:p>
        </text:list-item>
        <text:list-item>
          <text:p text:style-name="P351"><text:span text:style-name="Strong_20_Emphasis">Temporal Flux (concurrency):</text:span> Non-deterministic waveforms (async, threads).</text:p>
        </text:list-item>
        <text:list-item>
          <text:p text:style-name="P351"><text:span text:style-name="Strong_20_Emphasis">Data Volatility (logic_flux -&gt; flux):</text:span> Rate of state change and variable mutation.</text:p>
        </text:list-item>
        <text:list-item>
          <text:p text:style-name="P351"><text:span text:style-name="Strong_20_Emphasis">Indentation Signatures:</text:span> Monitors indent_tabs and indent_spaces for style audits.</text:p>
        </text:list-item>
      </text:list>
      <text:h text:style-name="Heading_20_6" text:outline-level="6"><text:bookmark-start text:name="__RefHeading___Toc44114_2214491331"/>2.3.5.B.2. The Metadata Extraction Engine: Decoding comment_stream<text:bookmark-end text:name="__RefHeading___Toc44114_2214491331"/></text:h>
      <text:p text:style-name="Text_20_body">The _decode_comment_stream process performs Feature Extraction on the first 500 lines of the comment_stream.</text:p>
      <text:list text:style-name="L140">
        <text:list-item>
          <text:p text:style-name="P352"><text:span text:style-name="Strong_20_Emphasis">Ownership Attribution:</text:span> Uses the ownership regex to identify the "Architect."</text:p>
        </text:list-item>
        <text:list-item>
          <text:p text:style-name="P352"><text:span text:style-name="Strong_20_Emphasis">Purpose Documentation:</text:span> Employs a multi-pass buffer to capture meta_purpose_line and meta_purpose_block content.</text:p>
        </text:list-item>
      </text:list>
      <text:h text:style-name="Heading_20_6" text:outline-level="6"><text:bookmark-start text:name="__RefHeading___Toc44116_2214491331"/>2.3.5.B.3. The Atomic Literal Shield: Index-Aligned Shielding<text:bookmark-end text:name="__RefHeading___Toc44116_2214491331"/></text:h>
      <text:p text:style-name="Text_20_body">To prevent false structural triggers (e.g., a brace { inside a string), the instrument applies an Index-Aligned Shield. This replaces characters in strings and comments with blank spaces. Standard parsers often strip comments or strings, which collapses the file's index. Our "Index-Aligned" approach preserves the exact character offsets and newline counts. This is critical because the detector's telemetry relies on the original source code's physical geometry to accurately calculate Magnitude and Line of Code (LOC) metrics.</text:p>
      <text:h text:style-name="P163" text:outline-level="4"><text:bookmark-start text:name="__RefHeading___Toc44118_2214491331"/><text:span text:style-name="Strong_20_Emphasis">2.3.5.C. Structural Segmentation: The Five-Mode Optical Switch</text:span><text:bookmark-end text:name="__RefHeading___Toc44118_2214491331"/></text:h>
      <text:p text:style-name="Text_20_body">To prevent data collision and ensure accurate signal resolution, the Detector performs Heuristic Block Segmentation. The instrument dynamically adjusts its Integration Gates (The Five-Mode Switch) to match the specific structural signatures defined by the Language Lens.</text:p>
      <text:p text:style-name="Text_20_body"><text:span text:style-name="Strong_20_Emphasis">The "Why": Syntactic Physics</text:span> Programming languages have evolved through different "Syntactic Families." A brace-counting parser is physically incapable of correctly resolving a Python file. The Five-Mode Switch allows the detector to swap its internal segmentation hardware mid-flight, ensuring that polyglot repositories are resolved with zero scope leakage.</text:p>
      <text:h text:style-name="Heading_20_6" text:outline-level="6"><text:bookmark-start text:name="__RefHeading___Toc44120_2214491331"/><text:soft-page-break/>2.3.5.C.1. Integration Mode A: Greedy Label-Based Segmentation (_slice_by_labels)<text:bookmark-end text:name="__RefHeading___Toc44120_2214491331"/></text:h>
      <text:p text:style-name="Text_20_body">Used for flat, "low-frequency" materials like AGC Assembly or COBOL. It performs a Greedy Linear Scan for control-flow labels and subroutines.</text:p>
      <text:list text:style-name="L141">
        <text:list-item>
          <text:p text:style-name="P353"><text:span text:style-name="Strong_20_Emphasis">The Rule of Termination:</text:span> Unlike scoped languages, Mode A captures signal packets until it encounters a hard Block Termination Sequence from the <text:span text:style-name="Source_20_Text">assembly_returns</text:span> registry (e.g., TCF Q, GOBACK, RET).</text:p>
        </text:list-item>
        <text:list-item>
          <text:p text:style-name="P353"><text:span text:style-name="Strong_20_Emphasis">The Minimum Mass Rule:</text:span> Blocks with fewer than 2 lines are discarded as "Background Radiation" (noise).</text:p>
        </text:list-item>
      </text:list>
      <text:h text:style-name="Heading_20_6" text:outline-level="6"><text:bookmark-start text:name="__RefHeading___Toc44122_2214491331"/>2.3.5.C.2. Integration Mode B: Recursive Scope Analysis (_slice_by_braces)<text:bookmark-end text:name="__RefHeading___Toc44122_2214491331"/></text:h>
      <text:p text:style-name="Text_20_body">The standard capture mode for C-family wavelengths (JS, Java, C++).</text:p>
      <text:list text:style-name="L142">
        <text:list-item>
          <text:p text:style-name="P354"><text:span text:style-name="Strong_20_Emphasis">The Index-Aligned Shield:</text:span> Before scanning, the system replaces strings and comments with blank spaces. This prevents tokens found inside string buffers from being interpreted as structural boundaries while maintaining the exact character indices.</text:p>
        </text:list-item>
        <text:list-item>
          <text:p text:style-name="P354"><text:span text:style-name="Strong_20_Emphasis">Search Limit Heuristic:</text:span> If the detector cannot find a starting brace <text:span text:style-name="Source_20_Text">{</text:span> within 2,000 characters of a function definition, it aborts the slice to prevent "Memory Saturation."</text:p>
        </text:list-item>
      </text:list>
      <text:h text:style-name="Heading_20_6" text:outline-level="6"><text:bookmark-start text:name="__RefHeading___Toc44124_2214491331"/>2.3.5.C.3. Integration Mode C: Indentation-Based Scope Resolution (_slice_by_indentation)<text:bookmark-end text:name="__RefHeading___Toc44124_2214491331"/></text:h>
      <text:p text:style-name="Text_20_body">Optimized for Python and YAML. It monitors the "Density Stratification" of the logic stream.</text:p>
      <text:list text:style-name="L143">
        <text:list-item>
          <text:p text:style-name="P355"><text:span text:style-name="Strong_20_Emphasis">The Break Point:</text:span> Block boundaries are identified by measuring shifts in leading whitespace. A scope is finalized when a line containing unshielded code is found at an indentation level less than or equal to the base block indent.</text:p>
        </text:list-item>
        <text:list-item>
          <text:p text:style-name="P355"><text:span text:style-name="Strong_20_Emphasis">The Persistence Rule:</text:span> Empty lines and fully shielded comment lines (Python/YAML <text:span text:style-name="Source_20_Text">#</text:span>) do not break the current scope, allowing the detector to bridge across stylistic gaps.</text:p>
        </text:list-item>
      </text:list>
      <text:h text:style-name="Heading_20_6" text:outline-level="6"><text:bookmark-start text:name="__RefHeading___Toc44126_2214491331"/>2.3.5.C.4. Integration Mode D: Semantic Handshake Stack (_slice_by_keywords)<text:bookmark-end text:name="__RefHeading___Toc44126_2214491331"/></text:h>
      <text:p text:style-name="Text_20_body">A specialized mode for keyword-delimited languages (Ruby, Lua, Shell).</text:p>
      <text:list text:style-name="L144">
        <text:list-item>
          <text:p text:style-name="P356"><text:span text:style-name="Strong_20_Emphasis">The State-Machine Tracker:</text:span> It monitors "Handshake" pairs like <text:span text:style-name="Source_20_Text">do/end</text:span>, <text:span text:style-name="Source_20_Text">if/fi</text:span>, or <text:span text:style-name="Source_20_Text">case/esac</text:span>.</text:p>
        </text:list-item>
        <text:list-item>
          <text:p text:style-name="P356"><text:soft-page-break/><text:span text:style-name="Strong_20_Emphasis">The Inline Modifier Guard:</text:span> Specifically for Ruby and Elixir, the detector ignores keywords used as inline modifiers (e.g., <text:span text:style-name="Source_20_Text">return x if y</text:span>) to prevent false depth increments.</text:p>
        </text:list-item>
        <text:list-item>
          <text:p text:style-name="P356"><text:span text:style-name="Strong_20_Emphasis">Global Context Accumulation:</text:span> Any logic not captured by a semantic block is aggregated into a special <text:span text:style-name="Source_20_Text">__global_context__</text:span> satellite, ensuring no logic "leaks" from the map.</text:p>
        </text:list-item>
      </text:list>
      <text:h text:style-name="Heading_20_6" text:outline-level="6"><text:bookmark-start text:name="__RefHeading___Toc44128_2214491331"/>2.3.5.C.5. Integration Mode E: Terminator Cleaving (_slice_by_terminator)<text:bookmark-end text:name="__RefHeading___Toc44128_2214491331"/></text:h>
      <text:p text:style-name="Text_20_body">Used for declarative and logic-based wavelengths (SQL, Erlang, Prolog).</text:p>
      <text:list text:style-name="L145">
        <text:list-item>
          <text:p text:style-name="P357"><text:span text:style-name="Strong_20_Emphasis">Block Ignition:</text:span> Triggered by high-intensity "Igniter" tokens like <text:span text:style-name="Source_20_Text">SELECT</text:span>, <text:span text:style-name="Source_20_Text">CREATE</text:span>, or <text:span text:style-name="Source_20_Text">DECLARE</text:span>.</text:p>
        </text:list-item>
        <text:list-item>
          <text:p text:style-name="P357"><text:span text:style-name="Strong_20_Emphasis">The Guillotine Drop:</text:span> Logic is accumulated until the detector encounters a "Hard Terminator" (semicolon <text:span text:style-name="Source_20_Text">;</text:span> or period <text:span text:style-name="Source_20_Text">.</text:span>).</text:p>
        </text:list-item>
      </text:list>
      <text:h text:style-name="Heading_20_5" text:outline-level="5"><text:bookmark-start text:name="__RefHeading___Toc44130_2214491331"/>2.3.5.D. Metric Vectorization: Multi-Dimensional Physics<text:bookmark-end text:name="__RefHeading___Toc44130_2214491331"/></text:h>
      <text:p text:style-name="Text_20_body">Once a packet of logic is resolved into a satellite unit, the <text:span text:style-name="Source_20_Text">_process_satellite_physics</text:span> engine transforms raw signal hits into functional telemetry.</text:p>
      <text:p text:style-name="Text_20_body"><text:span text:style-name="Strong_20_Emphasis">The "Why": Gravitational Mass</text:span> In the 3D galaxy, the "Sun" of a constellation must be the file with the most complexity. The Magnitude formula is designed to give exponential weight to complexity (Branches) and input density (Args), rather than just raw size (LOC). This ensures that a 100-line "God Function" has more gravitational pull than a 10,000-line data list.</text:p>
      <text:h text:style-name="Heading_20_6" text:outline-level="6"><text:bookmark-start text:name="__RefHeading___Toc44132_2214491331"/>2.3.5.D.1. Physical Attribute Formulas<text:bookmark-end text:name="__RefHeading___Toc44132_2214491331"/></text:h>
      <text:list text:style-name="L146">
        <text:list-item>
          <text:p text:style-name="P358"><text:span text:style-name="Strong_20_Emphasis">Logic Angle (Theta):</text:span> Derived from the ratio of branching intensity to linear signal definitions. Formula: Angle = 22.5 + (1.0 - logic_ratio) * 67.5</text:p>
        </text:list-item>
        <text:list-item>
          <text:p text:style-name="P358"><text:span text:style-name="Strong_20_Emphasis">Magnitude (Impact):</text:span> A composite weighting factor that determines the satellite's "Mass." Formula: Magnitude = ((Branches + 1) * (Args + 1) + (0.05 * LOC))</text:p>
        </text:list-item>
        <text:list-item>
          <text:p text:style-name="P358"><text:span text:style-name="Strong_20_Emphasis">Classification (Texture):</text:span> Performs a Signature Analysis on function names (e.g., <text:span text:style-name="Source_20_Text">fetch</text:span> = IO, <text:span text:style-name="Source_20_Text">set</text:span> = Mutation, <text:span text:style-name="Source_20_Text">calc</text:span> = Logic) to assign spectral colors to the satellite.</text:p>
        </text:list-item>
      </text:list>
      <text:h text:style-name="P163" text:outline-level="4"><text:bookmark-start text:name="__RefHeading___Toc44134_2214491331"/>2.3.5.E. The Cartographer: Fractal Fibonacci Positioning<text:bookmark-end text:name="__RefHeading___Toc44134_2214491331"/></text:h>
      <text:p text:style-name="Text_20_body">The Cartographer (Phase 7.5) transforms flat file lists into a deterministic 3D star map. By applying procedurally generated patterns to digital architecture, it ensures the visual <text:soft-page-break/>layout reflects the structural hierarchy and "gravitational" importance of the repository's components. It is both organic looking while being repeatable.</text:p>
      <text:h text:style-name="Heading_20_6" text:outline-level="6"><text:bookmark-start text:name="__RefHeading___Toc44136_2214491331"/>2.3.5.E.1. Galactic Tiling (Macro Layout)<text:bookmark-end text:name="__RefHeading___Toc44136_2214491331"/></text:h>
      <text:list text:style-name="L147">
        <text:list-item>
          <text:p text:style-name="P359"><text:span text:style-name="Strong_20_Emphasis">Sector Prioritization:</text:span> The engine first performs a <text:span text:style-name="Strong_20_Emphasis">Sector Census</text:span>, grouping files by their root directory. Sectors are then ranked by their "Max Mass" (the heaviest file in the folder), ensuring that the most critical architectural hubs are placed at the heart of the galaxy.</text:p>
        </text:list-item>
        <text:list-item>
          <text:p text:style-name="P359"><text:span text:style-name="Strong_20_Emphasis">The Macro-Spiral:</text:span> Constellations are tiled in a galactic plane using a spiral growth algorithm.</text:p>
          <text:list>
            <text:list-item>
              <text:p text:style-name="P359"><text:span text:style-name="Strong_20_Emphasis">Macro Spacing:</text:span> 150.0 units.</text:p>
            </text:list-item>
            <text:list-item>
              <text:p text:style-name="P359"><text:span text:style-name="Strong_20_Emphasis">Macro Padding:</text:span> 300.0 units.</text:p>
            </text:list-item>
          </text:list>
        </text:list-item>
      </text:list>
      <text:p text:style-name="Text_20_body"><text:span text:style-name="Strong_20_Emphasis">The "Why": Navigational Memory</text:span> By placing the "heaviest" sectors—those containing complex logic or core services—near the center (), the system creates a spatial hierarchy. Large, complex constellations stay central, while smaller, peripheral utility folders spiral outward. This allows users to navigate the codebase using spatial intuition rather than just file paths.</text:p>
      <text:h text:style-name="Heading_20_6" text:outline-level="6"><text:bookmark-start text:name="__RefHeading___Toc44138_2214491331"/>2.3.5.E.2. Local Star Systems (Micro Layout)<text:bookmark-end text:name="__RefHeading___Toc44138_2214491331"/></text:h>
      <text:list text:style-name="L148">
        <text:list-item>
          <text:p text:style-name="P360"><text:span text:style-name="Strong_20_Emphasis">The Sun/Planet Relationship:</text:span> Within each constellation, the file with the highest <text:span text:style-name="Strong_20_Emphasis">Structural Mass</text:span> is designated as the central star and fixed at the local origin. All other files orbit this central mass.</text:p>
        </text:list-item>
        <text:list-item>
          <text:p text:style-name="P360"><text:span text:style-name="Strong_20_Emphasis">Radius Scaling (Micro-Layout):</text:span> Planets spiral outward based on their mass-rank () using an Archimedean spiral property:</text:p>
          <text:list>
            <text:list-item>
              <text:p text:style-name="P360"><text:span text:style-name="Strong_20_Emphasis">Formula:</text:span> </text:p>
            </text:list-item>
            <text:list-item>
              <text:p text:style-name="P360"><text:span text:style-name="Strong_20_Emphasis">Golden Angle Increment:</text:span> Each star is rotated by 2.399 radians from the previous star.</text:p>
            </text:list-item>
          </text:list>
        </text:list-item>
      </text:list>
      <text:p text:style-name="Text_20_body"><text:span text:style-name="Strong_20_Emphasis">The "Why": Gravitational Hierarchy</text:span> This layout visually communicates the "God Object" or main entry point of a folder. Because the distance is a function of the square root of the rank, the density of the star system decreases gracefully as you move away from the central "Sun," preventing visual clutter in high-file-count directories.</text:p>
      <text:h text:style-name="Heading_20_6" text:outline-level="6"><text:bookmark-start text:name="__RefHeading___Toc44140_2214491331"/><text:soft-page-break/>2.3.5.E.3. Organic Entropy (Hash Jitter)<text:bookmark-end text:name="__RefHeading___Toc44140_2214491331"/></text:h>
      <text:list text:style-name="L149">
        <text:list-item>
          <text:p text:style-name="P361"><text:span text:style-name="Strong_20_Emphasis">MD5 Seed Logic:</text:span> To break the mechanical perfection of the spiral, the engine injects "Organic Noise" via the <text:span text:style-name="Source_20_Text">_hash_jitter</text:span> function. It takes the MD5 hash of the filename and maps it to a normalized range of to .</text:p>
        </text:list-item>
        <text:list-item>
          <text:p text:style-name="P361"><text:span text:style-name="Strong_20_Emphasis">Deterministic Organicism:</text:span> * <text:span text:style-name="Strong_20_Emphasis">X/Z Jitter:</text:span> units.</text:p>
          <text:list>
            <text:list-item>
              <text:p text:style-name="P361"><text:span text:style-name="Strong_20_Emphasis">Y Jitter:</text:span> units (for 3D depth).</text:p>
            </text:list-item>
          </text:list>
        </text:list-item>
      </text:list>
      <text:p text:style-name="Text_20_body"><text:span text:style-name="Strong_20_Emphasis">The "Why": Reproducible Chaos</text:span> A perfectly mathematical spiral feels artificial and makes it harder for the human eye to distinguish individual stars. Jitter provides the "texture" of a real galaxy. By using the filename hash as the seed, the jitter is <text:span text:style-name="Strong_20_Emphasis">deterministic</text:span>; a file will always "vibrate" to the exact same relative coordinate every time the map is rendered, allowing the developer to build a persistent mental map of the project's "shape."</text:p>
      <text:h text:style-name="Heading_20_5" text:outline-level="5"><text:bookmark-start text:name="__RefHeading___Toc44142_2214491331"/>2.3.5.F. Calibration &amp; Operational Sensitivity Modes<text:bookmark-end text:name="__RefHeading___Toc44142_2214491331"/></text:h>
      <text:p text:style-name="Text_20_body">To maintain the high-fidelity resolution of the Logic Splicer, we treat the detector as a sensitive scientific instrument. The <text:span text:style-name="Strong_20_Emphasis">Singularity Threshold Dial</text:span> serves as the primary gain control and aperture setting for the hardware. By modulating this threshold, the operator determines which tiers of evidence from the <text:span text:style-name="Strong_20_Emphasis">Trust Matrix</text:span> (Language Lens) are processed as <text:span text:style-name="Strong_20_Emphasis">Visible Matter</text:span> and which are cast into the <text:span text:style-name="Strong_20_Emphasis">Dark Matter</text:span> singularity.</text:p>
      <text:p text:style-name="Text_20_body">This dial regulates the entry-point to the <text:span text:style-name="Source_20_Text">LogicSplicer</text:span>, ensuring that the instrument does not waste compute-cycles on ambiguous signals.</text:p>
      <text:h text:style-name="Heading_20_6" text:outline-level="6"><text:bookmark-start text:name="__RefHeading___Toc44144_2214491331"/>2.3.5.F.1. Mode: Certified Architecture (Threshold: 0.78)<text:bookmark-end text:name="__RefHeading___Toc44144_2214491331"/></text:h>
      <text:p text:style-name="Text_20_body">The "High-Precision" setting. Aligned with the <text:span text:style-name="Source_20_Text">INTENSITY_FLOOR</text:span> of the Language Lens, this mode only accepts files with high-confidence Identity Locks.</text:p>
      <text:list text:style-name="L150">
        <text:list-item>
          <text:p text:style-name="P362"><text:span text:style-name="Strong_20_Emphasis">Admitted Evidence Tiers:</text:span></text:p>
          <text:list>
            <text:list-item>
              <text:p text:style-name="P362"><text:span text:style-name="Strong_20_Emphasis">Tier 0 (Convergent Lock):</text:span> Dual evidence (Extension + Shebang).</text:p>
            </text:list-item>
            <text:list-item>
              <text:p text:style-name="P362"><text:span text:style-name="Strong_20_Emphasis">Tier 1 (Roadmap Lock):</text:span> Explicit GuideStar manifest alignment.</text:p>
            </text:list-item>
            <text:list-item>
              <text:p text:style-name="P362"><text:span text:style-name="Strong_20_Emphasis">Tier 1.5 (Ecosystem Gravity):</text:span> Overwhelming dominance () in a directory.</text:p>
            </text:list-item>
            <text:list-item>
              <text:p text:style-name="P362"><text:span text:style-name="Strong_20_Emphasis">Tier 2 (Single Signature):</text:span> Standalone extension or shebang with a clean profile.</text:p>
            </text:list-item>
          </text:list>
        </text:list-item>
        <text:list-item>
          <text:p text:style-name="P362"><text:soft-page-break/><text:span text:style-name="Strong_20_Emphasis">Excluded Evidence:</text:span> Tier 3 (Contextual Proof) and Tier 4 (Discovery) are filtered out, as their intensity rarely crosses the 0.78 threshold without massive structural density.</text:p>
        </text:list-item>
        <text:list-item>
          <text:p text:style-name="P362"><text:span text:style-name="Strong_20_Emphasis">The "Why":</text:span> This is the "Clean Room" mode. It is used to map the proven, hardened core of a project, excluding all unverified or emerging "Deep Space" logic.</text:p>
        </text:list-item>
      </text:list>
      <text:h text:style-name="Heading_20_6" text:outline-level="6"><text:bookmark-start text:name="__RefHeading___Toc44146_2214491331"/>2.3.5.F.2. Mode: Event Horizon (Threshold: 0.42) - RECOMMENDED<text:bookmark-end text:name="__RefHeading___Toc44146_2214491331"/></text:h>
      <text:p text:style-name="Text_20_body">The "Balanced Resolution" setting. Calibrated just above the <text:span text:style-name="Strong_20_Emphasis">Ambiguity Floor</text:span> (), where the detector normally returns "undeterminable" during spectral collisions.</text:p>
      <text:list text:style-name="L151">
        <text:list-item>
          <text:p text:style-name="P363"><text:span text:style-name="Strong_20_Emphasis">Admitted Evidence Tiers:</text:span></text:p>
          <text:list>
            <text:list-item>
              <text:p text:style-name="P363"><text:span text:style-name="Strong_20_Emphasis">All Tiers 0 through 2.</text:span></text:p>
            </text:list-item>
            <text:list-item>
              <text:p text:style-name="P363"><text:span text:style-name="Strong_20_Emphasis">Tier 3 (Contextual Proof):</text:span> Logic identified via folder bias or README proximity.</text:p>
            </text:list-item>
            <text:list-item>
              <text:p text:style-name="P363"><text:span text:style-name="Strong_20_Emphasis">Tier 4 (Discovery):</text:span> Emerging logic that has passed a density check but lacks a known extension or shebang.</text:p>
            </text:list-item>
          </text:list>
        </text:list-item>
        <text:list-item>
          <text:p text:style-name="P363"><text:span text:style-name="Strong_20_Emphasis">Excluded Evidence:</text:span> Pure noise or "Tied" signals where the detector cannot distinguish between two languages with more than a 1.05x margin.</text:p>
        </text:list-item>
        <text:list-item>
          <text:p text:style-name="P363"><text:span text:style-name="Strong_20_Emphasis">The "Why":</text:span> This is the optimal operational state. It captures the "Long Tail" of logic—small helper scripts and sparse modules—while still filtering out purely inert text like logs and standard documentation.</text:p>
        </text:list-item>
      </text:list>
      <text:h text:style-name="Heading_20_6" text:outline-level="6"><text:bookmark-start text:name="__RefHeading___Toc44148_2214491331"/>2.3.5.F.3. Mode: Limit of Detection (Threshold: 0.30)<text:bookmark-end text:name="__RefHeading___Toc44148_2214491331"/></text:h>
      <text:p text:style-name="Text_20_body">The "Deep-Space Survey" setting. Representing the point where structural patterns first become discernible from background noise.</text:p>
      <text:list text:style-name="L152">
        <text:list-item>
          <text:p text:style-name="P364"><text:span text:style-name="Strong_20_Emphasis">Admitted Evidence Tiers:</text:span></text:p>
          <text:list>
            <text:list-item>
              <text:p text:style-name="P364"><text:span text:style-name="Strong_20_Emphasis">All Tiers 0 through 4.</text:span></text:p>
            </text:list-item>
            <text:list-item>
              <text:p text:style-name="P364"><text:span text:style-name="Strong_20_Emphasis">"Ghost" Signals:</text:span> Fragments of logic found in prose files (e.g., code snippets inside a <text:span text:style-name="Source_20_Text">README.txt</text:span> or a <text:span text:style-name="Source_20_Text">INSTALL</text:span> file).</text:p>
            </text:list-item>
            <text:list-item>
              <text:p text:style-name="P364"><text:span text:style-name="Strong_20_Emphasis">Exo-Species Fallback:</text:span> Unknown extensions that have extremely low logic density but pass a basic alphanumeric sanity check.</text:p>
            </text:list-item>
          </text:list>
        </text:list-item>
        <text:list-item>
          <text:p text:style-name="P364"><text:span text:style-name="Strong_20_Emphasis">Excluded Evidence:</text:span> Only completely inert files with zero structural signal.</text:p>
        </text:list-item>
        <text:list-item>
          <text:p text:style-name="P364"><text:soft-page-break/><text:span text:style-name="Strong_20_Emphasis">The "Why":</text:span> Used for deep forensics. It resolves everything that <text:span text:style-name="Emphasis">could</text:span> be code. This provides total visibility but introduces "Signal Ghosting," where documentation is hallucinated as functional satellites, cluttering the map with non-functional artifacts.</text:p>
        </text:list-item>
      </text:list>
      <text:p text:style-name="P164"/>
      <text:h text:style-name="P85" text:outline-level="4"><text:bookmark-start text:name="__RefHeading___Toc44150_2214491331"/>2.3.6. Signal Processing (Equations and 2nd Pass scanning Calculations)<text:bookmark-end text:name="__RefHeading___Toc44150_2214491331"/></text:h>
      <text:h text:style-name="Heading_20_5" text:outline-level="5"><text:bookmark-start text:name="__RefHeading___Toc44152_2214491331"/>2.3.6.A. Overview: The Post-Processing Pipeline<text:bookmark-end text:name="__RefHeading___Toc44152_2214491331"/></text:h>
      <text:p text:style-name="Text_20_body">The Exposure Engine (implemented as the SignalProcessor class in signal_processing.py) represents the backend signal processing stage of the instrument. Once the EMCCD Sensor has integrated the "photons" of intent into raw counts, the Exposure Engine applies specialized physics models to resolve these counts into meaningful Exposure Vectors.</text:p>
      <text:h text:style-name="Heading_20_5" text:outline-level="5"><text:bookmark-start text:name="__RefHeading___Toc44154_2214491331"/>2.3.6.B. Structural Forensics: The Universal Exposure Framework<text:bookmark-end text:name="__RefHeading___Toc44154_2214491331"/></text:h>
      <text:p text:style-name="Text_20_body">This framework assumes that one can roughly quantify and estimate different types of Risk Exposure. By using 43 different regex category counts to funnel into 13 different Risk Exposure equations each uniquely structured for the specific inputs we have available and then normalized to how implicit or explicit the language is in.</text:p>
      <text:h text:style-name="Heading_20_5" text:outline-level="5"><text:bookmark-start text:name="__RefHeading___Toc44156_2214491331"/>2.3.6.C. Standardization: The Tiered Physics Model<text:bookmark-end text:name="__RefHeading___Toc44156_2214491331"/></text:h>
      <text:p text:style-name="Text_20_body">To ensure comparative fairness across different code "materials," the engine applies Linguistic Normalization. This accounts for the fact that explicit languages (like Rust) "broadcast" their safety, while implicit languages (like Shell) hide their risks.</text:p>
      <text:h text:style-name="Heading_20_6" text:outline-level="6"><text:bookmark-start text:name="__RefHeading___Toc44158_2214491331"/>2.3.6.C.1. The Normalization Tiers<text:bookmark-end text:name="__RefHeading___Toc44158_2214491331"/></text:h>
      <text:p text:style-name="Text_20_body">The instrument applies specific Trust Constants based on the language's spectral class:</text:p>
      <text:list text:style-name="L153">
        <text:list-item>
          <text:p text:style-name="P365"><text:span text:style-name="Strong_20_Emphasis">Tier 1: Explicit (Rust, Go, Swift, Java):</text:span> Signals are trusted at face value. The Fidelity Coefficient is 1.0, and "Implicit Risk" is zero.</text:p>
        </text:list-item>
        <text:list-item>
          <text:p text:style-name="P365"><text:span text:style-name="Strong_20_Emphasis">Tier 2: Structured (Python, JS, C++):</text:span> Translucent. A minor "Opacity Tax" is applied to account for potential runtime surprises.</text:p>
        </text:list-item>
        <text:list-item>
          <text:p text:style-name="P365"><text:span text:style-name="Strong_20_Emphasis">Tier 3: Implicit (Shell, SQL, Assembly):</text:span> Opaque. The "Fog of War" penalty adds a baseline phantom risk to all equations, requiring significantly higher defensive density to achieve a "Safe" rating.</text:p>
        </text:list-item>
      </text:list>
      <text:h text:style-name="Heading_20_5" text:outline-level="5"><text:bookmark-start text:name="__RefHeading___Toc44160_2214491331"/><text:soft-page-break/>2.3.6.D. The Physics Engine: Weighted Asymmetry &amp; Mass<text:bookmark-end text:name="__RefHeading___Toc44160_2214491331"/></text:h>
      <text:p text:style-name="Text_20_body">The Exposure Engine applies the principle of Weighted Asymmetry to all signals. In this model, software entropy is the natural state; therefore, breaking a system is treated as mathematically easier than securing it.</text:p>
      <text:h text:style-name="Heading_20_6" text:outline-level="6"><text:bookmark-start text:name="__RefHeading___Toc44162_2214491331"/>2.3.6.D.1. The 2.5x Risk Bias<text:bookmark-end text:name="__RefHeading___Toc44162_2214491331"/></text:h>
      <text:p text:style-name="Text_20_body">The engine weights structural risks (Danger, Tech Debt, Flux) at 2.5x, while defensive guardrails (Tests, Safety, Documentation) are weighted at 1.0x. This ensures that a module must demonstrate "Overwhelming Defense" to be rendered as a stable, Cyan-colored entity in the star map.</text:p>
      <text:p text:style-name="P86"/>
      <text:h text:style-name="P85" text:outline-level="4"><text:bookmark-start text:name="__RefHeading___Toc44164_2214491331"/><text:span text:style-name="Source_20_Text"><text:span text:style-name="T191">2.3.7. The Spectral Audit (Quality Control)</text:span></text:span><text:bookmark-end text:name="__RefHeading___Toc44164_2214491331"/></text:h>
      <text:p text:style-name="Text_20_body">The Spectral Audit (implemented as the SpectralAuditor class in spectral_auditor.py) is the final data-integrity gate of the analysis pipeline. It performs an automated statistical verification of every artifact to ensure that the assigned language and resulting logic metrics are plausible. This process eliminates "Linguistic Drift"—the misidentification of non-code artifacts (e.g., massive data dumps or logs) as source files—ensuring that anomalous data does not corrupt the project's aggregate metrics.</text:p>
      <text:p text:style-name="Text_20_body">The audit is performed independently for each language species, acknowledging that the logic density of a low-level language like C is fundamentally different from a high-level language like Ruby.</text:p>
      <text:h text:style-name="Heading_20_5" text:outline-level="5"><text:bookmark-start text:name="__RefHeading___Toc44166_2214491331"/>2.3.7.A. Signal Density Verification (Intent Density)<text:bookmark-end text:name="__RefHeading___Toc44166_2214491331"/></text:h>
      <text:p text:style-name="Text_20_body">Once the Detector has generated a hit vector, the Auditor evaluates the "Intent Density" (rho) of the file. This isolates functional logic from "Syntactic Noise" (formatting and delimiters) to determine if the file contains a meaningful amount of code for its physical size.</text:p>
      <text:h text:style-name="Heading_20_6" text:outline-level="6"><text:bookmark-start text:name="__RefHeading___Toc44168_2214491331"/>2.3.7.A.1. Logic Signal vs. Noise<text:bookmark-end text:name="__RefHeading___Toc44168_2214491331"/></text:h>
      <text:p text:style-name="Text_20_body">To calculate density, the Auditor sums the hits from 32 specific high-signal keys in the schema, creating a "Linguistic Signature" of active logic.</text:p>
      <text:list text:style-name="L154">
        <text:list-item>
          <text:p text:style-name="P366"><text:span text:style-name="Strong_20_Emphasis">Structural:</text:span> branch, args, linear, func_start, class_start, import, api, decorators</text:p>
        </text:list-item>
        <text:list-item>
          <text:p text:style-name="P366"><text:span text:style-name="Strong_20_Emphasis">Logic/Risk:</text:span> safety, safety_neg, danger, flux, heat_triggers, keyword_debt, private_info</text:p>
        </text:list-item>
        <text:list-item>
          <text:p text:style-name="P366"><text:soft-page-break/><text:span text:style-name="Strong_20_Emphasis">Environment:</text:span> io, concurrency, ui_framework, events, ssr_boundaries, dependency_injection</text:p>
        </text:list-item>
        <text:list-item>
          <text:p text:style-name="P366"><text:span text:style-name="Strong_20_Emphasis">Compute:</text:span> scientific, generics, comprehensions, closures, globals, telemetry, test</text:p>
        </text:list-item>
        <text:list-item>
          <text:p text:style-name="P366"><text:span text:style-name="Strong_20_Emphasis">Low-Level:</text:span> macros, pointers, memory_alloc, inline_asm</text:p>
        </text:list-item>
      </text:list>
      <text:p text:style-name="Text_20_body"><text:span text:style-name="Strong_20_Emphasis">Excluded Noise:</text:span> Metadata such as comments, documentation density, ownership tags, and indentation consistency are explicitly ignored during this verification phase to focus purely on authorial intent.</text:p>
      <text:p text:style-name="Text_20_body"><text:span text:style-name="Strong_20_Emphasis">The Intent Density Equation:</text:span> rho = (Sum of Verified Signal Hits) / (Total Physical Lines of Code)</text:p>
      <text:h text:style-name="Heading_20_5" text:outline-level="5"><text:bookmark-start text:name="__RefHeading___Toc44170_2214491331"/>2.3.7.B. Statistical Outlier Detection (The MAD Protocol)<text:bookmark-end text:name="__RefHeading___Toc44170_2214491331"/></text:h>
      <text:p text:style-name="Text_20_body">Because codebases vary significantly in verbosity, the Auditor does not use a fixed "pass/fail" density. Instead, it calculates a Robust Z-Score (Mi) based on the repository's own local averages.</text:p>
      <text:h text:style-name="Heading_20_6" text:outline-level="6"><text:bookmark-start text:name="__RefHeading___Toc44172_2214491331"/>2.3.7.B.1. Repository Baseline Calibration<text:bookmark-end text:name="__RefHeading___Toc44172_2214491331"/></text:h>
      <text:p text:style-name="Text_20_body">The Auditor establishes a baseline by analyzing the population of each language species:</text:p>
      <text:list text:style-name="L155">
        <text:list-item>
          <text:p text:style-name="P367"><text:span text:style-name="Strong_20_Emphasis">Establishing the Median:</text:span> Calculates the median density (Median_rho) for the language group.</text:p>
        </text:list-item>
        <text:list-item>
          <text:p text:style-name="P367"><text:span text:style-name="Strong_20_Emphasis">Median Absolute Deviation (MAD):</text:span> Measures the standard variance of density across the group.</text:p>
        </text:list-item>
        <text:list-item>
          <text:p text:style-name="P367"><text:span text:style-name="Strong_20_Emphasis">The Outlier Equation:</text:span> Mi = [ 0.6745 * (rho - Median_rho) ] / MAD</text:p>
        </text:list-item>
      </text:list>
      <text:h text:style-name="Heading_20_6" text:outline-level="6"><text:bookmark-start text:name="__RefHeading___Toc44174_2214491331"/>2.3.7.B.2. Polyglot Baseline Defense<text:bookmark-end text:name="__RefHeading___Toc44174_2214491331"/></text:h>
      <text:p text:style-name="Text_20_body">To ensure the baseline represents "pure" language physics, any file identified as a <text:span text:style-name="Strong_20_Emphasis">Highly Blended Polyglot</text:span> (where the primary language makes up less than 80% of the mass) is excluded from the Median/MAD calculation. This prevents polyglots from skewing the statistical baseline of the species.</text:p>
      <text:h text:style-name="Heading_20_6" text:outline-level="6"><text:bookmark-start text:name="__RefHeading___Toc44176_2214491331"/>2.3.7.B.3. Bayesian Threshold Gating (T_adj)<text:bookmark-end text:name="__RefHeading___Toc44176_2214491331"/></text:h>
      <text:p text:style-name="Text_20_body">The instrument applies a dynamic limit based on the Confidence Score (Ci) provided by the Language Lens. This replaces static thresholds with a variable "Skepticism Gate": T_adj = -5 * max(Ci, 0.1)</text:p>
      <text:list text:style-name="L156">
        <text:list-item>
          <text:p text:style-name="P368"><text:soft-page-break/><text:span text:style-name="Strong_20_Emphasis">High Confidence (Ci &gt; 0.85):</text:span> The instrument allows the file to be a significant outlier (up to -5.0 Z-score) because the metadata proof is strong.</text:p>
        </text:list-item>
        <text:list-item>
          <text:p text:style-name="P368"><text:span text:style-name="Strong_20_Emphasis">Low Confidence (Ci &lt; 0.40):</text:span> The instrument is skeptical; the file must reside much closer to the median density of its peers to be accepted.</text:p>
        </text:list-item>
      </text:list>
      <text:h text:style-name="Heading_20_5" text:outline-level="5"><text:bookmark-start text:name="__RefHeading___Toc44178_2214491331"/>2.3.7.C. The Event Horizon (The 50/0 Law and Relegation)<text:bookmark-end text:name="__RefHeading___Toc44178_2214491331"/></text:h>
      <text:p text:style-name="Text_20_body">Regardless of statistical baselines, the Auditor enforces hard physical constants to identify "Hollow Stars."</text:p>
      <text:list text:style-name="L157">
        <text:list-item>
          <text:p text:style-name="P369"><text:span text:style-name="Strong_20_Emphasis">The 50/0 Law:</text:span> If a file contains more than 50 lines but generates 0 Signal Hits from the 32-key intent list, it is objectively not a source file of that assigned spectral class.</text:p>
        </text:list-item>
        <text:list-item>
          <text:p text:style-name="P369"><text:span text:style-name="Strong_20_Emphasis">Bayesian Accountability:</text:span> If a file with a Tier 0 or Tier 1 "Lock" (high-confidence prior) is refuted by the audit, the system logs a <text:span text:style-name="Strong_20_Emphasis">Bayesian Refutation</text:span> warning, holding the initial prediction to account for the physical evidence.</text:p>
        </text:list-item>
        <text:list-item>
          <text:p text:style-name="P369"><text:span text:style-name="Strong_20_Emphasis">The Necrosis Guard:</text:span> If a file fails the density audit but contains a massive comment-to-code ratio (e.g., 5:1) or high graveyard hits (commented-out structural logic), it is granted a <text:span text:style-name="Strong_20_Emphasis">Reprieve from Relegation</text:span>. This ensures that "Dead Code" remains in the visible galaxy for forensic tech-debt analysis (calculated by the Signal Processor) rather than being lost to the Singularity.</text:p>
        </text:list-item>
        <text:list-item>
          <text:p text:style-name="P369"><text:span text:style-name="Strong_20_Emphasis">Relegation:</text:span> Files failing the 50/0 Law or the MAD Protocol (and not saved by the Necrosis Guard) are stripped of metadata and cast into the <text:span text:style-name="Strong_20_Emphasis">Singularity of Ambiguity</text:span> (Dark Matter).</text:p>
        </text:list-item>
      </text:list>
      <text:h text:style-name="Heading_20_5" text:outline-level="5"><text:bookmark-start text:name="__RefHeading___Toc44180_2214491331"/>2.3.7.D. The Activation Protocol (Statistical Readiness)<text:bookmark-end text:name="__RefHeading___Toc44180_2214491331"/></text:h>
      <text:p text:style-name="Text_20_body">The Auditor only engages the Robust Z-Score if the language population provides a sufficient "Sample Mass" and "Linguistic Cohesion" to trust the baseline.</text:p>
      <text:h text:style-name="Heading_20_6" text:outline-level="6"><text:bookmark-start text:name="__RefHeading___Toc44182_2214491331"/>2.3.7.D.1. Criteria for Statistical Engagement<text:bookmark-end text:name="__RefHeading___Toc44182_2214491331"/></text:h>
      <text:list text:style-name="L158">
        <text:list-item>
          <text:p text:style-name="P370"><text:span text:style-name="Strong_20_Emphasis">Population Density (N &gt;= 50):</text:span> Requires 50 samples to achieve a stable median.</text:p>
        </text:list-item>
        <text:list-item>
          <text:p text:style-name="P370"><text:span text:style-name="Strong_20_Emphasis">The Cohesion Metric (R-MAD &lt; 1.0):</text:span> If the Relative Median Absolute Deviation is &gt;= 1.0, the population is considered too heterogeneous to establish a valid baseline.</text:p>
        </text:list-item>
        <text:list-item>
          <text:p text:style-name="P370"><text:span text:style-name="Strong_20_Emphasis">Confidence Anchor:</text:span> At least one file in the group must have a Confidence Score &gt; 0.85.</text:p>
        </text:list-item>
      </text:list>
      <text:h text:style-name="Heading_20_6" text:outline-level="6"><text:bookmark-start text:name="__RefHeading___Toc44184_2214491331"/><text:soft-page-break/>2.3.7.D.2. Fallback: Inert Matter Exemption<text:bookmark-end text:name="__RefHeading___Toc44184_2214491331"/></text:h>
      <text:p text:style-name="Text_20_body">The Auditor automatically exempts "Inert" file types from density audits to prevent false relegation of essential documentation or build infrastructure. This includes: markdown, makefile, cmake, json, yaml, toml, ini, and plaintext.</text:p>
      <text:p text:style-name="P86"><text:bookmark text:name="__RefHeading___Toc11743_959624642"/><text:span text:style-name="Source_20_Text"><text:span text:style-name="T191"/></text:span></text:p>
      <text:h text:style-name="P170" text:outline-level="4"><text:bookmark-start text:name="__RefHeading___Toc44186_2214491331"/><text:span text:style-name="Source_20_Text"><text:span text:style-name="T157">2.3.8. The Audit Recorder </text:span></text:span><text:bookmark-end text:name="__RefHeading___Toc44186_2214491331"/></text:h>
      <text:p text:style-name="Text_20_body">The Audit Recorder is the specialized forensic camera that captures the analysis. The Audit Recorder is designed specifically for human utility, legal compliance, and technical debt auditing. It transforms raw, columnar telemetry into a verbose, structured manifest where every technical signal is translated into descriptive, forensic terminology.</text:p>
      <text:h text:style-name="Heading_20_5" text:outline-level="5"><text:bookmark-start text:name="__RefHeading___Toc44188_2214491331"/>2.3.8.A. Root Structure (The Mission Archive)<text:bookmark-end text:name="__RefHeading___Toc44188_2214491331"/></text:h>
      <text:p text:style-name="Text_20_body">The Mission Archive is organized into five primary sections to provide immediate project-wide context followed by granular file-level evidence.</text:p>
      <text:list text:style-name="L159">
        <text:list-item>
          <text:p text:style-name="P371"><text:span text:style-name="Strong_20_Emphasis">1. Forensic Trail (Traceability):</text:span> Contains the immutable anchors of the scan. This includes the Engine Identity, Absolute Project Path, ISO Timestamps, and the Source Control Footprint (Branch name and SHA-1 Commit Hash).</text:p>
        </text:list-item>
        <text:list-item>
          <text:p text:style-name="P371"><text:span text:style-name="Strong_20_Emphasis">2. Global Synthesis Summary:</text:span> Project-wide health metrics, dominant language percentages, and the repository-wide Volatility Index.</text:p>
        </text:list-item>
        <text:list-item>
          <text:p text:style-name="P371"><text:span text:style-name="Strong_20_Emphasis">3. High-Value Forensic Report:</text:span> A high-level ranking of Primary and Baseline concentrations across all risk exposures.</text:p>
        </text:list-item>
        <text:list-item>
          <text:p text:style-name="P371"><text:span text:style-name="Strong_20_Emphasis">4. Dark Matter (Singularity Manifest):</text:span> A diagnostic log of every file relegated to the Singularity, documenting the "Diagnostic Reason" (e.g., 50/0 Law) and "Identity Confidence" at the time of failure.</text:p>
        </text:list-item>
        <text:list-item>
          <text:p text:style-name="P371"><text:span text:style-name="Strong_20_Emphasis">5. Visible Star Manifest:</text:span> The primary artifact database, where every file is reconstructed into a 6-category forensic profile.</text:p>
        </text:list-item>
      </text:list>
      <text:h text:style-name="Heading_20_5" text:outline-level="5"><text:bookmark-start text:name="__RefHeading___Toc44190_2214491331"/>2.3.8.B. Standardized Artifact Object Structure<text:bookmark-end text:name="__RefHeading___Toc44190_2214491331"/></text:h>
      <text:p text:style-name="Text_20_body">Every entry within the manifest follows a strict category-based order to ensure consistent readability for human auditors.</text:p>
      <text:h text:style-name="Heading_20_6" text:outline-level="6"><text:bookmark-start text:name="__RefHeading___Toc44192_2214491331"/>2.3.8.B.1. Identity (The Passport)<text:bookmark-end text:name="__RefHeading___Toc44192_2214491331"/></text:h>
      <text:p text:style-name="Text_20_body">Provides the "Identity Lock" details for the artifact.</text:p>
      <text:list text:style-name="L160">
        <text:list-item>
          <text:p text:style-name="P372"><text:soft-page-break/><text:span text:style-name="Strong_20_Emphasis">Filename:</text:span> The short name of the artifact.</text:p>
        </text:list-item>
        <text:list-item>
          <text:p text:style-name="P372"><text:span text:style-name="Strong_20_Emphasis">Path:</text:span> The relative repository location.</text:p>
        </text:list-item>
        <text:list-item>
          <text:p text:style-name="P372"><text:span text:style-name="Strong_20_Emphasis">Architect:</text:span> Ownership attribution (mapped from the comment stream).</text:p>
        </text:list-item>
        <text:list-item>
          <text:p text:style-name="P372"><text:span text:style-name="Strong_20_Emphasis">Language:</text:span> The detected syntax class (e.g., C++, Python).</text:p>
        </text:list-item>
        <text:list-item>
          <text:p text:style-name="P372"><text:span text:style-name="Strong_20_Emphasis">Lock Tier:</text:span> The Bayesian trust level (0–4).</text:p>
        </text:list-item>
        <text:list-item>
          <text:p text:style-name="P372"><text:span text:style-name="Strong_20_Emphasis">Identity Proof:</text:span> The specific evidence used to verify the file (e.g., Shebang, Extension).</text:p>
        </text:list-item>
      </text:list>
      <text:h text:style-name="Heading_20_6" text:outline-level="6"><text:bookmark-start text:name="__RefHeading___Toc44194_2214491331"/>2.3.8.B.2. Spatial Coordinates &amp; Galactic Profile<text:bookmark-end text:name="__RefHeading___Toc44194_2214491331"/></text:h>
      <text:list text:style-name="L161">
        <text:list-item>
          <text:p text:style-name="P373"><text:span text:style-name="Strong_20_Emphasis">Spatial Coordinates:</text:span> The X, Y, and Z positions within the 3D star map.</text:p>
        </text:list-item>
        <text:list-item>
          <text:p text:style-name="P373"><text:span text:style-name="Strong_20_Emphasis">Total LOC:</text:span> The raw physical line count.</text:p>
        </text:list-item>
        <text:list-item>
          <text:p text:style-name="P373"><text:span text:style-name="Strong_20_Emphasis">coding LOC:</text:span> Meaningful execution logic (formerly m_locs).</text:p>
        </text:list-item>
        <text:list-item>
          <text:p text:style-name="P373"><text:span text:style-name="Strong_20_Emphasis">Documentation LOC:</text:span> Volume of comments and header documentation.</text:p>
        </text:list-item>
        <text:list-item>
          <text:p text:style-name="P373"><text:span text:style-name="Strong_20_Emphasis">Structural Mass:</text:span> The final composite impact/weight of the file.</text:p>
        </text:list-item>
        <text:list-item>
          <text:p text:style-name="P373"><text:span text:style-name="Strong_20_Emphasis">control flow ratio:</text:span> Percentage representing coding_LOC relative to the total file size.</text:p>
        </text:list-item>
      </text:list>
      <text:h text:style-name="Heading_20_6" text:outline-level="6"><text:bookmark-start text:name="__RefHeading___Toc44196_2214491331"/>2.3.8.B.3. Risk Exposures (%)<text:bookmark-end text:name="__RefHeading___Toc44196_2214491331"/></text:h>
      <text:p text:style-name="Text_20_body">Exposures are expressed as percentages (0.0%–100.0%) and represent the "Color Overlays" used in the star map.</text:p>
      <text:list text:style-name="L162">
        <text:list-item>
          <text:p text:style-name="P374"><text:span text:style-name="Strong_20_Emphasis">Cognitive Load:</text:span> Mental RAM saturation.</text:p>
        </text:list-item>
        <text:list-item>
          <text:p text:style-name="P374"><text:span text:style-name="Strong_20_Emphasis">Safety Score:</text:span> Structural fragility and unsafe patterns.</text:p>
        </text:list-item>
        <text:list-item>
          <text:p text:style-name="P374"><text:span text:style-name="Strong_20_Emphasis">Tech Debt:</text:span> Planned vs. fragile logic debt.</text:p>
        </text:list-item>
        <text:list-item>
          <text:p text:style-name="P374"><text:span text:style-name="Strong_20_Emphasis">Verification:</text:span> Testing exposure (lack of unit verification).</text:p>
        </text:list-item>
        <text:list-item>
          <text:p text:style-name="P374"><text:span text:style-name="Strong_20_Emphasis">API Exposure:</text:span> Public surface area density.</text:p>
        </text:list-item>
        <text:list-item>
          <text:p text:style-name="P374"><text:span text:style-name="Strong_20_Emphasis">Concurrency:</text:span> Temporal static and async complexity.</text:p>
        </text:list-item>
        <text:list-item>
          <text:p text:style-name="P374"><text:span text:style-name="Strong_20_Emphasis">State Flux:</text:span> Data volatility/boiling plasma.</text:p>
        </text:list-item>
        <text:list-item>
          <text:p text:style-name="P374"><text:span text:style-name="Strong_20_Emphasis">Graveyard:</text:span> Logic necrosis (dead/commented-out blocks).</text:p>
        </text:list-item>
        <text:list-item>
          <text:p text:style-name="P374"><text:span text:style-name="Strong_20_Emphasis">Spec Match:</text:span> Alignment with specification/audit tags.</text:p>
        </text:list-item>
        <text:list-item>
          <text:p text:style-name="P374"><text:soft-page-break/><text:span text:style-name="Strong_20_Emphasis">Stability:</text:span> Temporal bedrock score.</text:p>
        </text:list-item>
        <text:list-item>
          <text:p text:style-name="P374"><text:span text:style-name="Strong_20_Emphasis">Churn:</text:span> Seismic modification frequency.</text:p>
        </text:list-item>
        <text:list-item>
          <text:p text:style-name="P374"><text:span text:style-name="Strong_20_Emphasis">Documentation Risk:</text:span> Narrative opacity.</text:p>
        </text:list-item>
        <text:list-item>
          <text:p text:style-name="P374"><text:span text:style-name="Strong_20_Emphasis">Civil War:</text:span> Indentation structural unity conflict.</text:p>
        </text:list-item>
      </text:list>
      <text:h text:style-name="Heading_20_5" text:outline-level="5"><text:bookmark-start text:name="__RefHeading___Toc44198_2214491331"/>2.3.8.C. Descriptive Descriptors (The Translation Layer)<text:bookmark-end text:name="__RefHeading___Toc44198_2214491331"/></text:h>
      <text:p text:style-name="Text_20_body">To assist non-technical auditors and legal teams, the Record Keeper translates raw "Hit Vector" keys into descriptive forensic labels.</text:p>
      <text:h text:style-name="Heading_20_6" text:outline-level="6"><text:bookmark-start text:name="__RefHeading___Toc44200_2214491331"/>2.3.8.C.1. Core Structural Descriptors<text:bookmark-end text:name="__RefHeading___Toc44200_2214491331"/></text:h>
      <text:list text:style-name="L163">
        <text:list-item>
          <text:p text:style-name="P375"><text:span text:style-name="Strong_20_Emphasis">branch:</text:span> logical control flow forks</text:p>
        </text:list-item>
        <text:list-item>
          <text:p text:style-name="P375"><text:span text:style-name="Strong_20_Emphasis">args:</text:span> function input parameter mass</text:p>
        </text:list-item>
        <text:list-item>
          <text:p text:style-name="P375"><text:span text:style-name="Strong_20_Emphasis">linear:</text:span> straight-line execution logic</text:p>
        </text:list-item>
        <text:list-item>
          <text:p text:style-name="P375"><text:span text:style-name="Strong_20_Emphasis">func_start:</text:span> logical satellite entry points</text:p>
        </text:list-item>
        <text:list-item>
          <text:p text:style-name="P375"><text:span text:style-name="Strong_20_Emphasis">class_start:</text:span> structural entity definition points</text:p>
        </text:list-item>
      </text:list>
      <text:h text:style-name="Heading_20_6" text:outline-level="6"><text:bookmark-start text:name="__RefHeading___Toc44202_2214491331"/>2.3.8.C.2. Risk and Vulnerability Descriptors<text:bookmark-end text:name="__RefHeading___Toc44202_2214491331"/></text:h>
      <text:list text:style-name="L164">
        <text:list-item>
          <text:p text:style-name="P376"><text:span text:style-name="Strong_20_Emphasis">safety_neg:</text:span> unsafe structural logic fractures</text:p>
        </text:list-item>
        <text:list-item>
          <text:p text:style-name="P376"><text:span text:style-name="Strong_20_Emphasis">danger:</text:span> critical runtime vulnerability hits</text:p>
        </text:list-item>
        <text:list-item>
          <text:p text:style-name="P376"><text:span text:style-name="Strong_20_Emphasis">flux:</text:span> state mutation boiling plasma</text:p>
        </text:list-item>
        <text:list-item>
          <text:p text:style-name="P376"><text:span text:style-name="Strong_20_Emphasis">graveyard:</text:span> dead logic necrosis trails</text:p>
        </text:list-item>
        <text:list-item>
          <text:p text:style-name="P376"><text:span text:style-name="Strong_20_Emphasis">print_hits:</text:span> amateur space debris prints</text:p>
        </text:list-item>
        <text:list-item>
          <text:p text:style-name="P376"><text:span text:style-name="Strong_20_Emphasis">cast_hits:</text:span> compiler "trust me" tax</text:p>
        </text:list-item>
        <text:list-item>
          <text:p text:style-name="P376"><text:span text:style-name="Strong_20_Emphasis">bailout_hits:</text:span> execution context detonator hits</text:p>
        </text:list-item>
      </text:list>
      <text:h text:style-name="Heading_20_6" text:outline-level="6"><text:bookmark-start text:name="__RefHeading___Toc44204_2214491331"/>2.3.8.C.3. Low-Level and Environment Descriptors<text:bookmark-end text:name="__RefHeading___Toc44204_2214491331"/></text:h>
      <text:list text:style-name="L165">
        <text:list-item>
          <text:p text:style-name="P377"><text:span text:style-name="Strong_20_Emphasis">concurrency:</text:span> temporal static/waveforms</text:p>
        </text:list-item>
        <text:list-item>
          <text:p text:style-name="P377"><text:span text:style-name="Strong_20_Emphasis">macros:</text:span> compiler preprocessor hook logic</text:p>
        </text:list-item>
        <text:list-item>
          <text:p text:style-name="P377"><text:span text:style-name="Strong_20_Emphasis">pointers:</text:span> raw memory pointer addressing</text:p>
        </text:list-item>
        <text:list-item>
          <text:p text:style-name="P377"><text:span text:style-name="Strong_20_Emphasis">inline_asm:</text:span> bare metal assembly logic</text:p>
        </text:list-item>
        <text:list-item>
          <text:p text:style-name="P377"><text:span text:style-name="Strong_20_Emphasis">telemetry:</text:span> professional observability framework logic</text:p>
        </text:list-item>
      </text:list>
      <text:h text:style-name="Heading_20_5" text:outline-level="5"><text:bookmark-start text:name="__RefHeading___Toc44206_2214491331"/><text:soft-page-break/>2.3.8.D. Example Forensic JSON (Spec v6.2.5)<text:bookmark-end text:name="__RefHeading___Toc44206_2214491331"/></text:h>
      <text:p text:style-name="Preformatted_20_Text"><text:span text:style-name="Source_20_Text">{</text:span></text:p>
      <text:p text:style-name="Preformatted_20_Text"><text:span text:style-name="Source_20_Text"><text:s text:c="4"/>"Audit Protocol": "GitGalaxy v6.2.0-Audit",</text:span></text:p>
      <text:p text:style-name="Preformatted_20_Text"><text:span text:style-name="Source_20_Text"><text:s text:c="4"/>"1. Forensic Trail": {</text:span></text:p>
      <text:p text:style-name="Preformatted_20_Text"><text:span text:style-name="Source_20_Text"><text:s text:c="8"/>"Source Control Footprint": {</text:span></text:p>
      <text:p text:style-name="Preformatted_20_Text"><text:span text:style-name="Source_20_Text"><text:s text:c="12"/>"Active Branch": "main",</text:span></text:p>
      <text:p text:style-name="Preformatted_20_Text"><text:span text:style-name="Source_20_Text"><text:s text:c="12"/>"Commit Hash": "7f8a9b2c...",</text:span></text:p>
      <text:p text:style-name="Preformatted_20_Text"><text:span text:style-name="Source_20_Text"><text:s text:c="12"/>"Remote Origin URL": "git@github.com:org/repo.gi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5. Visible Star Manifest": {</text:span></text:p>
      <text:p text:style-name="Preformatted_20_Text"><text:span text:style-name="Source_20_Text"><text:s text:c="8"/>"src/core/engine.cpp": {</text:span></text:p>
      <text:p text:style-name="Preformatted_20_Text"><text:span text:style-name="Source_20_Text"><text:s text:c="12"/>"1. Identity": {</text:span></text:p>
      <text:p text:style-name="Preformatted_20_Text"><text:span text:style-name="Source_20_Text"><text:s text:c="16"/>"Filename": "engine.cpp",</text:span></text:p>
      <text:p text:style-name="Preformatted_20_Text"><text:span text:style-name="Source_20_Text"><text:s text:c="16"/>"Language": "Cpp",</text:span></text:p>
      <text:p text:style-name="Preformatted_20_Text"><text:span text:style-name="Source_20_Text"><text:s text:c="16"/>"Architect": "Lead Architect",</text:span></text:p>
      <text:p text:style-name="Preformatted_20_Text"><text:span text:style-name="Source_20_Text"><text:s text:c="16"/>"Lock Tier": 0,</text:span></text:p>
      <text:p text:style-name="Preformatted_20_Text"><text:span text:style-name="Source_20_Text"><text:s text:c="16"/>"Identity Proof": "Convergent Lock (Ext + Shebang)"</text:span></text:p>
      <text:p text:style-name="Preformatted_20_Text"><text:span text:style-name="Source_20_Text"><text:s text:c="12"/>},</text:span></text:p>
      <text:p text:style-name="Preformatted_20_Text"><text:span text:style-name="Source_20_Text"><text:s text:c="12"/>"3. Galactic Profile": {</text:span></text:p>
      <text:p text:style-name="Preformatted_20_Text"><text:span text:style-name="Source_20_Text"><text:s text:c="16"/>"Total LOC": 1200,</text:span></text:p>
      <text:p text:style-name="Preformatted_20_Text"><text:span text:style-name="Source_20_Text"><text:s text:c="16"/>"coding LOC": 980,</text:span></text:p>
      <text:p text:style-name="Preformatted_20_Text"><text:span text:style-name="Source_20_Text"><text:s text:c="16"/>"Structural Mass": 4500.5,</text:span></text:p>
      <text:p text:style-name="Preformatted_20_Text"><text:span text:style-name="Source_20_Text"><text:s text:c="16"/>"control flow ratio": "81.6%"</text:span></text:p>
      <text:p text:style-name="Preformatted_20_Text"><text:span text:style-name="Source_20_Text"><text:s text:c="12"/>},</text:span></text:p>
      <text:p text:style-name="Preformatted_20_Text"><text:span text:style-name="Source_20_Text"><text:s text:c="12"/>"4. Risk Exposures": {</text:span></text:p>
      <text:p text:style-name="Preformatted_20_Text"><text:span text:style-name="Source_20_Text"><text:s text:c="16"/>"Cognitive Load": "72.4%",</text:span></text:p>
      <text:p text:style-name="Preformatted_20_Text"><text:span text:style-name="Source_20_Text"><text:s text:c="16"/>"Safety Score": "15.2%",</text:span></text:p>
      <text:p text:style-name="Preformatted_20_Text"><text:span text:style-name="Source_20_Text"><text:s text:c="16"/>"Tech Debt": "8.0%",</text:span></text:p>
      <text:p text:style-name="Preformatted_20_Text"><text:span text:style-name="Source_20_Text"><text:s text:c="16"/>"Verification": "100.0%",</text:span></text:p>
      <text:p text:style-name="Preformatted_20_Text"><text:span text:style-name="Source_20_Text"><text:s text:c="16"/>"Civil War": "0.0%"</text:span></text:p>
      <text:p text:style-name="Preformatted_20_Text"><text:span text:style-name="Source_20_Text"><text:s text:c="12"/>},</text:span></text:p>
      <text:p text:style-name="Preformatted_20_Text"><text:span text:style-name="Source_20_Text"><text:s text:c="12"/>"6. Structural DNA (Raw Hits)": {</text:span></text:p>
      <text:p text:style-name="Preformatted_20_Text"><text:span text:style-name="Source_20_Text"><text:s text:c="16"/>"logical control flow forks": 156,</text:span></text:p>
      <text:p text:style-name="Preformatted_20_Text"><text:span text:style-name="Source_20_Text"><text:s text:c="16"/>"function input parameter mass": 42,</text:span></text:p>
      <text:p text:style-name="Preformatted_20_Text"><text:span text:style-name="Source_20_Text"><text:s text:c="16"/>"unsafe structural logic fractures": 3,</text:span></text:p>
      <text:p text:style-name="Preformatted_20_Text"><text:span text:style-name="Source_20_Text"><text:s text:c="16"/>"amateur space debris prints": 12</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96"><text:span text:style-name="Source_20_Text">}</text:span></text:p>
      <text:h text:style-name="Heading_20_5" text:outline-level="5"><text:bookmark-start text:name="__RefHeading___Toc44208_2214491331"/>2.3.8.E. Forensic Report: Extremity Mapping<text:bookmark-end text:name="__RefHeading___Toc44208_2214491331"/></text:h>
      <text:p text:style-name="Text_20_body">The <text:span text:style-name="Source_20_Text">forensic_report</text:span> utilizes neutral, forensic terminology to provide relative rankings of every risk exposure defined in the schema.</text:p>
      <text:h text:style-name="Heading_20_6" text:outline-level="6"><text:bookmark-start text:name="__RefHeading___Toc44210_2214491331"/>2.3.8.E.1. Metric Ranking Requirements<text:bookmark-end text:name="__RefHeading___Toc44210_2214491331"/></text:h>
      <text:p text:style-name="Text_20_body">For each specific risk category (e.g., Tech Debt), the report must isolate:</text:p>
      <text:list text:style-name="L166">
        <text:list-item>
          <text:p text:style-name="P378"><text:span text:style-name="Strong_20_Emphasis">Primary Concentrations (Top 3):</text:span> The three artifacts exhibiting the highest statistical presence of the metric.</text:p>
        </text:list-item>
        <text:list-item>
          <text:p text:style-name="P378"><text:soft-page-break/><text:span text:style-name="Strong_20_Emphasis">Baseline Concentrations (Lowest 3):</text:span> The three artifacts exhibiting the lowest statistical presence of the metric.</text:p>
        </text:list-item>
      </text:list>
      <text:h text:style-name="Heading_20_6" text:outline-level="6"><text:bookmark-start text:name="__RefHeading___Toc44212_2214491331"/>2.3.8.E.2. Language Standards<text:bookmark-end text:name="__RefHeading___Toc44212_2214491331"/></text:h>
      <text:list text:style-name="L167">
        <text:list-item>
          <text:p text:style-name="P379">Use <text:span text:style-name="Strong_20_Emphasis">"Concentration"</text:span> or <text:span text:style-name="Strong_20_Emphasis">"Presence"</text:span> instead of "Severity" or "Score."</text:p>
        </text:list-item>
        <text:list-item>
          <text:p text:style-name="P379">Use <text:span text:style-name="Strong_20_Emphasis">"Primary"</text:span> and <text:span text:style-name="Strong_20_Emphasis">"Baseline"</text:span> instead of "Best" and "Worst."</text:p>
        </text:list-item>
        <text:list-item>
          <text:p text:style-name="P379">Use <text:span text:style-name="Strong_20_Emphasis">"High Density"</text:span> or <text:span text:style-name="Strong_20_Emphasis">"Low Density"</text:span> instead of "Good" or "Bad."</text:p>
        </text:list-item>
      </text:list>
      <text:h text:style-name="P170" text:outline-level="4"><text:bookmark-start text:name="__RefHeading___Toc44214_2214491331"/><text:span text:style-name="Source_20_Text"><text:span text:style-name="T157">2.3.9. The GPU Recorder (Hypercompressed Data Storage)</text:span></text:span><text:bookmark-end text:name="__RefHeading___Toc44214_2214491331"/></text:h>
      <text:p text:style-name="Text_20_body">The GPU Recorder (implemented as the GPURecorder class in gpu_recorder.py) is the instrument's high-performance recording head. Its purpose is to prepare project telemetry for real-time 3D rendering by transforming verbose, row-based data into a hypercompressed, columnar format. Unlike the Audit Recorder, which prioritizes human readability and legal compliance, the GPU Recorder prioritizes memory efficiency, bandwidth reduction, and computational speed.</text:p>
      <text:h text:style-name="Heading_20_5" text:outline-level="5"><text:bookmark-start text:name="__RefHeading___Toc44216_2214491331"/>2.3.9.A. Overview: The High-Speed Recording Head<text:bookmark-end text:name="__RefHeading___Toc44216_2214491331"/></text:h>
      <text:p text:style-name="Text_20_body">The GPU Recorder performs a "Destructive Columnar Pivot," converting the object-oriented manifest into a "Structure of Arrays" (SoA). This format is designed for high-performance physics engines where data can be injected directly into GPU buffers or vertex shaders without the overhead of parsing thousands of individual JSON objects.</text:p>
      <text:h text:style-name="Heading_20_5" text:outline-level="5"><text:bookmark-start text:name="__RefHeading___Toc44218_2214491331"/>2.3.9.B. Destructive RAM Eviction (Stage 3.3 Protocol)<text:bookmark-end text:name="__RefHeading___Toc44218_2214491331"/></text:h>
      <text:p text:style-name="Text_20_body">To handle massive repositories (10,000+ files) without exhausting system memory, the GPU Recorder employs an aggressive "Destructive RAM Eviction" strategy during the final recording phase.</text:p>
      <text:h text:style-name="Heading_20_6" text:outline-level="6"><text:bookmark-start text:name="__RefHeading___Toc44220_2214491331"/>2.3.9.B.1. Memory Reclamation Heuristics<text:bookmark-end text:name="__RefHeading___Toc44220_2214491331"/></text:h>
      <text:list text:style-name="L168">
        <text:list-item>
          <text:p text:style-name="P380"><text:span text:style-name="Strong_20_Emphasis">Iterative Destruction:</text:span> As each file (Star) is processed from the RAM-resident list, it is physically removed using <text:span text:style-name="Source_20_Text">.pop()</text:span>.</text:p>
        </text:list-item>
        <text:list-item>
          <text:p text:style-name="P380"><text:span text:style-name="Strong_20_Emphasis">Explicit Deletion:</text:span> Once a Star's data is converted into its columnar components, the original object reference is explicitly deleted (<text:span text:style-name="Source_20_Text">del s</text:span>).</text:p>
        </text:list-item>
        <text:list-item>
          <text:p text:style-name="P380"><text:span text:style-name="Strong_20_Emphasis">Garbage Collection Trigger:</text:span> A manual Python garbage collection cycle (<text:span text:style-name="Source_20_Text">gc.collect()</text:span>) is triggered immediately after the pivot to clear the memory heap before the final file-write operation.</text:p>
        </text:list-item>
      </text:list>
      <text:h text:style-name="Heading_20_5" text:outline-level="5"><text:bookmark-start text:name="__RefHeading___Toc44222_2214491331"/><text:soft-page-break/>2.3.9.C. The Columnar Pivot (Structure of Arrays)<text:bookmark-end text:name="__RefHeading___Toc44222_2214491331"/></text:h>
      <text:p text:style-name="Text_20_body">The recorder reorganizes the data into parallel arrays (Columns). This allows the rendering engine to stream specific attributes (e.g., just X/Y/Z coordinates or just Churn values) into GPU memory in contiguous blocks.</text:p>
      <text:h text:style-name="Heading_20_6" text:outline-level="6"><text:bookmark-start text:name="__RefHeading___Toc44224_2214491331"/>2.3.9.C.1. Primary Column Schema<text:bookmark-end text:name="__RefHeading___Toc44224_2214491331"/></text:h>
      <text:p text:style-name="Text_20_body">The GPU-ready manifest is organized into the following core columns:</text:p>
      <text:list text:style-name="L169">
        <text:list-item>
          <text:p text:style-name="P381"><text:span text:style-name="Strong_20_Emphasis">names/paths:</text:span> Identifier arrays.</text:p>
        </text:list-item>
        <text:list-item>
          <text:p text:style-name="P381"><text:span text:style-name="Strong_20_Emphasis">lang_ids:</text:span> Interned integer indices for linguistic species.</text:p>
        </text:list-item>
        <text:list-item>
          <text:p text:style-name="P381"><text:span text:style-name="Strong_20_Emphasis">locs/m_locs:</text:span> Physical and meaningful line counts.</text:p>
        </text:list-item>
        <text:list-item>
          <text:p text:style-name="P381"><text:span text:style-name="Strong_20_Emphasis">mass/entropy:</text:span> Quantized structural and variance metrics.</text:p>
        </text:list-item>
        <text:list-item>
          <text:p text:style-name="P381"><text:span text:style-name="Strong_20_Emphasis">pos_x/pos_y/pos_z:</text:span> Quantized 3D spatial coordinates.</text:p>
        </text:list-item>
        <text:list-item>
          <text:p text:style-name="P381"><text:span text:style-name="Strong_20_Emphasis">risks/hits:</text:span> Position-sensitive vectors for 13-point risks and 49-point structural DNA.</text:p>
        </text:list-item>
        <text:list-item>
          <text:p text:style-name="P381"><text:span text:style-name="Strong_20_Emphasis">satellites:</text:span> Minified internal function lists.</text:p>
        </text:list-item>
      </text:list>
      <text:h text:style-name="Heading_20_5" text:outline-level="5"><text:bookmark-start text:name="__RefHeading___Toc44226_2214491331"/>2.3.9.D. String Interning &amp; Text Minification<text:bookmark-end text:name="__RefHeading___Toc44226_2214491331"/></text:h>
      <text:p text:style-name="Text_20_body">To achieve maximum compression, the GPU Recorder utilizes <text:span text:style-name="Strong_20_Emphasis">String Interning</text:span>. This replaces repeated strings with unique integer identifiers.</text:p>
      <text:h text:style-name="Heading_20_6" text:outline-level="6"><text:bookmark-start text:name="__RefHeading___Toc44228_2214491331"/>2.3.9.D.1. Registry Lookups<text:bookmark-end text:name="__RefHeading___Toc44228_2214491331"/></text:h>
      <text:p text:style-name="Text_20_body">The recorder builds unique registries for metadata that would otherwise cause significant repetition:</text:p>
      <text:list text:style-name="L170">
        <text:list-item>
          <text:p text:style-name="P382"><text:span text:style-name="Strong_20_Emphasis">Languages:</text:span> <text:span text:style-name="Source_20_Text">lang_lookup</text:span></text:p>
        </text:list-item>
        <text:list-item>
          <text:p text:style-name="P382"><text:span text:style-name="Strong_20_Emphasis">Authors:</text:span> <text:span text:style-name="Source_20_Text">author_lookup</text:span></text:p>
        </text:list-item>
        <text:list-item>
          <text:p text:style-name="P382"><text:span text:style-name="Strong_20_Emphasis">Identity Proofs:</text:span> <text:span text:style-name="Source_20_Text">proof_lookup</text:span></text:p>
        </text:list-item>
        <text:list-item>
          <text:p text:style-name="P382"><text:span text:style-name="Strong_20_Emphasis">Textures (Satellite Types):</text:span> <text:span text:style-name="Source_20_Text">texture_lookup</text:span> (e.g., standard, necrosis, io, danger).</text:p>
        </text:list-item>
        <text:list-item>
          <text:p text:style-name="P382"><text:span text:style-name="Strong_20_Emphasis">Relegation Reasons:</text:span> <text:span text:style-name="Source_20_Text">reason_lookup</text:span></text:p>
        </text:list-item>
      </text:list>
      <text:p text:style-name="Text_20_body">The final manifest stores integer indices pointing to these registries in the <text:span text:style-name="Source_20_Text">meta</text:span> header, significantly reducing the file size for repositories with consistent authorship or language distributions.</text:p>
      <text:h text:style-name="Heading_20_5" text:outline-level="5"><text:bookmark-start text:name="__RefHeading___Toc44230_2214491331"/><text:soft-page-break/>2.3.9.E. Numerical Quantization &amp; Positional Schemas<text:bookmark-end text:name="__RefHeading___Toc44230_2214491331"/></text:h>
      <text:p text:style-name="Text_20_body">Floating-point values are precision-scaled and converted to integers to match the input expectations of vertex shaders and to minimize JSON character counts.</text:p>
      <text:h text:style-name="Heading_20_6" text:outline-level="6"><text:bookmark-start text:name="__RefHeading___Toc44232_2214491331"/>2.3.9.E.1. Physics and Exposure Scaling<text:bookmark-end text:name="__RefHeading___Toc44232_2214491331"/></text:h>
      <text:list text:style-name="L171">
        <text:list-item>
          <text:p text:style-name="P383"><text:span text:style-name="Strong_20_Emphasis">Physics Scaling (x10):</text:span> Applied to Spatial Coordinates (X, Y, Z) and Structural Mass. (e.g., a coordinate of <text:span text:style-name="Source_20_Text">150.45</text:span> is stored as <text:span text:style-name="Source_20_Text">1505</text:span>).</text:p>
        </text:list-item>
        <text:list-item>
          <text:p text:style-name="P383"><text:span text:style-name="Strong_20_Emphasis">Exposure Scaling (x1000):</text:span> Applied to the Entropy Signal and the 13-point Risk Vector. (e.g., a Tech Debt score of <text:span text:style-name="Source_20_Text">85.4%</text:span> is stored as <text:span text:style-name="Source_20_Text">854</text:span>).</text:p>
        </text:list-item>
      </text:list>
      <text:h text:style-name="Heading_20_6" text:outline-level="6"><text:bookmark-start text:name="__RefHeading___Toc44234_2214491331"/>2.3.9.E.2. Positional Vector Precision<text:bookmark-end text:name="__RefHeading___Toc44234_2214491331"/></text:h>
      <text:p text:style-name="Text_20_body">The recorder enforces strict ordering for all vectors to ensure the rendering engine decodes them correctly without key-based overhead:</text:p>
      <text:list text:style-name="L172">
        <text:list-item>
          <text:p text:style-name="P384"><text:span text:style-name="Strong_20_Emphasis">RISK_SCHEMA:</text:span> 13-point risk vector [cognitive, safety, debt, verification, api, async, flux, graveyard, spec, stability, churn, doc, civil_war].</text:p>
        </text:list-item>
        <text:list-item>
          <text:p text:style-name="P384"><text:span text:style-name="Strong_20_Emphasis">SAT_SCHEMA:</text:span> 8-point internal function vector [name, loc, branch, angle_x10, args, type_id, ratio_x1000, mag_x10].</text:p>
        </text:list-item>
      </text:list>
      <text:h text:style-name="Heading_20_5" text:outline-level="5"><text:bookmark-start text:name="__RefHeading___Toc44236_2214491331"/>2.3.9.F. Final Sealing (Maximized Compression)<text:bookmark-end text:name="__RefHeading___Toc44236_2214491331"/></text:h>
      <text:p text:style-name="Text_20_body">The final GPU manifest is serialized with maximum JSON compression.</text:p>
      <text:list text:style-name="L173">
        <text:list-item>
          <text:p text:style-name="P385"><text:span text:style-name="Strong_20_Emphasis">Indentation Removal:</text:span> <text:span text:style-name="Source_20_Text">indent=None</text:span> to strip all whitespace.</text:p>
        </text:list-item>
        <text:list-item>
          <text:p text:style-name="P385"><text:span text:style-name="Strong_20_Emphasis">Separator Minification:</text:span> <text:span text:style-name="Source_20_Text">separators=(',', ':')</text:span> to remove spaces between keys and values.</text:p>
        </text:list-item>
        <text:list-item>
          <text:p text:style-name="P385"><text:span text:style-name="Strong_20_Emphasis">Result:</text:span> A hypercompressed <text:span text:style-name="Source_20_Text">galaxy_gpu.json</text:span> that provides the lowest possible latency for the 3D visualizer initialization.</text:p>
        </text:list-item>
      </text:list>
      <text:p text:style-name="P169"><text:span text:style-name="Source_20_Text"><text:span text:style-name="T157"/></text:span></text:p>
      <text:h text:style-name="P165" text:outline-level="4"><text:bookmark-start text:name="__RefHeading___Toc11741_959624642"/><text:span text:style-name="Source_20_Text"><text:span text:style-name="T157">2</text:span></text:span><text:span text:style-name="Source_20_Text"><text:span text:style-name="T38">.</text:span></text:span><text:span text:style-name="Source_20_Text"><text:span text:style-name="T158">3</text:span></text:span><text:span text:style-name="Source_20_Text"><text:span text:style-name="T38">.</text:span></text:span><text:span text:style-name="Source_20_Text"><text:span text:style-name="T193">10</text:span></text:span><text:span text:style-name="Source_20_Text"><text:span text:style-name="T38">. </text:span></text:span><text:span text:style-name="Source_20_Text"><text:span text:style-name="T110">Overview of scanner_config.py </text:span></text:span><text:bookmark-end text:name="__RefHeading___Toc11741_959624642"/></text:h>
      <text:p text:style-name="P166"><text:span text:style-name="Source_20_Text"><text:span text:style-name="T110">If </text:span></text:span><text:span text:style-name="Source_20_Text"><text:span text:style-name="T426">scanner.py</text:span></text:span><text:span text:style-name="Source_20_Text"><text:span text:style-name="T110"> is the engine, </text:span></text:span><text:span text:style-name="Source_20_Text"><text:span text:style-name="T426">scanner_config.py</text:span></text:span><text:span text:style-name="Source_20_Text"><text:span text:style-name="T110"> represents the immutable "Laws of Physics" that govern the GitGalaxy universe. It allows the system to remain code-agnostic by isolating language-specific rules into three static data structures.</text:span></text:span></text:p>
      <text:list text:style-name="L174">
        <text:list-item>
          <text:p text:style-name="P386"><text:span text:style-name="Strong_20_Emphasis">The Fidelity Matrix:</text:span> This section defines the <text:span text:style-name="Strong_20_Emphasis">Trust Tiers</text:span>, assigning every supported language a <text:span text:style-name="Strong_20_Emphasis">Fidelity Coefficient ()</text:span> and <text:span text:style-name="Strong_20_Emphasis">Implicit Risk ()</text:span>. It establishes <text:soft-page-break/>the baseline "Trust" of a language (e.g., Tier 1 for Rust, Tier 3 for Shell) to normalize risk calculations across different syntaxes.</text:p>
        </text:list-item>
        <text:list-item>
          <text:p text:style-name="P386"><text:span text:style-name="Strong_20_Emphasis">Path Modifiers:</text:span> This dictionary defines the <text:span text:style-name="Strong_20_Emphasis">Environmental Physics</text:span>. It maps regex patterns to multipliers (), allowing the scanner to recognize that identical code carries different weight depending on its location (e.g., applying a 1.2x risk amplification to files in <text:span text:style-name="Source_20_Text">/kernel/</text:span> while applying a 0.9x dampener to files in <text:span text:style-name="Source_20_Text">/mocks/</text:span>).</text:p>
        </text:list-item>
        <text:list-item>
          <text:p text:style-name="P386"><text:span text:style-name="Strong_20_Emphasis"><text:span text:style-name="T176">The Regex Registry:</text:span></text:span><text:span text:style-name="Source_20_Text"><text:span text:style-name="T176"> The core knowledge base containing standardized regex patterns for 27+ languages. It maps abstract risk concepts (Logic, Safety, Danger, Flux) to specific syntax (e.g., mapping </text:span></text:span><text:span text:style-name="Source_20_Text"><text:span text:style-name="T471">try/catch</text:span></text:span><text:span text:style-name="Source_20_Text"><text:span text:style-name="T176"> in C# and </text:span></text:span><text:span text:style-name="Source_20_Text"><text:span text:style-name="T471">pcall</text:span></text:span><text:span text:style-name="Source_20_Text"><text:span text:style-name="T176"> in Lua to the same "Safety" signal), ensuring that the Physics Engine perceives all languages through a unified lens.</text:span></text:span></text:p>
        </text:list-item>
      </text:list>
      <text:h text:style-name="Heading_20_3" text:outline-level="3"><text:bookmark-start text:name="__RefHeading___Toc65767_4054234433"/><text:span text:style-name="Source_20_Text"><text:span text:style-name="T38">2.4. Strategy Validation – </text:span></text:span><text:span text:style-name="Source_20_Text"><text:span text:style-name="T178">Does this work? </text:span></text:span><text:bookmark-end text:name="__RefHeading___Toc65767_4054234433"/></text:h>
      <text:h text:style-name="P97" text:outline-level="4"><text:bookmark-start text:name="__RefHeading___Toc36590_1787320247"/><text:span text:style-name="T302">2.</text:span><text:span text:style-name="T300">4.0. Claim 1 – Optimum Search Strategies Change with Scale</text:span><text:bookmark-end text:name="__RefHeading___Toc36590_1787320247"/></text:h>
      <text:p text:style-name="P98"><text:span text:style-name="T300">In the late 1980s, computational biology hit a wall. DNA databases were growing exponentially, but the algorithm used to search them—the </text:span><text:span text:style-name="T309">Smith-Waterman algorithm</text:span><text:span text:style-name="T300">—was bottlenecked by its own perfection. It exhaustively evaluated every single base-pair combination to guarantee the absolute optimal alignment. As databases scaled, running a single search began taking days of supercomputer time. The pursuit of microscopic precision was blinding scientists to the macroscopic reality of the genome.</text:span></text:p>
      <text:p text:style-name="Text_20_body">Then came <text:span text:style-name="T1">BLAST</text:span>.</text:p>
      <text:p text:style-name="Text_20_body">BLAST committed what purists considered a scientific sin: <text:span text:style-name="T1">it intentionally abandoned mathematical perfection.</text:span> It used a <text:span text:style-name="T287">heuristic</text:span> approach, scanning for short, high-scoring patterns and extrapolating the rest. It occasionally missed the absolute optimal match. But it was <text:span text:style-name="T287">orders of magnitude faster</text:span>. By trading a tiny margin of pedantic accuracy for massive speed, BLAST unlocked the genomic revolution.</text:p>
      <text:p text:style-name="Text_20_body">Software Engineering is Trapped in the Smith-Waterman Era. Today, enterprise software is reaching genomic scale. Driven by microservice sprawl and Generative AI, codebases are ballooning to millions of lines across dozens of languages.</text:p>
      <text:p text:style-name="Text_20_body">Yet, the static analysis industry is obsessively clinging to its own version of Smith-Waterman: <text:span text:style-name="T1">The Abstract Syntax Tree (AST).</text:span></text:p>
      <text:p text:style-name="Text_20_body"><text:soft-page-break/>ASTs are mathematically perfect. They understand scope, types, and compiler logic flawlessly. But they are incredibly heavy. They require your code to perfectly compile. They choke if a single dependency is missing. And crucially, they are monolingual. Trying to run an AST across a 100,000-file, multi-lingual enterprise system takes hours, requires uploading your IP to a cloud server, and forces you to pray the build doesn't fail.</text:p>
      <text:p text:style-name="Text_20_body">Trading the Microscope for a Telescope. When we built GitGalaxy to visualize software architecture as explorable 3D universes, we made a deliberate, engineered choice: <text:span text:style-name="T2">We threw out the ASTs.</text:span></text:p>
      <text:p text:style-name="Text_20_body">Instead, we built a <text:span text:style-name="T1">Universal Heuristic Regex Engine.</text:span></text:p>
      <text:p text:style-name="Text_20_body">Does it have blind spots? Yes. We document them openly in our physics engine. We know that complex C++ macros can cause a "False Cold" reading.</text:p>
      <text:p text:style-name="Text_20_body">But by accepting that 5% margin of microscopic error, we unlocked a macroscopic superpower. <text:span text:style-name="T2">We map</text:span><text:span text:style-name="T289"> intent</text:span><text:span text:style-name="T2">, not machine execution, </text:span><text:span text:style-name="T19">at speed, at scale, with privacy, regardless of if it compiles, regardless of language. </text:span></text:p>
      <text:p text:style-name="Text_20_body">If a legacy <text:span text:style-name="Source_20_Text">PaymentController.java</text:span> file is 4,000 lines long, contains 45 <text:span text:style-name="Source_20_Text">try/catch</text:span> blocks, 12 instances of variable mutation, and 8 nested <text:span text:style-name="Source_20_Text">switch</text:span> statements, missing a single edge-case ternary operator does not change the physical mass of the star. It doesn't change the fact that the file is radiating <text:span text:style-name="T2">Deep Purple (Brain-Melting Cognitive Load).</text:span></text:p>
      <text:p text:style-name="Text_20_body">The visual <text:span text:style-name="T287">Gestalt</text:span> remains absolutely, undeniably accurate.</text:p>
      <text:p text:style-name="Text_20_body">If you need to know exactly which line of code is missing a semicolon, use a compiler. Use an AST. Use a microscope.</text:p>
      <text:p text:style-name="Text_20_body">But if you are trying to understand where the AI-generated sprawl is hiding, where the technical debt is violently expanding, and where the cognitive load is melting your team’s brains... you don't need a microscope. <text:span text:style-name="T1">You need a telescope.</text:span></text:p>
      <text:p text:style-name="P98"><text:span text:style-name="T300"/></text:p>
      <text:h text:style-name="P91" text:outline-level="4"><text:bookmark-start text:name="__RefHeading___Toc65769_4054234433"/><text:span text:style-name="T302">2.4.</text:span><text:span text:style-name="T300">1. </text:span><text:span text:style-name="T305">Claim 2 – Coding Languages </text:span><text:span text:style-name="T300">Evol</text:span><text:span text:style-name="T305">ve</text:span><text:span text:style-name="T300"> Toward</text:span><text:span text:style-name="T303">s</text:span><text:span text:style-name="T300"> </text:span><text:span text:style-name="Strong_20_Emphasis"><text:span text:style-name="T307">Explicitness </text:span></text:span><text:bookmark-end text:name="__RefHeading___Toc65769_4054234433"/></text:h>
      <text:p text:style-name="P93"><text:span text:style-name="T440">We</text:span> assess<text:span text:style-name="T440">ed </text:span>of our heuristic regex analysis <text:span text:style-name="T440">accuracy</text:span> across 27 distinct <text:span text:style-name="T485">historical</text:span> programming languages. <text:span text:style-name="T485">T</text:span>he <text:span text:style-name="Strong_20_Emphasis"><text:span text:style-name="T195">evidence strongly suggests</text:span></text:span> an inarguable pattern: <text:span text:style-name="T195">the history of software </text:span><text:span text:style-name="T215">language</text:span><text:span text:style-name="T195"> development </text:span><text:span text:style-name="T215">is a trend towards</text:span><text:span text:style-name="Strong_20_Emphasis"><text:span text:style-name="T195"> </text:span></text:span><text:span text:style-name="Strong_20_Emphasis"><text:span text:style-name="T216">explicitness, which correlates with</text:span></text:span><text:span text:style-name="Strong_20_Emphasis"><text:span text:style-name="T215"> </text:span></text:span><text:span text:style-name="Strong_20_Emphasis"><text:span text:style-name="T216">the ability for regex to scan intent.</text:span></text:span></text:p>
      <text:p text:style-name="P93"><text:soft-page-break/><text:span text:style-name="T428"><text:s/></text:span><text:span text:style-name="T439">W</text:span><text:span text:style-name="T428">hen languages are explicit, regex scanning works well but for implicit languages, regex struggles</text:span>. In older languages, intent is often "hidden" requiring deep context to understand. In modern languages, intent is "broadcasted" through explicit keywords and rigid structures. <text:span text:style-name="T440">Older languages literally don’t have the same vocabulary to explicitly describe concepts that modern languages do. </text:span><text:span text:style-name="T429">The following</text:span> matri<text:span text:style-name="T429">ces </text:span>serves as a map of that progression—showing how languages have evolved to "declare" their <text:span text:style-name="T429">intent </text:span>clearly to both machines and humans.</text:p>
      <text:h text:style-name="Heading_20_5" text:outline-level="5"><text:bookmark-start text:name="__RefHeading___Toc65773_4054234433"/><text:span text:style-name="T435">2.4.2.1</text:span>. False Positives &amp; Error Direction (Equations)<text:bookmark-end text:name="__RefHeading___Toc65773_4054234433"/></text:h>
      <text:list text:style-name="L176">
        <text:list-item>
          <text:p text:style-name="P388"><text:span text:style-name="Strong_20_Emphasis"><text:span text:style-name="T195">Neg-Safe Error Direction (Over-flagging):</text:span></text:span><text:span text:style-name="T195"> In modern JavaScript, the double-bang </text:span><text:span text:style-name="Source_20_Text"><text:span text:style-name="T195">!!</text:span></text:span><text:span text:style-name="T195"> operator is often flagged as a safety risk. While it converts types (risk), it is usually a standard idiom for truthiness. Direction: </text:span><text:span text:style-name="Strong_20_Emphasis"><text:span text:style-name="T195">False Risk Inflation</text:span></text:span><text:span text:style-name="T195">.</text:span></text:p>
        </text:list-item>
        <text:list-item>
          <text:p text:style-name="P388"><text:span text:style-name="Strong_20_Emphasis"><text:span text:style-name="T195">Tests Error Direction (Boilerplate Noise):</text:span></text:span><text:span text:style-name="T195"> In large enterprise projects, non-test files often contain internal helper methods like </text:span><text:span text:style-name="Source_20_Text"><text:span text:style-name="T195">validateInput</text:span></text:span><text:span text:style-name="T195"> or </text:span><text:span text:style-name="Source_20_Text"><text:span text:style-name="T195">checkStatus</text:span></text:span><text:span text:style-name="T195">. These can hit "TestKeywords" (</text:span><text:span text:style-name="Source_20_Text"><text:span text:style-name="T195">validate</text:span></text:span><text:span text:style-name="T195">, </text:span><text:span text:style-name="Source_20_Text"><text:span text:style-name="T195">check</text:span></text:span><text:span text:style-name="T195">). Direction: </text:span><text:span text:style-name="Strong_20_Emphasis"><text:span text:style-name="T195">False Verification Bonus</text:span></text:span><text:span text:style-name="T195">.</text:span></text:p>
        </text:list-item>
        <text:list-item>
          <text:p text:style-name="P388"><text:span text:style-name="Strong_20_Emphasis"><text:span text:style-name="T195">Heat Error Direction (Macro Ambiguity):</text:span></text:span><text:span text:style-name="T195"> C/C++ Macros that wrap simple loops can be missed, leading to </text:span><text:span text:style-name="Strong_20_Emphasis"><text:span text:style-name="T195">False Cold</text:span></text:span><text:span text:style-name="T195">. Conversely, complex macros that wrap definitions can look like branching. </text:span></text:p>
        </text:list-item>
      </text:list>
      <text:p text:style-name="P93"/>
      <text:h text:style-name="P90" text:outline-level="4"><text:bookmark-start text:name="__RefHeading___Toc65775_4054234433"/><text:span text:style-name="T430">2.4.3</text:span>. <text:span text:style-name="T430">Assessing Regex Sub-Equations Across 27 Languages</text:span><text:bookmark-end text:name="__RefHeading___Toc65775_4054234433"/></text:h>
      <text:p text:style-name="P93"><text:span text:style-name="Emphasis"><text:span text:style-name="T300">This matrix tracks the implementation status of all 24 </text:span></text:span><text:span text:style-name="Emphasis"><text:span text:style-name="T304">regex </text:span></text:span><text:span text:style-name="Emphasis"><text:span text:style-name="T300">heuristic sensors across the GitGalaxy registry, </text:span></text:span><text:span text:style-name="Emphasis"><text:span text:style-name="T304">collected from scanner_config.py. </text:span></text:span></text:p>
      <text:p text:style-name="Text_20_body"><text:bookmark-start text:name="__RefHeading___Toc36592_1787320247"/>Tier 1 - Modern Systems<text:bookmark-end text:name="__RefHeading___Toc36592_1787320247"/></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E"/>
        <table:table-column table:style-name="Table21.I"/>
        <table:table-column table:style-name="Table21.J"/>
        <table:table-row>
          <table:table-cell table:style-name="Table21.A1" office:value-type="string">
            <text:p text:style-name="P95">Metric</text:p>
          </table:table-cell>
          <table:table-cell table:style-name="Table21.A1" office:value-type="string">
            <text:p text:style-name="P95">JavaScript</text:p>
          </table:table-cell>
          <table:table-cell table:style-name="Table21.A1" office:value-type="string">
            <text:p text:style-name="P95">TypeScript</text:p>
          </table:table-cell>
          <table:table-cell table:style-name="Table21.A1" office:value-type="string">
            <text:p text:style-name="P95">Python</text:p>
          </table:table-cell>
          <table:table-cell table:style-name="Table21.A1" office:value-type="string">
            <text:p text:style-name="P95">Java</text:p>
          </table:table-cell>
          <table:table-cell table:style-name="Table21.A1" office:value-type="string">
            <text:p text:style-name="P95">C#</text:p>
          </table:table-cell>
          <table:table-cell table:style-name="Table21.A1" office:value-type="string">
            <text:p text:style-name="P95">Go</text:p>
          </table:table-cell>
          <table:table-cell table:style-name="Table21.A1" office:value-type="string">
            <text:p text:style-name="P95">Rust</text:p>
          </table:table-cell>
          <table:table-cell table:style-name="Table21.A1" office:value-type="string">
            <text:p text:style-name="P95">C++</text:p>
          </table:table-cell>
          <table:table-cell table:style-name="Table21.A1" office:value-type="string">
            <text:p text:style-name="P95">C</text:p>
          </table:table-cell>
        </table:table-row>
        <table:table-row>
          <table:table-cell table:style-name="Table21.A1" office:value-type="string">
            <text:p text:style-name="P94"><text:span text:style-name="Strong_20_Emphasis">Branch (Angle)</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Args (Mas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Linear (Flow)</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Func Start (Sat)</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ext:soft-page-break/>
        <table:table-row>
          <table:table-cell table:style-name="Table21.A1" office:value-type="string">
            <text:p text:style-name="P94"><text:span text:style-name="Strong_20_Emphasis">Safety</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Safety Neg</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Danger</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IO</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API</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Flux</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Graveyard</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Doc</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Test</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Concurrency</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UI Framework</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Closure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Global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Decorator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Generic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Comprehension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Scientific</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Heat Triggers</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Import</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row>
          <table:table-cell table:style-name="Table21.A1" office:value-type="string">
            <text:p text:style-name="P94"><text:span text:style-name="Strong_20_Emphasis">Ownership</text:span></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cell table:style-name="Table21.A1" office:value-type="string">
            <text:p text:style-name="P94">✅</text:p>
          </table:table-cell>
        </table:table-row>
      </table:table>
      <text:p text:style-name="Text_20_body"/>
      <text:p text:style-name="Text_20_body"><text:bookmark-start text:name="__RefHeading___Toc36594_1787320247"/>Group 2: Specialized &amp; Functional<text:bookmark-end text:name="__RefHeading___Toc36594_1787320247"/></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E" table:number-columns-repeated="2"/>
        <table:table-column table:style-name="Table26.F"/>
        <table:table-column table:style-name="Table26.J"/>
        <text:soft-page-break/>
        <table:table-row>
          <table:table-cell table:style-name="Table26.A1" office:value-type="string">
            <text:p text:style-name="P95">Metric</text:p>
          </table:table-cell>
          <table:table-cell table:style-name="Table26.A1" office:value-type="string">
            <text:p text:style-name="P95">PHP</text:p>
          </table:table-cell>
          <table:table-cell table:style-name="Table26.A1" office:value-type="string">
            <text:p text:style-name="P95">SW</text:p>
          </table:table-cell>
          <table:table-cell table:style-name="Table26.A1" office:value-type="string">
            <text:p text:style-name="P95">KT</text:p>
          </table:table-cell>
          <table:table-cell table:style-name="Table26.A1" office:value-type="string">
            <text:p text:style-name="P95">SH</text:p>
          </table:table-cell>
          <table:table-cell table:style-name="Table26.A1" office:value-type="string">
            <text:p text:style-name="P95">RB</text:p>
          </table:table-cell>
          <table:table-cell table:style-name="Table26.A1" office:value-type="string">
            <text:p text:style-name="P95">SQ</text:p>
          </table:table-cell>
          <table:table-cell table:style-name="Table26.A1" office:value-type="string">
            <text:p text:style-name="P95">HS</text:p>
          </table:table-cell>
          <table:table-cell table:style-name="Table26.A1" office:value-type="string">
            <text:p text:style-name="P95">LU</text:p>
          </table:table-cell>
          <table:table-cell table:style-name="Table26.A1" office:value-type="string">
            <text:p text:style-name="P95">PL</text:p>
          </table:table-cell>
        </table:table-row>
        <table:table-row>
          <table:table-cell table:style-name="Table26.A1" office:value-type="string">
            <text:p text:style-name="P94"><text:span text:style-name="Strong_20_Emphasis">Branch (Angle)</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Args (Mas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Linear (Flow)</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Func Start (Sat)</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Safety</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Safety Neg</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Danger</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IO</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API</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Flux</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Graveyard</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Doc</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Test</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Concurrency</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UI Framework</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Closure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Global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Decorator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Generic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Comprehension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Scientific</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ext:soft-page-break/>
        <table:table-row>
          <table:table-cell table:style-name="Table26.A1" office:value-type="string">
            <text:p text:style-name="P94"><text:span text:style-name="Strong_20_Emphasis">Heat Triggers</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Import</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row>
          <table:table-cell table:style-name="Table26.A1" office:value-type="string">
            <text:p text:style-name="P94"><text:span text:style-name="Strong_20_Emphasis">Ownership</text:span></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cell table:style-name="Table26.A1" office:value-type="string">
            <text:p text:style-name="P94">✅</text:p>
          </table:table-cell>
        </table:table-row>
      </table:table>
      <text:p text:style-name="Text_20_body"/>
      <text:p text:style-name="Text_20_body"><text:bookmark-start text:name="__RefHeading___Toc36596_1787320247"/>Group 3: Legacy, Web, &amp; Embedded<text:bookmark-end text:name="__RefHeading___Toc36596_1787320247"/></text:p>
      <table:table table:name="Table27" table:style-name="Table27">
        <table:table-column table:style-name="Table27.A"/>
        <table:table-column table:style-name="Table27.B"/>
        <table:table-column table:style-name="Table27.C" table:number-columns-repeated="3"/>
        <table:table-column table:style-name="Table27.F"/>
        <table:table-column table:style-name="Table27.B"/>
        <table:table-column table:style-name="Table27.H"/>
        <table:table-column table:style-name="Table27.F"/>
        <table:table-column table:style-name="Table27.J"/>
        <table:table-row>
          <table:table-cell table:style-name="Table27.A1" office:value-type="string">
            <text:p text:style-name="P95">Metric</text:p>
          </table:table-cell>
          <table:table-cell table:style-name="Table27.A1" office:value-type="string">
            <text:p text:style-name="P95">HT</text:p>
          </table:table-cell>
          <table:table-cell table:style-name="Table27.A1" office:value-type="string">
            <text:p text:style-name="P95">CS</text:p>
          </table:table-cell>
          <table:table-cell table:style-name="Table27.A1" office:value-type="string">
            <text:p text:style-name="P95">FB</text:p>
          </table:table-cell>
          <table:table-cell table:style-name="Table27.A1" office:value-type="string">
            <text:p text:style-name="P95">AS</text:p>
          </table:table-cell>
          <table:table-cell table:style-name="Table27.A1" office:value-type="string">
            <text:p text:style-name="P95">AG</text:p>
          </table:table-cell>
          <table:table-cell table:style-name="Table27.A1" office:value-type="string">
            <text:p text:style-name="P95">TK</text:p>
          </table:table-cell>
          <table:table-cell table:style-name="Table27.A1" office:value-type="string">
            <text:p text:style-name="P95">MP</text:p>
          </table:table-cell>
          <table:table-cell table:style-name="Table27.A1" office:value-type="string">
            <text:p text:style-name="P95">OC</text:p>
          </table:table-cell>
          <table:table-cell table:style-name="Table27.A1" office:value-type="string">
            <text:p text:style-name="P95">SL</text:p>
          </table:table-cell>
        </table:table-row>
        <table:table-row>
          <table:table-cell table:style-name="Table27.A1" office:value-type="string">
            <text:p text:style-name="P94"><text:span text:style-name="Strong_20_Emphasis">Branch (Angle)</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Args (Mas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Linear (Flow)</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Func Start (Sat)</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Safety</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Safety Neg</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Danger</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IO</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API</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Flux</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Graveyard</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Doc</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Test</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Concurrency</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UI Framework</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Closure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ext:soft-page-break/>
        <table:table-row>
          <table:table-cell table:style-name="Table27.A1" office:value-type="string">
            <text:p text:style-name="P94"><text:span text:style-name="Strong_20_Emphasis">Global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Decorator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Generic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Comprehension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Scientific</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Heat Triggers</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Import</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row>
          <table:table-cell table:style-name="Table27.A1" office:value-type="string">
            <text:p text:style-name="P94"><text:span text:style-name="Strong_20_Emphasis">Ownership</text:span></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cell table:style-name="Table27.A1" office:value-type="string">
            <text:p text:style-name="P94">✅</text:p>
          </table:table-cell>
        </table:table-row>
      </table:table>
      <text:p text:style-name="Text_20_body"><text:span text:style-name="Emphasis">(Group 3 Key: HT=HTML, CS=CSS, FB=Fortran, AS=Assembly, AG=AGC Assembly, TK=HyperTalk, MP=MicroPython, OC=Objective-C, SL=SQL)</text:span></text:p>
      <text:h text:style-name="Heading_20_5" text:outline-level="5"><text:bookmark-start text:name="__RefHeading___Toc65777_4054234433"/><text:span text:style-name="T435">2.4.3</text:span>.1. False Positives &amp; Error Direction (Overlays)<text:bookmark-end text:name="__RefHeading___Toc65777_4054234433"/></text:h>
      <text:list text:style-name="L177">
        <text:list-item>
          <text:p text:style-name="P389"><text:span text:style-name="Strong_20_Emphasis"><text:span text:style-name="T195">State Flux Error Direction (Severe Deflation):</text:span></text:span><text:span text:style-name="T195"> In non-reactive languages (C, Assembly, COBOL), tracking mutation is effectively blind. Files appear "Cold/Stable" even if they are heavily mutable. Direction: </text:span><text:span text:style-name="Strong_20_Emphasis"><text:span text:style-name="T195">False Stability</text:span></text:span><text:span text:style-name="T195">.</text:span></text:p>
        </text:list-item>
        <text:list-item>
          <text:p text:style-name="P389"><text:span text:style-name="Strong_20_Emphasis"><text:span text:style-name="T195">Cognitive Load Error Direction (Boilerplate Inflation):</text:span></text:span><text:span text:style-name="T195"> In COBOL and older Java, the extreme verbosity and repetitive declarations trigger Heat. Direction: </text:span><text:span text:style-name="Strong_20_Emphasis"><text:span text:style-name="T195">False Cognitive Heat</text:span></text:span><text:span text:style-name="T195">.</text:span></text:p>
        </text:list-item>
        <text:list-item>
          <text:p text:style-name="P389"><text:span text:style-name="Strong_20_Emphasis"><text:span text:style-name="T195">Private Info Error Direction (False Alarms):</text:span></text:span><text:span text:style-name="T195"> The scanner flags generic variables like </text:span><text:span text:style-name="Source_20_Text"><text:span text:style-name="T195">KEY</text:span></text:span><text:span text:style-name="T195"> or </text:span><text:span text:style-name="Source_20_Text"><text:span text:style-name="T195">ID</text:span></text:span><text:span text:style-name="T195"> as private exposure. Direction: </text:span><text:span text:style-name="Strong_20_Emphasis"><text:span text:style-name="T195">False Anxiety Overlay</text:span></text:span><text:span text:style-name="T195">.</text:span></text:p>
        </text:list-item>
      </text:list>
      <text:p text:style-name="P62"/>
      <text:h text:style-name="P90" text:outline-level="4"><text:bookmark-start text:name="__RefHeading___Toc65779_4054234433"/><text:span text:style-name="T435">2.4.4</text:span>. <text:span text:style-name="T430">Assessing </text:span>Risk Exposure <text:span text:style-name="T430">Across 27 Languages</text:span><text:bookmark-end text:name="__RefHeading___Toc65779_4054234433"/></text:h>
      <text:p text:style-name="P62"><text:span text:style-name="T195">This matrix assesses the reliability of the Risk </text:span><text:span text:style-name="T220">Exposures across languages.</text:span></text:p>
      <text:p text:style-name="P93"/>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H"/>
        <table:table-column table:style-name="Table22.I"/>
        <table:table-column table:style-name="Table22.L"/>
        <table:table-row>
          <table:table-cell table:style-name="Table22.A1" office:value-type="string">
            <text:p text:style-name="P62">Language</text:p>
          </table:table-cell>
          <table:table-cell table:style-name="Table22.A1" office:value-type="string">
            <text:p text:style-name="P62">Debt</text:p>
          </table:table-cell>
          <table:table-cell table:style-name="Table22.A1" office:value-type="string">
            <text:p text:style-name="P62">Doc</text:p>
          </table:table-cell>
          <table:table-cell table:style-name="Table22.A1" office:value-type="string">
            <text:p text:style-name="P62">Cog. Load</text:p>
          </table:table-cell>
          <table:table-cell table:style-name="Table22.A1" office:value-type="string">
            <text:p text:style-name="P62">Safety</text:p>
          </table:table-cell>
          <table:table-cell table:style-name="Table22.A1" office:value-type="string">
            <text:p text:style-name="P62">Test</text:p>
          </table:table-cell>
          <table:table-cell table:style-name="Table22.A1" office:value-type="string">
            <text:p text:style-name="P62">API</text:p>
          </table:table-cell>
          <table:table-cell table:style-name="Table22.A1" office:value-type="string">
            <text:p text:style-name="P62">Concur</text:p>
          </table:table-cell>
          <table:table-cell table:style-name="Table22.A1" office:value-type="string">
            <text:p text:style-name="P62">State</text:p>
          </table:table-cell>
          <table:table-cell table:style-name="Table22.A1" office:value-type="string">
            <text:p text:style-name="P62">Private</text:p>
          </table:table-cell>
          <table:table-cell table:style-name="Table22.A1" office:value-type="string">
            <text:p text:style-name="P62">Churn</text:p>
          </table:table-cell>
          <table:table-cell table:style-name="Table22.A1" office:value-type="string">
            <text:p text:style-name="P62">Audit</text:p>
          </table:table-cell>
        </table:table-row>
        <table:table-row>
          <table:table-cell table:style-name="Table22.A1" office:value-type="string">
            <text:p text:style-name="P93"><text:span text:style-name="Strong_20_Emphasis">1. Java</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ext:soft-page-break/>
        <table:table-row>
          <table:table-cell table:style-name="Table22.A1" office:value-type="string">
            <text:p text:style-name="P93"><text:span text:style-name="Strong_20_Emphasis">2. C#</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3. Go</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4. Rust</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5. Kotlin</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6. Swift</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7. Python</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8. SQL</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9. uPy</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0. Hask</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1. JS</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2. TS</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3. C</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4. C++</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5. PHP</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6. Obj-C</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7. Lua</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8. COBOL</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19. Fort</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0. Shell</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1. Ruby</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2. Perl</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3. HTML</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4. CSS</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ext:soft-page-break/>
        <table:table-row>
          <table:table-cell table:style-name="Table22.A1" office:value-type="string">
            <text:p text:style-name="P93"><text:span text:style-name="Strong_20_Emphasis">25. Asm</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6. AGC</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row>
          <table:table-cell table:style-name="Table22.A1" office:value-type="string">
            <text:p text:style-name="P93"><text:span text:style-name="Strong_20_Emphasis">27. HTalk</text:span></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N/A</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cell table:style-name="Table22.A1" office:value-type="string">
            <text:p text:style-name="P93">🟢</text:p>
          </table:table-cell>
        </table:table-row>
      </table:table>
      <text:p text:style-name="P93"/>
      <text:h text:style-name="Heading_20_5" text:outline-level="5"><text:bookmark-start text:name="__RefHeading___Toc65781_4054234433"/><text:span text:style-name="Strong_20_Emphasis"><text:span text:style-name="T435">2.4.4</text:span></text:span><text:span text:style-name="Strong_20_Emphasis">.1. False Positives &amp; Error Direction (Physics)</text:span><text:bookmark-end text:name="__RefHeading___Toc65781_4054234433"/></text:h>
      <text:list text:style-name="L178">
        <text:list-item>
          <text:p text:style-name="P390"><text:span text:style-name="Strong_20_Emphasis"><text:span text:style-name="T195">Args Error Direction (Deflation):</text:span></text:span><text:span text:style-name="T195"> In Objective-C and COBOL, the syntax for arguments is non-contiguous (e.g. </text:span><text:span text:style-name="Source_20_Text"><text:span text:style-name="T195">[obj key:val key2:val2]</text:span></text:span><text:span text:style-name="T195">). Regex fails to count these as multiple inputs. Direction: </text:span><text:span text:style-name="Strong_20_Emphasis"><text:span text:style-name="T195">Under-counting Functional Density</text:span></text:span><text:span text:style-name="T195">.</text:span></text:p>
        </text:list-item>
        <text:list-item>
          <text:p text:style-name="P390"><text:span text:style-name="Strong_20_Emphasis"><text:span text:style-name="T195">Civil War Error Direction (Flicker Noise):</text:span></text:span><text:span text:style-name="T195"> A file that is 99% consistent may turn "Blue/Conflict" because a single tab exists inside a multi-line string or comment. Direction: </text:span><text:span text:style-name="Strong_20_Emphasis"><text:span text:style-name="T195">False Polarization Warning</text:span></text:span><text:span text:style-name="T195">.</text:span></text:p>
        </text:list-item>
        <text:list-item>
          <text:p text:style-name="P390"><text:span text:style-name="Strong_20_Emphasis"><text:span text:style-name="T195">Sanitization Error Direction (Semantic Leakage):</text:span></text:span><text:span text:style-name="T195"> Complex nested interpolation in Shell/JS can lead to "unmasked" text. Direction: </text:span><text:span text:style-name="Strong_20_Emphasis"><text:span text:style-name="T195">False Heat Infiltration</text:span></text:span><text:span text:style-name="T195">.</text:span></text:p>
        </text:list-item>
      </text:list>
      <text:h text:style-name="P91" text:outline-level="4"><text:bookmark-start text:name="__RefHeading___Toc65783_4054234433"/><text:span text:style-name="Strong_20_Emphasis"><text:span text:style-name="T18">2.4.5</text:span></text:span><text:span text:style-name="Strong_20_Emphasis"><text:span text:style-name="T2">. </text:span></text:span><text:span text:style-name="Strong_20_Emphasis"><text:span text:style-name="T308">Summary of </text:span></text:span><text:span text:style-name="Strong_20_Emphasis"><text:span text:style-name="T306">Analys</text:span></text:span><text:span text:style-name="Strong_20_Emphasis"><text:span text:style-name="T308">es</text:span></text:span><text:span text:style-name="Strong_20_Emphasis"><text:span text:style-name="T306">: </text:span></text:span><text:span text:style-name="Strong_20_Emphasis"><text:span text:style-name="T308">The Evolution towards Explicitness</text:span></text:span><text:span text:style-name="Strong_20_Emphasis"><text:span text:style-name="T2"> </text:span></text:span><text:bookmark-end text:name="__RefHeading___Toc65783_4054234433"/></text:h>
      <text:p text:style-name="P68">This heuristic analysis acts as a <text:span text:style-name="T432">lens </text:span>for the evolution of programming intent. By measuring where the <text:span text:style-name="T441">heuristic methodology becomes inaccurate, one </text:span>can <text:span text:style-name="T441">clearly </text:span>see <text:span text:style-name="T441">that this correlates with older </text:span>languages <text:span text:style-name="T441">that simply don’t have the vocab to describe what we are trying to assess. </text:span></text:p>
      <text:h text:style-name="P92" text:outline-level="5"><text:bookmark-start text:name="__RefHeading___Toc65785_4054234433"/><text:span text:style-name="T435">2.4.5.1</text:span>. The "Color Orange" Paradox (Linguistic Gaps)<text:bookmark-end text:name="__RefHeading___Toc65785_4054234433"/></text:h>
      <text:p text:style-name="P68"><text:span text:style-name="T442">Before the age of travel, languages often</text:span> lack<text:span text:style-name="T442">ed</text:span> <text:span text:style-name="T442">specific</text:span> word<text:span text:style-name="T442">s, like “banana”</text:span>. <text:span text:style-name="T443">If t</text:span><text:span text:style-name="T442">he concept isn’t around, the language doesn’t need a name for a thing that doesn’t exist yet.</text:span> We see the exact equivalent in <text:span text:style-name="T443">older</text:span><text:span text:style-name="T441"> coding</text:span> languages:</text:p>
      <text:list text:style-name="L179">
        <text:list-item>
          <text:p text:style-name="P391"><text:span text:style-name="Strong_20_Emphasis"><text:span text:style-name="T195">The Invisible Shield (Assembly/C):</text:span></text:span><text:span text:style-name="T195"> These languages have no "word" (keyword) for </text:span><text:span text:style-name="Strong_20_Emphasis"><text:span text:style-name="T195">Safety</text:span></text:span><text:span text:style-name="T195">. A developer implements safety via convention (return codes, jump checks), but to a heuristic scanner, the </text:span><text:span text:style-name="T221">safety</text:span><text:span text:style-name="T195"> is invisible. The </text:span><text:span text:style-name="T221">coding language directly express </text:span><text:span text:style-name="T195">safety as a distinct structural element </text:span><text:span text:style-name="T221">of conversation. </text:span><text:span text:style-name="T224">It’s almost like an inferred concept, like verbal and non-verbal info was need to express this idea. Regexes stink at this. </text:span></text:p>
        </text:list-item>
        <text:list-item>
          <text:p text:style-name="P391"><text:span text:style-name="Strong_20_Emphasis"><text:span text:style-name="T195">The Gray Logic (Shell):</text:span></text:span><text:span text:style-name="T195"> In Shell, the boundary between a string (data) and a command (logic) is semi-permeable. Because the language treats everything as a </text:span><text:soft-page-break/><text:span text:style-name="T195">potential string until execution, the scanner experiences </text:span><text:span text:style-name="Strong_20_Emphasis"><text:span text:style-name="T195">Logic/String Entanglement</text:span></text:span><text:span text:style-name="T195">. Shell lacks a strict "word" for the distinction between a descriptive sentence and an executable branch. </text:span><text:span text:style-name="T224">Regex stinks at this too. </text:span></text:p>
        </text:list-item>
      </text:list>
      <text:h text:style-name="P92" text:outline-level="5"><text:bookmark-start text:name="__RefHeading___Toc65787_4054234433"/><text:span text:style-name="T435">2.4.5.2</text:span>. The Progression of Clarity (Implicit to Explicit)<text:bookmark-end text:name="__RefHeading___Toc65787_4054234433"/></text:h>
      <text:p text:style-name="P93"><text:span text:style-name="T221">Analyzing coding languages over time, one sees a </text:span><text:span text:style-name="T195">journey from </text:span><text:span text:style-name="Strong_20_Emphasis"><text:span text:style-name="T195">Implicit Physics</text:span></text:span><text:span text:style-name="T195"> to </text:span><text:span text:style-name="Strong_20_Emphasis"><text:span text:style-name="T195">Explicit Physics,</text:span></text:span><text:span text:style-name="Strong_20_Emphasis"><text:span text:style-name="T221"> enhanced vocabularies to unambiguously define something without having the other to also depend on context, the equivalent of non-verbal cues. </text:span></text:span></text:p>
      <text:p text:style-name="P100"><text:span text:style-name="Strong_20_Emphasis"><text:span text:style-name="T221">Based on the accuracy of our regex methodology with have grouped the languages into 3 categories. </text:span></text:span></text:p>
      <text:list text:style-name="L180">
        <text:list-item>
          <text:p text:style-name="P392"><text:span text:style-name="Strong_20_Emphasis"><text:span text:style-name="T20"><text:s/>Tier 3 Languages – </text:span></text:span><text:span text:style-name="Strong_20_Emphasis"><text:span text:style-name="T21">Older Languages, </text:span></text:span><text:span text:style-name="Strong_20_Emphasis"><text:span text:style-name="T20">Mostly Implicit <text:s/>-</text:span></text:span><text:span text:style-name="Strong_20_Emphasis"><text:span text:style-name="T222"> </text:span></text:span><text:span text:style-name="T195">Logic, data, and metadata are mixed. Ambiguity is high because the language relies on the interpreter's "hidden knowledge." (Example: Perl's </text:span><text:span text:style-name="Source_20_Text"><text:span text:style-name="T195">$_</text:span></text:span><text:span text:style-name="T195">). </text:span><text:span text:style-name="T223">Heuristic scanning cannot find what isn’t explicitly stated and hence suffers from a fog of war. </text:span><text:span text:style-name="T225">This ambiguity rightfully leads to the idea that regex isn’t good enough and led to AST development. </text:span></text:p>
        </text:list-item>
        <text:list-item>
          <text:p text:style-name="P393"><text:span text:style-name="T2">Tier 2 Languages – Mix of Implicit and Explicit </text:span><text:span text:style-name="T20">Expressions</text:span><text:span text:style-name="T222"> </text:span><text:span text:style-name="T195">Features are added via complex delimiters (C++ Templates, PHP Tags). The</text:span><text:span text:style-name="T223">se</text:span><text:span text:style-name="T195"> language</text:span><text:span text:style-name="T223">s</text:span><text:span text:style-name="T195"> </text:span><text:span text:style-name="T223">are more </text:span><text:span text:style-name="T195">"</text:span><text:span text:style-name="T217">structured</text:span><text:span text:style-name="T195">," </text:span><text:span text:style-name="T223">allowing regex to regularly find many patterns</text:span><text:span text:style-name="T195"> but t</text:span><text:span text:style-name="T217">h</text:span><text:span text:style-name="T223">ere is enough implicitness in the language, that ambiguity can be high in some cases. </text:span></text:p>
        </text:list-item>
        <text:list-item>
          <text:p text:style-name="P392"><text:span text:style-name="Strong_20_Emphasis"><text:span text:style-name="T20">Tier 1 Languages – </text:span></text:span><text:span text:style-name="Strong_20_Emphasis"><text:span text:style-name="T21">Modern Languages - </text:span></text:span><text:span text:style-name="Strong_20_Emphasis"><text:span text:style-name="T20">Explicit Enough for </text:span></text:span><text:span text:style-name="Strong_20_Emphasis"><text:span text:style-name="T21">~99% Accurate </text:span></text:span><text:span text:style-name="Strong_20_Emphasis"><text:span text:style-name="T20">Regex Scanning</text:span></text:span><text:span text:style-name="T195"> Languages like </text:span><text:span text:style-name="Strong_20_Emphasis"><text:span text:style-name="T195">Rust</text:span></text:span><text:span text:style-name="T195"> and </text:span><text:span text:style-name="Strong_20_Emphasis"><text:span text:style-name="T195">Go</text:span></text:span><text:span text:style-name="T195"> are designed to be machine-parseable and human-unambiguous. Concepts like "Ownership," "Error Handling," and "Concurrency" have dedicated, distinct keywords. The scanner hits 99% accuracy because the language has finally "</text:span><text:span text:style-name="T217">name for every feature</text:span><text:span text:style-name="T195">" in the complexity spectrum.</text:span></text:p>
        </text:list-item>
        <text:list-item>
          <text:p text:style-name="P394"><text:span text:style-name="T2">Tier 0 </text:span><text:span text:style-name="T21">Languages - </text:span><text:span text:style-name="T2">The Future Era:</text:span> It is easy to now see <text:span text:style-name="T431">a</text:span> progression <text:span text:style-name="T431">in</text:span> computer language<text:span text:style-name="T431">s over time, that each language continually reduces ambiguity</text:span> (“...no <text:span text:style-name="T443">concept </text:span>for <text:span text:style-name="T443">banana</text:span>, huh…”). <text:span text:style-name="T431">As languages define more and more keyword concepts, it becomes easier for machines, humans and </text:span><text:span text:style-name="T442">a heuristic</text:span><text:span text:style-name="T431"> strateg</text:span><text:span text:style-name="T443">ies</text:span><text:span text:style-name="T431"> to detect intent.</text:span></text:p>
        </text:list-item>
      </text:list>
      <text:h text:style-name="P92" text:outline-level="5"><text:bookmark-start text:name="__RefHeading___Toc65789_4054234433"/><text:soft-page-break/><text:span text:style-name="T435">2.4.5.3</text:span>. Conclusion: Design for Scannability<text:bookmark-end text:name="__RefHeading___Toc65789_4054234433"/></text:h>
      <text:p text:style-name="P93"><text:span text:style-name="T195">The evolution of programming languages is a move toward </text:span><text:span text:style-name="Strong_20_Emphasis"><text:span text:style-name="T195">Unambiguous Self-Description</text:span></text:span><text:span text:style-name="T195">. The higher a language ranks in our Fidelity Matrix, the more it has succeeded in building features that don't just "work," but explicitly "declare" themselves to both humans and heuristic tools. This suggests a future where "scannability"—the ease with which intent can be derived from the surface of the code—</text:span><text:span text:style-name="T225">could be a</text:span><text:span text:style-name="T195"> design goal for language architects </text:span><text:span text:style-name="T225">(person 1: “my new coding language is so clea</text:span><text:span text:style-name="T226">r</text:span><text:span text:style-name="T225"> a child could read it”, person 2: “oh yeah, my new coding language is so clea</text:span><text:span text:style-name="T226">r</text:span><text:span text:style-name="T225"> a regex is my compiler”). </text:span></text:p>
      <text:h text:style-name="P91" text:outline-level="4"><text:bookmark-start text:name="__RefHeading___Toc65791_4054234433"/><text:span text:style-name="Strong_20_Emphasis"><text:span text:style-name="T18">2.4.6</text:span></text:span><text:span text:style-name="Strong_20_Emphasis"><text:span text:style-name="T2">. </text:span></text:span><text:span text:style-name="Strong_20_Emphasis"><text:span text:style-name="T17">Tiering Languages based on their Implicitness </text:span></text:span><text:bookmark-end text:name="__RefHeading___Toc65791_4054234433"/></text:h>
      <text:p text:style-name="P68">To ensure the <text:span text:style-name="T433">risk exposures between languages</text:span> is fair, we must normalize the "Material Properties" of the languages. We do not judge a Shell script for being "worse" than Go; we acknowledge that it is built from a more opaque material. </text:p>
      <text:p text:style-name="P93"><text:span text:style-name="Strong_20_Emphasis"><text:span text:style-name="T195">The Go vs. Shell Analogy:</text:span></text:span><text:span text:style-name="T195"> Imagine inspecting two bridges:</text:span></text:p>
      <text:list text:style-name="L181">
        <text:list-item>
          <text:p text:style-name="P399"><text:span text:style-name="Strong_20_Emphasis"><text:span text:style-name="T195">The Steel Bridge (Go - Tier 1):</text:span></text:span><text:span text:style-name="T195"> The structure is explicit. We can clearly see the bolts, the tension cables, and the stress fractures. If there are no visible cracks, we can be 99% sure the bridge is safe.</text:span></text:p>
        </text:list-item>
        <text:list-item>
          <text:p text:style-name="P399"><text:span text:style-name="Strong_20_Emphasis"><text:span text:style-name="T195">The Stone Bridge (Shell - Tier 3):</text:span></text:span><text:span text:style-name="T195"> The structure is implicit. The internal integrity is hidden inside the masonry. A visual inspection might show </text:span><text:span text:style-name="Emphasis"><text:span text:style-name="T195">zero</text:span></text:span><text:span text:style-name="T195"> cracks, but that doesn't mean the bridge is safe—it just means the material </text:span><text:span text:style-name="T220">might still be </text:span><text:span text:style-name="T195">hid</text:span><text:span text:style-name="T220">ing</text:span><text:span text:style-name="T195"> faults.</text:span></text:p>
        </text:list-item>
      </text:list>
      <text:p text:style-name="P93"><text:span text:style-name="Strong_20_Emphasis"><text:span text:style-name="T195">The Fairness Principle:</text:span></text:span><text:span text:style-name="T195"> If we judged both bridges solely on "Visible Cracks" (Regex Hits), the Stone Bridge (Shell) would unfairly score higher simply because it </text:span><text:span text:style-name="T224">can hide</text:span><text:span text:style-name="T195"> its defects. To make the comparison fair, we apply a </text:span><text:span text:style-name="Strong_20_Emphasis"><text:span text:style-name="T195">Fidelity Tax</text:span></text:span><text:span text:style-name="T195"> to the Stone Bridge. We assume a baseline level of hidden risk (Phantom Risk) to correct for the opacity of the material. This ensures that a "Safe" rating in Shell requires significantly more defensive effort than a "Safe" rating in Go, reflecting the reality of the engineering challenge. </text:span><text:span text:style-name="T218">This doesn’t mean a stone bridge can never be viewed as safe, it just has to work a little bit harder to prove it is. </text:span></text:p>
      <text:h text:style-name="P99" text:outline-level="5"><text:bookmark-start text:name="__RefHeading___Toc65793_4054234433"/><text:span text:style-name="Strong_20_Emphasis"><text:span text:style-name="T18">2.4.6</text:span></text:span><text:span text:style-name="Strong_20_Emphasis"><text:span text:style-name="T2">.</text:span></text:span><text:span text:style-name="Strong_20_Emphasis"><text:span text:style-name="T18">1. </text:span></text:span><text:span text:style-name="Strong_20_Emphasis">Tier 1: <text:s/></text:span><text:span text:style-name="Strong_20_Emphasis"><text:span text:style-name="T20">Explicit Enough for </text:span></text:span><text:span text:style-name="Strong_20_Emphasis"><text:span text:style-name="T21">~99% Accurate </text:span></text:span><text:span text:style-name="Strong_20_Emphasis"><text:span text:style-name="T20">Regex Scanning</text:span></text:span><text:bookmark-end text:name="__RefHeading___Toc65793_4054234433"/></text:h>
      <text:p text:style-name="P93"><text:span text:style-name="Strong_20_Emphasis"/></text:p>
      <text:p text:style-name="P93"><text:soft-page-break/><text:span text:style-name="Strong_20_Emphasis">Fidelity Coefficient ():</text:span> <text:span text:style-name="Source_20_Text">1.0</text:span> (100% Signal) <text:span text:style-name="Strong_20_Emphasis">Definition:</text:span> Languages with explicit keywords for complex concepts. Intent is "Broadcasted." The scanner trusts these signals implicitly.</text:p>
      <text:p text:style-name="P146">Java, C#, Go, Rust, Swift, Kotlin, Python, MicroPython, SQL, Haskell, <text:span text:style-name="T445">Scala, Apex, Dart, Zig, Powershell, ABAP</text:span></text:p>
      <text:p text:style-name="P146"/>
      <text:p text:style-name="P101">Please note: This does not mean that we view all these languages as equally explicit, placement in Tier 1 only means that these languages are explicit enough for very high confidence heuristic scanning.</text:p>
      <text:h text:style-name="P92" text:outline-level="5"><text:bookmark-start text:name="__RefHeading___Toc65795_4054234433"/><text:span text:style-name="Strong_20_Emphasis"><text:span text:style-name="T18">2.4.6</text:span></text:span><text:span text:style-name="Strong_20_Emphasis"><text:span text:style-name="T2">.</text:span></text:span><text:span text:style-name="Strong_20_Emphasis"><text:span text:style-name="T18">2. </text:span></text:span>Tier 2: <text:span text:style-name="T434">Explicit with some Implicit</text:span><text:bookmark-end text:name="__RefHeading___Toc65795_4054234433"/></text:h>
      <text:p text:style-name="P93"/>
      <text:p text:style-name="P93"><text:span text:style-name="Strong_20_Emphasis">Fidelity Coefficient ():</text:span> <text:span text:style-name="Source_20_Text">0.85</text:span> (15% Ambiguity Tax) <text:span text:style-name="Strong_20_Emphasis">Definition:</text:span> Languages that are structured but suffer from "Ghost Logic" (macros, dynamic typing, or legacy verbosity). Intent is mostly clear but requires context, <text:span text:style-name="T443">which is invisible to regex. </text:span></text:p>
      <text:p text:style-name="P147">JavaScript</text:p>
      <text:p text:style-name="P147">TypeScript, C++, C, PHP, Objective-C, Lua, COBOL, Fortran</text:p>
      <text:h text:style-name="P92" text:outline-level="5"/>
      <text:h text:style-name="P92" text:outline-level="5"><text:bookmark-start text:name="__RefHeading___Toc65797_4054234433"/><text:span text:style-name="Strong_20_Emphasis"><text:span text:style-name="T18">2.4.6</text:span></text:span><text:span text:style-name="Strong_20_Emphasis"><text:span text:style-name="T2">.</text:span></text:span><text:span text:style-name="Strong_20_Emphasis"><text:span text:style-name="T18">3. </text:span></text:span>Tier 3: <text:span text:style-name="T434">Mostly Implicit</text:span><text:bookmark-end text:name="__RefHeading___Toc65797_4054234433"/></text:h>
      <text:p text:style-name="P93"/>
      <text:p text:style-name="P93"><text:span text:style-name="Strong_20_Emphasis">Fidelity Coefficient ():</text:span> <text:span text:style-name="Source_20_Text">0.60</text:span> (40% Ambiguity Tax) <text:span text:style-name="Strong_20_Emphasis">Definition:</text:span> Languages where logic, data, and metadata are mixed. Intent is hidden. These languages trigger the <text:span text:style-name="Strong_20_Emphasis">Implicit Risk Simulator</text:span> (Phantom Risks) and <text:span text:style-name="Strong_20_Emphasis">Base Anxiety Floor</text:span>.</text:p>
      <text:p text:style-name="P145"><text:span text:style-name="T447">Ruby, Shell (Bash/Zsh</text:span><text:span text:style-name="T449">), </text:span><text:span text:style-name="T447">Perl, AGC Assembly, Assembly (x86), HyperTalk, HTML, </text:span><text:span text:style-name="Strong_20_Emphasis"><text:span text:style-name="T448">CSS</text:span></text:span></text:p>
      <text:h text:style-name="P29" text:outline-level="2"/>
      <text:h text:style-name="P29" text:outline-level="2"><text:bookmark-start text:name="__RefHeading___Toc11715_959624642"/><text:span text:style-name="T391">3</text:span>. The Visual Engine (Frontend Rendering)<text:bookmark-end text:name="__RefHeading___Toc11715_959624642"/></text:h>
      <text:h text:style-name="P10" text:outline-level="3"/>
      <text:h text:style-name="P10" text:outline-level="3"><text:bookmark-start text:name="__RefHeading___Toc16516_2209633182"/>3.1 3D Engine Architecture: The Persistent Universe<text:bookmark-end text:name="__RefHeading___Toc16516_2209633182"/></text:h>
      <text:h text:style-name="P34" text:outline-level="4"><text:bookmark-start text:name="__RefHeading___Toc16518_2209633182"/>3.1.1 System Overview<text:bookmark-end text:name="__RefHeading___Toc16518_2209633182"/></text:h>
      <text:p text:style-name="P83"><text:span text:style-name="T38">The GitGalaxy 3D Engine (v8.6) is designed as a </text:span><text:span text:style-name="Strong_20_Emphasis"><text:span text:style-name="T38">Persistent Open Universe</text:span></text:span><text:span text:style-name="T38">. Unlike traditional "room-based" scene switching, all galaxy clusters are materialized at distinct, </text:span><text:soft-page-break/><text:span text:style-name="T38">massive coordinates within a single shared scene graph. This architecture allows distant systems to remain visible as glowing nebulas, providing a genuine sense of spatial interconnectedness.</text:span></text:p>
      <text:h text:style-name="P34" text:outline-level="4"><text:bookmark-start text:name="__RefHeading___Toc16520_2209633182"/>3.1.2 Philosophy: "The Camera is a Passenger"<text:bookmark-end text:name="__RefHeading___Toc16520_2209633182"/></text:h>
      <text:p text:style-name="P83"><text:span text:style-name="T38">The engine utilizes "Tow-Rope" camera physics. The camera does not move itself; it orbits a floating </text:span><text:span text:style-name="Source_20_Text"><text:span text:style-name="T38">target</text:span></text:span><text:span text:style-name="T38"> vector. During a "Warp," the target vector is tweened across the universe, and the camera is <text:s/>dragged along behind it.</text:span></text:p>
      <text:h text:style-name="P34" text:outline-level="4"><text:bookmark-start text:name="__RefHeading___Toc16522_2209633182"/>3.<text:span text:style-name="T244">1.3</text:span> Material Synthesis &amp; Performance (The Binning Strategy)<text:bookmark-end text:name="__RefHeading___Toc16522_2209633182"/></text:h>
      <text:p text:style-name="P83"><text:span text:style-name="T38">To maintain 60FPS on low-end hardware while displaying thousands of unique files, the engine employs </text:span><text:span text:style-name="Strong_20_Emphasis"><text:span text:style-name="T38">Unified Material Binning</text:span></text:span><text:span text:style-name="T38">.</text:span></text:p>
      <text:list text:style-name="L182">
        <text:list-item>
          <text:p text:style-name="P400"><text:span text:style-name="Strong_20_Emphasis"><text:span text:style-name="T38">The Material Cache:</text:span></text:span><text:span text:style-name="T38"> Instead of every </text:span><text:span text:style-name="Source_20_Text"><text:span text:style-name="T106">star</text:span></text:span><text:span text:style-name="T38"> instance creating its own material, the </text:span><text:span text:style-name="Source_20_Text"><text:span text:style-name="T38">MaterialCache</text:span></text:span><text:span text:style-name="T38"> class groups objects by their</text:span><text:span text:style-name="Source_20_Text"><text:span text:style-name="T38"> Tint</text:span></text:span><text:span text:style-name="T38"> metadata.</text:span></text:p>
        </text:list-item>
        <text:list-item>
          <text:p text:style-name="P400"><text:span text:style-name="Strong_20_Emphasis"><text:span text:style-name="T38">Performance Gain:</text:span></text:span><text:span text:style-name="T38"> This reduces GPU memory overhead by approximately 50% and minimizes "state switching" lag during high-speed warping.</text:span></text:p>
        </text:list-item>
        <text:list-item>
          <text:p text:style-name="P400"><text:span text:style-name="Strong_20_Emphasis"><text:span text:style-name="T38">Visual Cohesion:</text:span></text:span><text:span text:style-name="T38"> Objects within the same "bin" breathe in rhythmic unison, emphasizing the shared architectural traits of different modules.</text:span></text:p>
        </text:list-item>
      </text:list>
      <text:h text:style-name="P34" text:outline-level="4"><text:bookmark-start text:name="__RefHeading___Toc16526_2209633182"/>3.<text:span text:style-name="T244">1.5</text:span> Atmosphere &amp; Volumetric Simulation<text:bookmark-end text:name="__RefHeading___Toc16526_2209633182"/></text:h>
      <text:p text:style-name="P35">The "Nebula" feel is achieved through a multi-layered environmental stack that provides spatial orientation and kinetic feedback across the infinite coordinate system:</text:p>
      <text:list text:style-name="L183">
        <text:list-item>
          <text:p text:style-name="P401"><text:span text:style-name="Strong_20_Emphasis"><text:span text:style-name="T38">Celestial Islands:</text:span></text:span><text:span text:style-name="T38"> The primary spatial container. Unlike a traditional static skybox, the star field is composed of localized clusters of stars (3,000 to 5,000 suns) anchored to specific coordinate origins. This allows for physical "departure" and "arrival" visuals where star fields recede and expand based on actual camera proximity.</text:span></text:p>
        </text:list-item>
        <text:list-item>
          <text:p text:style-name="P401"><text:span text:style-name="Strong_20_Emphasis"><text:span text:style-name="T38">Volumetric Haze:</text:span></text:span><text:span text:style-name="T38"> A camera-following sprite with a radial gradient masks the distance threshold, providing a deep purple/blue background for the local galaxy.</text:span></text:p>
        </text:list-item>
        <text:list-item>
          <text:p text:style-name="P401"><text:span text:style-name="Strong_20_Emphasis"><text:span text:style-name="T38">Infinite Space Dust:</text:span></text:span><text:span text:style-name="T38"> A system of particles that wrap around the camera's local bounding box. This dust dilates (stretches) along the travel vector during warp, serving as a constant kinetic relative speed indicator even in the "void" between islands.</text:span></text:p>
        </text:list-item>
        <text:list-item>
          <text:p text:style-name="P401"><text:soft-page-break/><text:span text:style-name="Strong_20_Emphasis"><text:span text:style-name="T38">Pulse Moon Registry:</text:span></text:span><text:span text:style-name="T38"> Orbiting "Function Moons" are tracked in a global registry and pulse their opacity using sine-wave offsets, giving the galaxy a biological "heartbeat."</text:span></text:p>
        </text:list-item>
      </text:list>
      <text:h text:style-name="P34" text:outline-level="4"><text:bookmark-start text:name="__RefHeading___Toc16528_2209633182"/>3.<text:span text:style-name="T244">1.6 </text:span>Unified Interactivity Flow<text:bookmark-end text:name="__RefHeading___Toc16528_2209633182"/></text:h>
      <text:p text:style-name="P35">Interactivity is governed by a combined Raycaster and Orbit control system:</text:p>
      <text:list text:style-name="L184">
        <text:list-item>
          <text:p text:style-name="P402"><text:span text:style-name="Strong_20_Emphasis"><text:span text:style-name="T38">Drag-to-Rotate:</text:span></text:span><text:span text:style-name="T38"> Users can manually orbit the current target by dragging the screen. An </text:span><text:span text:style-name="Source_20_Text"><text:span text:style-name="T38">autoRotate</text:span></text:span><text:span text:style-name="T38"> drift is active when the user is idle.</text:span></text:p>
        </text:list-item>
        <text:list-item>
          <text:p text:style-name="P402"><text:span text:style-name="Strong_20_Emphasis"><text:span text:style-name="T38">Selection Raycaster:</text:span></text:span><text:span text:style-name="T38"> Every frame, a ray is projected from the mouse. Hovering over a </text:span><text:span text:style-name="T106">star</text:span><text:span text:style-name="T38"> triggers a localized scale tween (1.2x) and highlights the associated HTML label.</text:span></text:p>
        </text:list-item>
        <text:list-item>
          <text:p text:style-name="P402"><text:span text:style-name="Strong_20_Emphasis"><text:span text:style-name="T38">Drag-Thresholding:</text:span></text:span><text:span text:style-name="T38"> A safety logic prevents accidental selections. If the mouse moves more than 10 pixels during a click (indicating a rotation), the selection click is suppressed.</text:span></text:p>
        </text:list-item>
        <text:list-item>
          <text:p text:style-name="P402"><text:span text:style-name="Strong_20_Emphasis"><text:span text:style-name="T38">Deep-Dive Warp:</text:span></text:span><text:span text:style-name="T38"> Clicking a </text:span><text:span text:style-name="T106">star</text:span><text:span text:style-name="T38"> re-anchors the universe's focal point to that </text:span><text:span text:style-name="T106">stars</text:span><text:span text:style-name="T38">'s world position, bringing the camera into "Close-Look" range.</text:span></text:p>
        </text:list-item>
      </text:list>
      <text:h text:style-name="P34" text:outline-level="4"><text:bookmark-start text:name="__RefHeading___Toc16530_2209633182"/>3.<text:span text:style-name="T244">1.7</text:span> Optimization &amp; Culling<text:bookmark-end text:name="__RefHeading___Toc16530_2209633182"/></text:h>
      <text:list text:style-name="L185">
        <text:list-item>
          <text:p text:style-name="P403"><text:span text:style-name="Strong_20_Emphasis"><text:span text:style-name="T38">LOD Label Culling:</text:span></text:span><text:span text:style-name="T38"> HTML labels are removed from the DOM if </text:span><text:span text:style-name="Source_20_Text"><text:span text:style-name="T38">distanceToCamera &gt; 2500</text:span></text:span><text:span text:style-name="T38">.</text:span></text:p>
        </text:list-item>
        <text:list-item>
          <text:p text:style-name="P403"><text:span text:style-name="Strong_20_Emphasis"><text:span text:style-name="T38">LOD Opacity:</text:span></text:span><text:span text:style-name="T38"> Labels between 1500 and 2500 units smoothly fade their opacity based on distance to prevent visual "pop-in."</text:span></text:p>
        </text:list-item>
        <text:list-item>
          <text:p text:style-name="P403"><text:span text:style-name="Strong_20_Emphasis"><text:span text:style-name="T38">Post-Processing:</text:span></text:span><text:span text:style-name="T38"> The engine utilizes an </text:span><text:span text:style-name="Source_20_Text"><text:span text:style-name="T38">UnrealBloomPass</text:span></text:span><text:span text:style-name="T38"> with a strength of 1.2 to achieve the characteristic "Code Glow," while keeping the threshold high enough to prevent blinding highlights on standard starfields.</text:span></text:p>
        </text:list-item>
      </text:list>
      <text:h text:style-name="P34" text:outline-level="4"><text:bookmark-start text:name="__RefHeading___Toc24597_2209633182"/>3.<text:span text:style-name="T245">1.8</text:span> The "SpriteGlo" Technique<text:bookmark-end text:name="__RefHeading___Toc24597_2209633182"/></text:h>
      <text:p text:style-name="P83"><text:span text:style-name="T38">To maintain a consistent 60FPS during high-density galaxy rendering, the engine eschews standard dynamic </text:span><text:span text:style-name="Source_20_Text"><text:span text:style-name="T38">PointLights</text:span></text:span><text:span text:style-name="T38"> for the "SpriteGlo" billboard technique.</text:span></text:p>
      <text:list text:style-name="L186">
        <text:list-item>
          <text:p text:style-name="P404"><text:span text:style-name="Strong_20_Emphasis"><text:span text:style-name="T38">Billboard Synthesis:</text:span></text:span><text:span text:style-name="T38"> Every glowing </text:span><text:span text:style-name="T106">star</text:span><text:span text:style-name="T38"> uses a 2D Sprite (Billboard) with a radial gradient texture instead of a 3D light source.</text:span></text:p>
        </text:list-item>
        <text:list-item>
          <text:p text:style-name="P404"><text:soft-page-break/><text:span text:style-name="Strong_20_Emphasis"><text:span text:style-name="T38">Performance Gain:</text:span></text:span><text:span text:style-name="T38"> This eliminates the heavy computational cost of real-time shadow casting and light-fragment calculations, allowing for thousands of simultaneous "glowing" objects without GPU bottlenecking.</text:span></text:p>
        </text:list-item>
      </text:list>
      <text:h text:style-name="P30" text:outline-level="3"><text:bookmark-start text:name="__RefHeading___Toc78726_2209633182"/>3.<text:span text:style-name="T391">2</text:span> Atmosphere &amp; Immersion<text:bookmark-end text:name="__RefHeading___Toc78726_2209633182"/></text:h>
      <text:h text:style-name="P34" text:outline-level="4"><text:bookmark-start text:name="__RefHeading___Toc78728_2209633182"/>3.2.1 The Universal Radiance Protocol<text:bookmark-end text:name="__RefHeading___Toc78728_2209633182"/></text:h>
      <text:p text:style-name="P35">Everything in the GitGalaxy anthology is a light source by default, ensuring the code galaxy feels like a tangible, glowing physical entity. The intensity and color of this radiance are governed by a two-stage logic:</text:p>
      <text:list text:style-name="L187">
        <text:list-item>
          <text:p text:style-name="P405"><text:span text:style-name="Strong_20_Emphasis"><text:span text:style-name="T38">The Basal Glow:</text:span></text:span><text:span text:style-name="T38"> The foundational luminance is determined by the active Visual Theme (Section 3.2.2). This ensures that even without data overlays, every structure in the universe feels physically present, "alive," and atmospherically rich.</text:span></text:p>
        </text:list-item>
        <text:list-item>
          <text:p text:style-name="P405"><text:span text:style-name="Strong_20_Emphasis"><text:span text:style-name="T38">Metric Amplification:</text:span></text:span><text:span text:style-name="T38"> When a Code Metric Layer is toggled on, the structural radiance is amplified through the </text:span><text:span text:style-name="Strong_20_Emphasis"><text:span text:style-name="T38">Diffuse Bloom Multiplier</text:span></text:span><text:span text:style-name="T38">. The structure effectively "bleeds" its data status through its glow—pulsing brighter for high-risk zones or radiating deep stability—ensuring the analytical truth of the code is the most vibrant element in the viewport. Toggling a metric layer (like "Danger") causes specific nodes to “</text:span><text:span text:style-name="T107">emit” </text:span><text:span text:style-name="T38">color </text:span><text:span text:style-name="T107">overriding, it’s basal color state</text:span><text:span text:style-name="T38">, utilizing the high-intensity diffuse bloom to highlight hotspots.</text:span></text:p>
        </text:list-item>
      </text:list>
      <text:h text:style-name="P30" text:outline-level="3"><text:bookmark-start text:name="__RefHeading___Toc47686_2813440148"/>3.<text:span text:style-name="T391">3</text:span>.2. Visual Color Themes: Basal States &amp; Metric Overlays<text:bookmark-end text:name="__RefHeading___Toc47686_2813440148"/></text:h>
      <text:p text:style-name="P83"><text:span text:style-name="T38">The viewer supports distinct themes that serve as initial </text:span><text:span text:style-name="Strong_20_Emphasis"><text:span text:style-name="T38">Basal Labeling States</text:span></text:span><text:span text:style-name="T38">. These provide the foundational aesthetic and tonal anchor for the universe. Upon these states, users can dynamically layer specific Code Metric Color Labels (e.g., Debt, Safety, Ownership).</text:span></text:p>
      <text:h text:style-name="P76" text:outline-level="4"><text:bookmark-start text:name="__RefHeading___Toc139651_2813440148"/><text:span text:style-name="Strong_20_Emphasis"><text:span text:style-name="T38">3.</text:span></text:span><text:span text:style-name="Strong_20_Emphasis"><text:span text:style-name="T158">3</text:span></text:span><text:span text:style-name="Strong_20_Emphasis"><text:span text:style-name="T38">.2.A. Default: Ice Crystal (The Organic Structure)</text:span></text:span><text:bookmark-end text:name="__RefHeading___Toc139651_2813440148"/></text:h>
      <text:list text:style-name="L188">
        <text:list-item>
          <text:p text:style-name="P406"><text:span text:style-name="Strong_20_Emphasis"><text:span text:style-name="T38">Philosophy:</text:span></text:span><text:span text:style-name="T38"> The "Pure Structure" mode. It focuses on the elegance of logic, treating code as a living, breathing crystalline entity.</text:span></text:p>
        </text:list-item>
        <text:list-item>
          <text:p text:style-name="P406"><text:span text:style-name="Strong_20_Emphasis"><text:span text:style-name="T38">Visuals:</text:span></text:span></text:p>
          <text:list>
            <text:list-item>
              <text:p text:style-name="P406"><text:span text:style-name="Strong_20_Emphasis"><text:span text:style-name="T38">Background:</text:span></text:span><text:span text:style-name="T38"> Dark Navy/Black void (</text:span><text:span text:style-name="Source_20_Text"><text:span text:style-name="T38">#020205</text:span></text:span><text:span text:style-name="T38">) with a volumetric fog (</text:span><text:span text:style-name="Source_20_Text"><text:span text:style-name="T38">#0a0a15</text:span></text:span><text:span text:style-name="T38">).</text:span></text:p>
            </text:list-item>
            <text:list-item>
              <text:p text:style-name="P406"><text:soft-page-break/><text:span text:style-name="Strong_20_Emphasis"><text:span text:style-name="T38">Basal Color Strategy (Organic Variance):</text:span></text:span><text:span text:style-name="T38"> To prevent the universe from feeling sterile or purely monochromatic, this theme employs a </text:span><text:span text:style-name="Strong_20_Emphasis"><text:span text:style-name="T38">Subtle Variance Palette</text:span></text:span><text:span text:style-name="T38">. While primarily white, </text:span><text:span text:style-name="T106">star</text:span><text:span text:style-name="T38">s are assigned randomized, persistent tints of </text:span><text:span text:style-name="Strong_20_Emphasis"><text:span text:style-name="T38">Alice Blue (</text:span></text:span><text:span text:style-name="Source_20_Text"><text:span text:style-name="T38">#f0f8ff</text:span></text:span><text:span text:style-name="Strong_20_Emphasis"><text:span text:style-name="T38">)</text:span></text:span><text:span text:style-name="T38">, </text:span><text:span text:style-name="Strong_20_Emphasis"><text:span text:style-name="T38">Lavender Blush (</text:span></text:span><text:span text:style-name="Source_20_Text"><text:span text:style-name="T38">#fff0f5</text:span></text:span><text:span text:style-name="Strong_20_Emphasis"><text:span text:style-name="T38">)</text:span></text:span><text:span text:style-name="T38">, and </text:span><text:span text:style-name="Strong_20_Emphasis"><text:span text:style-name="T38">Light Cyan (</text:span></text:span><text:span text:style-name="Source_20_Text"><text:span text:style-name="T38">#e0ffff</text:span></text:span><text:span text:style-name="Strong_20_Emphasis"><text:span text:style-name="T38">)</text:span></text:span><text:span text:style-name="T38">. This creates a shimmering, pearlescent effect where the code feels grown rather than built.</text:span></text:p>
            </text:list-item>
          </text:list>
        </text:list-item>
        <text:list-item>
          <text:p text:style-name="P406"><text:span text:style-name="Strong_20_Emphasis"><text:span text:style-name="T38">Behavior:</text:span></text:span><text:span text:style-name="T38"> Standard "Universal Radiance." Metric overlays simply tint the </text:span><text:span text:style-name="T106">stars</text:span><text:span text:style-name="T38"> to the specific data color (e.g., Red for Debt) without dimming the surrounding structures.</text:span></text:p>
        </text:list-item>
      </text:list>
      <text:h text:style-name="P76" text:outline-level="4"><text:bookmark-start text:name="__RefHeading___Toc47688_2813440148"/><text:span text:style-name="Strong_20_Emphasis"><text:span text:style-name="T38">3.</text:span></text:span><text:span text:style-name="Strong_20_Emphasis"><text:span text:style-name="T158">3</text:span></text:span><text:span text:style-name="Strong_20_Emphasis"><text:span text:style-name="T38">.2.B. </text:span></text:span><text:span text:style-name="Strong_20_Emphasis"><text:span text:style-name="T108">The </text:span></text:span><text:span text:style-name="Strong_20_Emphasis"><text:span text:style-name="T38">Galactic </text:span></text:span><text:span text:style-name="Strong_20_Emphasis"><text:span text:style-name="T108">Empire</text:span></text:span><text:bookmark-end text:name="__RefHeading___Toc47688_2813440148"/></text:h>
      <text:p text:style-name="P83"><text:span text:style-name="Strong_20_Emphasis"><text:span text:style-name="T38">Philosophy:</text:span></text:span><text:span text:style-name="T38"> The "Diverse Universe" mode. This theme treats the codebase as a vibrant, populated galaxy full of unique celestial bodies (Planets, Exo-Planets, Stars). It prioritizes visual richness and spectral variety to fill the "energy gaps" in the dark void. </text:span></text:p>
      <text:p text:style-name="P83"><text:span text:style-name="Strong_20_Emphasis"><text:span text:style-name="T38">Visuals:</text:span></text:span></text:p>
      <text:list text:style-name="L189">
        <text:list-item>
          <text:p text:style-name="P407"><text:span text:style-name="Strong_20_Emphasis"><text:span text:style-name="T38">Background:</text:span></text:span><text:span text:style-name="T38"> Deep grey-black void (</text:span><text:span text:style-name="Source_20_Text"><text:span text:style-name="T38">0x050508</text:span></text:span><text:span text:style-name="T38">) with a high-density, multi-colored starfield.</text:span></text:p>
        </text:list-item>
        <text:list-item>
          <text:p text:style-name="P407"><text:span text:style-name="Strong_20_Emphasis"><text:span text:style-name="T38">Basal Color Strategy (The Expanded Exo-Palette):</text:span></text:span><text:span text:style-name="T38"> Unlike monochrome themes, Galactic assigns a </text:span><text:span text:style-name="T106">file name based seed</text:span><text:span text:style-name="T38"> high-vibrancy color to every </text:span><text:span text:style-name="T106">star</text:span><text:span text:style-name="T38"> upon instantiation, </text:span><text:span text:style-name="T106">so that the random color is repeatable. </text:span></text:p>
        </text:list-item>
        <text:list-item>
          <text:p text:style-name="P407"><text:span text:style-name="Strong_20_Emphasis"><text:span text:style-name="T38">The Palette:</text:span></text:span><text:span text:style-name="T38"> A curated 11-color high-energy spectrum designed for maximum bloom response:</text:span></text:p>
          <text:list>
            <text:list-item>
              <text:p text:style-name="P407"><text:span text:style-name="Strong_20_Emphasis"><text:span text:style-name="T38">Core Spectrum:</text:span></text:span><text:span text:style-name="T38"> Neon Purple (</text:span><text:span text:style-name="Source_20_Text"><text:span text:style-name="T38">0xbc13fe</text:span></text:span><text:span text:style-name="T38">), Solar Orange (</text:span><text:span text:style-name="Source_20_Text"><text:span text:style-name="T38">0xffaa00</text:span></text:span><text:span text:style-name="T38">), Ice Blue (</text:span><text:span text:style-name="Source_20_Text"><text:span text:style-name="T38">0x00f3ff</text:span></text:span><text:span text:style-name="T38">), Acid Green (</text:span><text:span text:style-name="Source_20_Text"><text:span text:style-name="T38">0xbfff00</text:span></text:span><text:span text:style-name="T38">).</text:span></text:p>
            </text:list-item>
            <text:list-item>
              <text:p text:style-name="P407"><text:span text:style-name="Strong_20_Emphasis"><text:span text:style-name="T38">Spectral Fillers:</text:span></text:span><text:span text:style-name="T38"> Supernova Pink (</text:span><text:span text:style-name="Source_20_Text"><text:span text:style-name="T38">0xff00ff</text:span></text:span><text:span text:style-name="T38">), Neon Green (</text:span><text:span text:style-name="Source_20_Text"><text:span text:style-name="T38">0x00ff00</text:span></text:span><text:span text:style-name="T38">), Electric Crimson (</text:span><text:span text:style-name="Source_20_Text"><text:span text:style-name="T38">0xff0033</text:span></text:span><text:span text:style-name="T38">), Binary Gold (</text:span><text:span text:style-name="Source_20_Text"><text:span text:style-name="T38">0xffe600</text:span></text:span><text:span text:style-name="T38">).</text:span></text:p>
            </text:list-item>
            <text:list-item>
              <text:p text:style-name="P407"><text:span text:style-name="Strong_20_Emphasis"><text:span text:style-name="T38">High-Energy Accents:</text:span></text:span><text:span text:style-name="T38"> Void Cobalt (</text:span><text:span text:style-name="Source_20_Text"><text:span text:style-name="T38">0x2200ff</text:span></text:span><text:span text:style-name="T38">), Plasma Violet (</text:span><text:span text:style-name="Source_20_Text"><text:span text:style-name="T38">0x7a00ff</text:span></text:span><text:span text:style-name="T38">), and Galactic White (</text:span><text:span text:style-name="Source_20_Text"><text:span text:style-name="T38">0xffffff</text:span></text:span><text:span text:style-name="T38">).</text:span></text:p>
            </text:list-item>
          </text:list>
        </text:list-item>
        <text:list-item>
          <text:p text:style-name="P407"><text:span text:style-name="Strong_20_Emphasis"><text:span text:style-name="T38">Assignment:</text:span></text:span><text:span text:style-name="T38"> Colors are hashed deterministically from the filename </text:span><text:span text:style-name="T108">for persistence across sessions. </text:span></text:p>
        </text:list-item>
        <text:list-item>
          <text:p text:style-name="P407"><text:span text:style-name="Strong_20_Emphasis"><text:span text:style-name="T38">Behavior (The "Data Focus" Protocol):</text:span></text:span></text:p>
          <text:list>
            <text:list-item>
              <text:p text:style-name="P407"><text:soft-page-break/><text:span text:style-name="Strong_20_Emphasis"><text:span text:style-name="T38">State 1: Exploration (Default):</text:span></text:span><text:span text:style-name="T38"> All nodes glow with their assigned "Exo-Palette" color at 100% luminance.</text:span></text:p>
            </text:list-item>
            <text:list-item>
              <text:p text:style-name="P407"><text:span text:style-name="Strong_20_Emphasis"><text:span text:style-name="T38">State 2: Analysis (Metric Active):</text:span></text:span><text:span text:style-name="T38"> When a Metric Layer is toggled (e.g., "Tech Debt"):</text:span></text:p>
              <text:list>
                <text:list-item>
                  <text:p text:style-name="P407"><text:span text:style-name="Strong_20_Emphasis"><text:span text:style-name="T38">Dimming:</text:span></text:span><text:span text:style-name="T38"> All nodes not relevant to the metric are desaturated and dimmed to 20% luminance (</text:span><text:span text:style-name="Source_20_Text"><text:span text:style-name="T38">dimmingFactor: 0.2</text:span></text:span><text:span text:style-name="T38">) to reduce visual noise.</text:span></text:p>
                </text:list-item>
                <text:list-item>
                  <text:p text:style-name="P407"><text:span text:style-name="Strong_20_Emphasis"><text:span text:style-name="T38">Override:</text:span></text:span><text:span text:style-name="T38"> Nodes with significant metric values override their basal color with the specific Metric Color.</text:span></text:p>
                </text:list-item>
              </text:list>
            </text:list-item>
          </text:list>
        </text:list-item>
      </text:list>
      <text:h text:style-name="P76" text:outline-level="4"><text:bookmark-start text:name="__RefHeading___Toc139653_2813440148"/><text:span text:style-name="Strong_20_Emphasis"><text:span text:style-name="T38">3.</text:span></text:span><text:span text:style-name="Strong_20_Emphasis"><text:span text:style-name="T158">3</text:span></text:span><text:span text:style-name="Strong_20_Emphasis"><text:span text:style-name="T38">.2.C. The Matrix (Hacker Aesthetic)</text:span></text:span><text:bookmark-end text:name="__RefHeading___Toc139653_2813440148"/></text:h>
      <text:list text:style-name="L190">
        <text:list-item>
          <text:p text:style-name="P408"><text:span text:style-name="Strong_20_Emphasis"><text:span text:style-name="T38">Philosophy:</text:span></text:span><text:span text:style-name="T38"> The "Digital Rain" metaphor. Raw data visualization.</text:span></text:p>
        </text:list-item>
        <text:list-item>
          <text:p text:style-name="P408"><text:span text:style-name="Strong_20_Emphasis"><text:span text:style-name="T38">Visuals:</text:span></text:span><text:span text:style-name="T38"> Absolute black background (</text:span><text:span text:style-name="Source_20_Text"><text:span text:style-name="T38">#000000</text:span></text:span><text:span text:style-name="T38">). Every node, satellite, and star is locked into a monochromatic </text:span><text:span text:style-name="Strong_20_Emphasis"><text:span text:style-name="T38">Neon Emerald (</text:span></text:span><text:span text:style-name="Source_20_Text"><text:span text:style-name="T38">#00ff41</text:span></text:span><text:span text:style-name="Strong_20_Emphasis"><text:span text:style-name="T38">)</text:span></text:span><text:span text:style-name="T38"> palette.</text:span></text:p>
        </text:list-item>
        <text:list-item>
          <text:p text:style-name="P408"><text:span text:style-name="Strong_20_Emphasis"><text:span text:style-name="T38">Behavior:</text:span></text:span><text:span text:style-name="T38"> Forces Wireframe rendering mode on all geometries. High-intensity bloom (2.0x) simulates CRT phosphor decay. </text:span><text:span text:style-name="T109">Stars (spheres) are replaced with <text:s/></text:span><text:span text:style-name="Strong_20_Emphasis"><text:span text:style-name="T45">Icosidodecahedrons. </text:span></text:span></text:p>
        </text:list-item>
      </text:list>
      <text:h text:style-name="P76" text:outline-level="4"><text:bookmark-start text:name="__RefHeading___Toc139655_2813440148"/><text:span text:style-name="Strong_20_Emphasis"><text:span text:style-name="T38">3.</text:span></text:span><text:span text:style-name="Strong_20_Emphasis"><text:span text:style-name="T158">3</text:span></text:span><text:span text:style-name="Strong_20_Emphasis"><text:span text:style-name="T38">.2.D. High Vis (Accessibility / High Contrast)</text:span></text:span><text:bookmark-end text:name="__RefHeading___Toc139655_2813440148"/></text:h>
      <text:list text:style-name="L191">
        <text:list-item>
          <text:p text:style-name="P409"><text:span text:style-name="Strong_20_Emphasis"><text:span text:style-name="T38">Philosophy:</text:span></text:span><text:span text:style-name="T38"> Function over Form. Maximum legibility.</text:span></text:p>
        </text:list-item>
        <text:list-item>
          <text:p text:style-name="P409"><text:span text:style-name="Strong_20_Emphasis"><text:span text:style-name="T38">Visuals:</text:span></text:span><text:span text:style-name="T38"> Pure white background (</text:span><text:span text:style-name="Source_20_Text"><text:span text:style-name="T38">#ffffff</text:span></text:span><text:span text:style-name="T38">). Thick Black lines, solid geometry, and </text:span><text:span text:style-name="Strong_20_Emphasis"><text:span text:style-name="T38">"Hunter Orange" (</text:span></text:span><text:span text:style-name="Source_20_Text"><text:span text:style-name="T38">#ff6600</text:span></text:span><text:span text:style-name="Strong_20_Emphasis"><text:span text:style-name="T38">)</text:span></text:span><text:span text:style-name="T38"> labels for active elements.</text:span></text:p>
        </text:list-item>
        <text:list-item>
          <text:p text:style-name="P409"><text:span text:style-name="Strong_20_Emphasis">Behavior:</text:span> Bypasses Bloom post-processing and volumetric haze entirely to maximize edge definition and text readability.</text:p>
        </text:list-item>
      </text:list>
      <text:p text:style-name="P35"/>
      <text:h text:style-name="P29" text:outline-level="2"><text:bookmark-start text:name="__RefHeading___Toc11773_959624642"/>4. Interaction &amp; User Experience (UX)<text:bookmark-end text:name="__RefHeading___Toc11773_959624642"/></text:h>
      <text:p text:style-name="P75"><text:span text:style-name="Emphasis"><text:span text:style-name="T38">Defined by </text:span></text:span><text:span text:style-name="Source_20_Text"><text:span text:style-name="T38">app.js</text:span></text:span><text:span text:style-name="Emphasis"><text:span text:style-name="T38"> and </text:span></text:span><text:span text:style-name="Source_20_Text"><text:span text:style-name="T38">main.css</text:span></text:span><text:span text:style-name="Emphasis"><text:span text:style-name="T38"> interaction flows.</text:span></text:span></text:p>
      <text:h text:style-name="P30" text:outline-level="3"><text:bookmark-start text:name="__RefHeading___Toc24599_2209633182"/>4.1 Navigation Dynamics<text:bookmark-end text:name="__RefHeading___Toc24599_2209633182"/></text:h>
      <text:h text:style-name="P76" text:outline-level="4"><text:bookmark-start text:name="__RefHeading___Toc32754_2209633182"/><text:span text:style-name="Strong_20_Emphasis"><text:span text:style-name="T38">A. The "Warp" Flow</text:span></text:span><text:bookmark-end text:name="__RefHeading___Toc32754_2209633182"/></text:h>
      <text:list text:style-name="L192">
        <text:list-item>
          <text:p text:style-name="P410"><text:span text:style-name="Strong_20_Emphasis"><text:span text:style-name="T38">System Select:</text:span></text:span><text:span text:style-name="T38"> User clicks a "Legendary System" (e.g., Apollo 11).</text:span></text:p>
        </text:list-item>
        <text:list-item>
          <text:p text:style-name="P410"><text:soft-page-break/><text:span text:style-name="Strong_20_Emphasis"><text:span text:style-name="T38">Hyperdrive:</text:span></text:span><text:span text:style-name="T38"> The camera tween-animates (</text:span><text:span text:style-name="Source_20_Text"><text:span text:style-name="T38">TWEEN.Easing.Quadratic.InOut</text:span></text:span><text:span text:style-name="T38">) to the system's coordinates.</text:span></text:p>
        </text:list-item>
        <text:list-item>
          <text:p text:style-name="P410"><text:span text:style-name="Strong_20_Emphasis"><text:span text:style-name="T38">Context Switch:</text:span></text:span><text:span text:style-name="T38"> The DOM UI updates statistics (loc, file_count) to match the active sector.</text:span></text:p>
        </text:list-item>
      </text:list>
      <text:h text:style-name="P76" text:outline-level="4"><text:bookmark-start text:name="__RefHeading___Toc32756_2209633182"/><text:span text:style-name="Strong_20_Emphasis"><text:span text:style-name="T38">B. View Mode Toggling</text:span></text:span><text:span text:style-name="T38"> </text:span><text:bookmark-end text:name="__RefHeading___Toc32756_2209633182"/></text:h>
      <text:p text:style-name="P35">There is a dedicated button to switch between modes, optimized for different analysis tiers:</text:p>
      <text:list text:style-name="L193">
        <text:list-item>
          <text:p text:style-name="P411"><text:span text:style-name="Strong_20_Emphasis"><text:span text:style-name="T38">GitGalaxy View (3D):</text:span></text:span></text:p>
          <text:list>
            <text:list-item>
              <text:p text:style-name="P411"><text:span text:style-name="Strong_20_Emphasis"><text:span text:style-name="T38">Purpose:</text:span></text:span><text:span text:style-name="T38"> Exploration, mood, and discovering high-level architectural patterns.</text:span></text:p>
            </text:list-item>
            <text:list-item>
              <text:p text:style-name="P411"><text:span text:style-name="Strong_20_Emphasis"><text:span text:style-name="T38">Controls:</text:span></text:span><text:span text:style-name="T38"> Standard Orbit controls (Rotate/Zoom/Pan) anchored to the focal target.</text:span></text:p>
            </text:list-item>
          </text:list>
        </text:list-item>
      </text:list>
      <text:h text:style-name="P76" text:outline-level="4"><text:bookmark-start text:name="__RefHeading___Toc32758_2209633182"/><text:span text:style-name="Strong_20_Emphasis"><text:span text:style-name="T38">C. Camera &amp; Visual Response</text:span></text:span><text:bookmark-end text:name="__RefHeading___Toc32758_2209633182"/></text:h>
      <text:list text:style-name="L194">
        <text:list-item>
          <text:p text:style-name="P412"><text:span text:style-name="Strong_20_Emphasis"><text:span text:style-name="T38">Camera Warp:</text:span></text:span><text:span text:style-name="T38"> The 3D camera performs a spline interpolation flight to center the target node on screen.</text:span></text:p>
        </text:list-item>
        <text:list-item>
          <text:p text:style-name="P412"><text:span text:style-name="Strong_20_Emphasis"><text:span text:style-name="T38">Visual Isolation:</text:span></text:span><text:span text:style-name="T38"> The selected node ("Sun") pulses with high intensity. The surrounding galaxy momentarily dims (opacity 0.3) to highlight the target module.</text:span></text:p>
        </text:list-item>
        <text:list-item>
          <text:p text:style-name="P412"><text:span text:style-name="Strong_20_Emphasis"><text:span text:style-name="T38">HUD Trigger:</text:span></text:span><text:span text:style-name="T38"> Successful selection automatically expands the "Deep Scan" telemetry HUD, revealing mass (LOC), gravity (Refs), and orbiting satellites (Functions).</text:span></text:p>
        </text:list-item>
      </text:list>
      <text:h text:style-name="P76" text:outline-level="4"><text:bookmark-start text:name="__RefHeading___Toc32760_2209633182"/><text:span text:style-name="Strong_20_Emphasis"><text:span text:style-name="T38">D. Unified Interactivity &amp; Selection Model</text:span></text:span><text:bookmark-end text:name="__RefHeading___Toc32760_2209633182"/></text:h>
      <text:p text:style-name="P83"><text:span text:style-name="T38">The engine utilizes a per-frame </text:span><text:span text:style-name="Strong_20_Emphasis"><text:span text:style-name="T38">Selection Raycaster</text:span></text:span><text:span text:style-name="T38"> to enable direct code engagement:</text:span></text:p>
      <text:list text:style-name="L195">
        <text:list-item>
          <text:p text:style-name="P413"><text:span text:style-name="Strong_20_Emphasis"><text:span text:style-name="T38">Hover State (Semantic Preview):</text:span></text:span><text:span text:style-name="T38"> A ray projected from the mouse triggers a scale tween (1.2x) on the targeted </text:span><text:span text:style-name="T106">star</text:span><text:span text:style-name="T38"> and highlights its associated HTML label.</text:span></text:p>
        </text:list-item>
        <text:list-item>
          <text:p text:style-name="P413"><text:span text:style-name="Strong_20_Emphasis"><text:span text:style-name="T38">Selection Click (Deep Dive):</text:span></text:span><text:span text:style-name="T38"> Clicking a </text:span><text:span text:style-name="T106">star</text:span><text:span text:style-name="T38"> re-anchors the universe's focal point (The Tow-Target) to that </text:span><text:span text:style-name="T106">star’s</text:span><text:span text:style-name="T38"> position, transitioning from "Cluster Explorer" to "File Focus" mode.</text:span></text:p>
        </text:list-item>
      </text:list>
      <text:h text:style-name="P76" text:outline-level="4"><text:bookmark-start text:name="__RefHeading___Toc32762_2209633182"/><text:soft-page-break/><text:span text:style-name="Strong_20_Emphasis"><text:span text:style-name="T38">E. Drag-Threshold Safety</text:span></text:span><text:span text:style-name="T38"> </text:span><text:bookmark-end text:name="__RefHeading___Toc32762_2209633182"/></text:h>
      <text:p text:style-name="P83"><text:span text:style-name="T38">To prevent accidental file selections while manually rotating the viewport, the engine implements a </text:span><text:span text:style-name="Strong_20_Emphasis"><text:span text:style-name="T38">Drag Threshold (10px)</text:span></text:span><text:span text:style-name="T38">. If the mouse moves more than 10 pixels between </text:span><text:span text:style-name="Source_20_Text"><text:span text:style-name="T38">mousedown</text:span></text:span><text:span text:style-name="T38"> and </text:span><text:span text:style-name="Source_20_Text"><text:span text:style-name="T38">mouseup</text:span></text:span><text:span text:style-name="T38">, the selection click is suppressed, allowing the user to reposition the camera without triggering a deep-dive warp.</text:span></text:p>
      <text:h text:style-name="P76" text:outline-level="4"><text:bookmark-start text:name="__RefHeading___Toc32764_2209633182"/><text:span text:style-name="Strong_20_Emphasis"><text:span text:style-name="T38">F. LOD (Level of Detail) Optimization</text:span></text:span><text:span text:style-name="T38"> </text:span><text:bookmark-end text:name="__RefHeading___Toc32764_2209633182"/></text:h>
      <text:p text:style-name="P35">To maintain UX fluidity across varying hardware tiers and avoid CPU-intensive browser reflows:</text:p>
      <text:list text:style-name="L196">
        <text:list-item>
          <text:p text:style-name="P414"><text:span text:style-name="Strong_20_Emphasis"><text:span text:style-name="T38">Label Physical Culling:</text:span></text:span><text:span text:style-name="T38"> HTML labels are physically removed from the DOM when </text:span><text:span text:style-name="Source_20_Text"><text:span text:style-name="T38">distanceToCamera &gt; 2500</text:span></text:span><text:span text:style-name="T38">.</text:span></text:p>
        </text:list-item>
        <text:list-item>
          <text:p text:style-name="P414"><text:span text:style-name="Strong_20_Emphasis"><text:span text:style-name="T38">Atmospheric Opacity:</text:span></text:span><text:span text:style-name="T38"> Labels between 1500 and 2500 units smoothly fade their opacity based on distance, ensuring that as the camera retreats, labels "evaporate" into the nebula mist rather than popping out of existence.</text:span></text:p>
        </text:list-item>
      </text:list>
      <text:h text:style-name="P76" text:outline-level="4"><text:bookmark-start text:name="__RefHeading___Toc32766_2209633182"/><text:span text:style-name="T69">G.</text:span><text:span text:style-name="T38"> </text:span><text:span text:style-name="Strong_20_Emphasis"><text:span text:style-name="T38">Single-Sector Isolation (Stage Mode):</text:span></text:span><text:bookmark-end text:name="__RefHeading___Toc32766_2209633182"/></text:h>
      <text:p text:style-name="P75"><text:span text:style-name="T38"><text:s/></text:span><text:span text:style-name="Source_20_Text"><text:span text:style-name="T38">app.js</text:span></text:span><text:span text:style-name="T38"> implements a "One Galaxy at a Time" projection mode. This strictly manages scene-graph clearance and focus-anchor resets for the Museum view, preventing visual interference between disparate Legendary datasets during rapid navigation.</text:span></text:p>
      <text:p text:style-name="P33"/>
      <text:h text:style-name="P30" text:outline-level="3"><text:bookmark-start text:name="__RefHeading___Toc11781_959624642"/>4.2 The Heads-Up Display (HUD)<text:bookmark-end text:name="__RefHeading___Toc11781_959624642"/></text:h>
      <text:list text:style-name="L197">
        <text:list-item>
          <text:p text:style-name="P415"><text:span text:style-name="Strong_20_Emphasis"><text:span text:style-name="T38">Data Overlay:</text:span></text:span><text:span text:style-name="T38"> </text:span><text:span text:style-name="Source_20_Text"><text:span text:style-name="T38">div.crystal-label</text:span></text:span><text:span text:style-name="T38"> elements track 3D positions using </text:span><text:span text:style-name="Source_20_Text"><text:span text:style-name="T38">vector.project(camera)</text:span></text:span><text:span text:style-name="T38">.</text:span></text:p>
        </text:list-item>
        <text:list-item>
          <text:p text:style-name="P415"><text:span text:style-name="Strong_20_Emphasis"><text:span text:style-name="T38">LOD (Level of Detail):</text:span></text:span><text:span text:style-name="Source_20_Text"><text:span text:style-name="T38"> Labels automatically fade out when distance &gt; 2000 units to prevent visual clutter.</text:span></text:span></text:p>
        </text:list-item>
      </text:list>
      <text:h text:style-name="P72" text:outline-level="3"><text:bookmark-start text:name="__RefHeading___Toc11783_959624642"/><text:span text:style-name="T38">4.3 </text:span><text:span text:style-name="Source_20_Text"><text:span text:style-name="T38">What happens when you click on a file – </text:span></text:span><text:span text:style-name="Source_20_Text"><text:span text:style-name="T148">Deep Dive Interaction</text:span></text:span><text:bookmark-end text:name="__RefHeading___Toc11783_959624642"/></text:h>
      <text:p text:style-name="P83"><text:span text:style-name="Source_20_Text"><text:span text:style-name="T38">When a user selects a file, the camera focuses on the object, and the HUD expands to reveal the "Deep Scan" telemetry. This data </text:span></text:span><text:span text:style-name="Source_20_Text"><text:span text:style-name="T148">wa</text:span></text:span><text:span text:style-name="Source_20_Text"><text:span text:style-name="T38">s </text:span></text:span><text:span text:style-name="Source_20_Text"><text:span text:style-name="T148">pre-generated by </text:span></text:span><text:span text:style-name="Source_20_Text"><text:span text:style-name="T38">scanner.py.</text:span></text:span></text:p>
      <text:h text:style-name="P34" text:outline-level="4"><text:bookmark-start text:name="__RefHeading___Toc11785_959624642"/>A. Vital Signs Header<text:bookmark-end text:name="__RefHeading___Toc11785_959624642"/></text:h>
      <text:list text:style-name="L198">
        <text:list-item>
          <text:p text:style-name="P416"><text:span text:style-name="Strong_20_Emphasis"><text:span text:style-name="T38">Identity:</text:span></text:span><text:span text:style-name="T38"> File Name, Extension, Detected Language (e.g., "TypeScript").</text:span></text:p>
        </text:list-item>
        <text:list-item>
          <text:p text:style-name="P416"><text:span text:style-name="Strong_20_Emphasis"><text:span text:style-name="T38">Physical Metrics:</text:span></text:span></text:p>
          <text:list>
            <text:list-item>
              <text:p text:style-name="P416"><text:span text:style-name="Strong_20_Emphasis"><text:span text:style-name="T38">Mass (LOC):</text:span></text:span><text:span text:style-name="T38"> Total lines of code.</text:span></text:p>
            </text:list-item>
            <text:list-item>
              <text:p text:style-name="P416"><text:soft-page-break/><text:span text:style-name="Strong_20_Emphasis"><text:span text:style-name="T38">Gravity (Refs):</text:span></text:span><text:span text:style-name="T38"> Number of inbound/outbound imports.</text:span></text:p>
            </text:list-item>
            <text:list-item>
              <text:p text:style-name="P416"><text:span text:style-name="Strong_20_Emphasis"><text:span text:style-name="T38">Satellites:</text:span></text:span><text:span text:style-name="T38"> Number of functions (Orbiting Moons).</text:span></text:p>
            </text:list-item>
          </text:list>
        </text:list-item>
      </text:list>
      <text:h text:style-name="P34" text:outline-level="4"><text:bookmark-start text:name="__RefHeading___Toc11787_959624642"/>B. Behavioral Badge Display<text:bookmark-end text:name="__RefHeading___Toc11787_959624642"/></text:h>
      <text:p text:style-name="P35"><text:tab/><text:span text:style-name="T262">May trigger easter egg as indicated in legendary code base. </text:span></text:p>
      <text:h text:style-name="P30" text:outline-level="3"><text:bookmark-start text:name="__RefHeading___Toc32768_2209633182"/>4.4 Search &amp; Discovery: Navigation as Teleportation<text:bookmark-end text:name="__RefHeading___Toc32768_2209633182"/></text:h>
      <text:h text:style-name="P34" text:outline-level="4"><text:bookmark-start text:name="__RefHeading___Toc32770_2209633182"/>4.4.1 The Navigation Dilemma: Scale vs. Legibility<text:bookmark-end text:name="__RefHeading___Toc32770_2209633182"/></text:h>
      <text:p text:style-name="P35">In a "Megastructure" codebase (Tier 4) containing thousands of files, manual exploration via mouse-orbiting—while visually stunning—becomes practically inefficient for professional workflows. As a project grows, the cognitive load required to "find that one specific function" increases exponentially, transforming the immersive experience into a navigational burden.</text:p>
      <text:p text:style-name="P83"><text:span text:style-name="T38">To bridge the gap between "Aesthetic Exploration" and "Targeted Debugging," the system integrates a high-speed </text:span><text:span text:style-name="Strong_20_Emphasis"><text:span text:style-name="T38">Quick-Jump Search Engine</text:span></text:span><text:span text:style-name="T38">. This tool functions as a "Warp Drive" for the codebase, allowing users to:</text:span></text:p>
      <text:list text:style-name="L199">
        <text:list-item>
          <text:p text:style-name="P417"><text:span text:style-name="Strong_20_Emphasis"><text:span text:style-name="T38">Bypass Physical Distance:</text:span></text:span><text:span text:style-name="T38"> Instantly teleport the camera to any specific logic block or file, regardless of its location in the 3D galaxy.</text:span></text:p>
        </text:list-item>
        <text:list-item>
          <text:p text:style-name="P417"><text:span text:style-name="Strong_20_Emphasis"><text:span text:style-name="T38">Filter by Intent:</text:span></text:span><text:span text:style-name="T38"> Use fuzzy-matching to locate files based on partial names (e.g., "login") or extensions (e.g., ".ts"), filtering the noise of the surrounding universe.</text:span></text:p>
        </text:list-item>
        <text:list-item>
          <text:p text:style-name="P417"><text:span text:style-name="Strong_20_Emphasis"><text:span text:style-name="T38">Visual Confirmation:</text:span></text:span><text:span text:style-name="T38"> Upon arrival, the target is highlighted while the surrounding "Data Focus Protocol" dims irrelevant nodes, ensuring immediate visual acquisition of the destination.</text:span></text:p>
        </text:list-item>
      </text:list>
      <text:h text:style-name="P34" text:outline-level="4"><text:bookmark-start text:name="__RefHeading___Toc32772_2209633182"/>4.4.2 Search Scope: Thinking Like a Developer<text:bookmark-end text:name="__RefHeading___Toc32772_2209633182"/></text:h>
      <text:p text:style-name="P35">The autocomplete engine doesn't just search for filenames; it indexes the codebase at three semantic depths to match the diverse ways developers recall information:</text:p>
      <text:list text:style-name="L200">
        <text:list-item>
          <text:p text:style-name="P418"><text:span text:style-name="Strong_20_Emphasis"><text:span text:style-name="T38">The Module Level (Files):</text:span></text:span><text:span text:style-name="T38"> Direct hits on file names (e.g., </text:span><text:span text:style-name="Source_20_Text"><text:span text:style-name="T38">Auth.ts</text:span></text:span><text:span text:style-name="T38">). This is for high-level architectural jumps when the user knows exactly which module they need to investigate.</text:span></text:p>
        </text:list-item>
        <text:list-item>
          <text:p text:style-name="P418"><text:span text:style-name="Strong_20_Emphasis"><text:span text:style-name="T38">The Structural Level (Classes/Structs):</text:span></text:span><text:span text:style-name="T38"> Finding the "Blueprints" within files (e.g., </text:span><text:span text:style-name="Source_20_Text"><text:span text:style-name="T38">class OrbitController</text:span></text:span><text:span text:style-name="T38">). By extracting these patterns, GitGalaxy allows users to navigate based on the internal architecture of a file, rather than just its path.</text:span></text:p>
        </text:list-item>
        <text:list-item>
          <text:p text:style-name="P418"><text:soft-page-break/><text:span text:style-name="Strong_20_Emphasis"><text:span text:style-name="T38">The Logic Level (Functions):</text:span></text:span><text:span text:style-name="T38"> Deep-indexing specific named "</text:span><text:span text:style-name="T179">satellites</text:span><text:span text:style-name="T38">" (e.g., </text:span><text:span text:style-name="Source_20_Text"><text:span text:style-name="T38">calculatePhysics()</text:span></text:span><text:span text:style-name="T38">). This is the most granular level of discovery, allowing a user to find a "needle in a hay-galaxy" without needing to know the file's name or its directory depth.</text:span></text:p>
        </text:list-item>
      </text:list>
      <text:h text:style-name="P34" text:outline-level="4"><text:bookmark-start text:name="__RefHeading___Toc32774_2209633182"/>4.4.3 Cinematic Visual Response: The "Hero" Transition<text:bookmark-end text:name="__RefHeading___Toc32774_2209633182"/></text:h>
      <text:p text:style-name="P35">Searching in GitGalaxy is not a static UI interaction; it is designed as a cinematic event that provides immediate spatial context.</text:p>
      <text:list text:style-name="L201">
        <text:list-item>
          <text:p text:style-name="P419"><text:span text:style-name="Strong_20_Emphasis"><text:span text:style-name="T38">Input &amp; Filtering:</text:span></text:span><text:span text:style-name="T38"> As the user types, a specialized UI handler parses the client-side </text:span><text:span text:style-name="T106">galaxy</text:span><text:span text:style-name="Source_20_Text"><text:span text:style-name="T38">_map.json</text:span></text:span><text:span text:style-name="T38"> (or the local worker state) to provide zero-latency suggestions grouped by type. This ensures the user isn't slowed down by server round-trips.</text:span></text:p>
        </text:list-item>
        <text:list-item>
          <text:p text:style-name="P419"><text:span text:style-name="Strong_20_Emphasis"><text:span text:style-name="T38">The Focused Warp:</text:span></text:span><text:span text:style-name="T38"> Upon selection, the 3D camera initiates a spline-interpolated flight to the target's exact coordinates. To prevent visual "noise" during this transition, the rest of the galaxy momentarily dims (opacity 0.3), isolating the target module in a "Hero View." This focuses the user’s attention entirely on the selected logic block, while the surrounding environment provides a subtle reminder of the module's dependencies.</text:span></text:p>
        </text:list-item>
      </text:list>
      <text:h text:style-name="P30" text:outline-level="3"><text:bookmark-start text:name="__RefHeading___Toc32776_2209633182"/>4.5 The Heuristic Scanner: Turning Text into Physics<text:bookmark-end text:name="__RefHeading___Toc32776_2209633182"/></text:h>
      <text:h text:style-name="P34" text:outline-level="4"><text:bookmark-start text:name="__RefHeading___Toc32778_2209633182"/>4.5.1 The Philosophy of Approximation: Code as Intent<text:bookmark-end text:name="__RefHeading___Toc32778_2209633182"/></text:h>
      <text:p text:style-name="P83"><text:span text:style-name="T38">Traditional compilers are rigid linguists—they care if you missed a semicolon or used the wrong type. GitGalaxy, however, acts as a </text:span><text:span text:style-name="Strong_20_Emphasis"><text:span text:style-name="T38">Rosetta Stone</text:span></text:span><text:span text:style-name="T38">, using high-speed Regex signatures to read the "Soul" and "Intent" of the code rather than its strict syntax. By prioritizing consistent heuristic patterns over rigid parsing, we can meaningfully compare disparate systems—from the raw Assembly of Apollo 11 to the modern TypeScript of React—on a single, unified physical scale. We visualize the "spaghetti" regardless of whether the code compiles.</text:span></text:p>
      <text:h text:style-name="P34" text:outline-level="4"><text:bookmark-start text:name="__RefHeading___Toc32780_2209633182"/>4.5.2 The Heuristic Pipeline: How Text Becomes Geometry<text:bookmark-end text:name="__RefHeading___Toc32780_2209633182"/></text:h>
      <text:p text:style-name="P83"><text:span text:style-name="T38">The scanner transforms raw strings into the </text:span><text:span text:style-name="Strong_20_Emphasis"><text:span text:style-name="T38">Vectorized JSON</text:span></text:span><text:span text:style-name="T38"> protocol through a sophisticated three-pass heuristic sweep that operates entirely in a background Web Worker:</text:span></text:p>
      <text:p text:style-name="P83"><text:soft-page-break/><text:span text:style-name="Strong_20_Emphasis"><text:span text:style-name="T38">A. The Regex Registry (The Pattern Matcher)</text:span></text:span><text:span text:style-name="T38"> The scanner uses </text:span><text:span text:style-name="Source_20_Text"><text:span text:style-name="T38">scanner_config.js</text:span></text:span><text:span text:style-name="T38"> to identify semantic "signatures" across 18+ languages. It ignores the grammar and looks for functional markers:</text:span></text:p>
      <text:list text:style-name="L202">
        <text:list-item>
          <text:p text:style-name="P420"><text:span text:style-name="Strong_20_Emphasis"><text:span text:style-name="T38">Complexity Patterns:</text:span></text:span><text:span text:style-name="T38"> Nested loops, deep conditionals, and recursive calls that drive the "Jaggedness" of a </text:span><text:span text:style-name="T106">star</text:span><text:span text:style-name="T38">.</text:span></text:p>
        </text:list-item>
        <text:list-item>
          <text:p text:style-name="P420"><text:span text:style-name="Strong_20_Emphasis"><text:span text:style-name="T38">Risk Patterns:</text:span></text:span><text:span text:style-name="T38"> Detection of "Red Flags" (e.g., </text:span><text:span text:style-name="Source_20_Text"><text:span text:style-name="T38">eval()</text:span></text:span><text:span text:style-name="T38">, </text:span><text:span text:style-name="Source_20_Text"><text:span text:style-name="T38">unsafe</text:span></text:span><text:span text:style-name="T38">, or </text:span><text:span text:style-name="Source_20_Text"><text:span text:style-name="T38">goto</text:span></text:span><text:span text:style-name="T38">) that pull the color spectrum toward </text:span><text:span text:style-name="T171">red.</text:span></text:p>
        </text:list-item>
      </text:list>
      <text:p text:style-name="P83"><text:span text:style-name="Strong_20_Emphasis"><text:span text:style-name="T38">B. The Metric Translation Layer (The Mathematician)</text:span></text:span><text:span text:style-name="T38"> Once patterns are counted, they are fed into the </text:span><text:span text:style-name="Strong_20_Emphasis"><text:span text:style-name="T38">Equation Suite</text:span></text:span><text:span text:style-name="T38"> (Section 2.3). This is where abstract counts are translated into physical physics:</text:span></text:p>
      <text:list text:style-name="L203">
        <text:list-item>
          <text:p text:style-name="P421"><text:span text:style-name="Strong_20_Emphasis"><text:span text:style-name="T38">Logarithmic Mass:</text:span></text:span><text:span text:style-name="T38"> Total Lines of Code (LOC) are clamped logarithmically. This ensures that a 100,000-line file is visually impressive but doesn't grow so large that it consumes the entire viewport or obstructs nearby modules.</text:span></text:p>
        </text:list-item>
        <text:list-item>
          <text:p text:style-name="P421"><text:span text:style-name="Strong_20_Emphasis"><text:span text:style-name="T38">Asymmetric Safety:</text:span></text:span><text:span text:style-name="T38"> Safety is treated as a balance of power. A single "Danger Hit" requires three "Safety Checks" (assertions, sanitization) to neutralize, which determines the final "Shield Cyan" vs "Red" intensity.</text:span></text:p>
        </text:list-item>
      </text:list>
      <text:h text:style-name="P34" text:outline-level="4"><text:bookmark-start text:name="__RefHeading___Toc32782_2209633182"/>4.5.3 The 4-Stage "Fluid Intelligence" Workflow<text:bookmark-end text:name="__RefHeading___Toc32782_2209633182"/></text:h>
      <text:p text:style-name="P35">To ensure the browser remains fluid even when scanning "Megastructure" (Tier 4) repositories, the scanner uses an asynchronous, chunked pipeline:</text:p>
      <text:list text:style-name="L204">
        <text:list-item>
          <text:p text:style-name="P422"><text:span text:style-name="Strong_20_Emphasis"><text:span text:style-name="T38">Ingestion &amp; Sanitization:</text:span></text:span><text:span text:style-name="T38"> </text:span><text:span text:style-name="Source_20_Text"><text:span text:style-name="T38">ZipLoader.js</text:span></text:span><text:span text:style-name="T38"> delivers sanitized string buffers to the worker, ensuring the UI thread remains responsive.</text:span></text:p>
        </text:list-item>
        <text:list-item>
          <text:p text:style-name="P422"><text:span text:style-name="Strong_20_Emphasis"><text:span text:style-name="T38">First Pass (Vectorization):</text:span></text:span><text:span text:style-name="T38"> A high-speed sweep generates raw hit-counts for every module in the repository.</text:span></text:p>
        </text:list-item>
        <text:list-item>
          <text:p text:style-name="P422"><text:span text:style-name="Strong_20_Emphasis"><text:span text:style-name="T38">Second Pass (Synthesis):</text:span></text:span><text:span text:style-name="T38"> The Mathematical Engine applies the Equations to generate visual metadata including </text:span><text:span text:style-name="Source_20_Text"><text:span text:style-name="T38">geometry</text:span></text:span><text:span text:style-name="T38">, </text:span><text:span text:style-name="Source_20_Text"><text:span text:style-name="T38">tint.</text:span></text:span></text:p>
        </text:list-item>
        <text:list-item>
          <text:p text:style-name="P422"><text:span text:style-name="Strong_20_Emphasis"><text:span text:style-name="T38">Third Pass (</text:span></text:span><text:span text:style-name="Strong_20_Emphasis"><text:span text:style-name="T179">Function</text:span></text:span><text:span text:style-name="Strong_20_Emphasis"><text:span text:style-name="T38"> Mapping):</text:span></text:span><text:span text:style-name="T38"> The scanner "digs" deeper into individual files to find function signatures, materializing them as the orbiting "Moons" that represent the internal functional complexity of the module.</text:span></text:p>
        </text:list-item>
      </text:list>
      <text:h text:style-name="P34" text:outline-level="4"><text:bookmark-start text:name="__RefHeading___Toc32784_2209633182"/>4.5.4 User Experience: From Upload to Warp<text:bookmark-end text:name="__RefHeading___Toc32784_2209633182"/></text:h>
      <text:p text:style-name="P83"><text:span text:style-name="T38">The scanner is designed for "Instant Gratification." When a user drops a </text:span><text:span text:style-name="Source_20_Text"><text:span text:style-name="T38">.zip</text:span></text:span><text:span text:style-name="T38"> file into the HUD, they watch their codebase materialize in real-time as a new sector in the universe.</text:span></text:p>
      <text:list text:style-name="L205">
        <text:list-item>
          <text:p text:style-name="P423"><text:soft-page-break/><text:span text:style-name="Strong_20_Emphasis"><text:span text:style-name="T38">The User Sector:</text:span></text:span><text:span text:style-name="T38"> Every local scan is materialized at the specific coordinates </text:span><text:span text:style-name="Source_20_Text"><text:span text:style-name="T38">[0, 1000, 0]</text:span></text:span><text:span text:style-name="T38">, designating a "Sandbox Zone" in the persistent universe where users can compare their private work against the Legendary Artifacts in the distance.</text:span></text:p>
        </text:list-item>
        <text:list-item>
          <text:p text:style-name="P423"><text:span text:style-name="Strong_20_Emphasis"><text:span text:style-name="T38">Local Trophies:</text:span></text:span><text:span text:style-name="T38"> The journey concludes in the "Gift Shop," where users can use </text:span><text:span text:style-name="Source_20_Text"><text:span text:style-name="T38">poster.js</text:span></text:span><text:span text:style-name="T38"> to export their newly scanned repository as a high-resolution, branded "Artifact Poster." This transforms a local development task into a piece of museum-grade digital art.</text:span></text:p>
        </text:list-item>
      </text:list>
      <text:p text:style-name="P35"/>
      <text:h text:style-name="P30" text:outline-level="3"><text:bookmark-start text:name="__RefHeading___Toc32708_2209633182"/>4.6 The Gift Shop: Poster Generator (High-Resolution Artifacts)<text:bookmark-end text:name="__RefHeading___Toc32708_2209633182"/></text:h>
      <text:h text:style-name="P34" text:outline-level="4"><text:bookmark-start text:name="__RefHeading___Toc32710_2209633182"/>4.6.1 Overview: Why an Artifact Generator?<text:bookmark-end text:name="__RefHeading___Toc32710_2209633182"/></text:h>
      <text:p text:style-name="P83"><text:span text:style-name="T38">Code can be art, but digital displays are limited by the user's monitor resolution. The </text:span><text:span text:style-name="Strong_20_Emphasis"><text:span text:style-name="T38">Poster Generator</text:span></text:span><text:span text:style-name="T38"> (</text:span><text:span text:style-name="Source_20_Text"><text:span text:style-name="T38">poster.js</text:span></text:span><text:span text:style-name="T38">) is designed to transform a transient 3D view into a permanent, high-fidelity physical artifact.</text:span></text:p>
      <text:p text:style-name="P83"><text:span text:style-name="T38">While a typical screenshot captures pixels at 72–96 DPI (Dots Per Inch), which looks "blurry" or "pixelated" when printed, the Poster Generator renders the code galaxy into a massive high-resolution buffer at </text:span><text:span text:style-name="Strong_20_Emphasis"><text:span text:style-name="T38">300 DPI</text:span></text:span><text:span text:style-name="T38">. This ensures that the fine details—the orbiting function moons, the </text:span><text:span text:style-name="T106">file</text:span><text:span text:style-name="T38"> edges, and the glowing nebulas—remain crisp and professional on a printed poster or a 4K display.</text:span></text:p>
      <text:h text:style-name="P34" text:outline-level="4"><text:bookmark-start text:name="__RefHeading___Toc32712_2209633182"/>4.6.2 Technical Functionality: The 300 DPI Buffer<text:bookmark-end text:name="__RefHeading___Toc32712_2209633182"/></text:h>
      <text:p text:style-name="P35">The generator utilizes a "Offscreen Buffer" technique to capture the scene without disrupting the user's current view:</text:p>
      <text:list text:style-name="L206">
        <text:list-item>
          <text:p text:style-name="P424"><text:span text:style-name="Source_20_Text"><text:span text:style-name="T38">PRESETS</text:span></text:span><text:span text:style-name="Strong_20_Emphasis"><text:span text:style-name="T38"> Registry:</text:span></text:span><text:span text:style-name="T38"> Defines standard paper sizes including </text:span><text:span text:style-name="Strong_20_Emphasis"><text:span text:style-name="T38">Letter (8.5x11")</text:span></text:span><text:span text:style-name="T38">, </text:span><text:span text:style-name="Strong_20_Emphasis"><text:span text:style-name="T38">A4</text:span></text:span><text:span text:style-name="T38">, and </text:span><text:span text:style-name="Strong_20_Emphasis"><text:span text:style-name="T38">Large Format Poster (18x24")</text:span></text:span><text:span text:style-name="T38">. The "Poster" preset generates a canvas at </text:span><text:span text:style-name="Strong_20_Emphasis"><text:span text:style-name="T38">8K resolution</text:span></text:span><text:span text:style-name="T38"> (5400x7200 pixels).</text:span></text:p>
        </text:list-item>
        <text:list-item>
          <text:p text:style-name="P424"><text:span text:style-name="Source_20_Text"><text:span text:style-name="T38">generate(formatKey, systemData, engine3d)</text:span></text:span><text:span text:style-name="Strong_20_Emphasis"><text:span text:style-name="T38">:</text:span></text:span><text:span text:style-name="T38"> This function temporarily resizes the 3D renderer to the target resolution, performs a "Super-Sampled" render pass, and then restores the renderer to the user's window size instantly.</text:span></text:p>
        </text:list-item>
        <text:list-item>
          <text:p text:style-name="P424"><text:span text:style-name="Strong_20_Emphasis"><text:span text:style-name="T38">Memory Management:</text:span></text:span><text:span text:style-name="T38"> Because 8K images can exceed 20MB, the system uses </text:span><text:span text:style-name="Source_20_Text"><text:span text:style-name="T38">canvas.toBlob()</text:span></text:span><text:span text:style-name="T38"> and </text:span><text:span text:style-name="Source_20_Text"><text:span text:style-name="T38">URL.createObjectURL()</text:span></text:span><text:span text:style-name="T38"> to handle the download as a raw binary stream, bypassing browser data-URL string limits.</text:span></text:p>
        </text:list-item>
      </text:list>
      <text:h text:style-name="P34" text:outline-level="4"><text:bookmark-start text:name="__RefHeading___Toc32714_2209633182"/><text:soft-page-break/>4.6.3 Branding &amp; Museum Typography<text:bookmark-end text:name="__RefHeading___Toc32714_2209633182"/></text:h>
      <text:p text:style-name="P83"><text:span text:style-name="T38">To maintain the "Museum of Code" aesthetic, the generator overlays professional typography onto the render via the </text:span><text:span text:style-name="Source_20_Text"><text:span text:style-name="T38">drawTypography()</text:span></text:span><text:span text:style-name="T38"> function:</text:span></text:p>
      <text:list text:style-name="L207">
        <text:list-item>
          <text:p text:style-name="P425"><text:span text:style-name="Strong_20_Emphasis"><text:span text:style-name="T38">Metric Integration:</text:span></text:span><text:span text:style-name="T38"> The poster automatically displays the "Artifact Est." (year), the LOC (Mass), and the control flow ratio of the system.</text:span></text:p>
        </text:list-item>
        <text:list-item>
          <text:p text:style-name="P425"><text:span text:style-name="Strong_20_Emphasis"><text:span text:style-name="T38">Branding:</text:span></text:span><text:span text:style-name="T38"> Every export is watermarked with </text:span><text:span text:style-name="Source_20_Text"><text:span text:style-name="T38">ARCHIVE.GITGALAXY.IO // MUSEUM OF CODE</text:span></text:span><text:span text:style-name="T38"> and the system name in a bold, mono-spaced font.</text:span></text:p>
        </text:list-item>
        <text:list-item>
          <text:p text:style-name="P425"><text:span text:style-name="Strong_20_Emphasis"><text:span text:style-name="T38">Visual Hierarchy:</text:span></text:span><text:span text:style-name="T38"> The render occupies the top 75% of the frame, while the bottom 25% serves as a "Technical Legend," separated by a glowing "Shield Cyan" accent line.</text:span></text:p>
        </text:list-item>
      </text:list>
      <text:h text:style-name="P34" text:outline-level="4"><text:bookmark text:name="__RefHeading___Toc11801_959624642"/></text:h>
      <text:h text:style-name="P30" text:outline-level="3"><text:bookmark-start text:name="__RefHeading___Toc32802_2209633182"/>4.7 The Accessibility Engine: A Parallel Universe<text:bookmark-end text:name="__RefHeading___Toc32802_2209633182"/></text:h>
      <text:h text:style-name="P34" text:outline-level="4"><text:bookmark-start text:name="__RefHeading___Toc32804_2209633182"/>4.7.1 Overview: "The Map IS The Territory"<text:bookmark-end text:name="__RefHeading___Toc32804_2209633182"/></text:h>
      <text:p text:style-name="P83"><text:span text:style-name="T38">GitGalaxy recognizes that code is a linguistic structure before it is a visual one. The </text:span><text:span text:style-name="Strong_20_Emphasis"><text:span text:style-name="T38">Accessibility Engine</text:span></text:span><text:span text:style-name="T38"> (</text:span><text:span text:style-name="Source_20_Text"><text:span text:style-name="T38">ally.js</text:span></text:span><text:span text:style-name="T38">) ensures that the "Museum of Code" is inclusive by constructing a semantic "Shadow DOM" that mirrors the 3D galaxy. This parallel universe allows blind or low-vision engineers to navigate complex codebases using standard assistive technologies (Screen Readers) while maintaining the spatial logic of the visual engine. The core philosophy is that every visual datum—scale, color, jitter—must have a semantic equivalent in the text-based tree.</text:span></text:p>
      <text:h text:style-name="P34" text:outline-level="4"><text:bookmark-start text:name="__RefHeading___Toc32806_2209633182"/>4.7.2 Semantic Translation: From Physics to Adjectives<text:bookmark-end text:name="__RefHeading___Toc32806_2209633182"/></text:h>
      <text:p text:style-name="P35">The engine's primary role is to translate "Visual Truth" into "Semantic Description." It utilizes a heuristic translation matrix to convert abstract physics into human-readable adjectives:</text:p>
      <text:list text:style-name="L208">
        <text:list-item>
          <text:p text:style-name="P426"><text:span text:style-name="Strong_20_Emphasis"><text:span text:style-name="T38">Geometry to Logic Profiling:</text:span></text:span><text:span text:style-name="T38"> * "Jagged" (Icosahedron) is announced as </text:span><text:span text:style-name="Strong_20_Emphasis"><text:span text:style-name="T38">"High Complexity Logic Path."</text:span></text:span></text:p>
          <text:list>
            <text:list-item>
              <text:p text:style-name="P426"><text:span text:style-name="T38">"Smooth" (Dodecahedron) is announced as </text:span><text:span text:style-name="Strong_20_Emphasis"><text:span text:style-name="T38">"Structural/Declarative Definition."</text:span></text:span></text:p>
            </text:list-item>
            <text:list-item>
              <text:p text:style-name="P426"><text:span text:style-name="T38">Tier 4 Torus shapes are announced as </text:span><text:span text:style-name="Strong_20_Emphasis"><text:span text:style-name="T38">"Massive System Megastructure."</text:span></text:span></text:p>
            </text:list-item>
          </text:list>
        </text:list-item>
        <text:list-item>
          <text:p text:style-name="P426"><text:soft-page-break/><text:span text:style-name="Strong_20_Emphasis"><text:span text:style-name="T38">Color to Health Status:</text:span></text:span><text:span text:style-name="T38"> * "Red" (Debt &gt; 60) triggers a high-priority alert: </text:span><text:span text:style-name="Strong_20_Emphasis"><text:span text:style-name="T38">"Critical Tech Debt detected."</text:span></text:span></text:p>
          <text:list>
            <text:list-item>
              <text:p text:style-name="P426"><text:span text:style-name="T38">"Shield Cyan" (Safety &gt; 80) is described as </text:span><text:span text:style-name="Strong_20_Emphasis"><text:span text:style-name="T38">"Highly Robust and Validated Architecture."</text:span></text:span></text:p>
            </text:list-item>
            <text:list-item>
              <text:p text:style-name="P426"><text:span text:style-name="T38">"Cognitive Purple" (Heat &gt; 80) is noted as </text:span><text:span text:style-name="Strong_20_Emphasis"><text:span text:style-name="T38">"High Cognitive Load/Friction."</text:span></text:span></text:p>
            </text:list-item>
          </text:list>
        </text:list-item>
      </text:list>
      <text:h text:style-name="P34" text:outline-level="4"><text:bookmark-start text:name="__RefHeading___Toc32808_2209633182"/>4.7.3 Navigation &amp; Spatial Synchronization<text:bookmark-end text:name="__RefHeading___Toc32808_2209633182"/></text:h>
      <text:p text:style-name="P83"><text:span text:style-name="T38">The engine employs a </text:span><text:span text:style-name="Strong_20_Emphasis"><text:span text:style-name="T38">Keyboard-First</text:span></text:span><text:span text:style-name="T38"> interaction model to bridge the gap between abstract text and physical 3D space:</text:span></text:p>
      <text:list text:style-name="L209">
        <text:list-item>
          <text:p text:style-name="P427"><text:span text:style-name="Strong_20_Emphasis"><text:span text:style-name="T38">The Semantic Tree Structure:</text:span></text:span><text:span text:style-name="T38"> Upon loading a system, </text:span><text:span text:style-name="Source_20_Text"><text:span text:style-name="T38">ally.js</text:span></text:span><text:span text:style-name="T38"> builds a hierarchical </text:span><text:span text:style-name="Source_20_Text"><text:span text:style-name="T38">&lt;ul&gt;</text:span></text:span><text:span text:style-name="T38"> tree. It uses a folder-based heuristic (splitting </text:span><text:span text:style-name="Source_20_Text"><text:span text:style-name="T38">node.path</text:span></text:span><text:span text:style-name="T38"> by </text:span><text:span text:style-name="Source_20_Text"><text:span text:style-name="T38">/</text:span></text:span><text:span text:style-name="T38">) to group files logically. Each folder is an </text:span><text:span text:style-name="Source_20_Text"><text:span text:style-name="T38">aria-expanded</text:span></text:span><text:span text:style-name="T38"> tree item, and each file is a </text:span><text:span text:style-name="Source_20_Text"><text:span text:style-name="T38">treeitem</text:span></text:span><text:span text:style-name="T38"> with a calculated </text:span><text:span text:style-name="Source_20_Text"><text:span text:style-name="T38">aria-label</text:span></text:span><text:span text:style-name="T38"> containing its full semantic description.</text:span></text:p>
        </text:list-item>
        <text:list-item>
          <text:p text:style-name="P427"><text:span text:style-name="Strong_20_Emphasis"><text:span text:style-name="T38">Camera Focus Sync (Dual-Presence):</text:span></text:span><text:span text:style-name="T38"> When an element in the hidden A11y tree receives focus (via Arrow Key navigation), it triggers a </text:span><text:span text:style-name="Source_20_Text"><text:span text:style-name="T38">focusNode</text:span></text:span><text:span text:style-name="T38"> event in the 3D Engine. The camera performs a smooth warp to the physical coordinates of that file. This ensures that a sighted collaborator and a screen-reader user are always spatially synchronized on the same module.</text:span></text:p>
        </text:list-item>
        <text:list-item>
          <text:p text:style-name="P427"><text:span text:style-name="Strong_20_Emphasis"><text:span text:style-name="T38">Standardized Keyboard Mapping:</text:span></text:span><text:span text:style-name="T38"> The engine supports standard tree navigation:</text:span></text:p>
          <text:list>
            <text:list-item>
              <text:p text:style-name="P427"><text:span text:style-name="Strong_20_Emphasis"><text:span text:style-name="T38">Arrow Down/Up:</text:span></text:span><text:span text:style-name="T38"> Traverses siblings and depth-first nodes.</text:span></text:p>
            </text:list-item>
            <text:list-item>
              <text:p text:style-name="P427"><text:span text:style-name="Strong_20_Emphasis"><text:span text:style-name="T38">Arrow Right/Left:</text:span></text:span><text:span text:style-name="T38"> Expands/Collapses folders or moves between parent/child levels.</text:span></text:p>
            </text:list-item>
          </text:list>
        </text:list-item>
      </text:list>
      <text:h text:style-name="P34" text:outline-level="4"><text:bookmark-start text:name="__RefHeading___Toc32810_2209633182"/>4.7.4 The "Narrator" Live Region<text:bookmark-end text:name="__RefHeading___Toc32810_2209633182"/></text:h>
      <text:p text:style-name="P83"><text:span text:style-name="T38">A specialized </text:span><text:span text:style-name="Source_20_Text"><text:span text:style-name="T38">aria-live="polite"</text:span></text:span><text:span text:style-name="T38"> region serves as the universe's narrator.</text:span></text:p>
      <text:list text:style-name="L210">
        <text:list-item>
          <text:p text:style-name="P428"><text:span text:style-name="Strong_20_Emphasis"><text:span text:style-name="T38">Contextual Announcements:</text:span></text:span><text:span text:style-name="T38"> When a new system loads, the narrator provides a "System Sitrep" (e.g., "System Loaded. Contains 450 nodes. Use arrow keys to navigate.").</text:span></text:p>
        </text:list-item>
        <text:list-item>
          <text:p text:style-name="P428"><text:span text:style-name="Strong_20_Emphasis"><text:span text:style-name="T38">Focal Telemetry:</text:span></text:span><text:span text:style-name="T38"> Upon focusing a node, the narrator reads the specific semantic adjectives (metrics and behavior) derived in 4.7.2, providing the user with an "X-Ray" understanding of the code's health without needing to "see" the glow.</text:span></text:p>
        </text:list-item>
      </text:list>
      <text:h text:style-name="P30" text:outline-level="3"><text:bookmark-start text:name="__RefHeading___Toc32786_2209633182"/><text:soft-page-break/>4.9 The GalaxyScope: Performance Telemetry (Diagnostic HUD)<text:bookmark-end text:name="__RefHeading___Toc32786_2209633182"/></text:h>
      <text:h text:style-name="P34" text:outline-level="4"><text:bookmark-start text:name="__RefHeading___Toc32788_2209633182"/>4.9.1 Overview: The Engine’s X-Ray<text:bookmark-end text:name="__RefHeading___Toc32788_2209633182"/></text:h>
      <text:p text:style-name="P83"><text:span text:style-name="T38">As the GitGalaxy persistent universe grows to include millions of lines of code and thousands of physical nodes, monitoring browser hardware performance becomes critical. The </text:span><text:span text:style-name="Strong_20_Emphasis"><text:span text:style-name="T38">GalaxyScope</text:span></text:span><text:span text:style-name="T38"> (</text:span><text:span text:style-name="Source_20_Text"><text:span text:style-name="T38">perf_monitor.js</text:span></text:span><text:span text:style-name="T38">) is a high-fidelity telemetry HUD that provides real-time visibility into the "Engine Health." It is an essential tool for developers and museum curators to ensure that even "Megastructure" (Tier 4) repositories run at the 60FPS gold standard.</text:span></text:p>
      <text:h text:style-name="P34" text:outline-level="4"><text:bookmark-start text:name="__RefHeading___Toc32790_2209633182"/>4.9.2 Activation &amp; Interface<text:bookmark-end text:name="__RefHeading___Toc32790_2209633182"/></text:h>
      <text:list text:style-name="L211">
        <text:list-item>
          <text:p text:style-name="P429"><text:span text:style-name="Strong_20_Emphasis"><text:span text:style-name="T38">The Tilde Trigger:</text:span></text:span><text:span text:style-name="T38"> The HUD is a low-profile overlay, hidden by default to maintain immersion. It is summoned or dismissed instantly via the </text:span><text:span text:style-name="Strong_20_Emphasis"><text:span text:style-name="T38">Tilde key (~)</text:span></text:span><text:span text:style-name="T38">.</text:span></text:p>
        </text:list-item>
        <text:list-item>
          <text:p text:style-name="P429"><text:span text:style-name="Strong_20_Emphasis"><text:span text:style-name="T38">Visual Identity:</text:span></text:span><text:span text:style-name="T38"> Adhering to the Cyber-Noir aesthetic, the Scope features a "Shield Cyan" border with high-transparency dark backgrounds, ensuring diagnostic data is legible without obstructing the </text:span><text:span text:style-name="T106">stars</text:span><text:span text:style-name="T38">.</text:span></text:p>
        </text:list-item>
      </text:list>
      <text:h text:style-name="P34" text:outline-level="4"><text:bookmark-start text:name="__RefHeading___Toc32792_2209633182"/>4.9.3 Key Telemetry Metrics<text:bookmark-end text:name="__RefHeading___Toc32792_2209633182"/></text:h>
      <text:p text:style-name="P35">The Scope tracks four critical pillars of performance:</text:p>
      <text:list text:style-name="L212">
        <text:list-item>
          <text:p text:style-name="P430"><text:span text:style-name="Strong_20_Emphasis"><text:span text:style-name="T38">FPS (Fluidity):</text:span></text:span><text:span text:style-name="T38"> Monitors the frames-per-second delivered by the WebGL context. To maintain "Visual Truth," the FPS counter turns</text:span><text:span text:style-name="Strong_20_Emphasis"><text:span text:style-name="T38"> Red</text:span></text:span><text:span text:style-name="T38"> if the frame rate drops below 30, signaling that the system is entering a "Lag Zone."</text:span></text:p>
        </text:list-item>
        <text:list-item>
          <text:p text:style-name="P430"><text:span text:style-name="Strong_20_Emphasis"><text:span text:style-name="T38">Memory (Sustenance):</text:span></text:span><text:span text:style-name="T38"> Tracks the JS Heap Size (Chrome-specific). This is vital for monitoring the "Privacy Engine" during large ZIP unboxings, ensuring the browser doesn't crash from memory exhaustion.</text:span></text:p>
        </text:list-item>
        <text:list-item>
          <text:p text:style-name="P430"><text:span text:style-name="Strong_20_Emphasis"><text:span text:style-name="T38">Nodes (Complexity):</text:span></text:span><text:span text:style-name="T38"> Displays the count of active </text:span><text:span text:style-name="T106">star instances</text:span><text:span text:style-name="T38"> in the scene graph. This helps users understand the literal scale of the codebase being visualized.</text:span></text:p>
        </text:list-item>
        <text:list-item>
          <text:p text:style-name="P430"><text:span text:style-name="Strong_20_Emphasis"><text:span text:style-name="T38">Draws &amp; Tris (GPU Load):</text:span></text:span><text:span text:style-name="T38"> Direct telemetry from the Three.js renderer. It tracks "Draw Calls" and "Triangle Count," allowing curators to calibrate the Level of Detail (LOD) and post-processing bloom intensity for different hardware tiers.</text:span></text:p>
        </text:list-item>
      </text:list>
      <text:h text:style-name="P34" text:outline-level="4"><text:bookmark-start text:name="__RefHeading___Toc32794_2209633182"/>4.9.4 Hardware-Aware Logic<text:bookmark-end text:name="__RefHeading___Toc32794_2209633182"/></text:h>
      <text:p text:style-name="P35">The GalaxyScope is not just a display; it is deeply integrated into the application state:</text:p>
      <text:list text:style-name="L213">
        <text:list-item>
          <text:p text:style-name="P431"><text:soft-page-break/><text:span text:style-name="Strong_20_Emphasis"><text:span text:style-name="T38">Scene Intelligence:</text:span></text:span><text:span text:style-name="T38"> It hooks into the </text:span><text:span text:style-name="Source_20_Text"><text:span text:style-name="T38">Engine3D</text:span></text:span><text:span text:style-name="T38"> instance to count </text:span><text:span text:style-name="T106">stars</text:span><text:span text:style-name="T38"> and satellites.</text:span></text:p>
        </text:list-item>
        <text:list-item>
          <text:p text:style-name="P431"><text:span text:style-name="Strong_20_Emphasis"><text:span text:style-name="T38">Rolling Averages:</text:span></text:span><text:span text:style-name="T38"> FPS is calculated using a 1-second rolling average to provide a stable, human-readable number that ignores momentary micro-stutters during high-speed warps.</text:span></text:p>
        </text:list-item>
      </text:list>
      <text:h text:style-name="P30" text:outline-level="3"><text:bookmark-start text:name="__RefHeading___Toc24601_2209633182"/><text:span text:style-name="T263">4.</text:span><text:span text:style-name="T264">10</text:span> Prototyping: Procedural High-Fidelity Mocks<text:bookmark-end text:name="__RefHeading___Toc24601_2209633182"/></text:h>
      <text:h text:style-name="P34" text:outline-level="4"><text:bookmark-start text:name="__RefHeading___Toc24603_2209633182"/><text:span text:style-name="T263">4.</text:span><text:span text:style-name="T264">10</text:span>.1 The "Museum Simulation" Concept<text:bookmark-end text:name="__RefHeading___Toc24603_2209633182"/></text:h>
      <text:p text:style-name="P83"><text:span text:style-name="T38">To facilitate prototyping and testing of the Warp physics without requiring a live Python backend, the system includes a </text:span><text:span text:style-name="Strong_20_Emphasis"><text:span text:style-name="T38">High-Fidelity Mock Generator</text:span></text:span><text:span text:style-name="T38"> (</text:span><text:span text:style-name="Source_20_Text"><text:span text:style-name="T38">generateGalaxyData</text:span></text:span><text:span text:style-name="T38">).</text:span></text:p>
      <text:h text:style-name="P34" text:outline-level="4"><text:bookmark-start text:name="__RefHeading___Toc24607_2209633182"/><text:span text:style-name="T263">4.</text:span><text:span text:style-name="T264">10</text:span>.3 The Fetch-Fallback Logic<text:bookmark-end text:name="__RefHeading___Toc24607_2209633182"/></text:h>
      <text:p text:style-name="P83"><text:span text:style-name="T38">The controller implements a </text:span><text:span text:style-name="Strong_20_Emphasis"><text:span text:style-name="T38">Try-Fail-Simulate</text:span></text:span><text:span text:style-name="T38"> flow. If the engine attempts to load a system and receives a </text:span><text:span text:style-name="Source_20_Text"><text:span text:style-name="T38">404 Not Found</text:span></text:span><text:span text:style-name="T38">, it automatically engages the mock generator to populate the sector instantly</text:span></text:p>
      <text:p text:style-name="P35"/>
      <text:h text:style-name="P8" text:outline-level="2"><text:bookmark-start text:name="__RefHeading___Toc32841_2209633182"/>5. Adaptive Scale &amp; Performance (The Living Engine)<text:bookmark-end text:name="__RefHeading___Toc32841_2209633182"/></text:h>
      <text:h text:style-name="P30" text:outline-level="3"><text:bookmark-start text:name="__RefHeading___Toc32843_2209633182"/>5.1 The Challenge: Unpredictable Mass vs. Finite Compute<text:bookmark-end text:name="__RefHeading___Toc32843_2209633182"/></text:h>
      <text:p text:style-name="P83"><text:span text:style-name="T38">The fundamental problem in code visualization is </text:span><text:span text:style-name="Strong_20_Emphasis"><text:span text:style-name="T38">unpredictable structural weight</text:span></text:span><text:span text:style-name="T38">. A repository can be anything from a handful of scripts to a million-line monolith. Traditionally, we tried to box these into static "Tiers" to decide how much detail to show. However, static tiers fail because user hardware is equally diverse: a visualization that runs flawlessly on a multi-GPU workstation (a "Titan") will instantly crash a standard mobile browser (a "Potato"). We needed a system that doesn't just look at the size of the code, but "feels" the actual stress on the machine in real-time.</text:span></text:p>
      <text:h text:style-name="P30" text:outline-level="3"><text:bookmark-start text:name="__RefHeading___Toc32845_2209633182"/>5.2 Philosophy: The Active Feedback Loop<text:bookmark-end text:name="__RefHeading___Toc32845_2209633182"/></text:h>
      <text:p text:style-name="P83"><text:span text:style-name="T38">In the v4.2 architecture, performance is a </text:span><text:span text:style-name="Strong_20_Emphasis"><text:span text:style-name="T38">living conversation</text:span></text:span><text:span text:style-name="T38">. By integrating the </text:span><text:span text:style-name="Source_20_Text"><text:span text:style-name="T38">Engine3D</text:span></text:span><text:span text:style-name="T38"> with the </text:span><text:span text:style-name="Source_20_Text"><text:span text:style-name="T38">GalaxyScope</text:span></text:span><text:span text:style-name="T38"> telemetry (Section 4.9), the engine effectively develops a "nervous system."</text:span></text:p>
      <text:p text:style-name="P83"><text:span text:style-name="T38">Instead of assuming a system's weight based on file count, the engine </text:span><text:span text:style-name="Strong_20_Emphasis"><text:span text:style-name="T38">measures the actual friction</text:span></text:span><text:span text:style-name="T38"> on your specific hardware. It functions like a heartbeat: if the frame rate </text:span><text:soft-page-break/><text:span text:style-name="T38">stutters, the engine "breathes out," shedding non-essential visual weight (like complex glows and distant satellites) to stay fluid. If the hardware is powerful, the engine "breathes in," saturating the screen with high-fidelity cinematic detail. This ensures that every user gets a smooth 60FPS gold standard experience, regardless of their device.</text:span></text:p>
      <text:h text:style-name="P30" text:outline-level="3"><text:bookmark-start text:name="__RefHeading___Toc32847_2209633182"/>5.3 Reactive Quality Management (RQM): The 4 Levels of Decay<text:bookmark-end text:name="__RefHeading___Toc32847_2209633182"/></text:h>
      <text:p text:style-name="P83"><text:span text:style-name="T38">When the </text:span><text:span text:style-name="Source_20_Text"><text:span text:style-name="T38">GalaxyScope</text:span></text:span><text:span text:style-name="T38"> detects sustained performance friction—defined as a rolling 3-second average where FPS &lt; 45 or the JS Heap exceeds 500MB—the engine initiates a </text:span><text:span text:style-name="Strong_20_Emphasis"><text:span text:style-name="T38">Graceful Visual Decay</text:span></text:span><text:span text:style-name="T38">. This process is reversible; if the camera moves to a sparse sector and performance recovers, the engine will "Restore" fidelity levels automatically.</text:span></text:p>
      <text:p text:style-name="P35">When the GalaxyScope detects sustained performance friction—defined as a rolling 3-second average where FPS &lt; 45 or the JS Heap exceeds 500MB—the engine initiates a Graceful Visual Decay. This process is reversible; if the camera moves to a sparse sector and performance recovers, the engine will "Restore" fidelity levels automatically.</text:p>
      <text:h text:style-name="P34" text:outline-level="4"><text:bookmark-start text:name="__RefHeading___Toc47690_2813440148"/>5.3.1 Level 1: Material Pulse Suppression (Fragment Shader Relief)<text:bookmark-end text:name="__RefHeading___Toc47690_2813440148"/></text:h>
      <text:p text:style-name="P35">The first level of defense targets the Fragment Shader. In a dense galaxy, thousands of concurrent opacity and emissive "breathing" calculations create significant GPU overhead.</text:p>
      <text:p text:style-name="P83"><text:span text:style-name="Strong_20_Emphasis"><text:span text:style-name="T38">Action:</text:span></text:span><text:span text:style-name="T38"> The engine sets </text:span><text:span text:style-name="Source_20_Text"><text:span text:style-name="T38">emissiveIntensity</text:span></text:span><text:span text:style-name="T38"> to a static value for all </text:span><text:span text:style-name="T106">stars</text:span><text:span text:style-name="T38"> further than 500 units from the camera.</text:span></text:p>
      <text:p text:style-name="P83"><text:span text:style-name="Strong_20_Emphasis"><text:span text:style-name="T38">Result:</text:span></text:span><text:span text:style-name="T38"> Reclaims ~15% of GPU cycles by eliminating redundant per-frame mathematical oscillations.</text:span></text:p>
      <text:h text:style-name="P34" text:outline-level="4"><text:bookmark-start text:name="__RefHeading___Toc47692_2813440148"/>5.3.2 Level 2: Atmospheric &amp; Fill-Rate Reduction<text:bookmark-end text:name="__RefHeading___Toc47692_2813440148"/></text:h>
      <text:p text:style-name="P35">Level 2 addresses Fill-Rate bottlenecks caused by high-density alpha blending and background vertex counts.</text:p>
      <text:p text:style-name="P83"><text:span text:style-name="Strong_20_Emphasis"><text:span text:style-name="T38">Action:</text:span></text:span><text:span text:style-name="T38"> The "Space Dust" tunnel is thinned (particle count / 2), the volumetric "Nebula Haze" sprite is hidden, and the </text:span><text:span text:style-name="Strong_20_Emphasis"><text:span text:style-name="T38">Celestial Island star density</text:span></text:span><text:span text:style-name="T38"> is reduced by 60%.</text:span></text:p>
      <text:p text:style-name="P83"><text:span text:style-name="Strong_20_Emphasis"><text:span text:style-name="T38">Result:</text:span></text:span><text:span text:style-name="T38"> Reduces the number of overlapping transparent layers the GPU must composite and lowers the vertex overhead of background suns.</text:span></text:p>
      <text:h text:style-name="P34" text:outline-level="4"><text:bookmark-start text:name="__RefHeading___Toc47694_2813440148"/>5.3.3 Level 3: Stochastic Culling (Vertex &amp; Draw Call Relief)<text:bookmark-end text:name="__RefHeading___Toc47694_2813440148"/></text:h>
      <text:p text:style-name="P35">Level 3 targets the Scene Graph, Draw Calls, and the Celestial Island Registry.</text:p>
      <text:p text:style-name="P83"><text:soft-page-break/><text:span text:style-name="Strong_20_Emphasis"><text:span text:style-name="T38">Action:</text:span></text:span><text:span text:style-name="T38"> The engine identifies the 50% least "significant" function moons (Satellites) in the background and removes them. Additionally, the </text:span><text:span text:style-name="Strong_20_Emphasis"><text:span text:style-name="T38">Island Registry is pruned</text:span></text:span><text:span text:style-name="T38">, removing all star clusters except for the current and destination systems.</text:span></text:p>
      <text:p text:style-name="P83"><text:span text:style-name="Strong_20_Emphasis"><text:span text:style-name="T38">Result:</text:span></text:span><text:span text:style-name="T38"> Drastically reduces the number of vertices the GPU must transform and the number of draw calls the CPU must manage.</text:span></text:p>
      <text:h text:style-name="P34" text:outline-level="4"><text:bookmark-start text:name="__RefHeading___Toc47696_2813440148"/>5.3.4 Level 4: Post-Process Bypass (The Nuclear Option)<text:bookmark-end text:name="__RefHeading___Toc47696_2813440148"/></text:h>
      <text:p text:style-name="P35">Level 4 is the final recovery stage before system failure.</text:p>
      <text:p text:style-name="P83"><text:span text:style-name="Strong_20_Emphasis"><text:span text:style-name="T38">Action:</text:span></text:span><text:span text:style-name="T38"> The </text:span><text:span text:style-name="Source_20_Text"><text:span text:style-name="T38">EffectComposer</text:span></text:span><text:span text:style-name="T38"> is bypassed. The </text:span><text:span text:style-name="Source_20_Text"><text:span text:style-name="T38">UnrealBloomPass</text:span></text:span><text:span text:style-name="T38"> is disabled, and the scene is rendered directly to the screen using the standard </text:span><text:span text:style-name="Source_20_Text"><text:span text:style-name="T38">WebGLRenderer</text:span></text:span><text:span text:style-name="T38">.</text:span></text:p>
      <text:p text:style-name="P83"><text:span text:style-name="Strong_20_Emphasis"><text:span text:style-name="T38">Result:</text:span></text:span><text:span text:style-name="T38"> Restores massive amounts of GPU memory and processing power at the cost of the "Cyber-Noir" glow aesthetic.</text:span></text:p>
      <text:h text:style-name="P30" text:outline-level="3"><text:bookmark-start text:name="__RefHeading___Toc32857_2209633182"/>5.4 Geometric Aggregation: From Suns to Megastructures<text:bookmark-end text:name="__RefHeading___Toc32857_2209633182"/></text:h>
      <text:p text:style-name="P83"><text:span text:style-name="T38">Aggregation is our primary strategy for handling </text:span><text:span text:style-name="Strong_20_Emphasis"><text:span text:style-name="T38">Topological Friction</text:span></text:span><text:span text:style-name="T38">. Instead of a naive "show everything" approach, the engine uses heuristics to decide when individual fidelity is a hindrance to understanding.</text:span></text:p>
      <text:h text:style-name="P34" text:outline-level="4"><text:bookmark-start text:name="__RefHeading___Toc32859_2209633182"/>5.4.1 Individual Fidelity (Satellite/Planetary)<text:bookmark-end text:name="__RefHeading___Toc32859_2209633182"/></text:h>
      <text:p text:style-name="P35">Used for repos under 100 files. Every module is a unique sun, and every function is a unique moon. This is the "High-Res Exhibit" mode where individual logic is the primary focus.</text:p>
      <text:h text:style-name="P34" text:outline-level="4"><text:bookmark-start text:name="__RefHeading___Toc32861_2209633182"/>5.4.2 Topological Clusters (Stellar)<text:bookmark-end text:name="__RefHeading___Toc32861_2209633182"/></text:h>
      <text:p text:style-name="P83"><text:span text:style-name="T38">Used for repos between 100–500 files. The engine groups suns into </text:span><text:span text:style-name="Strong_20_Emphasis"><text:span text:style-name="T38">"Directory Nebulas."</text:span></text:span><text:span text:style-name="T38"> * </text:span><text:span text:style-name="Strong_20_Emphasis"><text:span text:style-name="T38">Logic:</text:span></text:span><text:span text:style-name="T38"> Files within the same subdirectory share a spatial center-point.</text:span></text:p>
      <text:list text:style-name="L214">
        <text:list-item>
          <text:p text:style-name="P432"><text:span text:style-name="Strong_20_Emphasis"><text:span text:style-name="T38">Interaction:</text:span></text:span><text:span text:style-name="T38"> Labels are culled at the macro level. As the user "warps" into a nebula, the individual file names materialize based on proximity, preventing the screen from becoming a wall of unreadable text.</text:span></text:p>
        </text:list-item>
      </text:list>
      <text:h text:style-name="P34" text:outline-level="4"><text:bookmark-start text:name="__RefHeading___Toc32863_2209633182"/>5.4.3 Dyson Cages (Megastructure)<text:bookmark-end text:name="__RefHeading___Toc32863_2209633182"/></text:h>
      <text:p text:style-name="P35">Used for "God Files" exceeding 50,000 LOC.</text:p>
      <text:list text:style-name="L215">
        <text:list-item>
          <text:p text:style-name="P433"><text:soft-page-break/><text:span text:style-name="Strong_20_Emphasis"><text:span text:style-name="T38">Logic:</text:span></text:span><text:span text:style-name="T38"> Rendering thousands of individual function moons for one file creates a "Cloud of Confusion." Instead, we bin functions onto two perpendicular Torus rings (The Dyson Cage).</text:span></text:p>
        </text:list-item>
        <text:list-item>
          <text:p text:style-name="P433"><text:span text:style-name="Strong_20_Emphasis"><text:span text:style-name="T38">Benefit:</text:span></text:span><text:span text:style-name="T38"> This collapses thousands of draw calls into two single geometric primitives. Complexity is shown via the density of the ring's lattice rather than the number of orbiting spheres.</text:span></text:p>
        </text:list-item>
      </text:list>
      <text:h text:style-name="P30" text:outline-level="3"><text:bookmark-start text:name="__RefHeading___Toc32865_2209633182"/>5.5 Stochastic Sampling: Smart Moon Truncation<text:bookmark-end text:name="__RefHeading___Toc32865_2209633182"/></text:h>
      <text:p text:style-name="P83"><text:span text:style-name="T38">To maintain the "Museum Standard" of visual clarity, the scanner does not blindly render every function. It uses </text:span><text:span text:style-name="Strong_20_Emphasis"><text:span text:style-name="T38">Weighted Truncation</text:span></text:span><text:span text:style-name="T38"> to ensure the visual signature is honest.</text:span></text:p>
      <text:list text:style-name="L216">
        <text:list-item>
          <text:p text:style-name="P434"><text:span text:style-name="Strong_20_Emphasis"><text:span text:style-name="T38">Selection Criteria:</text:span></text:span><text:span text:style-name="T38"> Instead of taking the </text:span><text:span text:style-name="Emphasis"><text:span text:style-name="T38">first</text:span></text:span><text:span text:style-name="T38"> 12 functions, the scanner takes the </text:span><text:span text:style-name="Strong_20_Emphasis"><text:span text:style-name="T38">12 most complex functions</text:span></text:span><text:span text:style-name="T38">.</text:span></text:p>
        </text:list-item>
        <text:list-item>
          <text:p text:style-name="P434"><text:span text:style-name="Strong_20_Emphasis"><text:span text:style-name="T38">Rationale:</text:span></text:span><text:span text:style-name="T38"> A file with 100 one-liner getters and 1 complex calculation should "look" like a complex calculation. By prioritizing the high-complexity </text:span><text:span text:style-name="T179">functions</text:span><text:span text:style-name="T38">, the "Jaggedness" of the resulting 3D </text:span><text:span text:style-name="T106">star</text:span><text:span text:style-name="T38"> accurately reflects the mental effort required to read the file.</text:span></text:p>
        </text:list-item>
        <text:list-item>
          <text:p text:style-name="P434"><text:span text:style-name="Strong_20_Emphasis"><text:span text:style-name="T38">Scaling:</text:span></text:span><text:span text:style-name="T38"> In 3D mode, moon sizes are binned into three sizes (Small/Medium/Large) to represent the relative mass of the logic blocks they represent.</text:span></text:p>
        </text:list-item>
      </text:list>
      <text:h text:style-name="P30" text:outline-level="3"><text:bookmark-start text:name="__RefHeading___Toc32867_2209633182"/>5.6 Hardware-Aware Fallbacks: The "1202 Alarm" Protocol<text:bookmark-end text:name="__RefHeading___Toc32867_2209633182"/></text:h>
      <text:p text:style-name="P35">Inspired by the Apollo 11 "Executive Overflow" (1202 Alarm), GitGalaxy implements a strict hand-off between the 3D Engine and the UI.</text:p>
      <text:h text:style-name="P34" text:outline-level="4"><text:bookmark-start text:name="__RefHeading___Toc32869_2209633182"/>5.6.1 Trigger Conditions<text:bookmark-end text:name="__RefHeading___Toc32869_2209633182"/></text:h>
      <text:p text:style-name="P83"><text:span text:style-name="T38">If the </text:span><text:span text:style-name="Source_20_Text"><text:span text:style-name="T38">GalaxyScope</text:span></text:span><text:span text:style-name="T38"> detects that the browser tab is nearing its memory limit (JS Heap &gt; 90% of allowed limit) or if the WebGL context is lost twice within 60 seconds, the engine triggers the </text:span><text:span text:style-name="Strong_20_Emphasis"><text:span text:style-name="T38">Teletype Fallback</text:span></text:span><text:span text:style-name="T38">.</text:span></text:p>
      <text:h text:style-name="P34" text:outline-level="4"><text:bookmark-start text:name="__RefHeading___Toc32871_2209633182"/>5.6.2 The A11y Parallelism Hand-off<text:bookmark-end text:name="__RefHeading___Toc32871_2209633182"/></text:h>
      <text:p text:style-name="P83"><text:span text:style-name="T38">The WebGL renderer is immediately destroyed to clear VRAM. The system switches focus entirely to the </text:span><text:span text:style-name="Strong_20_Emphasis"><text:span text:style-name="T38">Parallel DOM</text:span></text:span><text:span text:style-name="T38"> (Section 4.7).</text:span></text:p>
      <text:list text:style-name="L217">
        <text:list-item>
          <text:p text:style-name="P435"><text:span text:style-name="Strong_20_Emphasis"><text:span text:style-name="T38">Navigation:</text:span></text:span><text:span text:style-name="T38"> The user is presented with a high-contrast, text-only directory tree.</text:span></text:p>
        </text:list-item>
        <text:list-item>
          <text:p text:style-name="P435"><text:soft-page-break/><text:span text:style-name="Strong_20_Emphasis"><text:span text:style-name="T38">Search:</text:span></text:span><text:span text:style-name="T38"> The Search Bar (Section 4.4) continues to function, but instead of a 3D warp, it simply highlights the focused item in the text list.</text:span></text:p>
        </text:list-item>
      </text:list>
      <text:h text:style-name="P34" text:outline-level="4"><text:bookmark-start text:name="__RefHeading___Toc32873_2209633182"/>5.6.3 Persistence of Truth<text:bookmark-end text:name="__RefHeading___Toc32873_2209633182"/></text:h>
      <text:p text:style-name="P83"><text:span text:style-name="T38">Because the </text:span><text:span text:style-name="Strong_20_Emphasis"><text:span text:style-name="T38">Heuristic Scanner</text:span></text:span><text:span text:style-name="T38"> (Section 4.5) operates in a background Web Worker and generates raw JSON data, the "Visual Truth" is never lost. The metrics (Safety, Debt, Logic) are still displayed as badges and text labels in the Teletype mode. The user can still analyze the codebase—they just lose the "Artistic Nebula" until they move to more capable hardware.</text:span></text:p>
      <text:h text:style-name="P29" text:outline-level="2"><text:bookmark-start text:name="__RefHeading___Toc47698_2813440148"/>5.7 Adaptive Atmospheric Cinematics<text:bookmark-end text:name="__RefHeading___Toc47698_2813440148"/></text:h>
      <text:p text:style-name="P35">The engine will implement a dynamic environment that scales visual fidelity based on real-time hardware feedback. This ensures that users with high-end GPUs experience a "Grand Tour" level of immersion, while users on constrained hardware maintain a fluid 60FPS experience without sacrificing the legibility of the code data.</text:p>
      <text:h text:style-name="P30" text:outline-level="3"><text:bookmark-start text:name="__RefHeading___Toc47700_2813440148"/>A. Quality Tiers &amp; Triggers<text:bookmark-end text:name="__RefHeading___Toc47700_2813440148"/></text:h>
      <text:p text:style-name="P35">The system monitors frame rate stability over a 3-second rolling window. Sustained drops trigger a degradation in atmospheric effects, while sustained high performance enables cinematic features.</text:p>
      <text:list text:style-name="L218">
        <text:list-item>
          <text:p text:style-name="P436"><text:span text:style-name="Strong_20_Emphasis"><text:span text:style-name="T38">Tier 1: Titan (&gt;55 FPS):</text:span></text:span><text:span text:style-name="T38"> The "Director's Cut."</text:span></text:p>
          <text:list>
            <text:list-item>
              <text:p text:style-name="P436"><text:span text:style-name="Strong_20_Emphasis"><text:span text:style-name="T38">Atmosphere:</text:span></text:span><text:span text:style-name="T38"> Deep volumetric nebula composed of 3+ rotating sprite layers for parallax depth.</text:span></text:p>
            </text:list-item>
            <text:list-item>
              <text:p text:style-name="P436"><text:span text:style-name="Strong_20_Emphasis"><text:span text:style-name="T38">Starfield:</text:span></text:span><text:span text:style-name="T38"> High-density (20k stars) with full velocity stretching during warp.</text:span></text:p>
            </text:list-item>
            <text:list-item>
              <text:p text:style-name="P436"><text:span text:style-name="Strong_20_Emphasis"><text:span text:style-name="T38">Post-Processing:</text:span></text:span><text:span text:style-name="T38"> High-quality bloom and radial blur during transit.</text:span></text:p>
            </text:list-item>
          </text:list>
        </text:list-item>
        <text:list-item>
          <text:p text:style-name="P436"><text:span text:style-name="Strong_20_Emphasis"><text:span text:style-name="T38">Tier 2: Standard (30-55 FPS):</text:span></text:span><text:span text:style-name="T38"> The baseline experience.</text:span></text:p>
          <text:list>
            <text:list-item>
              <text:p text:style-name="P436"><text:span text:style-name="Strong_20_Emphasis"><text:span text:style-name="T38">Atmosphere:</text:span></text:span><text:span text:style-name="T38"> Single static haze sprite.</text:span></text:p>
            </text:list-item>
            <text:list-item>
              <text:p text:style-name="P436"><text:span text:style-name="Strong_20_Emphasis"><text:span text:style-name="T38">Starfield:</text:span></text:span><text:span text:style-name="T38"> Balanced density (8k stars) with simple rotation.</text:span></text:p>
            </text:list-item>
            <text:list-item>
              <text:p text:style-name="P436"><text:span text:style-name="Strong_20_Emphasis"><text:span text:style-name="T38">Post-Processing:</text:span></text:span><text:span text:style-name="T38"> Standard bloom.</text:span></text:p>
            </text:list-item>
          </text:list>
        </text:list-item>
        <text:list-item>
          <text:p text:style-name="P436"><text:span text:style-name="Strong_20_Emphasis"><text:span text:style-name="T38">Tier 3: Potato (&lt;30 FPS):</text:span></text:span><text:span text:style-name="T38"> The "Clinical" mode.</text:span></text:p>
          <text:list>
            <text:list-item>
              <text:p text:style-name="P436"><text:span text:style-name="Strong_20_Emphasis"><text:span text:style-name="T38">Atmosphere:</text:span></text:span><text:span text:style-name="T38"> Disabled (Black void or CSS gradient).</text:span></text:p>
            </text:list-item>
            <text:list-item>
              <text:p text:style-name="P436"><text:soft-page-break/><text:span text:style-name="Strong_20_Emphasis"><text:span text:style-name="T38">Starfield:</text:span></text:span><text:span text:style-name="T38"> Low density (2k stars), static.</text:span></text:p>
            </text:list-item>
            <text:list-item>
              <text:p text:style-name="P436"><text:span text:style-name="Strong_20_Emphasis"><text:span text:style-name="T38">Post-Processing:</text:span></text:span><text:span text:style-name="T38"> Bloom bypassed entirely to save fill-rate.</text:span></text:p>
            </text:list-item>
          </text:list>
        </text:list-item>
      </text:list>
      <text:h text:style-name="P30" text:outline-level="3"><text:bookmark-start text:name="__RefHeading___Toc47702_2813440148"/>B. The Performance Sensor<text:bookmark-end text:name="__RefHeading___Toc47702_2813440148"/></text:h>
      <text:p text:style-name="P83"><text:span text:style-name="T38">The </text:span><text:span text:style-name="Source_20_Text"><text:span text:style-name="T38">GalaxyScope</text:span></text:span><text:span text:style-name="T38"> telemetry module acts as the sensor for this system. It broadcasts quality-change events, allowing the 3D engine to seamlessly add or remove scene elements without requiring a reload. This "Active Feedback Loop" prioritizes the frame rate of the code visualization above all else—the background is the first thing to go when resources are scarce.</text:span></text:p>
      <text:p text:style-name="P35"/>
      <text:h text:style-name="P30" text:outline-level="3"><text:bookmark-start text:name="__RefHeading___Toc32875_2209633182"/>5.<text:span text:style-name="T265">8</text:span> Specific Optimization Challenges<text:bookmark-end text:name="__RefHeading___Toc32875_2209633182"/></text:h>
      <text:h text:style-name="P34" text:outline-level="4"><text:bookmark-start text:name="__RefHeading___Toc32877_2209633182"/>5.<text:span text:style-name="T265">8</text:span>.1 Megastructure Challenge: SQLite (sqlite3.c)<text:bookmark-end text:name="__RefHeading___Toc32877_2209633182"/></text:h>
      <text:p text:style-name="P35">SQLite is the "Titan" of our collection due to its amalgamation process.</text:p>
      <text:list text:style-name="L219">
        <text:list-item>
          <text:p text:style-name="P437"><text:span text:style-name="Strong_20_Emphasis"><text:span text:style-name="T38">Estimated LOC:</text:span></text:span><text:span text:style-name="T38"> ~230,000+ lines in a single file.</text:span></text:p>
        </text:list-item>
        <text:list-item>
          <text:p text:style-name="P437"><text:span text:style-name="Strong_20_Emphasis"><text:span text:style-name="T38">Visual Strategy:</text:span></text:span><text:span text:style-name="T38"> Employs Dyson Rings (Section 5.4.3). One giant Dyson Ring system represents the core C engine. Its </text:span><text:span text:style-name="T179">satellites</text:span><text:span text:style-name="T38"> (functions) are distributed to show the VFS and B-Tree logic blocks as distinct clusters on the ring's edge.</text:span></text:p>
        </text:list-item>
        <text:list-item>
          <text:p text:style-name="P437"><text:span text:style-name="Strong_20_Emphasis"><text:span text:style-name="T38">JSON Footprint:</text:span></text:span><text:span text:style-name="T38"> Capped at ~15KB by clustering similar functions into "Mega-</text:span><text:span text:style-name="T179">satellites</text:span><text:span text:style-name="T38">" on the Dyson Ring.</text:span></text:p>
        </text:list-item>
      </text:list>
      <text:h text:style-name="P34" text:outline-level="4"><text:bookmark-start text:name="__RefHeading___Toc32879_2209633182"/>5.<text:span text:style-name="T265">8</text:span>.2 High-Density Logic: Linux Kernel (kernel/sched/core.c)<text:bookmark-end text:name="__RefHeading___Toc32879_2209633182"/></text:h>
      <text:p text:style-name="P35">The Linux scheduler is our stress test for "Active" vectorized <text:span text:style-name="T436">satellites</text:span>.</text:p>
      <text:list text:style-name="L220">
        <text:list-item>
          <text:p text:style-name="P438"><text:span text:style-name="Strong_20_Emphasis"><text:span text:style-name="T38">Estimated LOC:</text:span></text:span><text:span text:style-name="T38"> ~10,000 lines.</text:span></text:p>
        </text:list-item>
        <text:list-item>
          <text:p text:style-name="P438"><text:span text:style-name="Strong_20_Emphasis"><text:span text:style-name="T38">Heuristic Profile:</text:span></text:span><text:span text:style-name="T38"> Extreme scores in concurrency, danger (manual locks/atomics), and heat (deep nesting).</text:span></text:p>
        </text:list-item>
        <text:list-item>
          <text:p text:style-name="P438"><text:span text:style-name="Strong_20_Emphasis"><text:span text:style-name="T38">Vibrancy:</text:span></text:span><text:span text:style-name="T38"> Because the scheduler is "God-ish," it manifests as a Dyson Ring encircling its dependency suns. The renderer handles dozens of simultaneous high-intensity pulses across the ring and the internal nodes.</text:span></text:p>
        </text:list-item>
      </text:list>
      <text:h text:style-name="P30" text:outline-level="3"><text:bookmark-start text:name="__RefHeading___Toc32881_2209633182"/><text:soft-page-break/>5.<text:span text:style-name="T265">9</text:span> Technical Thresholds: Fault Tolerance &amp; Mobile Fallbacks<text:bookmark-end text:name="__RefHeading___Toc32881_2209633182"/></text:h>
      <text:p text:style-name="P35">To prevent the "1202 Alarm" (Executive Overflow) on the user's browser, we adhere to these rules:</text:p>
      <text:list text:style-name="L221">
        <text:list-item>
          <text:p text:style-name="P439"><text:span text:style-name="Strong_20_Emphasis"><text:span text:style-name="T38">Mass Threshold:</text:span></text:span><text:span text:style-name="T38"> Tier 4 files trigger "Megastructure" visuals.</text:span></text:p>
        </text:list-item>
        <text:list-item>
          <text:p text:style-name="P439"><text:span text:style-name="Strong_20_Emphasis"><text:span text:style-name="T179">Satellite</text:span></text:span><text:span text:style-name="Strong_20_Emphasis"><text:span text:style-name="T38"> Threshold:</text:span></text:span><text:span text:style-name="T38"> Maintain a strict </text:span><text:span text:style-name="Source_20_Text"><text:span text:style-name="T38">processed[:30]</text:span></text:span><text:span text:style-name="T38"> cap in the scanner to avoid "Moon Clutter."</text:span></text:p>
        </text:list-item>
        <text:list-item>
          <text:p text:style-name="P439"><text:span text:style-name="Strong_20_Emphasis"><text:span text:style-name="T38">JSON Payload Limit:</text:span></text:span><text:span text:style-name="T38"> No single galaxy JSON should exceed 1.5MB (compressed) to ensure fast load times over mobile networks.</text:span></text:p>
        </text:list-item>
        <text:list-item>
          <text:p text:style-name="P439"><text:span text:style-name="Strong_20_Emphasis"><text:span text:style-name="T38">Graceful Degradation:</text:span></text:span><text:span text:style-name="T38"> If the WebGL context is lost (common on low-end mobile), the system must fallback to a purely text-based "Teletype HUD" view.</text:span></text:p>
        </text:list-item>
        <text:list-item>
          <text:p text:style-name="P439"><text:span text:style-name="Strong_20_Emphasis"><text:span text:style-name="T38">Mobile Optimizations:</text:span></text:span><text:span text:style-name="T38"> For Tier 3/4 systems on mobile devices, the engine will automatically switch to "Blueprint Mode" (2D) or disable volumetric fog to maintain 60fps.</text:span></text:p>
        </text:list-item>
        <text:list-item>
          <text:p text:style-name="P439"><text:span text:style-name="Strong_20_Emphasis"><text:span text:style-name="T38">Warp-Speed Indexing:</text:span></text:span><text:span text:style-name="T38"> The Search Bar indices only "Hero Files" in Tier 4 to prevent UI latency.</text:span></text:p>
        </text:list-item>
        <text:list-item>
          <text:p text:style-name="P439"><text:span text:style-name="Strong_20_Emphasis"><text:span text:style-name="T38">Megastructure Shaders:</text:span></text:span><text:span text:style-name="T38"> Tier 4 triggers custom shaders that make the Sun appear as a complex, geometric lattice.</text:span></text:p>
        </text:list-item>
        <text:list-item>
          <text:p text:style-name="P439"><text:span text:style-name="Strong_20_Emphasis"><text:span text:style-name="T38">Streaming Analysis:</text:span></text:span><text:span text:style-name="T38"> For Tier 3 and 4 systems, the scanner must process files in chunks to avoid memory overflow.</text:span></text:p>
        </text:list-item>
      </text:list>
      <text:p text:style-name="P83"/>
      <text:p text:style-name="P57"><text:span text:style-name="T175"/></text:p>
      <text:h text:style-name="P56" text:outline-level="2"><text:bookmark-start text:name="__RefHeading___Toc277554_2813440148"/><text:span text:style-name="T175">8</text:span><text:span text:style-name="T38">. </text:span><text:span text:style-name="T173">Impacts &amp; </text:span><text:span text:style-name="T38">Future Outlooks</text:span><text:bookmark-end text:name="__RefHeading___Toc277554_2813440148"/></text:h>
      <text:h text:style-name="P60" text:outline-level="3"><text:bookmark-start text:name="__RefHeading___Toc656524_2813440148"/><text:span text:style-name="Strong_20_Emphasis"><text:span text:style-name="T91">8</text:span></text:span><text:span text:style-name="Strong_20_Emphasis"><text:span text:style-name="T90">.1 Integration into the publishing pipeline for 24/7 Risk Exposure Analyses</text:span></text:span><text:bookmark-end text:name="__RefHeading___Toc656524_2813440148"/></text:h>
      <text:p text:style-name="P61"><text:span text:style-name="Strong_20_Emphasis"><text:span text:style-name="T64">The ultimate realization of the GitGalaxy standard is the transition from point-in-time inspections to a </text:span></text:span><text:span text:style-name="Strong_20_Emphasis"><text:span text:style-name="T174">24/7 Rolling Risk Exposure</text:span></text:span><text:span text:style-name="Strong_20_Emphasis"><text:span text:style-name="T64"> model. By deploying a headless version of the engine—</text:span></text:span><text:span text:style-name="Strong_20_Emphasis"><text:span text:style-name="Source_20_Text"><text:span text:style-name="T210">scanner.py</text:span></text:span></text:span><text:span text:style-name="Strong_20_Emphasis"><text:span text:style-name="T64">—directly into the publishing pipeline, we move beyond the "User-Triggered Audit" into a state of continuous architectural awareness. Every push or pull request triggers a full-fidelity scan, ensuring the system’s health is never more than </text:span></text:span><text:soft-page-break/><text:span text:style-name="Strong_20_Emphasis"><text:span text:style-name="T64">one commit out of date. By utilizing a heuristic regex-based engine rather than full AST (Abstract Syntax Tree) parsing, the scanner remains lightweight enough to process millions of lines of code in seconds, making real-time, high-frequency audits technically viable for even the largest enterprise monoliths. This creates an automated, objective heartbeat that treats human-written code and AI-generated logic with the same clinical scrutiny, ensuring the map and the territory never drift apart in silence.</text:span></text:span></text:p>
      <text:p text:style-name="Text_20_body">This rolling assessment is designed to <text:span text:style-name="T404">highlight</text:span> <text:span text:style-name="T2">Risk Exposure </text:span>in real-time. Instead of waiting for a manual review to discover that a critical module has become a "Brain Melting" zone or that its "Safety Armor" has been compromised, the sentinel identifies these deviations the moment they are pushed. It tracks the cumulative tension of the system, flagging when the "Cognitive Tax" of a new feature exceeds the team's documented intent. This transforms auditing from a reactive, punitive event into a proactive, atmospheric sensor that allows teams to see risk coming long before it manifests as a production failure.</text:p>
      <text:h text:style-name="Heading_20_3" text:outline-level="3"><text:bookmark-start text:name="__RefHeading___Toc480075_2813440148"/><text:span text:style-name="T91">8</text:span><text:span text:style-name="T86">.</text:span><text:span text:style-name="T90">2</text:span><text:span text:style-name="T86"> </text:span><text:span text:style-name="T88">One </text:span><text:span text:style-name="T86">Non-Numeric Dashboard </text:span><text:span text:style-name="T88">to rule them all</text:span><text:bookmark-end text:name="__RefHeading___Toc480075_2813440148"/></text:h>
      <text:p text:style-name="P26">GitGalaxy is a system designed to visualize code complexity through the use of procedurally generated equations to create spatial information and color overlays. This paradigm naturally extends to assess other forms of amorphous complex systems, such as microservice ecosystems, server clusters, global infrastructure, and the health of agent AI fleets. Just as Level of Detail (LOD) algorithms are used to alter appearances at distances in gaming engines, we can apply equivalent concepts to zoom in and out at orders of magnitude, allowing us to visualize entire levels of systems simultaneously. The goal <text:span text:style-name="T386">could be, if we are bold enough,</text:span> to connect in <text:span text:style-name="T386">a single </text:span>dashboard, the microscopic code to the macroscopic infrastructure.</text:p>
      <text:h text:style-name="P9" text:outline-level="3"><text:bookmark-start text:name="__RefHeading___Toc277556_2813440148"/><text:span text:style-name="T415">8</text:span>.<text:span text:style-name="T403">3</text:span> The <text:span text:style-name="T394">Cockpit </text:span>Crisis<text:bookmark-end text:name="__RefHeading___Toc277556_2813440148"/></text:h>
      <text:p text:style-name="P66"><text:span text:style-name="T42">Standard</text:span><text:span text:style-name="T195"> </text:span><text:span text:style-name="T42">dashboards are failing the needs of modern computing. We are building systems with unpredictable emergent behaviors. But our dashboards, the very way we measure those systems, are still rooted in the “cockpit” philosophy, that we can predict every important error ahead of time and make a warning light for it. This relies on </text:span><text:span text:style-name="Strong_20_Emphasis"><text:span text:style-name="T38">Finite State Anticipation,</text:span></text:span><text:span text:style-name="Strong_20_Emphasis"> </text:span><text:span text:style-name="Strong_20_Emphasis"><text:span text:style-name="T41">that</text:span></text:span><text:span text:style-name="T195"> </text:span><text:span text:style-name="T42">one can predict every way that</text:span><text:span text:style-name="T195"> </text:span><text:span text:style-name="T42">system will fail. But what happens when the system fails in a way no one predicted? </text:span><text:span text:style-name="T94">If a system can produce emergent behaviors, any worthwhile dashboard must be able to capture and report on emergent behaviors.</text:span><text:span text:style-name="T51"> </text:span><text:span text:style-name="T62">Do you know what the most data-rich sensor of a </text:span><text:soft-page-break/><text:span text:style-name="T62">cockpit is? The windshield. The very design of the airplane itself recognizes that we can’t make a warning light for everything, that sometimes we need to let the user see the chaotic world themselves and trust them to act appropriately. </text:span></text:p>
      <text:h text:style-name="Heading_20_3" text:outline-level="3"><text:bookmark-start text:name="__RefHeading___Toc480077_2813440148"/><text:span text:style-name="T175">8</text:span><text:span text:style-name="T163">.</text:span><text:span text:style-name="T174">4</text:span><text:span text:style-name="T38"> Time to </text:span><text:span text:style-name="T164">tend a Garden</text:span><text:bookmark-end text:name="__RefHeading___Toc480077_2813440148"/></text:h>
      <text:p text:style-name="P55"><text:span text:style-name="T51">GitGalaxy uses </text:span><text:span text:style-name="T65">9</text:span><text:span text:style-name="T51"> independent metrics to </text:span><text:span text:style-name="T53">visually</text:span><text:span text:style-name="T51"> display complexity. To capture and display emergent behavior, one could adapt these equations into a </text:span><text:span text:style-name="T53">system of</text:span><text:span text:style-name="T51"> feedback loop</text:span><text:span text:style-name="T53">s</text:span><text:span text:style-name="T51"> that would then create </text:span><text:span text:style-name="T53">visual</text:span><text:span text:style-name="T51"> fractal patterns. We could easily display these fractal patterns in a way that the human mind enjoys, using biomimetic patterns. Just as a flower's droop integrates thirst, heat, and soil quality into a single visual signal, dashboard</text:span><text:span text:style-name="T61">s could</text:span><text:span text:style-name="T51"> </text:span><text:span text:style-name="T61">do the same with</text:span><text:span text:style-name="T51"> CPU, RAM, and Latency. </text:span><text:span text:style-name="T60">One </text:span><text:span text:style-name="T51">could display a fleet of</text:span><text:span text:style-name="T53"> servers</text:span><text:span text:style-name="T51"> as a field of </text:span><text:span text:style-name="T60">stars or alien </text:span><text:span text:style-name="T51">flowers, that initially </text:span><text:span text:style-name="T52">were </text:span><text:span text:style-name="T51">all identical in quality, but as time </text:span><text:span text:style-name="T52">went on </text:span><text:span text:style-name="T51">we </text:span><text:span text:style-name="T52">could </text:span><text:span text:style-name="T51">see that e</text:span><text:span text:style-name="T60">ach diverged in pattern</text:span><text:span text:style-name="T51">. </text:span><text:span text:style-name="T54">Alerting teams that it might be time to tend to </text:span><text:span text:style-name="T60">the system</text:span><text:span text:style-name="T54">, </text:span><text:span text:style-name="T61">before</text:span><text:span text:style-name="T54"> we find any corpses. <text:s/></text:span></text:p>
      <text:p text:style-name="P55"><text:span text:style-name="T52">As our systems become more alive, we can no longer depend on just discrete numbers and traditional sensors to monitor them. We need sensors that can detect unpredictable emergent behaviors, before drift causes </text:span><text:span text:style-name="T53">downtime</text:span><text:span text:style-name="T52">. By leaning on the evolutionary strengths of the human mind, we can easily create such sensors. A chaos sensor </text:span><text:span text:style-name="T53">for the 21</text:span><text:span text:style-name="T395">st</text:span><text:span text:style-name="T53"> century, but for people. </text:span></text:p>
      <text:h text:style-name="P58" text:outline-level="3"><text:bookmark-start text:name="__RefHeading___Toc656526_2813440148"/><text:span text:style-name="Strong_20_Emphasis"><text:span text:style-name="T415">8</text:span></text:span><text:span text:style-name="Strong_20_Emphasis">.</text:span><text:span text:style-name="Strong_20_Emphasis"><text:span text:style-name="T403">5</text:span></text:span><text:span text:style-name="Strong_20_Emphasis"> Circling back to Specifications </text:span><text:span text:style-name="Strong_20_Emphasis"><text:span text:style-name="T401">Exposure </text:span></text:span><text:span text:style-name="Strong_20_Emphasis"><text:span text:style-name="T402">&amp; Auditing</text:span></text:span><text:bookmark-end text:name="__RefHeading___Toc656526_2813440148"/></text:h>
      <text:p text:style-name="P59"><text:span text:style-name="Strong_20_Emphasis"><text:span text:style-name="T208">By embedding </text:span></text:span><text:span text:style-name="Strong_20_Emphasis"><text:span text:style-name="T209">a specification</text:span></text:span><text:span text:style-name="Strong_20_Emphasis"><text:span text:style-name="T208"> audit trail into the README, we turn documentation into a living sensor. We move away from the "Big Bang" release where specs are checked once at the end, and toward a continuous, visual heartbeat of alignment. If this becomes the standard, we stop seeing specifications as a "gate" to pass through and start seeing them as a "home" for our logic to inhabit. </text:span></text:span></text:p>
      <text:p text:style-name="P59"><text:span text:style-name="Strong_20_Emphasis"><text:span text:style-name="T208">The true power of the [audit] standard lies in its ability to formalize the natural, bottom-up documentation that already lives in a developer's README. While high-level "user specs" might define the destination, the real engineering happens in the sub-specifications and complex edge cases that usually stay hidden. By tagging these technical hurdles right where they are described, we transform the README from a static file into a living </text:span></text:span><text:span text:style-name="Strong_20_Emphasis"><text:span text:style-name="T401">Engineering Roadmap</text:span></text:span><text:span text:style-name="Strong_20_Emphasis"><text:span text:style-name="T208">.</text:span></text:span></text:p>
      <text:p text:style-name="P59"><text:span text:style-name="T53">This isn't about assessing how we are meeting a rigid, top-down "God Spec." It’s about the dev team marking where their work really went. By tagging specific sub-problems or </text:span><text:soft-page-break/><text:span text:style-name="T53">edge cases, the CTO or Team Lead can finally assess the </text:span><text:span text:style-name="Emphasis"><text:span text:style-name="T53">true</text:span></text:span><text:span text:style-name="T53"> steps the team is focusing on. This allows a leader to see exactly which technical sub-problems are being solved, providing a no-blame way to understand why a specific module is taking more time: because the team is busy "civilizing" five different sub-specs that were required to make the high-level plan a reality.</text:span></text:p>
      <text:h text:style-name="P63" text:outline-level="3"><text:bookmark-start text:name="__RefHeading___Toc36598_1787320247"/><text:span text:style-name="T180">8.</text:span><text:span text:style-name="T181">6. </text:span><text:span text:style-name="T182">The Field of AI Forensics</text:span><text:bookmark-end text:name="__RefHeading___Toc36598_1787320247"/></text:h>
      <text:p text:style-name="P69"><text:span text:style-name="T181">Large Language Models (LLMs) do not write code like humans. Humans are pragmatic, lazy, and highly contextual. AI agents are deterministic, hyper-focused on their immediate context window, and strictly driven by their RLHF (Reinforcement Learning from Human Feedback) guardrails. They don't just use different variable names; they build </text:span><text:span text:style-name="T183">differently</text:span><text:span text:style-name="T140">. With enough training data (AI generated code), there is high odds that one could identify unique fingerprints based on a multi-dimensional analys</text:span><text:span text:style-name="T142">e</text:span><text:span text:style-name="T140">s </text:span><text:span text:style-name="T142">with</text:span><text:span text:style-name="T141"> the ~50 different metrics assessed </text:span><text:span text:style-name="T142">here </text:span><text:span text:style-name="T141">for each file</text:span><text:span text:style-name="T140">. Claude Code appears focus on high safety scores and low danger scores while Copilot, often focused at the function level, </text:span><text:span text:style-name="T141">might have unique function scoring values</text:span><text:span text:style-name="T140">. This could useful to determine which models, and even which model versions, were likely or not likely involved in creating </text:span><text:span text:style-name="T141">a</text:span><text:span text:style-name="T140"> </text:span><text:span text:style-name="T141">file</text:span><text:span text:style-name="T140">. Or, </text:span><text:span text:style-name="T141">alternatively,</text:span><text:span text:style-name="T140"> fingerprints could be </text:span><text:span text:style-name="T141">specifically </text:span><text:span text:style-name="T140">built in to create a new </text:span><text:span text:style-name="T141">ability</text:span><text:span text:style-name="T140"> </text:span><text:span text:style-name="T141">to track one model’s </text:span><text:span text:style-name="T142">produced </text:span><text:span text:style-name="T141">code throughout the world (...There is a 95% chance that Gemini 3 wrote this function,...</text:span><text:span text:style-name="T142">this code was likely human generated...10% of the files on github are from an OpenAI model</text:span><text:span text:style-name="T1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ato" svg:font-family="La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adornments="Regular"/>
    <style:font-face style:name="roboto" svg:font-family="roboto"/>
    <style:font-face style:name="roboto1" svg:font-family="roboto" style:font-adornments="Bol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rOBOTO" fo:font-family="rOBOTO" style:font-style-name="Regular"/>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roboto1" fo:font-family="roboto" style:font-style-name="Bold"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roboto" fo:font-family="roboto"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6:17:49.469228850</meta:creation-date>
    <meta:print-date>2026-02-09T16:18:05.004937713</meta:print-date>
    <dc:date>2026-03-22T07:26:54.682561949</dc:date>
    <meta:editing-duration>P8DT12H16M44S</meta:editing-duration>
    <meta:editing-cycles>113</meta:editing-cycles>
    <meta:generator>LibreOffice/24.2.7.2$Linux_X86_64 LibreOffice_project/420$Build-2</meta:generator>
    <meta:document-statistic meta:table-count="38" meta:image-count="0" meta:object-count="0" meta:page-count="152" meta:paragraph-count="4752" meta:word-count="40912" meta:character-count="265871" meta:non-whitespace-character-count="227158"/>
  </office:meta>
</office:document-meta>
</file>