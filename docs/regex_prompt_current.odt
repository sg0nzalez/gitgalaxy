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paragraph-rsid="000ac93c"/>
    </style:style>
    <style:style style:name="P3" style:family="paragraph" style:parent-style-name="Preformatted_20_Text">
      <style:text-properties officeooo:paragraph-rsid="000cbc47"/>
    </style:style>
    <style:style style:name="P4" style:family="paragraph" style:parent-style-name="Preformatted_20_Text">
      <style:text-properties officeooo:paragraph-rsid="000fb993"/>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paragraph-properties fo:margin-left="0in" fo:margin-right="0in" fo:margin-top="0in" fo:margin-bottom="0.0972in" style:contextual-spacing="false" fo:line-height="114%" fo:text-indent="0in" style:auto-text-indent="false"/>
    </style:style>
    <style:style style:name="P8" style:family="paragraph" style:parent-style-name="Text_20_body" style:list-style-name="L4">
      <style:paragraph-properties fo:margin-left="0in" fo:margin-right="0in" fo:margin-top="0in" fo:margin-bottom="0.0972in" style:contextual-spacing="false" fo:line-height="114%" fo:text-indent="0in" style:auto-text-indent="false"/>
    </style:style>
    <style:style style:name="P9" style:family="paragraph" style:parent-style-name="Text_20_body" style:list-style-name="L5">
      <style:paragraph-properties fo:margin-left="0in" fo:margin-right="0in" fo:margin-top="0in" fo:margin-bottom="0.0972in" style:contextual-spacing="false" fo:line-height="114%" fo:text-indent="0in" style:auto-text-indent="false"/>
    </style:style>
    <style:style style:name="P10" style:family="paragraph" style:parent-style-name="Text_20_body" style:list-style-name="L6">
      <style:paragraph-properties fo:margin-left="0in" fo:margin-right="0in" fo:margin-top="0in" fo:margin-bottom="0.0972in" style:contextual-spacing="false" fo:line-height="114%" fo:text-indent="0in" style:auto-text-indent="false"/>
    </style:style>
    <style:style style:name="P11" style:family="paragraph" style:parent-style-name="Text_20_body" style:list-style-name="L2">
      <style:text-properties style:font-name="Google Sans Text"/>
    </style:style>
    <style:style style:name="T1" style:family="text">
      <style:text-properties officeooo:rsid="0009df46"/>
    </style:style>
    <style:style style:name="T2" style:family="text">
      <style:text-properties fo:font-weight="bold"/>
    </style:style>
    <style:style style:name="T3" style:family="text">
      <style:text-properties style:font-name="Google Sans Text"/>
    </style:style>
    <style:style style:name="T4" style:family="text">
      <style:text-properties style:font-name="Google Sans Text" fo:font-weight="bold"/>
    </style:style>
    <style:style style:name="T5" style:family="text">
      <style:text-properties officeooo:rsid="000a161f"/>
    </style:style>
    <style:style style:name="T6" style:family="text">
      <style:text-properties officeooo:rsid="000cbc47"/>
    </style:style>
    <style:style style:name="T7" style:family="text">
      <style:text-properties fo:font-style="italic"/>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GitGalaxy: Universal Language Definition Worksheet (v6.3.<text:span text:style-name="T5">1</text:span>)</text:h>
      <text:p text:style-name="Text_20_body"><text:span text:style-name="Strong_20_Emphasis">Purpose:</text:span> This document provides a standardized template for defining the physical and operational laws of a programming language within the GitGalaxy Physics Engine. It ensures a consistent 1:1 cross-language comparison between disparate ecosystems (e.g., Assembly vs. TypeScript) and enables the extraction of high-level user intent.</text:p>
      <text:p text:style-name="Text_20_body"><text:span text:style-name="Strong_20_Emphasis">Instructions for LLM:</text:span> Complete the JSON object below.</text:p>
      <text:list text:style-name="L1">
        <text:list-item>
          <text:p text:style-name="P5"><text:span text:style-name="Strong_20_Emphasis">Format:</text:span> Your output must be a valid JSON-structured Python dictionary.</text:p>
        </text:list-item>
        <text:list-item>
          <text:p text:style-name="P5"><text:span text:style-name="Strong_20_Emphasis">Regex Mandate:</text:span> Every rule value must be replaced with a high-performance Python <text:span text:style-name="Source_20_Text">re.compile(r'...')</text:span> object or <text:span text:style-name="Source_20_Text">None</text:span>.</text:p>
        </text:list-item>
        <text:list-item>
          <text:p text:style-name="P5"><text:span text:style-name="Strong_20_Emphasis">Identity vs. Gravity:</text:span> * <text:span text:style-name="Source_20_Text">exact_matches</text:span>: ONLY for files where the filename defines the syntax (e.g., <text:span text:style-name="Source_20_Text">Makefile</text:span>).</text:p>
          <text:list>
            <text:list-item>
              <text:p text:style-name="P5"><text:span text:style-name="Source_20_Text">discriminators</text:span>: For manifests/lockfiles that prove ecosystem context (e.g., <text:span text:style-name="Source_20_Text">package.json</text:span>).</text:p>
            </text:list-item>
          </text:list>
        </text:list-item>
        <text:list-item>
          <text:p text:style-name="P5"><text:span text:style-name="Strong_20_Emphasis">Horizontal Space Protocol:</text:span> Use <text:span text:style-name="Source_20_Text">[ \t]*</text:span> instead of <text:span text:style-name="Source_20_Text">\s*</text:span> for indentation to prevent backtracking blowouts.</text:p>
        </text:list-item>
      </text:list>
      <text:h text:style-name="Heading_20_3" text:outline-level="3">⚙️ SYSTEM PROMPT INSTRUCTIONS: GITGALAXY REGISTRY GENERATOR</text:h>
      <text:p text:style-name="Text_20_body">You are an expert compiler engineer and static analysis specialist. Generate the <text:span text:style-name="Source_20_Text">REGISTRY</text:span> using the framework below.</text:p>
      <text:p text:style-name="Text_20_body">🚨 <text:span text:style-name="Strong_20_Emphasis">CRITICAL RULES:</text:span></text:p>
      <text:list xml:id="list1821495692" text:style-name="L2">
        <text:list-item>
          <text:p text:style-name="P6"><text:span text:style-name="Strong_20_Emphasis">Exactly </text:span><text:span text:style-name="Strong_20_Emphasis"><text:span text:style-name="T1">49</text:span></text:span><text:span text:style-name="Strong_20_Emphasis"> Keys</text:span>. Use <text:span text:style-name="Source_20_Text">None</text:span> if a dimension is missing.</text:p>
        </text:list-item>
        <text:list-item>
          <text:p text:style-name="P6"><text:span text:style-name="Strong_20_Emphasis">Lookahead Mandate:</text:span> <text:span text:style-name="Source_20_Text">func_start</text:span> MUST use Positive Lookaheads <text:span text:style-name="Source_20_Text">(?=)</text:span> to isolate identifier names without consuming punctuation.</text:p>
        </text:list-item>
        <text:list-item>
          <text:p text:style-name="P6"><text:span text:style-name="Strong_20_Emphasis">Geometric Stability:</text:span> Do NOT place access modifiers in <text:span text:style-name="Source_20_Text">linear</text:span>.</text:p>
        </text:list-item>
        <text:list-item>
          <text:p text:style-name="P6"><text:bookmark text:name="p-rc_6d72336272d2a08c-41"/><text:span text:style-name="T4">The Nested Quantifier Ban ($O(2^N)$ Prevention):</text:span><text:span text:style-name="T3"> NEVER nest unbounded quantifiers. If the engine fails to match, it will attempt billions of permutations and crash. NEVER do this: </text:span><text:span text:style-name="Source_20_Text"><text:span text:style-name="T3">(?:[ \t]*\*+)*</text:span></text:span><text:span text:style-name="T3"> or </text:span><text:span text:style-name="Source_20_Text"><text:span text:style-name="T3">(?:(?:public|private)\s+)*</text:span></text:span><text:span text:style-name="T3">. ALWAYS use strict numeric clamps: </text:span><text:span text:style-name="Source_20_Text"><text:span text:style-name="T3">(?:[ \t*&amp;]+){0,10}</text:span></text:span><text:span text:style-name="T3"> or </text:span><text:span text:style-name="Source_20_Text"><text:span text:style-name="T3">(?:(?:public|static)[ \t]+){0,3}</text:span></text:span><text:span text:style-name="T3">. </text:span></text:p>
        </text:list-item>
        <text:list-item text:style-override="L3">
          <text:p text:style-name="P7"><text:bookmark text:name="p-rc_6d72336272d2a08c-42"/><text:soft-page-break/><text:span text:style-name="T4">Strict Bounding for Brackets:</text:span><text:span text:style-name="T3"> Never use </text:span><text:span text:style-name="Source_20_Text"><text:span text:style-name="T3">.*</text:span></text:span><text:span text:style-name="T3"> inside brackets or parentheses. Always use strict negation boundaries. For parameters: Use </text:span><text:span text:style-name="Source_20_Text"><text:span text:style-name="T3">\([^)]*\)</text:span></text:span><text:span text:style-name="T3">. For generics: Use </text:span><text:span text:style-name="Source_20_Text"><text:span text:style-name="T3">&lt;[^&gt;]*&gt;</text:span></text:span><text:span text:style-name="T3"> or </text:span><text:span text:style-name="Source_20_Text"><text:span text:style-name="T3">\[[^\]]*\]</text:span></text:span><text:span text:style-name="T3">. </text:span></text:p>
        </text:list-item>
        <text:list-item text:style-override="L4">
          <text:p text:style-name="P8"><text:bookmark text:name="p-rc_6d72336272d2a08c-43"/><text:span text:style-name="T4">No Inline String Traps:</text:span><text:span text:style-name="T3"> Do not attempt to match raw strings with complex escape logic like </text:span><text:span text:style-name="Source_20_Text"><text:span text:style-name="T3">"(?:[^"\\]|\\.)*"</text:span></text:span><text:span text:style-name="T3">. If a developer forgets a closing quote, it causes explosive backtracking. Rely on standard keywords instead. </text:span></text:p>
        </text:list-item>
        <text:list-item>
          <text:p text:style-name="P11"><text:bookmark text:name="p-rc_6d72336272d2a08c-44"/><text:span text:style-name="T2">The Physical Reality Rule (Implicit vs. Explicit):</text:span> Do not just hunt for explicit keywords. You must capture the physical reality of the code. Example: If defining API Exposure, determine if the language is implicitly public (e.g., Python, Fortran). If so, the regex must capture standard function/subroutine definitions, not just the rare use of an explicit public or export tag. </text:p>
        </text:list-item>
        <text:list-item text:style-override="L5">
          <text:p text:style-name="P9"><text:bookmark text:name="p-rc_6d72336272d2a08c-45"/><text:span text:style-name="T4">The Paradigm Forgiveness Rule (No "Trust Me" Taxes in Safety):</text:span><text:span text:style-name="T3"> Do not punish a language for operating within its standard paradigm. Example: Standard C-style pointer casting or Fortran DIMENSION arrays are standard operating procedures, not structural fractures. They must be routed to Phase 5 (Thermodynamic Balance) as friction, NOT placed in Phase 2 </text:span><text:span text:style-name="Source_20_Text"><text:span text:style-name="T3">safety_neg</text:span></text:span><text:span text:style-name="T3"> where they will trigger the Breach Cap and destroy the file's baseline safety score. </text:span></text:p>
        </text:list-item>
        <text:list-item text:style-override="L5">
          <text:p text:style-name="P9">While the Paradigm Forgiveness Rule tells us not to punish a language for its standard operating procedure , applying that forgiveness by deliberately blinding the Primary Detector violates the Physical Reality Rule ... which explicitly demands we capture the actual physical reality of the code. The detector's only job is to capture that raw structural DNA ; it is actually the downstream Signal Processor's responsibility to mathematically dampen those raw counts. Never set a key to <text:span text:style-name="Source_20_Text">None</text:span> simply because the behavior is standard for the language. Capture the raw structural DNA to preserve the physical geometry of the code. All 'Paradigm Forgiveness' and risk dampening must be handled downstream by the Signal Processor's Trust Constants, not by blinding the regex</text:p>
        </text:list-item>
        <text:list-item text:style-override="L5">
          <text:p text:style-name="P9"><text:span text:style-name="T2">The Carrier Language Rule (No Metaphorical Mapping):</text:span> When defining execution sensors (like <text:span text:style-name="Source_20_Text">globals</text:span>, <text:span text:style-name="Source_20_Text">flux</text:span>, <text:span text:style-name="Source_20_Text">danger</text:span>, <text:span text:style-name="Source_20_Text">bailout_hits</text:span>, or <text:span text:style-name="Source_20_Text">concurrency</text:span>) for a declarative markup or template language (e.g., HTML, XML, PHP, Vue), <text:span text:style-name="T2">do not map them to structural tags using metaphors</text:span> (e.g., do not map <text:span text:style-name="Source_20_Text">globals</text:span> to the <text:span text:style-name="Source_20_Text">&lt;html&gt;</text:span> tag just because it is the root element). Instead, these sensors must strictly target the <text:span text:style-name="T7">embedded scripting language</text:span> that the file carries. If an HTML file contains inline JavaScript, the <text:span text:style-name="Source_20_Text">globals</text:span> regex must target <text:span text:style-name="Source_20_Text">window.</text:span> or <text:span text:style-name="Source_20_Text">document.</text:span>, exactly as it would for a pure <text:span text:style-name="Source_20_Text">.js</text:span> file. If the language has absolutely no capacity for that execution concept, set it to <text:span text:style-name="Source_20_Text">None</text:span>.</text:p>
        </text:list-item>
        <text:list-item text:style-override="L6">
          <text:p text:style-name="P10"><text:bookmark text:name="p-rc_6d72336272d2a08c-46"/><text:span text:style-name="T4">The "Ghost Logic" Rule (Contextual Debt):</text:span><text:span text:style-name="T3"> When assessing Tech Debt or Danger, isolate human commentary from execution flow. Example: </text:span><text:span text:style-name="Source_20_Text"><text:span text:style-name="T3">TODO</text:span></text:span><text:span text:style-name="T3"> and </text:span><text:soft-page-break/><text:span text:style-name="Source_20_Text"><text:span text:style-name="T3">FIXME</text:span></text:span><text:span text:style-name="T3"> are planned debt. They must NEVER be placed in execution-blocking keys like </text:span><text:span text:style-name="Source_20_Text"><text:span text:style-name="T3">danger</text:span></text:span><text:span text:style-name="T3">, otherwise, a file with high developer documentation will be falsely penalized as a volatile execution risk. </text:span></text:p>
        </text:list-item>
      </text:list>
      <text:p text:style-name="Text_20_body"/>
      <text:p text:style-name="Preformatted_20_Text"><text:span text:style-name="Source_20_Text">{</text:span></text:p>
      <text:p text:style-name="Preformatted_20_Text"><text:span text:style-name="Source_20_Text"><text:s text:c="4"/>"language_id": {</text:span></text:p>
      <text:p text:style-name="Preformatted_20_Text"><text:span text:style-name="Source_20_Text"><text:s text:c="8"/>"_meta": {</text:span></text:p>
      <text:p text:style-name="Preformatted_20_Text"><text:span text:style-name="Source_20_Text"><text:s text:c="12"/>"target_version": "Specify the exact language version/standard (e.g., 'Java 21', 'C++23', 'ES2025').",</text:span></text:p>
      <text:p text:style-name="Preformatted_20_Text"><text:span text:style-name="Source_20_Text"><text:s text:c="12"/>"last_updated": "2026-03-11", </text:span><text:span text:style-name="Source_20_Text"><text:span text:style-name="T5">todays’ date</text:span></text:span></text:p>
      <text:p text:style-name="Preformatted_20_Text"><text:span text:style-name="Source_20_Text"><text:s text:c="12"/>"blueprint_version": </text:span><text:span text:style-name="Source_20_Text"><text:span text:style-name="T5">from this worksheets header.</text:span></text:span></text:p>
      <text:p text:style-name="Preformatted_20_Text"><text:span text:style-name="Source_20_Text"><text:s text:c="12"/>"status": "production", “</text:span><text:span text:style-name="Source_20_Text"><text:span text:style-name="T5">testing”</text:span></text:span></text:p>
      <text:p text:style-name="Preformatted_20_Text"><text:span text:style-name="Source_20_Text"><text:s text:c="8"/>},</text:span></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s text:c="8"/>"extensions": [</text:span></text:p>
      <text:p text:style-name="Preformatted_20_Text"><text:span text:style-name="Source_20_Text"><text:s text:c="2"/>"COMPREHENSIVE SURFACE AREA: Provide an exhaustive list of ALL file extensions that execute or map to this language's syntax. You MUST include: 1. Standard modern suffixes. 2. Legacy/deprecated formats. 3. Framework-specific UI/template extensions. 4. Build-tooling and embedded scripting formats. The goal is zero 'dark matter' in the repository scan. Example for JS: ['.js', '.mjs', '.cjs', '.jsx', '.es6', '.pac', '.sjs']"</text:span></text:p>
      <text:p text:style-name="Preformatted_20_Text"><text:span text:style-name="Source_20_Text">]</text:span></text:p>
      <text:p text:style-name="Preformatted_20_Text"><text:span text:style-name="Source_20_Text"><text:tab/><text:tab/>"exact_matches": [</text:span></text:p>
      <text:p text:style-name="Preformatted_20_Text"><text:span text:style-name="Source_20_Text"><text:s text:c="2"/>"ABSOLUTE IDENTITY &amp; EXACT FILENAMES: Provide an exhaustive list of specific, highly standardized filenames (with or without extensions) that consist entirely of this language's syntax. You MUST include: 1. Extensionless build and configuration scripts (e.g., 'SConstruct', 'Makefile'). 2. Standardized framework CLI entry points (e.g., 'artisan', 'drush'). 3. Tooling configurations that are secretly pure code (e.g., 'setup.py', 'Jakefile', 'wscript'). DO NOT include static data manifests like JSON, YAML, or XML lockfiles here. Example for Python: ['setup.py', 'SConstruct', 'BUCK', 'BUILD', 'wscript']"</text:span></text:p>
      <text:p text:style-name="Preformatted_20_Text"><text:span text:style-name="Source_20_Text">]</text:span></text:p>
      <text:p text:style-name="Preformatted_20_Text"><text:span text:style-name="Source_20_Text"><text:tab/><text:tab/>"discriminators": [</text:span></text:p>
      <text:p text:style-name="Preformatted_20_Text"><text:span text:style-name="Source_20_Text"><text:s text:c="2"/>"ECOSYSTEM GRAVITY &amp; DISAMBIGUATION: Provide an exhaustive list of files and sibling extensions that prove the context of this language, acting as gravitational anchors to resolve ambiguous files. You MUST include: 1. Primary sibling extensions used for disambiguation (e.g., using '.c' to prove an ambiguous '.h' is C instead of C++). 2. Package manifests and lockfiles. 3. Build system and environment configs. Example for C: ['.c', 'Makefile', 'configure.ac']"</text:span></text:p>
      <text:p text:style-name="P3"><text:span text:style-name="Source_20_Text"><text:span text:style-name="T6">]</text:span></text:span></text:p>
      <text:p text:style-name="P2"><text:span text:style-name="Source_20_Text"><text:s text:c="8"/>"shebangs": [</text:span></text:p>
      <text:p text:style-name="P2"><text:span text:style-name="Source_20_Text"><text:s text:c="12"/>"Interpreter signatures found on Line 1. Example: ['python3', 'node', 'pwsh']"<text:tab/><text:tab/></text:span></text:p>
      <text:p text:style-name="Preformatted_20_Text"><text:span text:style-name="Source_20_Text"><text:s text:c="8"/>],</text:span></text:p>
      <text:p text:style-name="Preformatted_20_Text"><text:span text:style-name="Source_20_Text"><text:s text:c="8"/>"lexical_family": "Select core parsing logic: std_c, nested_c, pure_hash, hybrid_hash, hybrid_dash, polyglot, positional, singular.",</text:span></text:p>
      <text:p text:style-name="Preformatted_20_Text"><text:span text:style-name="Source_20_Text"><text:s text:c="8"/>"rules": {</text:span></text:p>
      <text:p text:style-name="Preformatted_20_Text"><text:span text:style-name="Source_20_Text"><text:s text:c="12"/># --- PHASE 1: PHYSICS ENGINE (Geometry &amp; Structure) ---</text:span></text:p>
      <text:p text:style-name="Preformatted_20_Text"><text:span text:style-name="Source_20_Text"><text:s text:c="12"/>"branch": "Logic forcing execution to split or jump. Includes conditionals, loops, and short-circuits. EXCLUDES exceptions (bailout_hits). Example: re.compile(r'\\b(if|else|for|while|match|case)\\b|&amp;&amp;|\\|\\|')",</text:span></text:p>
      <text:p text:style-name="Preformatted_20_Text"><text:span text:style-name="Source_20_Text"><text:s text:c="12"/>"args": "Functional signatures defining the parameter mass of the file. Must capture the parameter block mass to calculate coupling. Example: re.compile(r'\\([^)]*\\)|\\|[\\w, ]*\\|')",</text:span></text:p>
      <text:p text:style-name="Preformatted_20_Text"><text:soft-page-break/><text:span text:style-name="Source_20_Text"><text:s text:c="12"/>"linear": "Declarative pathing defining the file's architectural skeleton. Includes returns, imports, and package declarations. EXCLUDES access modifiers. Example: re.compile(r'\\b(import|export|package|return|class|extends|implements)\\b')",</text:span></text:p>
      <text:p text:style-name="Preformatted_20_Text"><text:span text:style-name="Source_20_Text"><text:s text:c="12"/>"func_start": "The primary entry point for executable intent. For CSS/HTML, this anchors macro-rules or behavior blocks. MUST use Positive Lookaheads to stop exactly at the name. Example: re.compile(r'[a-zA-Z_]\\w*(?=[ \\t]*\\()')",</text:span></text:p>
      <text:p text:style-name="Preformatted_20_Text"><text:span text:style-name="Source_20_Text"><text:s text:c="12"/>"class_start": "Defines boundaries of OO entities or structural data definitions. Example: re.compile(r'\\b(class|interface|struct|trait|enum)\\b')",</text:span></text:p>
      <text:p text:style-name="Preformatted_20_Text"/>
      <text:p text:style-name="Preformatted_20_Text"><text:span text:style-name="Source_20_Text"><text:s text:c="12"/># --- PHASE 2: RISK ENGINE (Structural Integrity) ---</text:span></text:p>
      <text:p text:style-name="Preformatted_20_Text"><text:span text:style-name="Source_20_Text"><text:s text:c="12"/>"safety": "Explicit signals of safe boundary management, error handling, and strict equality. Example: re.compile(r'\\b(try|catch|Optional|assert|instanceof)\\b|===')",</text:span></text:p>
      <text:p text:style-name="Preformatted_20_Text"><text:span text:style-name="Source_20_Text"><text:s text:c="12"/>"safety_neg": "Active bypasses of type systems or standard safety protocols. Example: re.compile(r'\\b(any|unsafe|eslint-disable)\\b|==(?!=)')",</text:span></text:p>
      <text:p text:style-name="Preformatted_20_Text"><text:span text:style-name="Source_20_Text"><text:s text:c="12"/>"danger": "Catastrophic execution risks or un-sanitized process triggers (e.g., eval, process.exit). Example: re.compile(r'\\b(eval|innerHTML|document.write|process.exit)\\b')",</text:span></text:p>
      <text:p text:style-name="Preformatted_20_Text"><text:span text:style-name="Source_20_Text"><text:s text:c="12"/>"io": "Interaction with the external universe (Disk, Network, DB). Example: re.compile(r'\\b(fetch|open|fs.read|XMLHttpRequest|socket|sql)\\b')",</text:span></text:p>
      <text:p text:style-name="Preformatted_20_Text"><text:span text:style-name="Source_20_Text"><text:s text:c="12"/>"api": "Identification of code surface area exposed to external scopes. Accounts for implicit public defaults. Example: re.compile(r'\\b(public|export|module.exports|__all__)\\b')",</text:span></text:p>
      <text:p text:style-name="Preformatted_20_Text"><text:span text:style-name="Source_20_Text"><text:s text:c="12"/>"flux": "Direct mutation of state or memory reassignments. Example: re.compile(r'\\b(let|var|this\\.|setState)\\b|\\.(push|set|add)\\(')",</text:span></text:p>
      <text:p text:style-name="Preformatted_20_Text"><text:span text:style-name="Source_20_Text"><text:s text:c="12"/>"graveyard": "Commented-out execution logic indicating dead features. MUST enforce that the structural keyword immediately follows the comment token with only whitespace in between. Do NOT use .* after the comment token, or it will flag normal conversational comments (e.g., '// wait for the network'). Example: re.compile(r'//[ \\t]*(?:if|for|while|function|class|return)\\b')",</text:span></text:p>
      <text:p text:style-name="Preformatted_20_Text"><text:span text:style-name="Source_20_Text"><text:s text:c="12"/>"doc": "Signals of structured metadata/docs intended for humans/parsers. Example: re.compile(r'\\/\\*\\*|@param|@return|///')",</text:span></text:p>
      <text:p text:style-name="Preformatted_20_Text"><text:span text:style-name="Source_20_Text"><text:s text:c="12"/>"test": "Triggers indicating internal verification or testing framework proximity. MUST strictly anchor common English words used in BDD frameworks (like 'it' or 'describe') with parentheses or brackets to prevent massive false positives in prose. Example: re.compile(r'\\b(describe|expect|assert|TestCase)\\b|\\bit\\s*\\(')",</text:span></text:p>
      <text:p text:style-name="Preformatted_20_Text"/>
      <text:p text:style-name="Preformatted_20_Text"><text:span text:style-name="Source_20_Text"><text:s text:c="12"/># --- PHASE 3: SPECIALIZED SENSORS (Architecture &amp; Domain) ---</text:span></text:p>
      <text:p text:style-name="Preformatted_20_Text"><text:span text:style-name="Source_20_Text"><text:s text:c="12"/>"concurrency": "Asynchronous primitives and thread orchestration. Example: re.compile(r'\\b(async|await|Promise|thread|worker|setTimeout)\\b')",</text:span></text:p>
      <text:p text:style-name="Preformatted_20_Text"><text:span text:style-name="Source_20_Text"><text:s text:c="12"/>"ui_framework": "Density of visual layout primitives or framework-specific UI bindings. Example: re.compile(r'&lt;[A-Z]|className=|useState|@Component')",</text:span></text:p>
      <text:p text:style-name="Preformatted_20_Text"><text:span text:style-name="Source_20_Text"><text:s text:c="12"/>"closures": "Anonymous scopes and lambda callbacks. Example: re.compile(r'=&gt;|lambda|function[ \\t]*\\(')",</text:span></text:p>
      <text:p text:style-name="Preformatted_20_Text"><text:span text:style-name="Source_20_Text"><text:s text:c="12"/>"globals": "Access to global registries, environment variables, or singleton states. Example: re.compile(r'\\b(window\\.|global\\.|process\\.env|System\\.getProperty)\\b')",</text:span></text:p>
      <text:p text:style-name="Preformatted_20_Text"><text:span text:style-name="Source_20_Text"><text:s text:c="12"/>"decorators": "Architectural annotations modifying block behavior. Example: re.compile(r'@[\\w.]+|#\\[[^\\]]*\\]')",</text:span></text:p>
      <text:p text:style-name="Preformatted_20_Text"><text:span text:style-name="Source_20_Text"><text:s text:c="12"/>"generics": "Signals of generic contracts and type parameterization. Example: re.compile(r'&lt;[ \\t]*[A-Z][^&gt;]*&gt;|List\\[[^\\]]*\\]|forall')",</text:span></text:p>
      <text:p text:style-name="Preformatted_20_Text"><text:span text:style-name="Source_20_Text"><text:s text:c="12"/>"comprehensions": "Functional mapping, filtering, or list-comps that act as inline data pipelines. Example: re.compile(r'\\.(map|filter|reduce)\\(|\\bfor\\b.*\\bin\\b')",</text:span></text:p>
      <text:p text:style-name="Preformatted_20_Text"><text:soft-page-break/><text:span text:style-name="Source_20_Text"><text:s text:c="12"/>"scientific": "Math libraries, tensor operations, and linear algebra primitives. Example: re.compile(r'\\b(math\\.|numpy|torch|linalg|sin|cos|sqrt)\\b')",</text:span></text:p>
      <text:p text:style-name="Preformatted_20_Text"><text:span text:style-name="Source_20_Text"><text:s text:c="12"/>"heat_triggers": "Metaprogramming, reflection, or dynamic property binding. Example: re.compile(r'\\b(prototype|reflect|__getattr__|method_missing)\\b')",</text:span></text:p>
      <text:p text:style-name="Preformatted_20_Text"><text:span text:style-name="Source_20_Text"><text:s text:c="12"/>"import": "Dependency resolution across modules. Example: re.compile(r'\\b(import|from|require|using|include)\\b')",</text:span></text:p>
      <text:p text:style-name="Preformatted_20_Text"><text:span text:style-name="Source_20_Text"><text:tab/><text:tab/>"_dependency_capture": "Extraction of the specific module, package, or file path being imported. MUST HAVE EXACTLY ONE CAPTURE GROUP isolating the dependency name. This is used by the Orchestrator to build the intra-repository dependency graph. Example: re.compile(r'^[ \\t]*(?:from|import)\\s+([a-zA-Z0-9_.]+)', re.M)", </text:span></text:p>
      <text:p text:style-name="Preformatted_20_Text"><text:span text:style-name="Source_20_Text"><text:s text:c="12"/>"ownership": "Identifying the architect within comments. Example: re.compile(r'(@author|Created by|Maintainer:)\\s+(.*)')",</text:span></text:p>
      <text:p text:style-name="Preformatted_20_Text"/>
      <text:p text:style-name="Preformatted_20_Text"><text:span text:style-name="Source_20_Text"><text:s text:c="12"/># --- PHASE 4: EXTRACTED SUB-EQUATIONS (Specialized Systems) ---</text:span></text:p>
      <text:p text:style-name="Preformatted_20_Text"><text:span text:style-name="Source_20_Text"><text:s text:c="12"/>"planned_debt": "Future engineering work that doesn't break execution (TODOs). Example: re.compile(r'\\b(TODO|WIP|STUB|IMPLEMENT|PENDING)\\b')",</text:span></text:p>
      <text:p text:style-name="Preformatted_20_Text"><text:span text:style-name="Source_20_Text"><text:s text:c="12"/>"fragile_debt": "Explicit admissions of hacks or 'ugly' code (FIXMEs). Example: re.compile(r'\\b(HACK|FIXME|XXX|KLUDGE|UGLY|WTF)\\b')",</text:span></text:p>
      <text:p text:style-name="Preformatted_20_Text"><text:span text:style-name="Source_20_Text"><text:s text:c="12"/>"private_info": "Hardcoded credentials or secrets. MUST enforce an assignment operator (e.g., =, :=, :) to prevent triggering on logs or prose. Example: re.compile(r'\\b(password|secret|token|api_key)\\b[ \\t]*[:=]', re.I)",</text:span></text:p>
      <text:p text:style-name="Preformatted_20_Text"><text:span text:style-name="Source_20_Text"><text:s text:c="12"/>"spec_exposure": "Documentation or markers tracing code back to architecture specs, RFCs, or audits. Example: re.compile(r'\\[SPEC-\\d+\\]|RFC\\b|audit|spec\\b')",</text:span></text:p>
      <text:p text:style-name="P4"><text:span text:style-name="Source_20_Text"><text:s text:c="12"/>"civil_war": "Structural formatting violating norms (Tabs in Space-files). MUST ALWAYS BE SET TO None. The GitGalaxy Signal Processor handles indentation natively via 'indent_tabs' and 'indent_spaces'. Example: None",</text:span></text:p>
      <text:p text:style-name="Preformatted_20_Text"><text:span text:style-name="Source_20_Text"><text:s text:c="12"/>"ssr_boundaries": "Server-side rendering hydration or template boundaries. Example: re.compile(r'\\b(getServerSideProps|renderToString)\\b|{{|{%')",</text:span></text:p>
      <text:p text:style-name="Preformatted_20_Text"><text:span text:style-name="Source_20_Text"><text:s text:c="12"/>"events": "Event dispatching, message emission, and signal publishers. Example: re.compile(r'\\b(emit|Signal|publish|broadcast|dispatchEvent)\\b')",</text:span></text:p>
      <text:p text:style-name="Preformatted_20_Text"><text:span text:style-name="Source_20_Text"><text:s text:c="12"/>"dependency_injection": "Wiring and container resolution signatures. Example: re.compile(r'\\b(Depends|Provide|Inject|Container|@Autowired)\\b')",</text:span></text:p>
      <text:p text:style-name="Preformatted_20_Text"><text:span text:style-name="Source_20_Text"><text:s text:c="12"/>"macros": "Compile-time logic generation hooks. Example: re.compile(r'^#define|macro_rules!|@freestanding')",</text:span></text:p>
      <text:p text:style-name="P4"><text:span text:style-name="Source_20_Text"><text:s text:c="12"/>"pointers": "Raw memory addressing and pointer manipulation. MUST use strict spacing or negative lookarounds when tracking asterisks (*) or ampersands (&amp;) to prevent flagging standard multiplication or logical AND operations. Example: re.compile(r'\\*(?:\\s*const\\s*)?\\w+|&amp;\\w+|-&gt;|\\b(?:IntPtr|uintptr)\\b')",</text:span></text:p>
      <text:p text:style-name="Preformatted_20_Text"><text:span text:style-name="Source_20_Text"><text:s text:c="12"/>"memory_alloc": "Explicit heap control (The Yang to Cleanup). Example: re.compile(r'\\b(malloc|free|new|alloc|dealloc|Box::new)\\b')",</text:span></text:p>
      <text:p text:style-name="Preformatted_20_Text"><text:span text:style-name="Source_20_Text"><text:s text:c="12"/>"inline_asm": "Direct hardware instruction injection. Example: re.compile(r'\\b(asm!|__asm__|asm\\()')",</text:span></text:p>
      <text:p text:style-name="Preformatted_20_Text"/>
      <text:p text:style-name="Preformatted_20_Text"><text:span text:style-name="Source_20_Text"><text:s text:c="12"/># --- PHASE 5: THERMODYNAMIC BALANCE (Yin &amp; Yang) ---</text:span></text:p>
      <text:p text:style-name="Preformatted_20_Text"><text:span text:style-name="Source_20_Text"><text:s text:c="12"/>"telemetry": "Structured logging, observability, and tracing frameworks. Example: re.compile(r'\\b(logger\\.|Sentry\\.|datadog|MDC\\.put)\\b')",</text:span></text:p>
      <text:p text:style-name="Preformatted_20_Text"><text:span text:style-name="Source_20_Text"><text:s text:c="12"/>"print_hits": "Ad-hoc terminal dumps for transient debugging. Example: re.compile(r'\\b(console\\.log|printf|echo|print\\()\\b')",</text:span></text:p>
      <text:p text:style-name="P4"><text:span text:style-name="Source_20_Text"><text:s text:c="12"/>"cast_hits": "Forceful type coercion bypassing the safety engine. MUST strictly define known primitives or enforce strict C-style casting rules to prevent flagging standard mathematical/logical groupings. NEVER use generic wildcards inside parentheses. Example: re.compile(r'\\bas\\s+[A-Z]\\w*|\\(\\s*(?:int|float|string|bool)\\s*\\)\\s*[a-zA-Z_]')",</text:span></text:p>
      <text:p text:style-name="Preformatted_20_Text"><text:soft-page-break/><text:span text:style-name="Source_20_Text"><text:s text:c="12"/>"bailout_hits": "Hard execution destruction and unrecoverable exceptions. Example: re.compile(r'\\b(throw|raise|panic!|abort|exit|fatalError)\\b')",</text:span></text:p>
      <text:p text:style-name="Preformatted_20_Text"><text:span text:style-name="Source_20_Text"><text:s text:c="12"/>"halt_hits": "Forcing threads to sleep (often used to hide race conditions). Example: re.compile(r'\\b(sleep|delay|Thread\\.sleep|Atomics\\.wait)\\b')",</text:span></text:p>
      <text:p text:style-name="Preformatted_20_Text"><text:span text:style-name="Source_20_Text"><text:s text:c="12"/>"bitwise_hits": "Low-level byte manipulation. MUST NOT include symbols overloaded by the language for standard operations (e.g., do not use '|' in Shell due to piping, '&lt;&lt;' in Ruby for appending, or '|' in Rust for closures) unless strictly shielded with negative lookarounds. Use None if the language lacks safe bitwise symbols. Example: re.compile(r'&lt;&lt;|&gt;&gt;|\\^|(?&lt;![=!])~')",</text:span></text:p>
      <text:p text:style-name="Preformatted_20_Text"><text:span text:style-name="Source_20_Text"><text:s text:c="12"/>"sync_locks": "Explicit coordination to prevent race conditions (The Yang to Concurrency). Example: re.compile(r'\\b(Lock|Mutex|Semaphore|synchronized|atomic)\\b')",</text:span></text:p>
      <text:p text:style-name="Preformatted_20_Text"><text:span text:style-name="Source_20_Text"><text:s text:c="12"/>"freeze_hits": "Explicit locking of data to prevent mutation (The Yang to Flux). Example: re.compile(r'\\b(const|readonly|final|val|immutable|Object.freeze)\\b')",</text:span></text:p>
      <text:p text:style-name="Preformatted_20_Text"><text:span text:style-name="Source_20_Text"><text:s text:c="12"/>"cleanup": "Explicit destruction of state or closing of streams (The Yang to IO/Memory). Example: re.compile(r'\\b(close|dispose|__exit__|cleanup|defer|free)\\b')",</text:span></text:p>
      <text:p text:style-name="Preformatted_20_Text"><text:span text:style-name="Source_20_Text"><text:s text:c="12"/>"encapsulation": "Logic hidden from view via visibility modifiers (The Yang to API). Example: re.compile(r'\\b(private|protected|internal|_\\w+|#\\w+)\\b')",</text:span></text:p>
      <text:p text:style-name="Preformatted_20_Text"><text:span text:style-name="Source_20_Text"><text:s text:c="12"/>"listeners": "Waiting to receive state from an external broadcast (The Yang to Events). Example: re.compile(r'\\b(addEventListener|\\.on\\(|subscribe|watch)\\b')",</text:span></text:p>
      <text:p text:style-name="Preformatted_20_Text"><text:span text:style-name="Source_20_Text"><text:s text:c="12"/>"test_skip": "Framework code that explicitly bypasses verification. Example: re.compile(r'\\b(it\\.skip|@Ignore|XCTSkip|mock|stub)\\b')"</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1T09:55:47.340875187</meta:creation-date>
    <dc:date>2026-04-01T08:38:11.968137621</dc:date>
    <meta:editing-duration>PT1H43M26S</meta:editing-duration>
    <meta:editing-cycles>9</meta:editing-cycles>
    <meta:generator>LibreOffice/24.2.7.2$Linux_X86_64 LibreOffice_project/420$Build-2</meta:generator>
    <meta:document-statistic meta:table-count="0" meta:image-count="0" meta:object-count="0" meta:page-count="6" meta:paragraph-count="102" meta:word-count="1828" meta:character-count="16740" meta:non-whitespace-character-count="14229"/>
  </office:meta>
</office:document-meta>
</file>