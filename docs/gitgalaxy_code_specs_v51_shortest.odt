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tyle:font-face style:name="roboto1" svg:font-family="roboto" style:font-adornments="Bold"/>
  </office:font-face-decls>
  <office:automatic-styles>
    <style:style style:name="Table1" style:family="table">
      <style:table-properties style:width="6.925in" table:align="left"/>
    </style:style>
    <style:style style:name="Table1.A" style:family="table-column">
      <style:table-column-properties style:column-width="1.0597in"/>
    </style:style>
    <style:style style:name="Table1.B" style:family="table-column">
      <style:table-column-properties style:column-width="1.4667in"/>
    </style:style>
    <style:style style:name="Table1.C" style:family="table-column">
      <style:table-column-properties style:column-width="4.3986in"/>
    </style:style>
    <style:style style:name="Table1.A1" style:family="table-cell">
      <style:table-cell-properties style:vertical-align="middle" fo:padding="0.0194in" fo:border="none"/>
    </style:style>
    <style:style style:name="Table2" style:family="table">
      <style:table-properties style:width="6.9271in" fo:margin-left="0in" table:align="left"/>
    </style:style>
    <style:style style:name="Table2.A" style:family="table-column">
      <style:table-column-properties style:column-width="1.1458in"/>
    </style:style>
    <style:style style:name="Table2.B" style:family="table-column">
      <style:table-column-properties style:column-width="2.1215in"/>
    </style:style>
    <style:style style:name="Table2.C" style:family="table-column">
      <style:table-column-properties style:column-width="0.8771in"/>
    </style:style>
    <style:style style:name="Table2.D" style:family="table-column">
      <style:table-column-properties style:column-width="2.7826in"/>
    </style:style>
    <style:style style:name="Table2.A1" style:family="table-cell">
      <style:table-cell-properties style:vertical-align="middle" fo:padding="0.0194in" fo:border="none"/>
    </style:style>
    <style:style style:name="Table2.14" style:family="table-row">
      <style:table-row-properties style:min-row-height="0.5229in"/>
    </style:style>
    <style:style style:name="Table19" style:family="table">
      <style:table-properties style:width="6.925in" table:align="left"/>
    </style:style>
    <style:style style:name="Table19.A" style:family="table-column">
      <style:table-column-properties style:column-width="1.1354in"/>
    </style:style>
    <style:style style:name="Table19.B" style:family="table-column">
      <style:table-column-properties style:column-width="1.075in"/>
    </style:style>
    <style:style style:name="Table19.C" style:family="table-column">
      <style:table-column-properties style:column-width="2.7576in"/>
    </style:style>
    <style:style style:name="Table19.D" style:family="table-column">
      <style:table-column-properties style:column-width="1.9569in"/>
    </style:style>
    <style:style style:name="Table19.A1" style:family="table-cell">
      <style:table-cell-properties style:vertical-align="middle" fo:padding="0.0194in" fo:border="none"/>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Contents_20_3">
      <style:paragraph-properties>
        <style:tab-stops>
          <style:tab-stop style:position="6.5307in" style:type="right" style:leader-style="dotted" style:leader-text="."/>
        </style:tab-stops>
      </style:paragraph-properties>
    </style:style>
    <style:style style:name="P4" style:family="paragraph" style:parent-style-name="Contents_20_4">
      <style:paragraph-properties>
        <style:tab-stops>
          <style:tab-stop style:position="6.3339in" style:type="right" style:leader-style="dotted" style:leader-text="."/>
        </style:tab-stops>
      </style:paragraph-properties>
    </style:style>
    <style:style style:name="P5" style:family="paragraph" style:parent-style-name="Heading_20_1">
      <style:text-properties officeooo:paragraph-rsid="00065a16"/>
    </style:style>
    <style:style style:name="P6" style:family="paragraph" style:parent-style-name="Heading_20_2">
      <style:text-properties officeooo:paragraph-rsid="00065a16"/>
    </style:style>
    <style:style style:name="P7" style:family="paragraph" style:parent-style-name="Heading_20_3">
      <style:text-properties officeooo:paragraph-rsid="00065a16"/>
    </style:style>
    <style:style style:name="P8" style:family="paragraph" style:parent-style-name="Heading_20_4">
      <style:text-properties officeooo:paragraph-rsid="00065a16"/>
    </style:style>
    <style:style style:name="P9" style:family="paragraph" style:parent-style-name="Preformatted_20_Text">
      <style:paragraph-properties fo:margin-top="0in" fo:margin-bottom="0in" style:contextual-spacing="true"/>
      <style:text-properties officeooo:paragraph-rsid="00065a16"/>
    </style:style>
    <style:style style:name="P10" style:family="paragraph" style:parent-style-name="Text_20_body">
      <style:paragraph-properties fo:margin-top="0in" fo:margin-bottom="0in" style:contextual-spacing="true"/>
      <style:text-properties officeooo:paragraph-rsid="00065a16"/>
    </style:style>
    <style:style style:name="P11" style:family="paragraph" style:parent-style-name="Preformatted_20_Text">
      <style:text-properties officeooo:paragraph-rsid="00065a16"/>
    </style:style>
    <style:style style:name="P12" style:family="paragraph" style:parent-style-name="Table_20_Contents">
      <style:paragraph-properties fo:margin-top="0in" fo:margin-bottom="0.1965in" style:contextual-spacing="false"/>
      <style:text-properties officeooo:paragraph-rsid="00065a16"/>
    </style:style>
    <style:style style:name="P13" style:family="paragraph" style:parent-style-name="Table_20_Heading">
      <style:paragraph-properties fo:margin-top="0in" fo:margin-bottom="0.1965in" style:contextual-spacing="false"/>
      <style:text-properties officeooo:paragraph-rsid="00065a16"/>
    </style:style>
    <style:style style:name="P14" style:family="paragraph" style:parent-style-name="Text_20_body">
      <style:text-properties officeooo:paragraph-rsid="00065a16"/>
    </style:style>
    <style:style style:name="P15" style:family="paragraph" style:parent-style-name="Heading_20_2">
      <style:text-properties style:font-name="roboto" officeooo:paragraph-rsid="00065a16"/>
    </style:style>
    <style:style style:name="P16" style:family="paragraph" style:parent-style-name="Heading_20_3">
      <style:text-properties style:font-name="roboto" officeooo:paragraph-rsid="00065a16"/>
    </style:style>
    <style:style style:name="P17" style:family="paragraph" style:parent-style-name="Heading_20_3">
      <style:paragraph-properties fo:margin-top="0in" fo:margin-bottom="0in" style:contextual-spacing="true"/>
      <style:text-properties style:font-name="roboto" officeooo:paragraph-rsid="00065a16"/>
    </style:style>
    <style:style style:name="P18" style:family="paragraph" style:parent-style-name="Standard">
      <style:paragraph-properties fo:margin-top="0in" fo:margin-bottom="0in" style:contextual-spacing="true"/>
      <style:text-properties style:font-name="roboto" officeooo:paragraph-rsid="00065a16"/>
    </style:style>
    <style:style style:name="P19" style:family="paragraph" style:parent-style-name="Text_20_body">
      <style:paragraph-properties fo:margin-top="0in" fo:margin-bottom="0in" style:contextual-spacing="true"/>
      <style:text-properties style:font-name="roboto" officeooo:paragraph-rsid="00065a16"/>
    </style:style>
    <style:style style:name="P20" style:family="paragraph" style:parent-style-name="Heading_20_4">
      <style:text-properties style:font-name="roboto" officeooo:paragraph-rsid="00065a16"/>
    </style:style>
    <style:style style:name="P21" style:family="paragraph" style:parent-style-name="Text_20_body">
      <style:text-properties style:font-name="roboto" officeooo:paragraph-rsid="00065a16"/>
    </style:style>
    <style:style style:name="P22" style:family="paragraph" style:parent-style-name="Heading_20_4">
      <style:text-properties style:font-name="roboto" officeooo:rsid="0014e929" officeooo:paragraph-rsid="00065a16"/>
    </style:style>
    <style:style style:name="P23" style:family="paragraph" style:parent-style-name="Table_20_Contents">
      <style:paragraph-properties fo:margin-top="0in" fo:margin-bottom="0in" style:contextual-spacing="true" fo:text-align="center" style:justify-single-word="false"/>
      <style:text-properties style:font-name="roboto" fo:font-size="12pt" officeooo:rsid="001579a0" officeooo:paragraph-rsid="00065a16" style:font-size-asian="12pt" style:font-size-complex="12pt"/>
    </style:style>
    <style:style style:name="P24" style:family="paragraph" style:parent-style-name="Table_20_Contents">
      <style:paragraph-properties fo:margin-top="0in" fo:margin-bottom="0in" style:contextual-spacing="true" fo:text-align="center" style:justify-single-word="false"/>
      <style:text-properties style:font-name="roboto" fo:font-size="12pt" officeooo:rsid="00326e0f" officeooo:paragraph-rsid="00065a16" style:font-size-asian="12pt" style:font-size-complex="12pt"/>
    </style:style>
    <style:style style:name="P25" style:family="paragraph" style:parent-style-name="Table_20_Contents">
      <style:paragraph-properties fo:margin-top="0in" fo:margin-bottom="0in" style:contextual-spacing="true" fo:text-align="center" style:justify-single-word="false"/>
      <style:text-properties style:font-name="roboto" fo:font-size="12pt" officeooo:rsid="005a98e8" officeooo:paragraph-rsid="00065a16" style:font-size-asian="12pt" style:font-size-complex="12pt"/>
    </style:style>
    <style:style style:name="P26" style:family="paragraph" style:parent-style-name="Table_20_Contents">
      <style:paragraph-properties fo:margin-top="0in" fo:margin-bottom="0in" style:contextual-spacing="true" fo:text-align="center" style:justify-single-word="false"/>
      <style:text-properties style:font-name="roboto" fo:font-size="12pt" officeooo:rsid="00d2610f" officeooo:paragraph-rsid="00065a16" style:font-size-asian="12pt" style:font-size-complex="12pt"/>
    </style:style>
    <style:style style:name="P27" style:family="paragraph" style:parent-style-name="Table_20_Heading">
      <style:paragraph-properties fo:margin-top="0in" fo:margin-bottom="0in" style:contextual-spacing="true" fo:text-align="center" style:justify-single-word="false"/>
      <style:text-properties style:font-name="roboto" fo:font-size="12pt" officeooo:paragraph-rsid="00065a16" style:font-size-asian="12pt" style:font-size-complex="12pt"/>
    </style:style>
    <style:style style:name="P28" style:family="paragraph" style:parent-style-name="Table_20_Heading">
      <style:paragraph-properties fo:margin-top="0in" fo:margin-bottom="0in" style:contextual-spacing="true"/>
      <style:text-properties style:font-name="roboto" fo:font-size="12pt" officeooo:paragraph-rsid="00065a16" style:font-size-asian="12pt" style:font-size-complex="12pt"/>
    </style:style>
    <style:style style:name="P29" style:family="paragraph" style:parent-style-name="Table_20_Contents">
      <style:paragraph-properties fo:text-align="center" style:justify-single-word="false"/>
      <style:text-properties style:font-name="roboto" fo:font-weight="normal" officeooo:paragraph-rsid="00065a16" style:font-weight-asian="normal" style:font-weight-complex="normal"/>
    </style:style>
    <style:style style:name="P30" style:family="paragraph" style:parent-style-name="Table_20_Contents">
      <style:paragraph-properties fo:text-align="center" style:justify-single-word="false"/>
      <style:text-properties style:font-name="roboto" fo:font-weight="normal" officeooo:rsid="00d118b1" officeooo:paragraph-rsid="00065a16" style:font-weight-asian="normal" style:font-weight-complex="normal"/>
    </style:style>
    <style:style style:name="P31" style:family="paragraph" style:parent-style-name="Text_20_body">
      <style:paragraph-properties fo:margin-top="0in" fo:margin-bottom="0in" style:contextual-spacing="true"/>
      <style:text-properties style:font-name="roboto" fo:font-weight="normal" officeooo:rsid="0099877e" officeooo:paragraph-rsid="00065a16" style:font-weight-asian="normal" style:font-weight-complex="normal"/>
    </style:style>
    <style:style style:name="P32" style:family="paragraph" style:parent-style-name="Text_20_body">
      <style:paragraph-properties fo:margin-top="0in" fo:margin-bottom="0in" style:contextual-spacing="true"/>
      <style:text-properties style:font-name="roboto" officeooo:rsid="002ff849" officeooo:paragraph-rsid="00065a16"/>
    </style:style>
    <style:style style:name="P33" style:family="paragraph" style:parent-style-name="Text_20_body">
      <style:paragraph-properties fo:margin-top="0in" fo:margin-bottom="0in" style:contextual-spacing="true"/>
      <style:text-properties style:font-name="roboto" officeooo:rsid="00315ace" officeooo:paragraph-rsid="00065a16"/>
    </style:style>
    <style:style style:name="P34" style:family="paragraph" style:parent-style-name="Text_20_body">
      <style:paragraph-properties fo:margin-top="0in" fo:margin-bottom="0in" style:contextual-spacing="true"/>
      <style:text-properties style:font-name="roboto" officeooo:rsid="00b49ca5" officeooo:paragraph-rsid="00065a16"/>
    </style:style>
    <style:style style:name="P35" style:family="paragraph" style:parent-style-name="Text_20_body">
      <style:paragraph-properties fo:margin-top="0in" fo:margin-bottom="0in" style:contextual-spacing="true"/>
      <style:text-properties style:font-name="roboto" fo:font-weight="bold" officeooo:rsid="006f5baa" officeooo:paragraph-rsid="00065a16" style:font-weight-asian="bold" style:font-weight-complex="bold"/>
    </style:style>
    <style:style style:name="P36" style:family="paragraph" style:parent-style-name="Text_20_body">
      <style:paragraph-properties fo:margin-top="0in" fo:margin-bottom="0in" style:contextual-spacing="true"/>
      <style:text-properties style:font-name="roboto" officeooo:rsid="00b29438" officeooo:paragraph-rsid="00065a16"/>
    </style:style>
    <style:style style:name="P37" style:family="paragraph" style:parent-style-name="Heading_20_3">
      <style:text-properties fo:font-weight="bold" officeooo:paragraph-rsid="00065a16" style:font-weight-asian="bold" style:font-weight-complex="bold"/>
    </style:style>
    <style:style style:name="P38" style:family="paragraph" style:parent-style-name="Table_20_Contents">
      <style:paragraph-properties fo:margin-top="0in" fo:margin-bottom="0.1965in" style:contextual-spacing="false"/>
      <style:text-properties fo:font-weight="bold" officeooo:rsid="00f31413" officeooo:paragraph-rsid="00065a16" style:font-weight-asian="bold" style:font-weight-complex="bold"/>
    </style:style>
    <style:style style:name="P39" style:family="paragraph" style:parent-style-name="Preformatted_20_Text">
      <style:paragraph-properties fo:margin-top="0in" fo:margin-bottom="0in" style:contextual-spacing="true"/>
      <style:text-properties officeooo:rsid="010cc767" officeooo:paragraph-rsid="00065a16"/>
    </style:style>
    <style:style style:name="P40" style:family="paragraph" style:parent-style-name="Table_20_Contents">
      <style:paragraph-properties fo:margin-left="0in" fo:margin-right="0in" fo:margin-top="0in" fo:margin-bottom="0in" style:contextual-spacing="false" fo:line-height="114%" fo:orphans="2" fo:widows="2" fo:text-indent="0in" style:auto-text-indent="false" fo:keep-with-next="auto"/>
      <style:text-properties officeooo:paragraph-rsid="00065a16"/>
    </style:style>
    <style:style style:name="P41" style:family="paragraph" style:parent-style-name="Table_20_Contents">
      <style:paragraph-properties fo:margin-top="0in" fo:margin-bottom="0in" style:contextual-spacing="true" fo:text-align="center" style:justify-single-word="false"/>
      <style:text-properties officeooo:paragraph-rsid="00065a16"/>
    </style:style>
    <style:style style:name="P42" style:family="paragraph" style:parent-style-name="Table_20_Contents">
      <style:paragraph-properties fo:text-align="center" style:justify-single-word="false"/>
      <style:text-properties officeooo:paragraph-rsid="00065a16"/>
    </style:style>
    <style:style style:name="P43" style:family="paragraph" style:parent-style-name="Table_20_Contents">
      <style:paragraph-properties fo:margin-left="0in" fo:margin-right="0in" fo:margin-top="0in" fo:margin-bottom="0in" style:contextual-spacing="false" fo:line-height="114%" fo:orphans="2" fo:widows="2" fo:text-indent="0in" style:auto-text-indent="false" fo:keep-with-next="auto"/>
      <style:text-properties fo:color="#1f1f1f" loext:opacity="100%" style:font-name="Google Sans Text" officeooo:paragraph-rsid="00065a16" loext:padding="0in" loext:border="none"/>
    </style:style>
    <style:style style:name="P44" style:family="paragraph" style:parent-style-name="Table_20_Contents">
      <style:paragraph-properties fo:margin-top="0in" fo:margin-bottom="0.1965in" style:contextual-spacing="false"/>
      <style:text-properties officeooo:rsid="00f31413" officeooo:paragraph-rsid="00065a16"/>
    </style:style>
    <style:style style:name="P45" style:family="paragraph" style:parent-style-name="Table_20_Contents">
      <style:paragraph-properties fo:margin-top="0in" fo:margin-bottom="0.1965in" style:contextual-spacing="false"/>
      <style:text-properties officeooo:rsid="00f4864b" officeooo:paragraph-rsid="00065a16"/>
    </style:style>
    <style:style style:name="P46" style:family="paragraph" style:parent-style-name="Table_20_Contents">
      <style:paragraph-properties fo:margin-top="0in" fo:margin-bottom="0.1965in" style:contextual-spacing="false"/>
      <style:text-properties officeooo:rsid="00cacd0b" officeooo:paragraph-rsid="00065a16"/>
    </style:style>
    <style:style style:name="P47" style:family="paragraph" style:parent-style-name="Text_20_body">
      <loext:graphic-properties draw:fill="none"/>
      <style:paragraph-properties fo:margin-left="-0.3118in" fo:margin-right="0in" fo:margin-top="0in" fo:margin-bottom="0in" style:contextual-spacing="false" fo:line-height="115%" fo:text-indent="0in" style:auto-text-indent="false" fo:background-color="transparent"/>
      <style:text-properties officeooo:paragraph-rsid="00065a16"/>
    </style:style>
    <style:style style:name="P48" style:family="paragraph" style:parent-style-name="Text_20_body">
      <loext:graphic-properties draw:fill="none"/>
      <style:paragraph-properties fo:margin-left="0in" fo:margin-right="0in" fo:margin-top="0in" fo:margin-bottom="0in" style:contextual-spacing="false" fo:line-height="115%" fo:text-align="center" style:justify-single-word="false" fo:text-indent="0in" style:auto-text-indent="false" fo:background-color="transparent"/>
      <style:text-properties officeooo:rsid="00cfad9e" officeooo:paragraph-rsid="00065a16"/>
    </style:style>
    <style:style style:name="P49" style:family="paragraph" style:parent-style-name="Text_20_body">
      <style:paragraph-properties fo:margin-top="0in" fo:margin-bottom="0in" style:contextual-spacing="true"/>
      <style:text-properties style:font-name="Google Sans Text" officeooo:rsid="0093d52a" officeooo:paragraph-rsid="00065a16"/>
    </style:style>
    <style:style style:name="P50" style:family="paragraph" style:parent-style-name="Text_20_body">
      <style:paragraph-properties fo:margin-left="0in" fo:margin-right="0in" fo:margin-top="0in" fo:margin-bottom="0.0972in" style:contextual-spacing="false" fo:line-height="114%" fo:text-indent="0in" style:auto-text-indent="false" fo:padding="0in" fo:border="none"/>
      <style:text-properties style:font-name="Google Sans Text" officeooo:paragraph-rsid="00065a16"/>
    </style:style>
    <style:style style:name="P51" style:family="paragraph" style:parent-style-name="Text_20_body">
      <style:text-properties officeooo:rsid="001b6e47" officeooo:paragraph-rsid="00065a16"/>
    </style:style>
    <style:style style:name="P52" style:family="paragraph" style:parent-style-name="Text_20_body">
      <style:text-properties fo:font-weight="normal" officeooo:paragraph-rsid="00065a16" style:font-weight-asian="normal" style:font-weight-complex="normal"/>
    </style:style>
    <style:style style:name="P53" style:family="paragraph" style:parent-style-name="Heading_20_2">
      <style:text-properties officeooo:paragraph-rsid="00084918"/>
    </style:style>
    <style:style style:name="P54" style:family="paragraph" style:parent-style-name="Heading_20_3">
      <style:text-properties style:font-name="roboto" officeooo:paragraph-rsid="00065a16"/>
    </style:style>
    <style:style style:name="P55" style:family="paragraph" style:parent-style-name="Heading_20_3">
      <style:text-properties officeooo:paragraph-rsid="00084918"/>
    </style:style>
    <style:style style:name="P56" style:family="paragraph" style:parent-style-name="Text_20_body" style:list-style-name="L1">
      <style:text-properties officeooo:paragraph-rsid="00065a16"/>
    </style:style>
    <style:style style:name="P57" style:family="paragraph" style:parent-style-name="Text_20_body" style:list-style-name="L2">
      <style:text-properties officeooo:paragraph-rsid="00065a16"/>
    </style:style>
    <style:style style:name="P58" style:family="paragraph" style:parent-style-name="Text_20_body" style:list-style-name="L2">
      <style:text-properties officeooo:rsid="002cf76c" officeooo:paragraph-rsid="00065a16"/>
    </style:style>
    <style:style style:name="P59" style:family="paragraph" style:parent-style-name="Text_20_body" style:list-style-name="L3">
      <style:paragraph-properties fo:margin-top="0in" fo:margin-bottom="0in" style:contextual-spacing="true"/>
      <style:text-properties style:font-name="roboto" officeooo:rsid="00b49ca5" officeooo:paragraph-rsid="00065a16"/>
    </style:style>
    <style:style style:name="P60" style:family="paragraph" style:parent-style-name="Text_20_body" style:list-style-name="L3">
      <style:paragraph-properties fo:margin-top="0in" fo:margin-bottom="0in" style:contextual-spacing="true"/>
      <style:text-properties style:font-name="roboto" fo:font-weight="bold" officeooo:rsid="006f5baa" officeooo:paragraph-rsid="00065a16" style:font-weight-asian="bold" style:font-weight-complex="bold"/>
    </style:style>
    <style:style style:name="P61" style:family="paragraph" style:parent-style-name="Text_20_body" style:list-style-name="L4">
      <loext:graphic-properties draw:fill="none"/>
      <style:paragraph-properties fo:margin-left="-0.3118in" fo:margin-right="0in" fo:margin-top="0in" fo:margin-bottom="0in" style:contextual-spacing="false" fo:line-height="115%" fo:text-indent="0in" style:auto-text-indent="false" fo:background-color="transparent"/>
      <style:text-properties style:font-name="roboto" fo:font-weight="bold" officeooo:rsid="00300db1" officeooo:paragraph-rsid="00065a16" style:font-weight-asian="bold" style:font-weight-complex="bold"/>
    </style:style>
    <style:style style:name="P62" style:family="paragraph" style:parent-style-name="Text_20_body" style:list-style-name="L4" style:master-page-name="">
      <loext:graphic-properties draw:fill="none"/>
      <style:paragraph-properties fo:margin-left="-0.3118in" fo:margin-right="0in" fo:margin-top="0in" fo:margin-bottom="0in" style:contextual-spacing="false" fo:line-height="115%" fo:text-indent="0in" style:auto-text-indent="false" style:page-number="auto" fo:background-color="transparent"/>
      <style:text-properties style:font-name="roboto" officeooo:paragraph-rsid="00065a16"/>
    </style:style>
    <style:style style:name="P63" style:family="paragraph" style:parent-style-name="Text_20_body" style:list-style-name="L4">
      <loext:graphic-properties draw:fill="none"/>
      <style:paragraph-properties fo:margin-left="-0.3118in" fo:margin-right="0in" fo:margin-top="0in" fo:margin-bottom="0in" style:contextual-spacing="false" fo:line-height="115%" fo:text-indent="0in" style:auto-text-indent="false" fo:background-color="transparent"/>
      <style:text-properties style:font-name="roboto" officeooo:paragraph-rsid="00065a16"/>
    </style:style>
    <style:style style:name="P64" style:family="paragraph" style:parent-style-name="Text_20_body" style:list-style-name="L4">
      <loext:graphic-properties draw:fill="none"/>
      <style:paragraph-properties fo:margin-left="-0.3118in" fo:margin-right="0in" fo:margin-top="0in" fo:margin-bottom="0in" style:contextual-spacing="false" fo:line-height="115%" fo:text-indent="0in" style:auto-text-indent="false" fo:background-color="transparent"/>
      <style:text-properties style:font-name="roboto" officeooo:rsid="00300db1" officeooo:paragraph-rsid="00065a16"/>
    </style:style>
    <style:style style:name="P65" style:family="paragraph" style:parent-style-name="Text_20_body" style:list-style-name="L4">
      <loext:graphic-properties draw:fill="none"/>
      <style:paragraph-properties fo:margin-left="-0.3118in" fo:margin-right="0in" fo:margin-top="0in" fo:margin-bottom="0in" style:contextual-spacing="false" fo:line-height="115%" fo:text-indent="0in" style:auto-text-indent="false" fo:background-color="transparent"/>
      <style:text-properties style:font-name="roboto" officeooo:rsid="00cfad9e" officeooo:paragraph-rsid="00065a16"/>
    </style:style>
    <style:style style:name="P66" style:family="paragraph" style:parent-style-name="Text_20_body" style:list-style-name="L4">
      <loext:graphic-properties draw:fill="none"/>
      <style:paragraph-properties fo:margin-left="-0.3118in" fo:margin-right="0in" fo:margin-top="0in" fo:margin-bottom="0in" style:contextual-spacing="false" fo:line-height="115%" fo:text-indent="0in" style:auto-text-indent="false" fo:background-color="transparent"/>
      <style:text-properties style:font-name="roboto" fo:font-size="12pt" officeooo:rsid="001816f1" officeooo:paragraph-rsid="00065a16" style:font-size-asian="12pt" style:font-size-complex="12pt"/>
    </style:style>
    <style:style style:name="P67" style:family="paragraph" style:parent-style-name="Text_20_body" style:list-style-name="L4">
      <loext:graphic-properties draw:fill="none"/>
      <style:paragraph-properties fo:margin-left="-0.3118in" fo:margin-right="0in" fo:margin-top="0in" fo:margin-bottom="0in" style:contextual-spacing="false" fo:line-height="115%" fo:text-indent="0in" style:auto-text-indent="false" fo:background-color="transparent"/>
      <style:text-properties style:font-name="roboto" fo:font-size="12pt" officeooo:paragraph-rsid="00065a16" style:font-size-asian="12pt" style:font-size-complex="12pt"/>
    </style:style>
    <style:style style:name="P68" style:family="paragraph" style:parent-style-name="Text_20_body" style:list-style-name="L4">
      <loext:graphic-properties draw:fill="none"/>
      <style:paragraph-properties fo:margin-left="-0.3118in" fo:margin-right="0in" fo:margin-top="0in" fo:margin-bottom="0in" style:contextual-spacing="false" fo:line-height="115%" fo:text-indent="0in" style:auto-text-indent="false" fo:background-color="transparent"/>
      <style:text-properties style:font-name="roboto" fo:font-size="12pt" officeooo:rsid="00cfad9e" officeooo:paragraph-rsid="00065a16" style:font-size-asian="12pt" style:font-size-complex="12pt"/>
    </style:style>
    <style:style style:name="P69" style:family="paragraph" style:parent-style-name="Text_20_body" style:list-style-name="L4">
      <loext:graphic-properties draw:fill="none"/>
      <style:paragraph-properties fo:margin-left="-0.3118in" fo:margin-right="0in" fo:margin-top="0in" fo:margin-bottom="0in" style:contextual-spacing="false" fo:line-height="115%" fo:text-indent="0in" style:auto-text-indent="false" fo:background-color="transparent"/>
      <style:text-properties style:font-name="roboto" fo:font-size="12pt" fo:font-weight="bold" officeooo:rsid="001a67c3" officeooo:paragraph-rsid="00065a16" style:font-size-asian="12pt" style:font-weight-asian="bold" style:font-size-complex="12pt" style:font-weight-complex="bold"/>
    </style:style>
    <style:style style:name="P70" style:family="paragraph" style:parent-style-name="Text_20_body" style:list-style-name="L4">
      <loext:graphic-properties draw:fill="none"/>
      <style:paragraph-properties fo:margin-left="-0.3118in" fo:margin-right="0in" fo:margin-top="0in" fo:margin-bottom="0in" style:contextual-spacing="false" fo:line-height="115%" fo:text-indent="0in" style:auto-text-indent="false" fo:background-color="transparent"/>
      <style:text-properties style:font-name="roboto" fo:font-size="12pt" fo:font-weight="bold" officeooo:rsid="001b64c2" officeooo:paragraph-rsid="00065a16" style:font-size-asian="12pt" style:font-weight-asian="bold" style:font-size-complex="12pt" style:font-weight-complex="bold"/>
    </style:style>
    <style:style style:name="P71" style:family="paragraph" style:parent-style-name="Text_20_body" style:list-style-name="L36">
      <style:paragraph-properties fo:margin-top="0in" fo:margin-bottom="0in" style:contextual-spacing="true"/>
      <style:text-properties style:font-name="roboto" officeooo:paragraph-rsid="00065a16"/>
    </style:style>
    <style:style style:name="P72" style:family="paragraph" style:parent-style-name="Text_20_body" style:list-style-name="L37">
      <style:paragraph-properties fo:margin-top="0in" fo:margin-bottom="0in" style:contextual-spacing="true"/>
      <style:text-properties style:font-name="roboto" officeooo:paragraph-rsid="00065a16"/>
    </style:style>
    <style:style style:name="P73" style:family="paragraph" style:parent-style-name="Text_20_body" style:list-style-name="L4">
      <loext:graphic-properties draw:fill="none"/>
      <style:paragraph-properties fo:margin-left="-0.3118in" fo:margin-right="0in" fo:margin-top="0in" fo:margin-bottom="0in" style:contextual-spacing="false" fo:line-height="115%" fo:text-indent="0in" style:auto-text-indent="false" fo:background-color="transparent"/>
      <style:text-properties officeooo:paragraph-rsid="00065a16"/>
    </style:style>
    <style:style style:name="P74" style:family="paragraph" style:parent-style-name="Text_20_body" style:list-style-name="L5">
      <style:text-properties officeooo:paragraph-rsid="00065a16"/>
    </style:style>
    <style:style style:name="P75" style:family="paragraph" style:parent-style-name="Text_20_body" style:list-style-name="L6">
      <style:text-properties officeooo:paragraph-rsid="00065a16"/>
    </style:style>
    <style:style style:name="P76" style:family="paragraph" style:parent-style-name="Text_20_body" style:list-style-name="L7">
      <style:text-properties officeooo:paragraph-rsid="00065a16"/>
    </style:style>
    <style:style style:name="P77" style:family="paragraph" style:parent-style-name="Text_20_body" style:list-style-name="L8">
      <style:text-properties officeooo:paragraph-rsid="00065a16"/>
    </style:style>
    <style:style style:name="P78" style:family="paragraph" style:parent-style-name="Text_20_body" style:list-style-name="L9">
      <style:text-properties officeooo:paragraph-rsid="00065a16"/>
    </style:style>
    <style:style style:name="P79" style:family="paragraph" style:parent-style-name="Text_20_body" style:list-style-name="L10">
      <style:text-properties officeooo:paragraph-rsid="00065a16"/>
    </style:style>
    <style:style style:name="P80" style:family="paragraph" style:parent-style-name="Text_20_body" style:list-style-name="L11">
      <style:paragraph-properties fo:margin-left="0in" fo:margin-right="0in" fo:text-indent="0in" style:auto-text-indent="false"/>
      <style:text-properties officeooo:paragraph-rsid="00065a16"/>
    </style:style>
    <style:style style:name="P81" style:family="paragraph" style:parent-style-name="Text_20_body" style:list-style-name="L12">
      <style:paragraph-properties fo:margin-left="0in" fo:margin-right="0in" fo:text-indent="0in" style:auto-text-indent="false"/>
      <style:text-properties officeooo:paragraph-rsid="00065a16"/>
    </style:style>
    <style:style style:name="P82" style:family="paragraph" style:parent-style-name="Text_20_body" style:list-style-name="L13">
      <style:paragraph-properties fo:margin-left="0in" fo:margin-right="0in" fo:text-indent="0in" style:auto-text-indent="false"/>
      <style:text-properties officeooo:paragraph-rsid="00065a16"/>
    </style:style>
    <style:style style:name="P83" style:family="paragraph" style:parent-style-name="Text_20_body" style:list-style-name="L14">
      <style:paragraph-properties fo:margin-left="0in" fo:margin-right="0in" fo:text-indent="0in" style:auto-text-indent="false"/>
      <style:text-properties officeooo:paragraph-rsid="00065a16"/>
    </style:style>
    <style:style style:name="P84" style:family="paragraph" style:parent-style-name="Text_20_body" style:list-style-name="L15">
      <style:paragraph-properties fo:margin-left="0in" fo:margin-right="0in" fo:text-indent="0in" style:auto-text-indent="false"/>
      <style:text-properties officeooo:paragraph-rsid="00065a16"/>
    </style:style>
    <style:style style:name="P85" style:family="paragraph" style:parent-style-name="Text_20_body" style:list-style-name="L16">
      <style:paragraph-properties fo:margin-left="0in" fo:margin-right="0in" fo:text-indent="0in" style:auto-text-indent="false"/>
      <style:text-properties officeooo:paragraph-rsid="00065a16"/>
    </style:style>
    <style:style style:name="P86" style:family="paragraph" style:parent-style-name="Text_20_body" style:list-style-name="L17">
      <style:paragraph-properties fo:margin-left="0in" fo:margin-right="0in" fo:text-indent="0in" style:auto-text-indent="false"/>
      <style:text-properties officeooo:paragraph-rsid="00065a16"/>
    </style:style>
    <style:style style:name="P87" style:family="paragraph" style:parent-style-name="Text_20_body" style:list-style-name="L18">
      <style:paragraph-properties fo:margin-left="0in" fo:margin-right="0in" fo:text-indent="0in" style:auto-text-indent="false"/>
      <style:text-properties officeooo:paragraph-rsid="00065a16"/>
    </style:style>
    <style:style style:name="P88" style:family="paragraph" style:parent-style-name="Text_20_body" style:list-style-name="L19">
      <style:paragraph-properties fo:margin-left="0in" fo:margin-right="0in" fo:text-indent="0in" style:auto-text-indent="false"/>
      <style:text-properties officeooo:paragraph-rsid="00065a16"/>
    </style:style>
    <style:style style:name="P89" style:family="paragraph" style:parent-style-name="Text_20_body" style:list-style-name="L20">
      <style:paragraph-properties fo:margin-left="0in" fo:margin-right="0in" fo:text-indent="0in" style:auto-text-indent="false"/>
      <style:text-properties officeooo:paragraph-rsid="00065a16"/>
    </style:style>
    <style:style style:name="P90" style:family="paragraph" style:parent-style-name="Text_20_body" style:list-style-name="L21">
      <style:paragraph-properties fo:margin-left="0in" fo:margin-right="0in" fo:text-indent="0in" style:auto-text-indent="false"/>
      <style:text-properties officeooo:paragraph-rsid="00065a16"/>
    </style:style>
    <style:style style:name="P91" style:family="paragraph" style:parent-style-name="Text_20_body" style:list-style-name="L22">
      <style:paragraph-properties fo:margin-left="0in" fo:margin-right="0in" fo:text-indent="0in" style:auto-text-indent="false"/>
      <style:text-properties officeooo:paragraph-rsid="00065a16"/>
    </style:style>
    <style:style style:name="P92" style:family="paragraph" style:parent-style-name="Text_20_body" style:list-style-name="L23">
      <style:paragraph-properties fo:margin-left="0in" fo:margin-right="0in" fo:text-indent="0in" style:auto-text-indent="false"/>
      <style:text-properties officeooo:paragraph-rsid="00065a16"/>
    </style:style>
    <style:style style:name="P93" style:family="paragraph" style:parent-style-name="Text_20_body" style:list-style-name="L24">
      <style:paragraph-properties fo:margin-left="0in" fo:margin-right="0in" fo:text-indent="0in" style:auto-text-indent="false"/>
      <style:text-properties officeooo:paragraph-rsid="00065a16"/>
    </style:style>
    <style:style style:name="P94" style:family="paragraph" style:parent-style-name="Text_20_body" style:list-style-name="L25">
      <style:paragraph-properties fo:margin-left="0in" fo:margin-right="0in" fo:text-indent="0in" style:auto-text-indent="false"/>
      <style:text-properties officeooo:paragraph-rsid="00065a16"/>
    </style:style>
    <style:style style:name="P95" style:family="paragraph" style:parent-style-name="Text_20_body" style:list-style-name="L26">
      <style:paragraph-properties fo:margin-left="0in" fo:margin-right="0in" fo:text-indent="0in" style:auto-text-indent="false"/>
      <style:text-properties officeooo:paragraph-rsid="00065a16"/>
    </style:style>
    <style:style style:name="P96" style:family="paragraph" style:parent-style-name="Text_20_body" style:list-style-name="L27">
      <style:paragraph-properties fo:margin-left="0in" fo:margin-right="0in" fo:text-indent="0in" style:auto-text-indent="false"/>
      <style:text-properties officeooo:paragraph-rsid="00065a16"/>
    </style:style>
    <style:style style:name="P97" style:family="paragraph" style:parent-style-name="Text_20_body" style:list-style-name="L28">
      <style:paragraph-properties fo:margin-left="0in" fo:margin-right="0in" fo:text-indent="0in" style:auto-text-indent="false"/>
      <style:text-properties officeooo:paragraph-rsid="00065a16"/>
    </style:style>
    <style:style style:name="P98" style:family="paragraph" style:parent-style-name="Text_20_body" style:list-style-name="L29">
      <style:paragraph-properties fo:margin-left="0in" fo:margin-right="0in" fo:text-indent="0in" style:auto-text-indent="false"/>
      <style:text-properties officeooo:paragraph-rsid="00065a16"/>
    </style:style>
    <style:style style:name="P99" style:family="paragraph" style:parent-style-name="Text_20_body" style:list-style-name="L30">
      <style:paragraph-properties fo:margin-left="0in" fo:margin-right="0in" fo:text-indent="0in" style:auto-text-indent="false"/>
      <style:text-properties officeooo:paragraph-rsid="00065a16"/>
    </style:style>
    <style:style style:name="P100" style:family="paragraph" style:parent-style-name="Text_20_body" style:list-style-name="L31">
      <style:paragraph-properties fo:margin-left="0in" fo:margin-right="0in" fo:text-indent="0in" style:auto-text-indent="false"/>
      <style:text-properties officeooo:paragraph-rsid="00065a16"/>
    </style:style>
    <style:style style:name="P101" style:family="paragraph" style:parent-style-name="Text_20_body" style:list-style-name="L32">
      <style:paragraph-properties fo:margin-left="0in" fo:margin-right="0in" fo:text-indent="0in" style:auto-text-indent="false"/>
      <style:text-properties officeooo:paragraph-rsid="00065a16"/>
    </style:style>
    <style:style style:name="P102" style:family="paragraph" style:parent-style-name="Text_20_body" style:list-style-name="L33">
      <style:paragraph-properties fo:margin-left="0in" fo:margin-right="0in" fo:text-indent="0in" style:auto-text-indent="false"/>
      <style:text-properties officeooo:paragraph-rsid="00065a16"/>
    </style:style>
    <style:style style:name="P103" style:family="paragraph" style:parent-style-name="Text_20_body" style:list-style-name="L34">
      <style:paragraph-properties fo:margin-left="0in" fo:margin-right="0in" fo:text-indent="0in" style:auto-text-indent="false"/>
      <style:text-properties officeooo:paragraph-rsid="00065a16"/>
    </style:style>
    <style:style style:name="P104" style:family="paragraph" style:parent-style-name="Text_20_body" style:list-style-name="L35">
      <style:paragraph-properties fo:margin-left="0in" fo:margin-right="0in" fo:margin-top="0in" fo:margin-bottom="0.0972in" style:contextual-spacing="false" fo:line-height="114%" fo:text-indent="0in" style:auto-text-indent="false" fo:padding="0in" fo:border="none"/>
      <style:text-properties style:font-name="Google Sans Text" officeooo:paragraph-rsid="00065a16"/>
    </style:style>
    <style:style style:name="P105" style:family="paragraph" style:parent-style-name="Text_20_body" style:list-style-name="L35">
      <style:paragraph-properties fo:margin-left="0in" fo:margin-right="0in" fo:margin-top="0in" fo:margin-bottom="0.0972in" style:contextual-spacing="false" fo:line-height="114%" fo:text-indent="0in" style:auto-text-indent="false" fo:padding="0in" fo:border="none"/>
      <style:text-properties officeooo:paragraph-rsid="00065a16"/>
    </style:style>
    <style:style style:name="P106" style:family="paragraph" style:parent-style-name="Text_20_body" style:list-style-name="L36">
      <style:paragraph-properties fo:margin-top="0in" fo:margin-bottom="0in" style:contextual-spacing="true"/>
      <style:text-properties officeooo:paragraph-rsid="00065a16"/>
    </style:style>
    <style:style style:name="P107" style:family="paragraph" style:parent-style-name="Text_20_body">
      <style:text-properties officeooo:rsid="00065a16" officeooo:paragraph-rsid="00065a16"/>
    </style:style>
    <style:style style:name="P108" style:family="paragraph" style:parent-style-name="Text_20_body">
      <style:text-properties officeooo:rsid="00084918" officeooo:paragraph-rsid="00084918"/>
    </style:style>
    <style:style style:name="P109" style:family="paragraph" style:parent-style-name="Text_20_body">
      <style:text-properties officeooo:rsid="00084918" officeooo:paragraph-rsid="0009c52d"/>
    </style:style>
    <style:style style:name="P110" style:family="paragraph" style:parent-style-name="Text_20_body">
      <style:text-properties officeooo:rsid="0009c52d" officeooo:paragraph-rsid="0009c52d"/>
    </style:style>
    <style:style style:name="T1" style:family="text">
      <style:text-properties style:font-name="roboto"/>
    </style:style>
    <style:style style:name="T2" style:family="text">
      <style:text-properties style:font-name="roboto" officeooo:rsid="002f2e87"/>
    </style:style>
    <style:style style:name="T3" style:family="text">
      <style:text-properties style:font-name="roboto" officeooo:rsid="002ff849"/>
    </style:style>
    <style:style style:name="T4" style:family="text">
      <style:text-properties style:font-name="roboto" officeooo:rsid="00074483"/>
    </style:style>
    <style:style style:name="T5" style:family="text">
      <style:text-properties style:font-name="roboto" fo:font-weight="bold"/>
    </style:style>
    <style:style style:name="T6" style:family="text">
      <style:text-properties style:font-name="roboto" fo:font-weight="bold" style:font-weight-asian="bold" style:font-weight-complex="bold"/>
    </style:style>
    <style:style style:name="T7" style:family="text">
      <style:text-properties style:font-name="roboto" fo:font-weight="bold" officeooo:rsid="002ff849" style:font-weight-asian="bold" style:font-weight-complex="bold"/>
    </style:style>
    <style:style style:name="T8" style:family="text">
      <style:text-properties style:font-name="roboto" fo:font-weight="bold" officeooo:rsid="00b0c85c" style:font-weight-asian="bold" style:font-weight-complex="bold"/>
    </style:style>
    <style:style style:name="T9" style:family="text">
      <style:text-properties style:font-name="roboto" fo:font-weight="bold" officeooo:rsid="0036293b" style:font-weight-asian="bold" style:font-weight-complex="bold"/>
    </style:style>
    <style:style style:name="T10" style:family="text">
      <style:text-properties style:font-name="roboto" fo:font-weight="bold" officeooo:rsid="0034ca31" style:font-weight-asian="bold" style:font-weight-complex="bold"/>
    </style:style>
    <style:style style:name="T11" style:family="text">
      <style:text-properties style:font-name="roboto" fo:font-weight="bold" officeooo:rsid="00c8996f" style:font-weight-asian="bold" style:font-weight-complex="bold"/>
    </style:style>
    <style:style style:name="T12" style:family="text">
      <style:text-properties style:font-name="roboto" fo:font-weight="bold" officeooo:rsid="0010bb08" style:font-weight-asian="bold" style:font-weight-complex="bold"/>
    </style:style>
    <style:style style:name="T13" style:family="text">
      <style:text-properties style:font-name="roboto" fo:font-weight="bold" officeooo:rsid="000cf396" style:font-weight-asian="bold" style:font-weight-complex="bold"/>
    </style:style>
    <style:style style:name="T14" style:family="text">
      <style:text-properties style:font-name="roboto" fo:font-weight="bold" officeooo:rsid="00093f17" style:font-weight-asian="bold" style:font-weight-complex="bold"/>
    </style:style>
    <style:style style:name="T15" style:family="text">
      <style:text-properties style:font-name="roboto" fo:font-weight="bold" officeooo:rsid="000b32ed" style:font-weight-asian="bold" style:font-weight-complex="bold"/>
    </style:style>
    <style:style style:name="T16" style:family="text">
      <style:text-properties style:font-name="roboto" fo:font-weight="bold" officeooo:rsid="00376014" style:font-weight-asian="bold" style:font-weight-complex="bold"/>
    </style:style>
    <style:style style:name="T17" style:family="text">
      <style:text-properties style:font-name="roboto" fo:font-weight="bold" officeooo:rsid="00315ace" style:font-weight-asian="bold" style:font-weight-complex="bold"/>
    </style:style>
    <style:style style:name="T18" style:family="text">
      <style:text-properties style:font-name="roboto" fo:font-weight="bold" officeooo:rsid="0011f317" style:font-weight-asian="bold" style:font-weight-complex="bold"/>
    </style:style>
    <style:style style:name="T19" style:family="text">
      <style:text-properties style:font-name="roboto" fo:font-weight="bold" officeooo:rsid="0013ab3e" style:font-weight-asian="bold" style:font-weight-complex="bold"/>
    </style:style>
    <style:style style:name="T20" style:family="text">
      <style:text-properties style:font-name="roboto" fo:font-weight="bold" officeooo:rsid="001633e1" style:font-weight-asian="bold" style:font-weight-complex="bold"/>
    </style:style>
    <style:style style:name="T21" style:family="text">
      <style:text-properties style:font-name="roboto" fo:font-weight="bold" officeooo:rsid="00300db1" style:font-weight-asian="bold" style:font-weight-complex="bold"/>
    </style:style>
    <style:style style:name="T22" style:family="text">
      <style:text-properties style:font-name="roboto" fo:font-weight="bold" officeooo:rsid="00b29438" style:font-weight-asian="bold" style:font-weight-complex="bold"/>
    </style:style>
    <style:style style:name="T23" style:family="text">
      <style:text-properties style:font-name="roboto" fo:font-weight="bold" officeooo:rsid="0093d52a" style:font-weight-asian="bold" style:font-weight-complex="bold"/>
    </style:style>
    <style:style style:name="T24" style:family="text">
      <style:text-properties style:font-name="roboto" fo:font-weight="bold" officeooo:rsid="0096f8fc" style:font-weight-asian="bold" style:font-weight-complex="bold"/>
    </style:style>
    <style:style style:name="T25" style:family="text">
      <style:text-properties style:font-name="roboto" fo:font-weight="bold" officeooo:rsid="004b7dd7" style:font-weight-asian="bold" style:font-weight-complex="bold"/>
    </style:style>
    <style:style style:name="T26" style:family="text">
      <style:text-properties style:font-name="roboto" fo:font-weight="bold" officeooo:rsid="00397eda" style:font-weight-asian="bold" style:font-weight-complex="bold"/>
    </style:style>
    <style:style style:name="T27" style:family="text">
      <style:text-properties style:font-name="roboto" fo:font-weight="bold" officeooo:rsid="001b822c" style:font-weight-asian="bold" style:font-weight-complex="bold"/>
    </style:style>
    <style:style style:name="T28" style:family="text">
      <style:text-properties style:font-name="roboto" fo:font-weight="bold" officeooo:rsid="0034cd67" style:font-weight-asian="bold" style:font-weight-complex="bold"/>
    </style:style>
    <style:style style:name="T29" style:family="text">
      <style:text-properties style:font-name="roboto" fo:font-weight="bold" officeooo:rsid="0068af0b"/>
    </style:style>
    <style:style style:name="T30" style:family="text">
      <style:text-properties style:font-name="roboto" fo:font-weight="bold" style:font-weight-asian="normal" style:font-weight-complex="normal"/>
    </style:style>
    <style:style style:name="T31" style:family="text">
      <style:text-properties style:font-name="roboto" fo:font-weight="normal"/>
    </style:style>
    <style:style style:name="T32" style:family="text">
      <style:text-properties style:font-name="roboto" fo:font-weight="normal" style:font-weight-asian="normal" style:font-weight-complex="normal"/>
    </style:style>
    <style:style style:name="T33" style:family="text">
      <style:text-properties style:font-name="roboto" fo:font-weight="normal" officeooo:rsid="00074483" style:font-weight-asian="normal" style:font-weight-complex="normal"/>
    </style:style>
    <style:style style:name="T34" style:family="text">
      <style:text-properties style:font-name="roboto" fo:font-weight="normal" officeooo:rsid="00093f17" style:font-weight-asian="normal" style:font-weight-complex="normal"/>
    </style:style>
    <style:style style:name="T35" style:family="text">
      <style:text-properties style:font-name="roboto" fo:font-weight="normal" officeooo:rsid="00cfad9e" style:font-weight-asian="normal" style:font-weight-complex="normal"/>
    </style:style>
    <style:style style:name="T36" style:family="text">
      <style:text-properties style:font-name="roboto" fo:font-weight="normal" officeooo:rsid="000b32ed" style:font-weight-asian="normal" style:font-weight-complex="normal"/>
    </style:style>
    <style:style style:name="T37" style:family="text">
      <style:text-properties style:font-name="roboto" fo:font-weight="normal" officeooo:rsid="000cf396" style:font-weight-asian="normal" style:font-weight-complex="normal"/>
    </style:style>
    <style:style style:name="T38" style:family="text">
      <style:text-properties style:font-name="roboto" fo:font-weight="normal" officeooo:rsid="00376014" style:font-weight-asian="normal" style:font-weight-complex="normal"/>
    </style:style>
    <style:style style:name="T39" style:family="text">
      <style:text-properties style:font-name="roboto" fo:font-weight="normal" officeooo:rsid="0013ab3e" style:font-weight-asian="normal" style:font-weight-complex="normal"/>
    </style:style>
    <style:style style:name="T40" style:family="text">
      <style:text-properties style:font-name="roboto" fo:font-weight="normal" officeooo:rsid="0011f317" style:font-weight-asian="normal" style:font-weight-complex="normal"/>
    </style:style>
    <style:style style:name="T41" style:family="text">
      <style:text-properties style:font-name="roboto" fo:font-weight="normal" officeooo:rsid="0036293b" style:font-weight-asian="normal" style:font-weight-complex="normal"/>
    </style:style>
    <style:style style:name="T42" style:family="text">
      <style:text-properties style:font-name="roboto" fo:font-weight="normal" officeooo:rsid="001a67c3" style:font-weight-asian="normal" style:font-weight-complex="normal"/>
    </style:style>
    <style:style style:name="T43" style:family="text">
      <style:text-properties style:font-name="roboto" fo:font-weight="normal" officeooo:rsid="001a158f" style:font-weight-asian="normal" style:font-weight-complex="normal"/>
    </style:style>
    <style:style style:name="T44" style:family="text">
      <style:text-properties style:font-name="roboto" fo:font-weight="normal" officeooo:rsid="00891e88" style:font-weight-asian="normal" style:font-weight-complex="normal"/>
    </style:style>
    <style:style style:name="T45" style:family="text">
      <style:text-properties style:font-name="roboto" fo:font-weight="normal" officeooo:rsid="00397eda" style:font-weight-asian="normal" style:font-weight-complex="normal"/>
    </style:style>
    <style:style style:name="T46" style:family="text">
      <style:text-properties style:font-name="roboto" fo:font-weight="normal" officeooo:rsid="001b822c" style:font-weight-asian="normal" style:font-weight-complex="normal"/>
    </style:style>
    <style:style style:name="T47" style:family="text">
      <style:text-properties style:font-name="roboto" fo:font-weight="normal" officeooo:rsid="0034689f" style:font-weight-asian="normal" style:font-weight-complex="normal"/>
    </style:style>
    <style:style style:name="T48" style:family="text">
      <style:text-properties style:font-name="roboto" fo:font-weight="normal" officeooo:rsid="001e239c" style:font-weight-asian="normal" style:font-weight-complex="normal"/>
    </style:style>
    <style:style style:name="T49" style:family="text">
      <style:text-properties style:font-name="roboto" fo:font-weight="normal" officeooo:rsid="00207840" style:font-weight-asian="normal" style:font-weight-complex="normal"/>
    </style:style>
    <style:style style:name="T50" style:family="text">
      <style:text-properties style:font-name="roboto" fo:font-weight="normal" officeooo:rsid="00205e0e" style:font-weight-asian="normal" style:font-weight-complex="normal"/>
    </style:style>
    <style:style style:name="T51" style:family="text">
      <style:text-properties style:font-name="roboto" fo:font-weight="normal" officeooo:rsid="001c39df" style:font-weight-asian="normal" style:font-weight-complex="normal"/>
    </style:style>
    <style:style style:name="T52" style:family="text">
      <style:text-properties style:font-name="roboto" fo:font-weight="normal" officeooo:rsid="001ebff7" style:font-weight-asian="normal" style:font-weight-complex="normal"/>
    </style:style>
    <style:style style:name="T53" style:family="text">
      <style:text-properties style:font-name="roboto" fo:font-weight="normal" officeooo:rsid="00cfad9e"/>
    </style:style>
    <style:style style:name="T54" style:family="text">
      <style:text-properties style:font-name="roboto" fo:font-weight="normal" officeooo:rsid="001b64c2"/>
    </style:style>
    <style:style style:name="T55" style:family="text">
      <style:text-properties style:font-name="roboto" fo:font-weight="normal" officeooo:rsid="00126893"/>
    </style:style>
    <style:style style:name="T56" style:family="text">
      <style:text-properties style:font-name="roboto" officeooo:rsid="00b80a17"/>
    </style:style>
    <style:style style:name="T57" style:family="text">
      <style:text-properties style:font-name="roboto" officeooo:rsid="0010bb08"/>
    </style:style>
    <style:style style:name="T58" style:family="text">
      <style:text-properties style:font-name="roboto" officeooo:rsid="00093f17"/>
    </style:style>
    <style:style style:name="T59" style:family="text">
      <style:text-properties style:font-name="roboto" officeooo:rsid="0021268e"/>
    </style:style>
    <style:style style:name="T60" style:family="text">
      <style:text-properties style:font-name="roboto" officeooo:rsid="000b32ed"/>
    </style:style>
    <style:style style:name="T61" style:family="text">
      <style:text-properties style:font-name="roboto" officeooo:rsid="000cf396"/>
    </style:style>
    <style:style style:name="T62" style:family="text">
      <style:text-properties style:font-name="roboto" officeooo:rsid="00cfad9e"/>
    </style:style>
    <style:style style:name="T63" style:family="text">
      <style:text-properties style:font-name="roboto" officeooo:rsid="00315ace"/>
    </style:style>
    <style:style style:name="T64" style:family="text">
      <style:text-properties style:font-name="roboto" officeooo:rsid="0036293b"/>
    </style:style>
    <style:style style:name="T65" style:family="text">
      <style:text-properties style:font-name="roboto" officeooo:rsid="0011f317"/>
    </style:style>
    <style:style style:name="T66" style:family="text">
      <style:text-properties style:font-name="roboto" officeooo:rsid="00b0c85c"/>
    </style:style>
    <style:style style:name="T67" style:family="text">
      <style:text-properties style:font-name="roboto" officeooo:rsid="00376df0"/>
    </style:style>
    <style:style style:name="T68" style:family="text">
      <style:text-properties style:font-name="roboto" officeooo:rsid="0013ab3e"/>
    </style:style>
    <style:style style:name="T69" style:family="text">
      <style:text-properties style:font-name="roboto" officeooo:rsid="00e82514"/>
    </style:style>
    <style:style style:name="T70" style:family="text">
      <style:text-properties style:font-name="roboto" officeooo:rsid="00300db1"/>
    </style:style>
    <style:style style:name="T71" style:family="text">
      <style:text-properties style:font-name="roboto" officeooo:rsid="001b64c2"/>
    </style:style>
    <style:style style:name="T72" style:family="text">
      <style:text-properties style:font-name="roboto" officeooo:rsid="001633e1"/>
    </style:style>
    <style:style style:name="T73" style:family="text">
      <style:text-properties style:font-name="roboto" officeooo:rsid="002b64a8"/>
    </style:style>
    <style:style style:name="T74" style:family="text">
      <style:text-properties style:font-name="roboto" officeooo:rsid="001f578e"/>
    </style:style>
    <style:style style:name="T75" style:family="text">
      <style:text-properties style:font-name="roboto" officeooo:rsid="00b29438"/>
    </style:style>
    <style:style style:name="T76" style:family="text">
      <style:text-properties style:font-name="roboto" officeooo:rsid="00b49ca5"/>
    </style:style>
    <style:style style:name="T77" style:family="text">
      <style:text-properties style:font-name="roboto" officeooo:rsid="0093d98a"/>
    </style:style>
    <style:style style:name="T78" style:family="text">
      <style:text-properties style:font-name="roboto" officeooo:rsid="005a98e8"/>
    </style:style>
    <style:style style:name="T79" style:family="text">
      <style:text-properties style:font-name="roboto" officeooo:rsid="001a158f"/>
    </style:style>
    <style:style style:name="T80" style:family="text">
      <style:text-properties style:font-name="roboto" officeooo:rsid="001a67c3"/>
    </style:style>
    <style:style style:name="T81" style:family="text">
      <style:text-properties style:font-name="roboto" officeooo:rsid="00038e07"/>
    </style:style>
    <style:style style:name="T82" style:family="text">
      <style:text-properties style:font-name="roboto" officeooo:rsid="00135f1e"/>
    </style:style>
    <style:style style:name="T83" style:family="text">
      <style:text-properties style:font-name="roboto" officeooo:rsid="00175002"/>
    </style:style>
    <style:style style:name="T84" style:family="text">
      <style:text-properties style:font-name="roboto" officeooo:rsid="00763b95"/>
    </style:style>
    <style:style style:name="T85" style:family="text">
      <style:text-properties style:font-name="roboto" officeooo:rsid="003d2e34"/>
    </style:style>
    <style:style style:name="T86" style:family="text">
      <style:text-properties style:font-name="roboto" fo:font-size="12pt" fo:font-weight="normal" style:font-size-asian="12pt" style:font-weight-asian="normal" style:font-size-complex="12pt" style:font-weight-complex="normal"/>
    </style:style>
    <style:style style:name="T87" style:family="text">
      <style:text-properties style:font-name="roboto" fo:font-size="12pt" fo:font-weight="normal" officeooo:rsid="001433cf" style:font-size-asian="12pt" style:font-weight-asian="normal" style:font-size-complex="12pt" style:font-weight-complex="normal"/>
    </style:style>
    <style:style style:name="T88" style:family="text">
      <style:text-properties style:font-name="roboto" fo:font-size="12pt" style:font-size-asian="12pt" style:font-size-complex="12pt"/>
    </style:style>
    <style:style style:name="T89" style:family="text">
      <style:text-properties style:font-name="roboto" fo:font-size="12pt" officeooo:rsid="00326e0f" style:font-size-asian="12pt" style:font-size-complex="12pt"/>
    </style:style>
    <style:style style:name="T90" style:family="text">
      <style:text-properties style:font-name="roboto" fo:font-size="12pt" officeooo:rsid="001579a0" style:font-size-asian="12pt" style:font-size-complex="12pt"/>
    </style:style>
    <style:style style:name="T91" style:family="text">
      <style:text-properties style:font-name="roboto" officeooo:rsid="0067d144"/>
    </style:style>
    <style:style style:name="T92" style:family="text">
      <style:text-properties style:font-name="roboto" officeooo:rsid="0068af0b"/>
    </style:style>
    <style:style style:name="T93" style:family="text">
      <style:text-properties style:font-name="roboto" officeooo:rsid="0099877e"/>
    </style:style>
    <style:style style:name="T94" style:family="text">
      <style:text-properties style:font-name="roboto" officeooo:rsid="00150bbd"/>
    </style:style>
    <style:style style:name="T95" style:family="text">
      <style:text-properties style:font-name="roboto" officeooo:rsid="00b04970"/>
    </style:style>
    <style:style style:name="T96" style:family="text">
      <style:text-properties style:font-name="roboto" officeooo:rsid="00c96c4b"/>
    </style:style>
    <style:style style:name="T97" style:family="text">
      <style:text-properties style:font-name="roboto" officeooo:rsid="00891e88"/>
    </style:style>
    <style:style style:name="T98" style:family="text">
      <style:text-properties style:font-name="roboto" fo:font-style="normal" officeooo:rsid="00891e88" style:font-style-asian="normal" style:font-style-complex="normal"/>
    </style:style>
    <style:style style:name="T99" style:family="text">
      <style:text-properties style:font-name="roboto" fo:font-style="normal" officeooo:rsid="0089d465" style:font-style-asian="normal" style:font-style-complex="normal"/>
    </style:style>
    <style:style style:name="T100" style:family="text">
      <style:text-properties style:font-name="roboto" fo:font-style="normal" officeooo:rsid="008929e3" style:font-style-asian="normal" style:font-style-complex="normal"/>
    </style:style>
    <style:style style:name="T101" style:family="text">
      <style:text-properties style:font-name="roboto" officeooo:rsid="004b7dd7"/>
    </style:style>
    <style:style style:name="T102" style:family="text">
      <style:text-properties style:font-name="roboto" officeooo:rsid="0034cd67"/>
    </style:style>
    <style:style style:name="T103" style:family="text">
      <style:text-properties style:font-name="roboto" officeooo:rsid="00397eda"/>
    </style:style>
    <style:style style:name="T104" style:family="text">
      <style:text-properties style:font-name="roboto" officeooo:rsid="001b822c"/>
    </style:style>
    <style:style style:name="T105" style:family="text">
      <style:text-properties style:font-name="roboto" officeooo:rsid="001c39df"/>
    </style:style>
    <style:style style:name="T106" style:family="text">
      <style:text-properties style:font-name="roboto" officeooo:rsid="001e239c"/>
    </style:style>
    <style:style style:name="T107" style:family="text">
      <style:text-properties style:font-name="roboto" officeooo:rsid="008929e3"/>
    </style:style>
    <style:style style:name="T108" style:family="text">
      <style:text-properties style:font-name="roboto" officeooo:rsid="0089d465"/>
    </style:style>
    <style:style style:name="T109" style:family="text">
      <style:text-properties fo:font-weight="normal"/>
    </style:style>
    <style:style style:name="T110" style:family="text">
      <style:text-properties fo:font-weight="normal" officeooo:rsid="00cfad9e"/>
    </style:style>
    <style:style style:name="T111" style:family="text">
      <style:text-properties fo:font-weight="normal" style:font-weight-asian="normal" style:font-weight-complex="normal"/>
    </style:style>
    <style:style style:name="T112" style:family="text">
      <style:text-properties fo:font-weight="normal" officeooo:rsid="00f54bf8" style:font-weight-asian="normal" style:font-weight-complex="normal"/>
    </style:style>
    <style:style style:name="T113" style:family="text">
      <style:text-properties fo:font-weight="normal" officeooo:rsid="00f31413" style:font-weight-asian="normal" style:font-weight-complex="normal"/>
    </style:style>
    <style:style style:name="T114" style:family="text">
      <style:text-properties fo:font-weight="normal" officeooo:rsid="00397eda" style:font-weight-asian="normal" style:font-weight-complex="normal"/>
    </style:style>
    <style:style style:name="T115" style:family="text">
      <style:text-properties fo:font-weight="normal" officeooo:rsid="00376014" style:font-weight-asian="normal" style:font-weight-complex="normal"/>
    </style:style>
    <style:style style:name="T116" style:family="text">
      <style:text-properties fo:font-weight="normal" officeooo:rsid="0038e184" style:font-weight-asian="normal" style:font-weight-complex="normal"/>
    </style:style>
    <style:style style:name="T117" style:family="text">
      <style:text-properties officeooo:rsid="006b5f71"/>
    </style:style>
    <style:style style:name="T118" style:family="text">
      <style:text-properties officeooo:rsid="000e2fcf"/>
    </style:style>
    <style:style style:name="T119" style:family="text">
      <style:text-properties fo:font-weight="bold"/>
    </style:style>
    <style:style style:name="T120" style:family="text">
      <style:text-properties fo:font-weight="bold" style:font-weight-asian="bold" style:font-weight-complex="bold"/>
    </style:style>
    <style:style style:name="T121" style:family="text">
      <style:text-properties fo:font-weight="bold" officeooo:rsid="000e2fcf" style:font-weight-asian="bold" style:font-weight-complex="bold"/>
    </style:style>
    <style:style style:name="T122" style:family="text">
      <style:text-properties fo:font-weight="bold" officeooo:rsid="0011f317" style:font-weight-asian="bold" style:font-weight-complex="bold"/>
    </style:style>
    <style:style style:name="T123" style:family="text">
      <style:text-properties fo:font-weight="bold" officeooo:rsid="001b64c2" style:font-weight-asian="bold" style:font-weight-complex="bold"/>
    </style:style>
    <style:style style:name="T124" style:family="text">
      <style:text-properties fo:font-weight="bold" officeooo:rsid="00126893" style:font-weight-asian="bold" style:font-weight-complex="bold"/>
    </style:style>
    <style:style style:name="T125" style:family="text">
      <style:text-properties fo:font-weight="bold" officeooo:rsid="00f2468c" style:font-weight-asian="bold" style:font-weight-complex="bold"/>
    </style:style>
    <style:style style:name="T126" style:family="text">
      <style:text-properties fo:font-weight="bold" officeooo:rsid="001a158f" style:font-weight-asian="bold" style:font-weight-complex="bold"/>
    </style:style>
    <style:style style:name="T127" style:family="text">
      <style:text-properties fo:font-weight="bold" officeooo:rsid="001816f1" style:font-weight-asian="bold" style:font-weight-complex="bold"/>
    </style:style>
    <style:style style:name="T128" style:family="text">
      <style:text-properties fo:font-weight="bold" officeooo:rsid="00f31413" style:font-weight-asian="bold" style:font-weight-complex="bold"/>
    </style:style>
    <style:style style:name="T129" style:family="text">
      <style:text-properties fo:font-weight="bold" officeooo:rsid="00cc0014"/>
    </style:style>
    <style:style style:name="T130" style:family="text">
      <style:text-properties fo:font-weight="bold" officeooo:rsid="00f2468c"/>
    </style:style>
    <style:style style:name="T131" style:family="text">
      <style:text-properties fo:font-weight="bold" officeooo:rsid="0099877e"/>
    </style:style>
    <style:style style:name="T132" style:family="text">
      <style:text-properties officeooo:rsid="0010bb08"/>
    </style:style>
    <style:style style:name="T133" style:family="text">
      <style:text-properties officeooo:rsid="006f5baa"/>
    </style:style>
    <style:style style:name="T134" style:family="text">
      <style:text-properties officeooo:rsid="001b64c2"/>
    </style:style>
    <style:style style:name="T135" style:family="text">
      <style:text-properties officeooo:rsid="00b4761b"/>
    </style:style>
    <style:style style:name="T136" style:family="text">
      <style:text-properties officeooo:rsid="002b64a8"/>
    </style:style>
    <style:style style:name="T137" style:family="text">
      <style:text-properties officeooo:rsid="002bbb88"/>
    </style:style>
    <style:style style:name="T138" style:family="text">
      <style:text-properties officeooo:rsid="00126893"/>
    </style:style>
    <style:style style:name="T139" style:family="text">
      <style:text-properties officeooo:rsid="002d2181"/>
    </style:style>
    <style:style style:name="T140" style:family="text">
      <style:text-properties officeooo:rsid="005a98e8"/>
    </style:style>
    <style:style style:name="T141" style:family="text">
      <style:text-properties officeooo:rsid="00ca2511"/>
    </style:style>
    <style:style style:name="T142" style:family="text">
      <style:text-properties officeooo:rsid="00e909f9"/>
    </style:style>
    <style:style style:name="T143" style:family="text">
      <style:text-properties officeooo:rsid="00cc0014"/>
    </style:style>
    <style:style style:name="T144" style:family="text">
      <style:text-properties officeooo:rsid="001a67c3"/>
    </style:style>
    <style:style style:name="T145" style:family="text">
      <style:text-properties officeooo:rsid="00cfad9e"/>
    </style:style>
    <style:style style:name="T146" style:family="text">
      <style:text-properties officeooo:rsid="00135f1e"/>
    </style:style>
    <style:style style:name="T147" style:family="text">
      <style:text-properties officeooo:rsid="00150bbd"/>
    </style:style>
    <style:style style:name="T148" style:family="text">
      <style:text-properties officeooo:rsid="0014e929"/>
    </style:style>
    <style:style style:name="T149" style:family="text">
      <style:text-properties officeooo:rsid="00b80a17"/>
    </style:style>
    <style:style style:name="T150" style:family="text">
      <style:text-properties officeooo:rsid="0030c895"/>
    </style:style>
    <style:style style:name="T151" style:family="text">
      <style:text-properties officeooo:rsid="00d118b1"/>
    </style:style>
    <style:style style:name="T152" style:family="text">
      <style:text-properties officeooo:rsid="0014c2d9"/>
    </style:style>
    <style:style style:name="T153" style:family="text">
      <style:text-properties fo:color="#1f1f1f" loext:opacity="100%" style:font-name="Google Sans Text" loext:padding="0in" loext:border="none"/>
    </style:style>
    <style:style style:name="T154" style:family="text">
      <style:text-properties fo:font-style="italic"/>
    </style:style>
    <style:style style:name="T155" style:family="text">
      <style:text-properties officeooo:rsid="00d2610f"/>
    </style:style>
    <style:style style:name="T156" style:family="text">
      <style:text-properties style:font-name="Google Sans Text"/>
    </style:style>
    <style:style style:name="T157" style:family="text">
      <style:text-properties style:font-name="Google Sans Text" fo:font-weight="bold"/>
    </style:style>
    <style:style style:name="T158" style:family="text">
      <style:text-properties officeooo:rsid="001e23cc"/>
    </style:style>
    <style:style style:name="T159" style:family="text">
      <style:text-properties officeooo:rsid="0099877e"/>
    </style:style>
    <style:style style:name="T160" style:family="text">
      <style:text-properties style:text-position="super 58%" style:font-name="roboto" officeooo:rsid="00c96c4b"/>
    </style:style>
    <style:style style:name="T161" style:family="text">
      <style:text-properties style:text-position="super 58%" style:font-name="roboto" fo:font-weight="normal" officeooo:rsid="001e239c" style:font-weight-asian="normal" style:font-weight-complex="normal"/>
    </style:style>
    <style:style style:name="T162" style:family="text">
      <style:text-properties officeooo:rsid="00f31413"/>
    </style:style>
    <style:style style:name="T163" style:family="text">
      <style:text-properties officeooo:rsid="00f4864b"/>
    </style:style>
    <style:style style:name="T164" style:family="text">
      <style:text-properties officeooo:rsid="00cacd0b"/>
    </style:style>
    <style:style style:name="T165" style:family="text">
      <style:text-properties officeooo:rsid="00ca9b30"/>
    </style:style>
    <style:style style:name="T166" style:family="text">
      <style:text-properties officeooo:rsid="00f54bf8"/>
    </style:style>
    <style:style style:name="T167" style:family="text">
      <style:text-properties officeooo:rsid="000c7646"/>
    </style:style>
    <style:style style:name="T168" style:family="text">
      <style:text-properties officeooo:rsid="003a99c2"/>
    </style:style>
    <style:style style:name="T169" style:family="text">
      <style:text-properties officeooo:rsid="00e723d8"/>
    </style:style>
    <style:style style:name="T170" style:family="text">
      <style:text-properties officeooo:rsid="004b7dd7"/>
    </style:style>
    <style:style style:name="T171" style:family="text">
      <style:text-properties officeooo:rsid="00397eda"/>
    </style:style>
    <style:style style:name="T172" style:family="text">
      <style:text-properties officeooo:rsid="001b822c"/>
    </style:style>
    <style:style style:name="T173" style:family="text">
      <style:text-properties officeooo:rsid="00376014"/>
    </style:style>
    <style:style style:name="T174" style:family="text">
      <style:text-properties officeooo:rsid="00390517"/>
    </style:style>
    <style:style style:name="T175" style:family="text">
      <style:text-properties officeooo:rsid="00084918"/>
    </style:style>
    <style:style style:name="T176" style:family="text">
      <style:text-properties officeooo:rsid="0009c52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text:bookmark-start text:name="__RefHeading___Toc11703_959624642"/>GitGalaxy Technical Specifications v4.1 (Master Blueprint)<text:bookmark-end text:name="__RefHeading___Toc11703_959624642"/></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11703_959624642" text:style-name="Index_20_Link" text:visited-style-name="Index_20_Link">GitGalaxy Technical Specifications v4.1 (Master Blueprint)<text:tab/>1</text:a></text:p>
          <text:p text:style-name="P2"><text:a xlink:type="simple" xlink:href="#__RefHeading___Toc11705_959624642" text:style-name="Index_20_Link" text:visited-style-name="Index_20_Link">1. Foundation &amp; Architecture<text:tab/>1</text:a></text:p>
          <text:p text:style-name="P3"><text:a xlink:type="simple" xlink:href="#__RefHeading___Toc11707_959624642" text:style-name="Index_20_Link" text:visited-style-name="Index_20_Link">1.1 Project Overview<text:tab/>1</text:a></text:p>
          <text:p text:style-name="P3"><text:a xlink:type="simple" xlink:href="#__RefHeading___Toc11709_959624642" text:style-name="Index_20_Link" text:visited-style-name="Index_20_Link">1.2 Visualizing Complexity<text:tab/>4</text:a></text:p>
          <text:p text:style-name="P3"><text:a xlink:type="simple" xlink:href="#__RefHeading___Toc11711_959624642" text:style-name="Index_20_Link" text:visited-style-name="Index_20_Link">1.3 System Architecture: High-Level Stack<text:tab/>5</text:a></text:p>
          <text:p text:style-name="P3"><text:a xlink:type="simple" xlink:href="#__RefHeading___Toc11713_959624642" text:style-name="Index_20_Link" text:visited-style-name="Index_20_Link">1.4 System File Map: Backend (Scanner) vs. Frontend (Viewer)<text:tab/>6</text:a></text:p>
          <text:p text:style-name="P3"><text:a xlink:type="simple" xlink:href="#__RefHeading___Toc32686_2209633182" text:style-name="Index_20_Link" text:visited-style-name="Index_20_Link">1.5 The Security &amp; Privacy Protocol: Zero-Trust Local Analysis<text:tab/>7</text:a></text:p>
          <text:p text:style-name="P4"><text:a xlink:type="simple" xlink:href="#__RefHeading___Toc32688_2209633182" text:style-name="Index_20_Link" text:visited-style-name="Index_20_Link">1.5.1 Overview: "Your Code Never Leaves Your Computer"<text:tab/>7</text:a></text:p>
          <text:p text:style-name="P4"><text:a xlink:type="simple" xlink:href="#__RefHeading___Toc32690_2209633182" text:style-name="Index_20_Link" text:visited-style-name="Index_20_Link">1.5.2 The "Privacy Engine": ZipLoader.js<text:tab/>7</text:a></text:p>
          <text:p text:style-name="P4"><text:a xlink:type="simple" xlink:href="#__RefHeading___Toc32692_2209633182" text:style-name="Index_20_Link" text:visited-style-name="Index_20_Link">1.5.3 Implementation Detail: Security Safeguards<text:tab/>8</text:a></text:p>
          <text:p text:style-name="P2"><text:a xlink:type="simple" xlink:href="#__RefHeading___Toc11735_959624642" text:style-name="Index_20_Link" text:visited-style-name="Index_20_Link">2. Converting code into space and color info<text:tab/>8</text:a></text:p>
          <text:p text:style-name="P3"><text:a xlink:type="simple" xlink:href="#__RefHeading___Toc139657_2813440148" text:style-name="Index_20_Link" text:visited-style-name="Index_20_Link">2.1 How we represent complexity as physical structure<text:tab/>8</text:a></text:p>
          <text:p text:style-name="P3"><text:a xlink:type="simple" xlink:href="#__RefHeading___Toc11747_959624642" text:style-name="Index_20_Link" text:visited-style-name="Index_20_Link">2.2 Color Labeling Equations<text:tab/>9</text:a></text:p>
          <text:p text:style-name="P4"><text:a xlink:type="simple" xlink:href="#__RefHeading___Toc49783_1155106909" text:style-name="Index_20_Link" text:visited-style-name="Index_20_Link">2.2.A. Overview of methodology<text:tab/>9</text:a></text:p>
          <text:p text:style-name="P4"><text:a xlink:type="simple" xlink:href="#__RefHeading___Toc11765_959624642" text:style-name="Index_20_Link" text:visited-style-name="Index_20_Link">2.2.B. Sub-Equations<text:tab/>11</text:a></text:p>
          <text:p text:style-name="P4"><text:a xlink:type="simple" xlink:href="#__RefHeading___Toc26218_2298275600" text:style-name="Index_20_Link" text:visited-style-name="Index_20_Link">2.2.C. Transforming Noisy Regex Counts Into Something Meaningful<text:tab/>12</text:a></text:p>
          <text:p text:style-name="P3"><text:a xlink:type="simple" xlink:href="#__RefHeading___Toc11737_959624642" text:style-name="Index_20_Link" text:visited-style-name="Index_20_Link">2.3 Data Analysis Pipeline<text:tab/>14</text:a></text:p>
          <text:p text:style-name="P2"><text:a xlink:type="simple" xlink:href="#__RefHeading___Toc277554_2813440148" text:style-name="Index_20_Link" text:visited-style-name="Index_20_Link">8. Impacts &amp; Future Outlooks<text:tab/>16</text:a></text:p>
          <text:p text:style-name="P3"><text:a xlink:type="simple" xlink:href="#__RefHeading___Toc656524_2813440148" text:style-name="Index_20_Link" text:visited-style-name="Index_20_Link">8.1 Integration into the publishing pipeline for 24/7 Risk Exposure Analyses<text:tab/>16</text:a></text:p>
          <text:p text:style-name="P3"><text:a xlink:type="simple" xlink:href="#__RefHeading___Toc480075_2813440148" text:style-name="Index_20_Link" text:visited-style-name="Index_20_Link">8.2 One Non-Numeric Dashboard to rule them all<text:tab/>16</text:a></text:p>
          <text:p text:style-name="P3"><text:a xlink:type="simple" xlink:href="#__RefHeading___Toc277556_2813440148" text:style-name="Index_20_Link" text:visited-style-name="Index_20_Link">8.3 The Cockpit Crisis<text:tab/>17</text:a></text:p>
          <text:p text:style-name="P3"><text:a xlink:type="simple" xlink:href="#__RefHeading___Toc480077_2813440148" text:style-name="Index_20_Link" text:visited-style-name="Index_20_Link">8.4 Time to tend a Garden<text:tab/>17</text:a></text:p>
          <text:p text:style-name="P3"><text:a xlink:type="simple" xlink:href="#__RefHeading___Toc656526_2813440148" text:style-name="Index_20_Link" text:visited-style-name="Index_20_Link">8.5 Circling back to Specifications Exposure &amp; Auditing<text:tab/>18</text:a></text:p>
          <text:p text:style-name="P3"><text:a xlink:type="simple" xlink:href="#__RefHeading___Toc36598_1787320247" text:style-name="Index_20_Link" text:visited-style-name="Index_20_Link">8.6. The Field of AI Forensics<text:tab/>18</text:a></text:p>
        </text:index-body>
      </text:table-of-content>
      <text:p text:style-name="P14"/>
      <text:p text:style-name="P107">Note: This is a paired down version from the full readme hosted on github @ <text:a xlink:type="simple" xlink:href="https://github.com/squid-protocol/gitgalaxy" text:style-name="Internet_20_link" text:visited-style-name="Visited_20_Internet_20_Link">https://github.com/squid-protocol/gitgalaxy</text:a>. </text:p>
      <text:p text:style-name="P107"/>
      <text:h text:style-name="P53" text:outline-level="2"><text:bookmark-start text:name="__RefHeading___Toc11705_959624642 Copy 1"/><text:span text:style-name="T175">0</text:span>. <text:span text:style-name="T175">Quickstart </text:span><text:bookmark-end text:name="__RefHeading___Toc11705_959624642 Copy 1"/></text:h>
      <text:h text:style-name="Heading_20_3" text:outline-level="3">1. Install</text:h>
      <text:p text:style-name="P108">pip install gitgalaxy</text:p>
      <text:h text:style-name="P55" text:outline-level="3"><text:span text:style-name="T175">2</text:span>. <text:span text:style-name="T175">How to </text:span><text:span text:style-name="T176">generate your data</text:span></text:h>
      <text:p text:style-name="P108">At the CLI: </text:p>
      <text:p text:style-name="P108"><text:soft-page-break/>gitgalaxy /path/to/your/repo </text:p>
      <text:h text:style-name="Heading_20_3" text:outline-level="3">3. How to view your data </text:h>
      <text:p text:style-name="P109">GitGalaxy offers two ways to visualize your 3D architecture, both built on a strict Zero-Trust Privacy Model (your code never leaves your machine).</text:p>
      <text:p text:style-name="Text_20_body"><text:span text:style-name="T120">Option A:</text:span> The Web Viewer (Frictionless) Simply drag and drop your generated "your_repo_galaxy.json" file (or a .zip of your raw repository) directly into GitGalaxy.io (<text:a xlink:type="simple" xlink:href="https://www.google.com/search?q=https://gitgalaxy.io" office:target-frame-name="_blank" xlink:show="new" text:style-name="Internet_20_link" text:visited-style-name="Visited_20_Internet_20_Link">https://gitgalaxy.io</text:a>). All rendering and scanning happens entirely in your browser's local memory.</text:p>
      <text:p text:style-name="Text_20_body"><text:span text:style-name="T120">Option B: </text:span>The Local Server (Enterprise &amp; Offline) For teams working behind strict corporate firewalls, you can host the 3D viewer locally. Clone the repository and spin up the included Flask server:</text:p>
      <text:p text:style-name="Text_20_body">git clone <text:a xlink:type="simple" xlink:href="https://www.google.com/search?q=https://github.com/squid-protocol/gitgalaxy.git" office:target-frame-name="_blank" xlink:show="new" text:style-name="Internet_20_link" text:visited-style-name="Visited_20_Internet_20_Link">https://github.com/squid-protocol/gitgalaxy.git</text:a> cd gitgalaxy python app.py</text:p>
      <text:p text:style-name="Text_20_body">Then open http://localhost:5000 in your browser and drop your JSON file in securely.</text:p>
      <text:h text:style-name="Heading_20_3" text:outline-level="3">4. <text:span text:style-name="T176">License </text:span></text:h>
      <text:p text:style-name="P110">GitGalaxy is released under the PolyForm Noncommercial License 1.0.0. It is completely free for personal use, research, and hobby projects. If you are interested in integrating GitGalaxy into a commercial workflow, CI/CD pipeline, or SaaS product, please reach out via <text:a xlink:type="simple" xlink:href="https://gitgalaxy.io/" office:target-frame-name="_blank" xlink:show="new" text:style-name="Internet_20_link" text:visited-style-name="Visited_20_Internet_20_Link">https://gitgalaxy.io</text:a> to discuss a commercial license.</text:p>
      <text:h text:style-name="P6" text:outline-level="2"><text:bookmark-start text:name="__RefHeading___Toc11705_959624642"/>1. Foundation &amp; Architecture<text:bookmark-end text:name="__RefHeading___Toc11705_959624642"/></text:h>
      <text:h text:style-name="P7" text:outline-level="3"><text:bookmark-start text:name="__RefHeading___Toc11707_959624642"/>1.1 Project Overview<text:bookmark-end text:name="__RefHeading___Toc11707_959624642"/></text:h>
      <text:p text:style-name="P10"><text:span text:style-name="T2">1. </text:span><text:span text:style-name="T3">Code can be art. Logic can be art. Systems engineering can be art. GitGalaxy reveal</text:span><text:span text:style-name="T4">s</text:span><text:span text:style-name="T3"> the </text:span><text:span text:style-name="T7">complexity of</text:span><text:span text:style-name="T8"> codebases</text:span><text:span text:style-name="T3"> </text:span><text:span text:style-name="T9">as</text:span><text:span text:style-name="T10"> </text:span><text:span text:style-name="T11">explorable 3D</text:span><text:span text:style-name="T10"> galaxies </text:span><text:span text:style-name="T33">by using </text:span><text:span text:style-name="T56">source code as a seed for procedural generative art. </text:span><text:span text:style-name="T31">The human brain is not optimized for processing rows of digits; it is optimized for detecting patterns in nature or physics. By procedurally mapping complexity to things like spatial position, movement, pulses</text:span> <text:span text:style-name="T31">and colors, </text:span><text:span text:style-name="T5">GitGalaxy taps into our evolutionary strengths to help us understand</text:span> <text:span text:style-name="T5">complex systems intuitively</text:span><text:span text:style-name="T31">. </text:span></text:p>
      <text:p text:style-name="P32"><text:s/></text:p>
      <text:p text:style-name="P10"><text:span text:style-name="T2">2. </text:span><text:span text:style-name="T57">While</text:span><text:span text:style-name="T2"> </text:span><text:span text:style-name="T57">t</text:span><text:span text:style-name="T2">here are many ways to write code, organizations rely on agreed-upon standards for </text:span><text:span text:style-name="T57">coding practices</text:span><text:span text:style-name="T2">. </text:span><text:span text:style-name="T12">GitGalaxy assesses deviations from organizational standards and displays that info as color overlays onto the 3D generated world. </text:span><text:span text:style-name="T1">GitGalaxy </text:span><text:span text:style-name="T57">does not measure</text:span><text:span text:style-name="T1"> "Code Quality", which feels like a judgment, </text:span><text:span text:style-name="T57">but instead </text:span><text:soft-page-break/><text:span text:style-name="T57">measures </text:span><text:span text:style-name="T13">Risk</text:span><text:span text:style-name="T1"> </text:span><text:span text:style-name="Strong_20_Emphasis"><text:span text:style-name="T1">Exposure</text:span></text:span><text:span text:style-name="T1">. Our </text:span><text:span text:style-name="T57">measurements</text:span><text:span text:style-name="T1"> do not judge; they highlight. They function as sensors, not critics.</text:span></text:p>
      <text:list text:style-name="L1">
        <text:list-item>
          <text:p text:style-name="P56"><text:span text:style-name="Strong_20_Emphasis"><text:span text:style-name="T32">We do not </text:span></text:span><text:span text:style-name="Strong_20_Emphasis"><text:span text:style-name="T34">assess</text:span></text:span><text:span text:style-name="Strong_20_Emphasis"><text:span text:style-name="T1"> "Bad Code";</text:span></text:span><text:span text:style-name="T1"> we measure </text:span><text:span text:style-name="Strong_20_Emphasis"><text:span text:style-name="T1">Cognitive </text:span></text:span><text:span text:style-name="Strong_20_Emphasis"><text:span text:style-name="T58">Load </text:span></text:span><text:span text:style-name="Strong_20_Emphasis"><text:span text:style-name="T1">Exposure, </text:span></text:span><text:span text:style-name="T1">how hard it is for a human to </text:span><text:span text:style-name="T59">work through</text:span><text:span text:style-name="T1"> the logic, </text:span><text:span text:style-name="T60">because </text:span><text:span text:style-name="T61">teams</text:span><text:span text:style-name="T60"> should be aware which files are the hardest to work on. </text:span></text:p>
        </text:list-item>
        <text:list-item>
          <text:p text:style-name="P56"><text:span text:style-name="Strong_20_Emphasis"><text:span text:style-name="T32">We do not </text:span></text:span><text:span text:style-name="Strong_20_Emphasis"><text:span text:style-name="T34">assess</text:span></text:span><text:span text:style-name="Strong_20_Emphasis"><text:span text:style-name="T1"> "Missing Docs";</text:span></text:span><text:span text:style-name="T1"> we </text:span><text:span text:style-name="T58">assess</text:span><text:span text:style-name="T1"> </text:span><text:span text:style-name="T14">Documentation</text:span><text:span text:style-name="Strong_20_Emphasis"><text:span text:style-name="T1"> Exposure, </text:span></text:span><text:span text:style-name="T1">the risk to the </text:span><text:span text:style-name="T61">team</text:span><text:span text:style-name="T1"> if a key </text:span><text:span text:style-name="T61">person </text:span><text:span text:style-name="T1">leaves.</text:span></text:p>
        </text:list-item>
        <text:list-item>
          <text:p text:style-name="P56"><text:span text:style-name="Strong_20_Emphasis"><text:span text:style-name="T32">We do not </text:span></text:span><text:span text:style-name="Strong_20_Emphasis"><text:span text:style-name="T34">assess</text:span></text:span><text:span text:style-name="Strong_20_Emphasis"><text:span text:style-name="T1"> "</text:span></text:span><text:span text:style-name="Strong_20_Emphasis"><text:span text:style-name="T58">Missing Testing</text:span></text:span><text:span text:style-name="Strong_20_Emphasis"><text:span text:style-name="T1">";</text:span></text:span><text:span text:style-name="T1"> we </text:span><text:span text:style-name="T58">assess</text:span><text:span text:style-name="T1"> </text:span><text:span text:style-name="T14">Testing</text:span><text:span text:style-name="Strong_20_Emphasis"><text:span text:style-name="T1"> Exposure, </text:span></text:span><text:span text:style-name="T1">the </text:span><text:span text:style-name="T61">risk</text:span><text:span text:style-name="T1"> of unshielded logic causing a meltdown in production. </text:span></text:p>
        </text:list-item>
        <text:list-item>
          <text:p text:style-name="P56"><text:span text:style-name="Strong_20_Emphasis"><text:span text:style-name="T35">We do not measure </text:span></text:span><text:span text:style-name="Strong_20_Emphasis"><text:span text:style-name="T62">"System Security";</text:span></text:span><text:span text:style-name="T53"> we measure </text:span><text:span text:style-name="Strong_20_Emphasis"><text:span text:style-name="T62">Safety Exposure, </text:span></text:span><text:span text:style-name="T53">the structural brittleness caused by a lack of </text:span><text:span text:style-name="Source_20_Text"><text:span text:style-name="T110">try/except</text:span></text:span><text:span text:style-name="T53"> blocks and robust error handling.</text:span></text:p>
        </text:list-item>
      </text:list>
      <text:list text:style-name="L2">
        <text:list-item>
          <text:p text:style-name="P57"><text:span text:style-name="Strong_20_Emphasis"><text:span text:style-name="T32">We do not measure </text:span></text:span><text:span text:style-name="Strong_20_Emphasis"><text:span text:style-name="T6">API Exposure</text:span></text:span><text:span text:style-name="Strong_20_Emphasis"><text:span text:style-name="T32"> </text:span></text:span><text:span text:style-name="Strong_20_Emphasis"><text:span text:style-name="T36">because its always bad, we just want </text:span></text:span><text:span text:style-name="Strong_20_Emphasis"><text:span text:style-name="T37">teams</text:span></text:span><text:span text:style-name="Strong_20_Emphasis"><text:span text:style-name="T36"> to understand </text:span></text:span><text:span text:style-name="Strong_20_Emphasis"><text:span text:style-name="T15">how sensitive a file might be to changes</text:span></text:span><text:span text:style-name="Strong_20_Emphasis"><text:span text:style-name="T36">.</text:span></text:span></text:p>
        </text:list-item>
        <text:list-item>
          <text:p text:style-name="P57"><text:span text:style-name="Strong_20_Emphasis"><text:span text:style-name="T32">We do not measure </text:span></text:span><text:span text:style-name="Strong_20_Emphasis"><text:span text:style-name="T6">Concurrency Exposure</text:span></text:span><text:span text:style-name="Strong_20_Emphasis"><text:span text:style-name="T32"> </text:span></text:span><text:span text:style-name="Strong_20_Emphasis"><text:span text:style-name="T36">because it’s always bad but because </text:span></text:span><text:span text:style-name="Strong_20_Emphasis"><text:span text:style-name="T37">teams</text:span></text:span><text:span text:style-name="Strong_20_Emphasis"><text:span text:style-name="T36"> should be able to easily assess </text:span></text:span><text:span text:style-name="T1">the </text:span><text:span text:style-name="T13">risk</text:span><text:span text:style-name="T6"> of race conditions and deadlocks</text:span><text:span text:style-name="T1"> in multi-threaded logic.</text:span></text:p>
        </text:list-item>
        <text:list-item>
          <text:p text:style-name="P57"><text:span text:style-name="Strong_20_Emphasis"><text:span text:style-name="T32">We do not measure </text:span></text:span><text:span text:style-name="Strong_20_Emphasis"><text:span text:style-name="T1">State Flux Exposure </text:span></text:span><text:span text:style-name="Strong_20_Emphasis"><text:span text:style-name="T36">because it’s always </text:span></text:span><text:span text:style-name="Strong_20_Emphasis"><text:span text:style-name="T37">bad but</text:span></text:span><text:span text:style-name="Strong_20_Emphasis"><text:span text:style-name="T36"> we </text:span></text:span><text:span text:style-name="Strong_20_Emphasis"><text:span text:style-name="T37">because teams </text:span></text:span><text:span text:style-name="Strong_20_Emphasis"><text:span text:style-name="T36">can easily assess </text:span></text:span><text:span text:style-name="T1">the </text:span><text:span text:style-name="T13">risk of state conflicts</text:span><text:span text:style-name="T60">. </text:span></text:p>
        </text:list-item>
        <text:list-item>
          <text:p text:style-name="P58"><text:span text:style-name="T32">We do not measure</text:span><text:span text:style-name="T6"> </text:span><text:span text:style-name="T16">Specification</text:span><text:span text:style-name="Strong_20_Emphasis"><text:span text:style-name="T6"> </text:span></text:span><text:span text:style-name="Strong_20_Emphasis"><text:span text:style-name="T1">Exposure</text:span></text:span><text:span text:style-name="T32"> to catch "Cowboy Code </text:span><text:span text:style-name="T38">that’s out of spec</text:span><text:span text:style-name="T32">," but to act as an </text:span><text:span text:style-name="Strong_20_Emphasis"><text:span text:style-name="T1">organizational compass</text:span></text:span><text:span text:style-name="T32">; it ensures that as a feature settles into the codebase, the documentation follows, fostering a culture where every line of logic has a traceable and understood home.</text:span></text:p>
        </text:list-item>
      </text:list>
      <text:p text:style-name="P21">By visualizing these exposures as <text:span text:style-name="T117">toggle-able </text:span>color overlays <text:span text:style-name="T118">onto the generated galaxy</text:span>, GitGalaxy provides <text:span text:style-name="T118">an intuitive</text:span> <text:span text:style-name="T121">non-numeric </text:span><text:span text:style-name="T122">d</text:span><text:span text:style-name="T120">ashboard</text:span>. It allows a team to agree on standard<text:span text:style-name="T118">s </text:span>and instantly see—without reading a single line of text—where their architecture <text:span text:style-name="T118">might be</text:span> drift<text:span text:style-name="T118">ing </text:span>into dangerous territory.</text:p>
      <text:p text:style-name="P10"><text:span text:style-name="T63">3. </text:span><text:span text:style-name="T59">Many projects are multi-lingual. </text:span><text:span text:style-name="T63">Traditional </text:span><text:span text:style-name="T64">code</text:span><text:span text:style-name="T63"> analysis tools (ASTs) act like strict linguists—they understand the grammar of one language perfectly but </text:span><text:span text:style-name="T64">not of any others</text:span><text:span text:style-name="T63">. GitGalaxy acts as </text:span><text:span text:style-name="T17">a Rosetta Stone for code </text:span><text:span text:style-name="T9">complexity, project scale and </text:span><text:span text:style-name="T18">risk exposure</text:span><text:span text:style-name="T63">. By prioritizing consistent </text:span><text:span text:style-name="T64">regex-based </text:span><text:span text:style-name="T63">approximation over rigid syntax </text:span><text:span text:style-name="T64">parsing</text:span><text:span text:style-name="T63">, we </text:span><text:span text:style-name="T64">can meaningfully compare different code bases </text:span><text:span text:style-name="T65">of different languages</text:span><text:span text:style-name="T63">. This </text:span><text:soft-page-break/><text:span text:style-name="T64">consistent</text:span><text:span text:style-name="T63"> standard allows us to </text:span><text:span text:style-name="T66">visually</text:span><text:span text:style-name="T63"> compare the </text:span><text:span text:style-name="T66">scale and complexity of different coding projects, from Apollo 11 (Assembly) to the Linux Kernel (C) to TensorFlow (Python) </text:span><text:span text:style-name="T59">under the same set of rules. </text:span></text:p>
      <text:p text:style-name="P33"/>
      <text:p text:style-name="P34"><text:span text:style-name="T120">Why This Matters:</text:span> </text:p>
      <text:p text:style-name="P34"/>
      <text:list text:style-name="L3">
        <text:list-item>
          <text:p text:style-name="P59"><text:span text:style-name="T120">Identify Hotspots: </text:span>Instantly spot files <text:span text:style-name="T132">with high exposure</text:span>, <text:span text:style-name="T132">as </text:span>they are <text:span text:style-name="T132">literally </text:span>glowing <text:span text:style-name="T133">planets in space</text:span>.</text:p>
        </text:list-item>
        <text:list-item>
          <text:p text:style-name="P59"><text:span text:style-name="T123">See</text:span><text:span text:style-name="T120"> Risk:</text:span> See exactly where "dangerous" patterns cluster before they become <text:span text:style-name="T134">issues</text:span>.</text:p>
        </text:list-item>
        <text:list-item>
          <text:p text:style-name="P59"><text:span text:style-name="T120">Audit Legacy Systems: </text:span>Map the topology of ancient codebases (like COBOL) to plan modernization strategies without reading a million lines of code.</text:p>
        </text:list-item>
        <text:list-item>
          <text:p text:style-name="P60">Analysis happens on your machine, <text:span text:style-name="T111">takes seconds and makes a file smaller than a photo and with a data presentation so easy kids could get it. </text:span></text:p>
        </text:list-item>
      </text:list>
      <text:p text:style-name="P35"/>
      <text:p text:style-name="P19"/>
      <text:p text:style-name="P10"><text:span text:style-name="T2">To </text:span><text:span text:style-name="T67">accomplish</text:span><text:span text:style-name="T2"> this, GitGalaxy </text:span><text:span text:style-name="T68">uses</text:span><text:span text:style-name="T1"> </text:span><text:span text:style-name="T65">general </text:span><text:span text:style-name="T1">Regex-based semantic signatures </text:span><text:span text:style-name="T65">that have been </text:span><text:span text:style-name="T68">adapted to each language, </text:span><text:span text:style-name="T69">as </text:span><text:span text:style-name="T65">either 1. the input to various </text:span><text:span text:style-name="T70">Risk </text:span><text:span text:style-name="T65">Exposure Equation</text:span><text:span text:style-name="T71">s</text:span><text:span text:style-name="T65"> or 2. as</text:span><text:span text:style-name="T69"> seeds </text:span><text:span text:style-name="T65">for </text:span><text:span text:style-name="T69">a procedurally generated algorithm to create a novel visual representation of </text:span><text:span text:style-name="T71">codebase complexity</text:span><text:span text:style-name="T1">. </text:span><text:span text:style-name="T72">This project</text:span><text:span text:style-name="T1"> prioritize</text:span><text:span text:style-name="T72">s</text:span><text:span text:style-name="T1"> ease of use, zero-setup scanning, </text:span><text:span text:style-name="T67">comparative analyses and</text:span><text:span text:style-name="T1"> visual impact over the academic rigor of a </text:span><text:span text:style-name="T67">single language </text:span><text:span text:style-name="T1">Abstract Syntax Tree. </text:span><text:span text:style-name="T19">This </text:span><text:span text:style-name="T20">project</text:span><text:span text:style-name="T19"> does not </text:span><text:span text:style-name="T6">visualiz</text:span><text:span text:style-name="T19">e</text:span><text:span text:style-name="T6"> syntax </text:span><text:span text:style-name="T8">or if </text:span><text:span text:style-name="T21">it</text:span><text:span text:style-name="T8"> will compile</text:span><text:span text:style-name="T1">; </text:span><text:span text:style-name="T68">it </text:span><text:span text:style-name="T39">visualize</text:span><text:span text:style-name="T40">s</text:span><text:span text:style-name="T32"> </text:span><text:span text:style-name="T41">aspects of </text:span><text:span text:style-name="T32">functional intent. </text:span></text:p>
      <text:p text:style-name="P10"><text:span text:style-name="T73"/></text:p>
      <text:p text:style-name="P10"><text:span text:style-name="T65">GitGalaxy comes pre-loaded with functional </text:span><text:span text:style-name="T70">Risk </text:span><text:span text:style-name="T65">Exposure Equations but </text:span><text:span text:style-name="T2">customization may be needed to adapt for your </text:span><text:span text:style-name="T65">team’s standards</text:span><text:span text:style-name="T73">.</text:span><text:span text:style-name="T65"> </text:span><text:span text:style-name="T73">These equations</text:span><text:span text:style-name="T1"> define the intensity of the </text:span><text:span text:style-name="T65">color overlay</text:span><text:span text:style-name="T1"> effect. </text:span><text:span text:style-name="T74">A</text:span><text:span text:style-name="T1">ll equations </text:span><text:span text:style-name="T73">attempt</text:span><text:span text:style-name="T1"> </text:span><text:span text:style-name="T65">to </text:span><text:span text:style-name="T1">target a </text:span><text:span text:style-name="T32">0-100 </text:span><text:span text:style-name="T1">scale. </text:span><text:span text:style-name="T75">Although the developer has worked hard to make the equations as nuanced as they can be, the equations should be viewed as rough </text:span><text:span text:style-name="T76">approximations</text:span><text:span text:style-name="T75"> only. They should be used to identify general trends (</text:span><text:span text:style-name="T22">Good - this </text:span><text:span text:style-name="T18">file</text:span><text:span text:style-name="T22"> has high </text:span><text:span text:style-name="T21">API exposure</text:span><text:span text:style-name="T75">) versus absolute ranking over tiny differences (</text:span><text:span text:style-name="T22">Bad - this </text:span><text:span text:style-name="T18">file</text:span><text:span text:style-name="T22"> is better than that one because it scored 1% higher in the tech debt equation</text:span><text:span text:style-name="T75">). </text:span><text:span text:style-name="T77">We took pains to hide the specific numbers, and instead only report out general tiers (very high, high, medium, low, very low). </text:span></text:p>
      <text:p text:style-name="P36"><text:s/></text:p>
      <text:p text:style-name="P19"><text:span text:style-name="T135">GitGalaxy </text:span><text:span text:style-name="T136">calculate</text:span><text:span text:style-name="T135">s</text:span><text:span text:style-name="T136"> </text:span><text:span text:style-name="T134">exposure</text:span><text:span text:style-name="T135"> metrics</text:span><text:span text:style-name="T136"> in a non-linear fashion with equations and sub-equations. This is because there are multiple ways to</text:span><text:span text:style-name="T137"> achieve the same goal, like how to </text:span><text:soft-page-break/><text:span text:style-name="T138">adhere to safety standards</text:span><text:span text:style-name="T136">, and this allows </text:span><text:span text:style-name="T135">for</text:span><text:span text:style-name="T136"> </text:span><text:span text:style-name="T135">the </text:span><text:span text:style-name="T138">evaluation of </text:span><text:span text:style-name="T136">different </text:span><text:span text:style-name="T138">practices </text:span><text:span text:style-name="T137">and to weigh them differently. Sometimes our sub-equations pop up in multiple equations; for example both </text:span><text:span text:style-name="T139">the</text:span><text:span text:style-name="T137"> safety equation and the tech debt equation use the sub-equation of SafetyHits, which is a measure of </text:span><text:span text:style-name="T139">counts of </text:span><text:span text:style-name="T137">'try', 'catch', 'finally', 'assert', 'sanitize', </text:span><text:span text:style-name="T140">etc. </text:span></text:p>
      <text:h text:style-name="P7" text:outline-level="3"><text:bookmark-start text:name="__RefHeading___Toc11709_959624642"/><text:span text:style-name="T1">1.2 </text:span><text:span text:style-name="Strong_20_Emphasis"><text:span text:style-name="T78">Visualizing Complexity</text:span></text:span><text:bookmark-end text:name="__RefHeading___Toc11709_959624642"/></text:h>
      <text:p text:style-name="P21">GitGalaxy operates on the principle that source code <text:span text:style-name="T141">can be used as</text:span> a procedural generation seed. Just as a random string of text in Minecraft dictates the rise of mountains or the depth of oceans, your codebase's logic dictates the topology of the galaxy that emerges. We treat code not as a set of instructions to be compiled, but as <text:span text:style-name="T142">a seed</text:span> for a generative <text:span text:style-name="T141">galaxy</text:span>. </text:p>
      <text:p text:style-name="P21"><text:span text:style-name="T141">GitGalaxy </text:span><text:span text:style-name="T143">renders</text:span><text:span text:style-name="T141"> code bases with the following visual metaphors: </text:span></text:p>
      <text:list text:style-name="L4">
        <text:list-item>
          <text:list>
            <text:list-item>
              <text:p text:style-name="P62"><text:span text:style-name="T120">Files</text:span> <text:span text:style-name="T144">=</text:span> Stars orbiting around an unseen black hole</text:p>
            </text:list-item>
            <text:list-item>
              <text:p text:style-name="P73"><text:span text:style-name="Strong_20_Emphasis"><text:span text:style-name="T5">External libraries = </text:span></text:span><text:span text:style-name="Strong_20_Emphasis"><text:span text:style-name="T31">Rings around planets</text:span></text:span></text:p>
            </text:list-item>
            <text:list-item>
              <text:p text:style-name="P73"><text:span text:style-name="Strong_20_Emphasis"><text:span text:style-name="T5">File Relationships = </text:span></text:span><text:span text:style-name="Strong_20_Emphasis"><text:span text:style-name="T31">Relative locations </text:span></text:span><text:span text:style-name="Strong_20_Emphasis"><text:span text:style-name="T54">of stars </text:span></text:span><text:span text:style-name="Strong_20_Emphasis"><text:span text:style-name="T31">in </text:span></text:span><text:span text:style-name="Strong_20_Emphasis"><text:span text:style-name="T54">the </text:span></text:span><text:span text:style-name="Strong_20_Emphasis"><text:span text:style-name="T31">galaxy</text:span></text:span></text:p>
            </text:list-item>
            <text:list-item>
              <text:p text:style-name="P73"><text:span text:style-name="Strong_20_Emphasis"><text:span text:style-name="T5">Inbound imports = </text:span></text:span><text:span text:style-name="Strong_20_Emphasis"><text:span text:style-name="T55">A star’s pulse </text:span></text:span><text:span text:style-name="Strong_20_Emphasis"><text:span text:style-name="T31">rate</text:span></text:span></text:p>
            </text:list-item>
            <text:list-item>
              <text:p text:style-name="P73"><text:span text:style-name="Strong_20_Emphasis"><text:span text:style-name="T1">Functions</text:span></text:span><text:span text:style-name="Strong_20_Emphasis"><text:span text:style-name="T32"> </text:span></text:span><text:span text:style-name="Strong_20_Emphasis"><text:span text:style-name="T42">=</text:span></text:span><text:span text:style-name="Strong_20_Emphasis"><text:span text:style-name="T32"> </text:span></text:span><text:span text:style-name="Strong_20_Emphasis"><text:span text:style-name="T31">Satellites</text:span></text:span><text:span text:style-name="Strong_20_Emphasis"><text:span text:style-name="T1"> </text:span></text:span><text:span text:style-name="Strong_20_Emphasis"><text:span text:style-name="T31">orbit stars</text:span></text:span></text:p>
            </text:list-item>
            <text:list-item>
              <text:p text:style-name="P63"><text:span text:style-name="T119">Function </text:span><text:span text:style-name="T129">c</text:span><text:span text:style-name="T119">omplexity </text:span><text:span text:style-name="T111">=</text:span><text:span text:style-name="T119"> </text:span><text:span text:style-name="T109">Arrangement, number and size of satellites in a unit</text:span></text:p>
            </text:list-item>
            <text:list-item>
              <text:p text:style-name="P63"><text:span text:style-name="T119">Function length = </text:span><text:span text:style-name="T109">Satellite orbital distance</text:span></text:p>
            </text:list-item>
            <text:list-item>
              <text:p text:style-name="P64"><text:span text:style-name="T120">Function Arguments</text:span><text:span text:style-name="T109"> = satellite size</text:span></text:p>
            </text:list-item>
            <text:list-item>
              <text:p text:style-name="P61">File Complexity = <text:span text:style-name="T111">Star shape</text:span></text:p>
            </text:list-item>
            <text:list-item>
              <text:p text:style-name="P63"><text:span text:style-name="T119">Tech debt</text:span> <text:span text:style-name="T124">exposure </text:span>= color overlay</text:p>
            </text:list-item>
            <text:list-item>
              <text:p text:style-name="P63"><text:span text:style-name="T119">Documentation </text:span><text:span text:style-name="T124">exposure</text:span> = color overlay</text:p>
            </text:list-item>
            <text:list-item>
              <text:p text:style-name="P63"><text:span text:style-name="T119">Cognitiv</text:span><text:span text:style-name="T130">e L</text:span><text:span text:style-name="T119">oad </text:span><text:span text:style-name="T124">exposure</text:span>= <text:span text:style-name="T109">color overlay</text:span></text:p>
            </text:list-item>
            <text:list-item>
              <text:p text:style-name="P63"><text:span text:style-name="T119">Safety </text:span><text:span text:style-name="T124">exposure</text:span> = <text:span text:style-name="T109">color overlay</text:span></text:p>
            </text:list-item>
            <text:list-item>
              <text:p text:style-name="P63"><text:span text:style-name="T119">Testing </text:span><text:span text:style-name="T124">exposure</text:span> = <text:span text:style-name="T109">color overlay</text:span></text:p>
            </text:list-item>
            <text:list-item>
              <text:p text:style-name="P63"><text:span text:style-name="T120">API </text:span><text:span text:style-name="T125">e</text:span><text:span text:style-name="T120">xposure</text:span> = <text:span text:style-name="T145">color overlay</text:span></text:p>
            </text:list-item>
            <text:list-item>
              <text:p text:style-name="P65"><text:span text:style-name="T120">Concurrency </text:span><text:span text:style-name="T125">e</text:span><text:span text:style-name="T120">xposure</text:span> = color overlay</text:p>
            </text:list-item>
            <text:list-item>
              <text:p text:style-name="P65"><text:span text:style-name="T120">State Flux </text:span><text:span text:style-name="T125">e</text:span><text:span text:style-name="T120">xposure </text:span>= color overlay</text:p>
            </text:list-item>
            <text:list-item>
              <text:p text:style-name="P66"><text:span text:style-name="T126">Private Info </text:span><text:span text:style-name="T125">e</text:span><text:span text:style-name="T120">xposure</text:span> = color overlay</text:p>
            </text:list-item>
            <text:list-item>
              <text:p text:style-name="P67"><text:span text:style-name="T119">Churn</text:span><text:span text:style-name="T109"> = color overlay</text:span></text:p>
            </text:list-item>
            <text:list-item>
              <text:p text:style-name="P67"><text:span text:style-name="T120">Commit Heat</text:span> = <text:span text:style-name="T109">color overlay</text:span></text:p>
            </text:list-item>
            <text:list-item>
              <text:p text:style-name="P69">Languages used <text:span text:style-name="T111">= color overlay</text:span></text:p>
            </text:list-item>
            <text:list-item>
              <text:p text:style-name="P70">Authorship<text:span text:style-name="T111"> = color overlay</text:span></text:p>
            </text:list-item>
            <text:list-item>
              <text:p text:style-name="P68"><text:span text:style-name="T127">Audit</text:span><text:span text:style-name="T120"> </text:span><text:span text:style-name="T125">e</text:span><text:span text:style-name="T120">xposure </text:span><text:span text:style-name="T109">= color overlay</text:span></text:p>
            </text:list-item>
          </text:list>
        </text:list-item>
      </text:list>
      <text:p text:style-name="P47"><text:soft-page-break/></text:p>
      <text:h text:style-name="P16" text:outline-level="3"><text:bookmark-start text:name="__RefHeading___Toc11711_959624642"/>1.3 System Architecture: High-Level Stack<text:bookmark-end text:name="__RefHeading___Toc11711_959624642"/></text:h>
      <text:p text:style-name="P10"><text:span text:style-name="T1">The application utilizes a concern-separated architecture designed to bridge raw forensic data with cinematic visualization. The primary deployment model is a </text:span><text:span text:style-name="Strong_20_Emphasis"><text:span text:style-name="T1">Client-Side "Zero-Trust" Application</text:span></text:span><text:span text:style-name="T1"> (Open Source), with an optional </text:span><text:span text:style-name="Strong_20_Emphasis"><text:span text:style-name="T1">Enterprise Backend.</text:span></text:span></text:p>
      <text:p text:style-name="P14"><text:span text:style-name="Strong_20_Emphasis"><text:span text:style-name="T1">The Open-Source Core (Browser-Based Engine):</text:span></text:span></text:p>
      <text:list text:style-name="L5">
        <text:list-item>
          <text:p text:style-name="P74"><text:span text:style-name="Source_20_Text"><text:span text:style-name="T1">scanner.worker.js</text:span></text:span><text:span text:style-name="Strong_20_Emphasis"><text:span text:style-name="T1"> (The Primary Engine):</text:span></text:span><text:span text:style-name="T1"> The heart of the free version. It runs in a background Web Worker to perform 100% local analysis. It digests regex hits and calculates </text:span><text:span text:style-name="T79">risk exposures </text:span><text:span text:style-name="T1">without transmitting code to a server.</text:span></text:p>
        </text:list-item>
        <text:list-item>
          <text:p text:style-name="P74"><text:span text:style-name="Source_20_Text"><text:span text:style-name="T1">scanner_config.js</text:span></text:span><text:span text:style-name="Strong_20_Emphasis"><text:span text:style-name="T1"> (The Rulebook):</text:span></text:span><text:span text:style-name="T1"> A ported, JavaScript-native registry of heuristic patterns. It includes the standard Regex library for 18+ languages.</text:span></text:p>
        </text:list-item>
        <text:list-item>
          <text:p text:style-name="P74"><text:span text:style-name="Source_20_Text"><text:span text:style-name="T1">zip_loader.js</text:span></text:span><text:span text:style-name="Strong_20_Emphasis"><text:span text:style-name="T1"> (The Ingestion Layer):</text:span></text:span><text:span text:style-name="T1"> Handles the "Zero-Trust" unpacking of repositories directly in browser memory.</text:span></text:p>
        </text:list-item>
      </text:list>
      <text:p text:style-name="P14"><text:span text:style-name="Strong_20_Emphasis"><text:span text:style-name="T1">The Bridge (Data Schema):</text:span></text:span></text:p>
      <text:list text:style-name="L6">
        <text:list-item>
          <text:p text:style-name="P75"><text:span text:style-name="Source_20_Text"><text:span text:style-name="T1">result.json</text:span></text:span><text:span text:style-name="Strong_20_Emphasis"><text:span text:style-name="T1"> (The Interface Contract):</text:span></text:span><text:span text:style-name="T1"> While the user never sees this file in the web version, it acts as the strict data schema that decouples the logic from the rendering.</text:span></text:p>
          <text:list>
            <text:list-item>
              <text:p text:style-name="P75"><text:span text:style-name="Strong_20_Emphasis"><text:span text:style-name="T1">In Web Mode:</text:span></text:span><text:span text:style-name="T1"> It exists as an ephemeral in-memory object passed from the Worker to the Main Thread via </text:span><text:span text:style-name="Source_20_Text"><text:span text:style-name="T1">postMessage</text:span></text:span><text:span text:style-name="T1">.</text:span></text:p>
            </text:list-item>
            <text:list-item>
              <text:p text:style-name="P75"><text:span text:style-name="Strong_20_Emphasis"><text:span text:style-name="T1">In Enterprise Mode:</text:span></text:span><text:span text:style-name="T1"> It is serialized to disk for CI/CD reporting </text:span><text:span text:style-name="T79">or trends over time analyses. </text:span></text:p>
            </text:list-item>
            <text:list-item>
              <text:p text:style-name="P75"><text:span text:style-name="Strong_20_Emphasis"><text:span text:style-name="T1">Role:</text:span></text:span><text:span text:style-name="T1"> It carries the unified payload for physics coordinates and </text:span><text:span text:style-name="Strong_20_Emphasis"><text:span text:style-name="T43">risk exposure</text:span></text:span><text:span text:style-name="T1">, ensuring the 3D Viewer behaves identically regardless of the source.</text:span></text:p>
            </text:list-item>
          </text:list>
        </text:list-item>
      </text:list>
      <text:p text:style-name="P14"><text:span text:style-name="Strong_20_Emphasis"><text:span text:style-name="T1">The Viewer (Frontend):</text:span></text:span></text:p>
      <text:list text:style-name="L7">
        <text:list-item>
          <text:p text:style-name="P76"><text:span text:style-name="Source_20_Text"><text:span text:style-name="T1">engine-3d.js</text:span></text:span><text:span text:style-name="Strong_20_Emphasis"><text:span text:style-name="T1"> (The Visualizer):</text:span></text:span><text:span text:style-name="T1"> A Three.js WebGL </text:span><text:span text:style-name="T80">engine that displays the spatial and color information of a codebase into an interactive non-numeric dashboard.</text:span></text:p>
        </text:list-item>
      </text:list>
      <text:h text:style-name="P16" text:outline-level="3"><text:bookmark-start text:name="__RefHeading___Toc11713_959624642"/>1.4 System File Map: Backend (Scanner) vs. Frontend (Viewer)<text:bookmark-end text:name="__RefHeading___Toc11713_959624642"/></text:h>
      <text:p text:style-name="P39"/>
      <text:p text:style-name="P39">ROOT/</text:p>
      <text:p text:style-name="P39">├── index.html <text:s text:c="16"/># Main Entry Point (UI Shell &amp; Canvas Container)</text:p>
      <text:p text:style-name="P39"><text:soft-page-break/>├── app.py <text:s text:c="20"/># [Enterprise] Python Server for LAN access / Backend routing</text:p>
      <text:p text:style-name="P39">├── LICENSE <text:s text:c="19"/># PolyForm Noncommercial License 1.0.0</text:p>
      <text:p text:style-name="P39">│</text:p>
      <text:p text:style-name="P39">├── backend/ <text:s text:c="18"/># [Enterprise] The GitGalaxy Physics Pipeline (Offline Scanner)</text:p>
      <text:p text:style-name="P39">│ <text:s text:c="2"/>├── galaxyscope.py <text:s text:c="8"/># The Orchestrator (Main chassis connecting all modules)</text:p>
      <text:p text:style-name="P39">│ <text:s text:c="2"/>├── gitgalaxy_standards_v011.py <text:s/># The Master Registry (Regex definitions and Universal Laws)</text:p>
      <text:p text:style-name="P39">│ <text:s text:c="2"/>│</text:p>
      <text:p text:style-name="P39">│ <text:s text:c="2"/># --- The Optical Pipeline Modules ---</text:p>
      <text:p text:style-name="P39">│ <text:s text:c="2"/>├── chronometer.py <text:s text:c="8"/># Phase 0.0: Temporal Telemetry (Author &amp; Churn mapping)</text:p>
      <text:p text:style-name="P39">│ <text:s text:c="2"/>├── aperture.py <text:s text:c="11"/># Phase 0.1: The Solar Shield (Ingestion &amp; Filtering)</text:p>
      <text:p text:style-name="P39">│ <text:s text:c="2"/>├── guidestar_lens.py <text:s text:c="5"/># Phase 0.5: Alignment &amp; Context Prioritization</text:p>
      <text:p text:style-name="P39">│ <text:s text:c="2"/>├── language_lens.py <text:s text:c="6"/># Phase 1: The Entity Census (Bayesian Identity Locks)</text:p>
      <text:p text:style-name="P39">│ <text:s text:c="2"/>├── prism.py <text:s text:c="14"/># Phase 2: Structural Refractor (Logic vs. Literature split)</text:p>
      <text:p text:style-name="P39">│ <text:s text:c="2"/>├── detector.py <text:s text:c="11"/># Phase 3: The Primary Detector (High-speed regex hit counting)</text:p>
      <text:p text:style-name="P39">│ <text:s text:c="2"/>├── signal_processor.py <text:s text:c="3"/># Phase 4: Exposure Engine (Transforms hits into risk metrics)</text:p>
      <text:p text:style-name="P39">│ <text:s text:c="2"/>├── spectral_auditor.py <text:s text:c="3"/># Phase 7: Quality Control (Density checks &amp; Outlier relegation)</text:p>
      <text:p text:style-name="P39">│ <text:s text:c="2"/>├── cartographer.py <text:s text:c="7"/># Phase 7.5: Spatial Geometry (3D mapping calculations)</text:p>
      <text:p text:style-name="P39">│ <text:s text:c="2"/>├── audit_recorder.py <text:s text:c="5"/># Phase 8: Astrograph Auditor (Human-readable forensic logs)</text:p>
      <text:p text:style-name="P39">│ <text:s text:c="2"/>├── llm_recorder.py <text:s text:c="7"/># Phase 8.5: AI Translation (SQLite &amp; Markdown outputs)</text:p>
      <text:p text:style-name="P39">│ <text:s text:c="2"/>└── gpu_recorder.py <text:s text:c="7"/># Phase 9: The Vectorizer (Columnar pivots for WebGL performance)</text:p>
      <text:p text:style-name="P39">│</text:p>
      <text:p text:style-name="P39">├── js/ <text:s text:c="23"/># Client-Side Logic (Frontend Visualizer)</text:p>
      <text:p text:style-name="P39">│ <text:s text:c="2"/>├── main.js <text:s text:c="15"/># Main Controller (UI &lt;-&gt; Engine handshakes)</text:p>
      <text:p text:style-name="P39">│ <text:s text:c="2"/>└── core/ <text:s text:c="17"/># The WebGL Visualization Engine</text:p>
      <text:p text:style-name="P39">│ <text:s text:c="6"/>├── galaxy-engine.js <text:s text:c="2"/># Physics Core (Three.js scene management)</text:p>
      <text:p text:style-name="P39">│ <text:s text:c="6"/>├── data-parser.js <text:s text:c="4"/># Decodes columnar GPU telemetry from the backend</text:p>
      <text:p text:style-name="P39">│ <text:s text:c="6"/>├── materials.js <text:s text:c="6"/># Visual Cortex (Data Focus Protocol &amp; "Ghost Mode")</text:p>
      <text:p text:style-name="P39">│ <text:s text:c="6"/>└── phase-6-shaders.js # Custom WebGL shaders for high-performance rendering</text:p>
      <text:p text:style-name="P39">│</text:p>
      <text:p text:style-name="P39">├── config/ <text:s text:c="19"/># Shared Configuration</text:p>
      <text:p text:style-name="P39">│ <text:s text:c="2"/>└── colors.js <text:s text:c="13"/># Palette Registry (Behavior, Language, Archetype mapping)</text:p>
      <text:p text:style-name="P39">│</text:p>
      <text:p text:style-name="P39">├── css/ <text:s text:c="22"/># Styling &amp; HUD Layout</text:p>
      <text:p text:style-name="P39">│ <text:s text:c="2"/>├── input.css <text:s text:c="13"/># Tailwind input source</text:p>
      <text:p text:style-name="P39">│ <text:s text:c="2"/>├── output.css <text:s text:c="12"/># Compiled Tailwind definitions</text:p>
      <text:p text:style-name="P39">│ <text:s text:c="2"/>└── styles.css <text:s text:c="12"/># Custom overrides and animations</text:p>
      <text:p text:style-name="P39">│</text:p>
      <text:p text:style-name="P39">├── data/ <text:s text:c="21"/># The Artifacts</text:p>
      <text:p text:style-name="P39">│ <text:s text:c="2"/>└── legendary/ <text:s text:c="12"/># Pre-baked JSONs for the Museum (Apollo 11, Voyager, etc.)</text:p>
      <text:p text:style-name="P39">│</text:p>
      <text:p text:style-name="P39">├── docs/ <text:s text:c="21"/># The Knowledge Base</text:p>
      <text:p text:style-name="P39"><text:soft-page-break/>│ <text:s text:c="2"/>├── pipeline.odt <text:s text:c="10"/># Core architectural manifesto</text:p>
      <text:p text:style-name="P39">│ <text:s text:c="2"/>├── Language Lens Specs.odt# Documentation for the Bayesian language engine</text:p>
      <text:p text:style-name="P39">│ <text:s text:c="2"/>└── ... (Assorted technical specs, checklists, and equation worksheets)</text:p>
      <text:p text:style-name="P39">│</text:p>
      <text:p text:style-name="P39">└── archive/ <text:s text:c="18"/># Deprecated prototypes and legacy logic</text:p>
      <text:p text:style-name="P39"><text:s text:c="4"/>└── ...</text:p>
      <text:p text:style-name="P9"><text:span text:style-name="Source_20_Text"><text:span text:style-name="T81"/></text:span></text:p>
      <text:h text:style-name="P17" text:outline-level="3"><text:bookmark-start text:name="__RefHeading___Toc32686_2209633182"/>1.5 The Security &amp; Privacy Protocol: Zero-Trust Local Analysis<text:bookmark-end text:name="__RefHeading___Toc32686_2209633182"/></text:h>
      <text:h text:style-name="P20" text:outline-level="4"><text:bookmark-start text:name="__RefHeading___Toc32688_2209633182"/>1.5.1 Overview: "Your Code Never Leaves Your Computer"<text:bookmark-end text:name="__RefHeading___Toc32688_2209633182"/></text:h>
      <text:p text:style-name="P14"><text:span text:style-name="T1">GitGalaxy is built on a </text:span><text:span text:style-name="Strong_20_Emphasis"><text:span text:style-name="T1">Zero-Trust Privacy Model</text:span></text:span><text:span text:style-name="T1">. GitGalaxy performs 100% of its scanning, vectorization, and rendering within the local browser environment.</text:span></text:p>
      <text:list text:style-name="L8">
        <text:list-item>
          <text:p text:style-name="P77"><text:span text:style-name="Strong_20_Emphasis"><text:span text:style-name="T1">No Data Transmission:</text:span></text:span><text:span text:style-name="T1"> Source code is never transmitted to any API, cloud database, or third-party service.</text:span></text:p>
        </text:list-item>
        <text:list-item>
          <text:p text:style-name="P77"><text:span text:style-name="Strong_20_Emphasis"><text:span text:style-name="T1">Ephemeral Memory Processing:</text:span></text:span><text:span text:style-name="T1"> Repositories are unpacked into a volatile memory buffer (RAM) and are automatically purged when the browser tab is closed.</text:span></text:p>
        </text:list-item>
        <text:list-item>
          <text:p text:style-name="P77"><text:span text:style-name="Strong_20_Emphasis"><text:span text:style-name="T1">Privacy-by-Design:</text:span></text:span><text:span text:style-name="T1"> Even when "uploading" a repository, the browser merely reads the local file into a Web Worker; the data remains behind the user's firewall at all times.</text:span></text:p>
        </text:list-item>
      </text:list>
      <text:h text:style-name="P20" text:outline-level="4"><text:bookmark-start text:name="__RefHeading___Toc32690_2209633182"/>1.5.2 The "Privacy Engine": ZipLoader.js<text:bookmark-end text:name="__RefHeading___Toc32690_2209633182"/></text:h>
      <text:p text:style-name="P14"><text:span text:style-name="T1">The technical cornerstone of this protocol is the client-side </text:span><text:span text:style-name="Strong_20_Emphasis"><text:span text:style-name="T1">ZipLoader</text:span></text:span><text:span text:style-name="T1">, which utilizes the JSZip library to handle repository ingestion safely:</text:span></text:p>
      <text:list text:style-name="L9">
        <text:list-item>
          <text:p text:style-name="P78"><text:span text:style-name="Strong_20_Emphasis"><text:span text:style-name="T1">Heuristic Unpacking:</text:span></text:span><text:span text:style-name="T1"> The loader identifies source files while strictly excluding binary blobs, junk folders (</text:span><text:span text:style-name="Source_20_Text"><text:span text:style-name="T1">node_modules</text:span></text:span><text:span text:style-name="T1">, </text:span><text:span text:style-name="Source_20_Text"><text:span text:style-name="T1">__pycache__</text:span></text:span><text:span text:style-name="T1">, </text:span><text:span text:style-name="Source_20_Text"><text:span text:style-name="T1">.git</text:span></text:span><text:span text:style-name="T1">), and build artifacts (</text:span><text:span text:style-name="Source_20_Text"><text:span text:style-name="T1">dist</text:span></text:span><text:span text:style-name="T1">, </text:span><text:span text:style-name="Source_20_Text"><text:span text:style-name="T1">vendor</text:span></text:span><text:span text:style-name="T1">).</text:span></text:p>
        </text:list-item>
        <text:list-item>
          <text:p text:style-name="P78"><text:span text:style-name="Strong_20_Emphasis"><text:span text:style-name="T1">Binary Shield:</text:span></text:span><text:span text:style-name="T1"> The loader implements a mandatory null-byte detection check (</text:span><text:span text:style-name="Source_20_Text"><text:span text:style-name="T1">indexOf('\0')</text:span></text:span><text:span text:style-name="T1">). If a file contains non-textual characters, it is immediately discarded to prevent memory corruption or the unintentional analysis of compiled binaries.</text:span></text:p>
        </text:list-item>
        <text:list-item>
          <text:p text:style-name="P78"><text:span text:style-name="Strong_20_Emphasis"><text:span text:style-name="T1">Exclusion Heuristics:</text:span></text:span><text:span text:style-name="T1"> To ensure performance and privacy, the loader prunes any path containing hidden files (starting with </text:span><text:span text:style-name="Source_20_Text"><text:span text:style-name="T1">.</text:span></text:span><text:span text:style-name="T1">) or common media/font extensions.</text:span></text:p>
        </text:list-item>
      </text:list>
      <text:h text:style-name="P20" text:outline-level="4"><text:bookmark-start text:name="__RefHeading___Toc32692_2209633182"/>1.5.3 Implementation Detail: Security Safeguards<text:bookmark-end text:name="__RefHeading___Toc32692_2209633182"/></text:h>
      <text:list text:style-name="L10">
        <text:list-item>
          <text:p text:style-name="P79"><text:span text:style-name="Strong_20_Emphasis"><text:span text:style-name="T1">In-Memory Sanitization:</text:span></text:span><text:span text:style-name="T1"> Code is read as string buffers. No persistent files are ever created on the local file system by the application.</text:span></text:p>
        </text:list-item>
        <text:list-item>
          <text:p text:style-name="P79"><text:soft-page-break/><text:span text:style-name="Strong_20_Emphasis"><text:span text:style-name="T1">Concurrency Protection:</text:span></text:span><text:span text:style-name="T1"> The </text:span><text:span text:style-name="Source_20_Text"><text:span text:style-name="T1">isProcessing</text:span></text:span><text:span text:style-name="T1"> guard prevents memory overflow by ensuring only one unpacking operation occurs at a time, protecting the user's browser stability during large-scale Tier 4 (Megastructure) scans.</text:span></text:p>
        </text:list-item>
      </text:list>
      <text:p text:style-name="P9"/>
      <text:h text:style-name="P15" text:outline-level="2"><text:bookmark-start text:name="__RefHeading___Toc11735_959624642"/><text:span text:style-name="T146">2</text:span>. <text:span text:style-name="T147">Converting code into space and color info</text:span><text:bookmark-end text:name="__RefHeading___Toc11735_959624642"/></text:h>
      <text:p text:style-name="P14"><text:span text:style-name="Emphasis"><text:span text:style-name="T148">Note: We have updated to attempt a function by function labeling for each of </text:span></text:span><text:span text:style-name="Emphasis"><text:span text:style-name="T144">the</text:span></text:span><text:span text:style-name="Emphasis"><text:span text:style-name="T148"> </text:span></text:span><text:span text:style-name="Emphasis"><text:span text:style-name="T149">complexity metrics for </text:span></text:span><text:span text:style-name="Emphasis"><text:span text:style-name="T148">and use a vectorized json to attempt to streamline this. </text:span></text:span><text:span text:style-name="Emphasis"><text:span text:style-name="T144">Risk exposure</text:span></text:span><text:span text:style-name="Emphasis"><text:span text:style-name="T149"> metrics like color are determined at the file level, not at the function level.</text:span></text:span></text:p>
      <text:h text:style-name="P7" text:outline-level="3"><text:bookmark-start text:name="__RefHeading___Toc139657_2813440148"/><text:span text:style-name="T82">2</text:span><text:span text:style-name="T1">.1 </text:span><text:span text:style-name="T83">How we represent complexity as physical structure</text:span> <text:bookmark-end text:name="__RefHeading___Toc139657_2813440148"/></text:h>
      <text:p text:style-name="P10"><text:span text:style-name="T1">Code complexity is mapped to </text:span><text:span text:style-name="Strong_20_Emphasis"><text:span text:style-name="T1">physical structure</text:span></text:span><text:span text:style-name="T1">, creating organic, distinct shapes for different </text:span><text:span text:style-name="T84">complexity</text:span><text:span text:style-name="T1"> patterns. </text:span><text:span text:style-name="T85">This representation of complexity does not depend on color. </text:span><text:span text:style-name="T84">They are summarized below. </text:span></text:p>
      <text:p text:style-name="P10"><text:span text:style-name="Source_20_Text"><text:span text:style-name="T84"/></text:span></text:p>
      <table:table table:name="Table1" table:style-name="Table1">
        <table:table-column table:style-name="Table1.A"/>
        <table:table-column table:style-name="Table1.B"/>
        <table:table-column table:style-name="Table1.C"/>
        <table:table-row>
          <table:table-cell table:style-name="Table1.A1" office:value-type="string">
            <text:p text:style-name="P13">Physical Attribute</text:p>
          </table:table-cell>
          <table:table-cell table:style-name="Table1.A1" office:value-type="string">
            <text:p text:style-name="P13">Code Metric (Heuristic)</text:p>
          </table:table-cell>
          <table:table-cell table:style-name="Table1.A1" office:value-type="string">
            <text:p text:style-name="P13">Visual Result (The "Look")</text:p>
          </table:table-cell>
        </table:table-row>
        <table:table-row>
          <table:table-cell table:style-name="Table1.A1" office:value-type="string">
            <text:p text:style-name="P12"><text:span text:style-name="Strong_20_Emphasis">Star’s Size</text:span></text:p>
          </table:table-cell>
          <table:table-cell table:style-name="Table1.A1" office:value-type="string">
            <text:p text:style-name="P12">Lines of Code (LOC) per File</text:p>
          </table:table-cell>
          <table:table-cell table:style-name="Table1.A1" office:value-type="string">
            <text:p text:style-name="P12"><text:span text:style-name="Strong_20_Emphasis">Mass.</text:span> Logarithmic scaling ensures that 10k+ LOC files appear as massive suns, while 10 LOC scripts remain small asteroids.</text:p>
          </table:table-cell>
        </table:table-row>
        <table:table-row>
          <table:table-cell table:style-name="Table1.A1" office:value-type="string">
            <text:p text:style-name="P12"><text:span text:style-name="Strong_20_Emphasis">Star’s Pulse Rate</text:span></text:p>
          </table:table-cell>
          <table:table-cell table:style-name="Table1.A1" office:value-type="string">
            <text:p text:style-name="P12">Inbound References (Popularity)</text:p>
          </table:table-cell>
          <table:table-cell table:style-name="Table1.A1" office:value-type="string">
            <text:p text:style-name="P12"><text:span text:style-name="Strong_20_Emphasis">Bioluminescence.</text:span> Core utilities pulse with a white-hot "heartbeat." Unreferenced files remain dim and static.</text:p>
          </table:table-cell>
        </table:table-row>
        <table:table-row>
          <table:table-cell table:style-name="Table1.A1" office:value-type="string">
            <text:p text:style-name="P12"><text:span text:style-name="Strong_20_Emphasis">Star’s Shape</text:span></text:p>
          </table:table-cell>
          <table:table-cell table:style-name="Table1.A1" office:value-type="string">
            <text:p text:style-name="P12">control flow ratio (File Level)</text:p>
          </table:table-cell>
          <table:table-cell table:style-name="Table1.A1" office:value-type="string">
            <text:p text:style-name="P12"><text:span text:style-name="Strong_20_Emphasis">Geometry.</text:span> Morphs from a smooth <text:span text:style-name="Strong_20_Emphasis">Sphere</text:span> (Declarative/Data) to a sharp <text:span text:style-name="Strong_20_Emphasis">Tetrahedron</text:span> (Pure Algorithmic Logic).</text:p>
          </table:table-cell>
        </table:table-row>
        <table:table-row>
          <table:table-cell table:style-name="Table1.A1" office:value-type="string">
            <text:p text:style-name="P12"><text:span text:style-name="Strong_20_Emphasis">Satellite Unit</text:span></text:p>
          </table:table-cell>
          <table:table-cell table:style-name="Table1.A1" office:value-type="string">
            <text:p text:style-name="P12">Function Declaration</text:p>
          </table:table-cell>
          <table:table-cell table:style-name="Table1.A1" office:value-type="string">
            <text:p text:style-name="P12"><text:span text:style-name="Strong_20_Emphasis">Moons.</text:span> Every discrete function is materialized as a satellite orbiting its parent star. <text:span text:style-name="T150">Limits for monorepos. </text:span></text:p>
          </table:table-cell>
        </table:table-row>
        <table:table-row>
          <table:table-cell table:style-name="Table1.A1" office:value-type="string">
            <text:p text:style-name="P12"><text:span text:style-name="Strong_20_Emphasis">Satellite Distance</text:span></text:p>
          </table:table-cell>
          <table:table-cell table:style-name="Table1.A1" office:value-type="string">
            <text:p text:style-name="P12">Lines of Code (LOC) per Function</text:p>
          </table:table-cell>
          <table:table-cell table:style-name="Table1.A1" office:value-type="string">
            <text:p text:style-name="P12"><text:span text:style-name="Strong_20_Emphasis">Orbital Reach.</text:span> Long functions reach further into the void; small stubs orbit tightly near the star’s surface.</text:p>
          </table:table-cell>
        </table:table-row>
        <table:table-row>
          <table:table-cell table:style-name="Table1.A1" office:value-type="string">
            <text:p text:style-name="P12"><text:span text:style-name="Strong_20_Emphasis">Number of Satellites</text:span></text:p>
          </table:table-cell>
          <table:table-cell table:style-name="Table1.A1" office:value-type="string">
            <text:p text:style-name="P12">Cyclomatic Complexity</text:p>
          </table:table-cell>
          <table:table-cell table:style-name="Table1.A1" office:value-type="string">
            <text:p text:style-name="P12"><text:span text:style-name="Strong_20_Emphasis">Fractal Density.</text:span> Highly complex functions spawn sub-clusters or dense swarms of satellites, creating a "thorny" silhouette.</text:p>
          </table:table-cell>
        </table:table-row>
        <table:table-row>
          <table:table-cell table:style-name="Table1.A1" office:value-type="string">
            <text:p text:style-name="P12"><text:span text:style-name="Strong_20_Emphasis">Satellite Position</text:span></text:p>
          </table:table-cell>
          <table:table-cell table:style-name="Table1.A1" office:value-type="string">
            <text:p text:style-name="P12">control flow ratio (Function Level)</text:p>
          </table:table-cell>
          <table:table-cell table:style-name="Table1.A1" office:value-type="string">
            <text:p text:style-name="P12"><text:span text:style-name="Strong_20_Emphasis">Branching Angle.</text:span> Sharp, jagged angles (&lt;45°) indicate complex control flow; 90° "Circuit Board" patterns indicate linear flow.</text:p>
          </table:table-cell>
        </table:table-row>
        <table:table-row>
          <table:table-cell table:style-name="Table1.A1" office:value-type="string">
            <text:p text:style-name="P12"><text:span text:style-name="Strong_20_Emphasis">Satellite Size</text:span></text:p>
          </table:table-cell>
          <table:table-cell table:style-name="Table1.A1" office:value-type="string">
            <text:p text:style-name="P12">Argument Count</text:p>
          </table:table-cell>
          <table:table-cell table:style-name="Table1.A1" office:value-type="string">
            <text:p text:style-name="P12"><text:span text:style-name="Strong_20_Emphasis">Volume.</text:span> Large moons represent "Heavy" functions with many inputs; small dots represent lightweight, encapsulated utilities.</text:p>
          </table:table-cell>
        </table:table-row>
        <text:soft-page-break/>
        <table:table-row>
          <table:table-cell table:style-name="Table1.A1" office:value-type="string">
            <text:p text:style-name="P12"><text:span text:style-name="Strong_20_Emphasis">Star’s Rings</text:span></text:p>
          </table:table-cell>
          <table:table-cell table:style-name="Table1.A1" office:value-type="string">
            <text:p text:style-name="P12">External Library Imports</text:p>
          </table:table-cell>
          <table:table-cell table:style-name="Table1.A1" office:value-type="string">
            <text:p text:style-name="P12"><text:span text:style-name="Strong_20_Emphasis">Accretion Disks.</text:span> Files tethered to many external dependencies manifest glowing rings, symbolizing a large "Gravity Well."</text:p>
          </table:table-cell>
        </table:table-row>
        <table:table-row>
          <table:table-cell table:style-name="Table1.A1" office:value-type="string">
            <text:p text:style-name="P12"><text:span text:style-name="Strong_20_Emphasis">Star’s Position</text:span></text:p>
          </table:table-cell>
          <table:table-cell table:style-name="Table1.A1" office:value-type="string">
            <text:p text:style-name="P12">Semantic Affinity (Directory/Path)</text:p>
          </table:table-cell>
          <table:table-cell table:style-name="Table1.A1" office:value-type="string">
            <text:p text:style-name="P12"><text:span text:style-name="Strong_20_Emphasis">Neighborhoods.</text:span> Files are grouped into sectoral clusters based on folder structure, creating distinct "Auth," "UI," and "API" continents.</text:p>
          </table:table-cell>
        </table:table-row>
      </table:table>
      <text:p text:style-name="P10"><text:span text:style-name="Source_20_Text"><text:span text:style-name="T1"/></text:span></text:p>
      <text:h text:style-name="P16" text:outline-level="3"><text:bookmark-start text:name="__RefHeading___Toc11747_959624642"/><text:span text:style-name="T146">2</text:span>.2 <text:span text:style-name="T136">Color Labeling Equations</text:span><text:bookmark-end text:name="__RefHeading___Toc11747_959624642"/></text:h>
      <text:h text:style-name="P8" text:outline-level="4"><text:bookmark-start text:name="__RefHeading___Toc49783_1155106909"/><text:span text:style-name="Strong_20_Emphasis"><text:span text:style-name="T146">2</text:span></text:span><text:span text:style-name="Strong_20_Emphasis"><text:span text:style-name="T151">.2.A. Overview of methodology</text:span></text:span><text:bookmark-end text:name="__RefHeading___Toc49783_1155106909"/></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7"><text:span text:style-name="T152">Labeling </text:span>Mode</text:p>
          </table:table-cell>
          <table:table-cell table:style-name="Table2.A1" office:value-type="string">
            <text:p text:style-name="P40"><text:span text:style-name="Strong_20_Emphasis"><text:span text:style-name="T153">What It Checks</text:span></text:span></text:p>
          </table:table-cell>
          <table:table-cell table:style-name="Table2.A1" office:value-type="string">
            <text:p text:style-name="P27">Color</text:p>
          </table:table-cell>
          <table:table-cell table:style-name="Table2.A1" office:value-type="string">
            <text:p text:style-name="P28">Visual Effect</text:p>
          </table:table-cell>
        </table:table-row>
        <table:table-row>
          <table:table-cell table:style-name="Table2.A1" office:value-type="string">
            <text:p text:style-name="P41"><text:span text:style-name="Strong_20_Emphasis"><text:span text:style-name="T86">Ownership </text:span></text:span></text:p>
          </table:table-cell>
          <table:table-cell table:style-name="Table2.A1" office:value-type="string">
            <text:p text:style-name="P43"><text:span text:style-name="T119">Who wrote this?</text:span> Shows if a file is owned by one person (Solo) or everyone (Collective).</text:p>
          </table:table-cell>
          <table:table-cell table:style-name="Table2.A1" office:value-type="string">
            <text:p text:style-name="P41"><text:span text:style-name="Strong_20_Emphasis"><text:span text:style-name="T89"><text:s/>White</text:span></text:span></text:p>
          </table:table-cell>
          <table:table-cell table:style-name="Table2.A1" office:value-type="string">
            <text:p text:style-name="P43"><text:span text:style-name="T119">Rainbow.</text:span> Single colors are individuals; bright White is a team effort.</text:p>
          </table:table-cell>
        </table:table-row>
        <table:table-row>
          <table:table-cell table:style-name="Table2.A1" office:value-type="string">
            <text:p text:style-name="P41"><text:span text:style-name="Strong_20_Emphasis"><text:span text:style-name="T86">Cognitive Load </text:span></text:span></text:p>
          </table:table-cell>
          <table:table-cell table:style-name="Table2.A1" office:value-type="string">
            <text:p text:style-name="P43"><text:span text:style-name="T119">How hard is it to read?</text:span> Highlights confusing logic that requires high mental effort.</text:p>
          </table:table-cell>
          <table:table-cell table:style-name="Table2.A1" office:value-type="string">
            <text:p text:style-name="P41"><text:span text:style-name="Strong_20_Emphasis"><text:span text:style-name="T90"><text:s/></text:span></text:span><text:span text:style-name="Strong_20_Emphasis"><text:span text:style-name="T89">P</text:span></text:span><text:span text:style-name="Strong_20_Emphasis"><text:span text:style-name="T90">urple</text:span></text:span></text:p>
          </table:table-cell>
          <table:table-cell table:style-name="Table2.A1" office:value-type="string">
            <text:p text:style-name="P43"><text:span text:style-name="T119">Purple.</text:span> The deeper the purple, the harder the logic is to follow.</text:p>
          </table:table-cell>
        </table:table-row>
        <table:table-row>
          <table:table-cell table:style-name="Table2.A1" office:value-type="string">
            <text:p text:style-name="P41"><text:span text:style-name="Strong_20_Emphasis"><text:span text:style-name="T86">Churn</text:span></text:span><text:span text:style-name="Strong_20_Emphasis"><text:span text:style-name="T88"> </text:span></text:span></text:p>
          </table:table-cell>
          <table:table-cell table:style-name="Table2.A1" office:value-type="string">
            <text:p text:style-name="P43"><text:span text:style-name="T119">How often does it change?</text:span> Identifies files that are constantly being rewritten or patched.</text:p>
          </table:table-cell>
          <table:table-cell table:style-name="Table2.A1" office:value-type="string">
            <text:p text:style-name="P41"><text:span text:style-name="Strong_20_Emphasis"><text:span text:style-name="T90">Orange</text:span></text:span></text:p>
          </table:table-cell>
          <table:table-cell table:style-name="Table2.A1" office:value-type="string">
            <text:p text:style-name="P43"><text:span text:style-name="T119">Orange.</text:span> Bright orange indicates a file that refuses to settle down.</text:p>
          </table:table-cell>
        </table:table-row>
        <table:table-row>
          <table:table-cell table:style-name="Table2.A1" office:value-type="string">
            <text:p text:style-name="P41"><text:span text:style-name="Strong_20_Emphasis"><text:span text:style-name="T86">Safety </text:span></text:span></text:p>
          </table:table-cell>
          <table:table-cell table:style-name="Table2.A1" office:value-type="string">
            <text:p text:style-name="P43"><text:span text:style-name="T119">Is it bulletproof?</text:span> Checks for defensive code (error handling) vs. risky code.</text:p>
          </table:table-cell>
          <table:table-cell table:style-name="Table2.A1" office:value-type="string">
            <text:p text:style-name="P41"><text:span text:style-name="Strong_20_Emphasis"><text:span text:style-name="T89">Red </text:span></text:span></text:p>
            <text:p text:style-name="P41"><text:span text:style-name="Strong_20_Emphasis"><text:span text:style-name="T89">to</text:span></text:span></text:p>
            <text:p text:style-name="P41"><text:span text:style-name="Strong_20_Emphasis"><text:span text:style-name="T88"><text:s/>Cyan</text:span></text:span><text:span text:style-name="T88"> </text:span></text:p>
          </table:table-cell>
          <table:table-cell table:style-name="Table2.A1" office:value-type="string">
            <text:p text:style-name="P43"><text:span text:style-name="T119">Red to Cyan.</text:span> Red is fragile/risky; Cyan is fortified/safe.</text:p>
          </table:table-cell>
        </table:table-row>
        <table:table-row>
          <table:table-cell table:style-name="Table2.A1" office:value-type="string">
            <text:p text:style-name="P41"><text:span text:style-name="Strong_20_Emphasis"><text:span text:style-name="T87">Tech Debt</text:span></text:span></text:p>
          </table:table-cell>
          <table:table-cell table:style-name="Table2.A1" office:value-type="string">
            <text:p text:style-name="P43"><text:span text:style-name="T119">Are there shortcuts?</text:span> Scans for "TODOs", "Hacks", and temporary fixes.</text:p>
          </table:table-cell>
          <table:table-cell table:style-name="Table2.A1" office:value-type="string">
            <text:p text:style-name="P41"><text:span text:style-name="Strong_20_Emphasis"><text:span text:style-name="T88">Red</text:span></text:span><text:span text:style-name="T88"> </text:span></text:p>
          </table:table-cell>
          <table:table-cell table:style-name="Table2.A1" office:value-type="string">
            <text:p text:style-name="P43"><text:span text:style-name="T119">Red.</text:span> Glowing red highlights unfinished business.</text:p>
          </table:table-cell>
        </table:table-row>
        <table:table-row>
          <table:table-cell table:style-name="Table2.A1" office:value-type="string">
            <text:p text:style-name="P42"><text:span text:style-name="Strong_20_Emphasis"><text:span text:style-name="T32">Doc Mode</text:span></text:span></text:p>
          </table:table-cell>
          <table:table-cell table:style-name="Table2.A1" office:value-type="string">
            <text:p text:style-name="P43"><text:span text:style-name="T119">Is it explained?</text:span> Measures the quality of instruction manuals and comments.</text:p>
          </table:table-cell>
          <table:table-cell table:style-name="Table2.A1" office:value-type="string">
            <text:p text:style-name="P41"><text:span text:style-name="Strong_20_Emphasis"><text:span text:style-name="T88">Library Gold</text:span></text:span><text:span text:style-name="T88"> </text:span></text:p>
          </table:table-cell>
          <table:table-cell table:style-name="Table2.A1" office:value-type="string">
            <text:p text:style-name="P43"><text:span text:style-name="T119">Gold.</text:span> Bright gold indicates library-grade documentation.</text:p>
          </table:table-cell>
        </table:table-row>
        <table:table-row>
          <table:table-cell table:style-name="Table2.A1" office:value-type="string">
            <text:p text:style-name="P42"><text:span text:style-name="Strong_20_Emphasis"><text:span text:style-name="T32">Commit Heat</text:span></text:span></text:p>
          </table:table-cell>
          <table:table-cell table:style-name="Table2.A1" office:value-type="string">
            <text:p text:style-name="P43"><text:span text:style-name="T119">Is it fresh?</text:span> Shows where <text:soft-page-break/>work is happening <text:span text:style-name="T154">right now</text:span> vs. months ago.</text:p>
          </table:table-cell>
          <table:table-cell table:style-name="Table2.A1" office:value-type="string">
            <text:p text:style-name="P23">Green</text:p>
          </table:table-cell>
          <table:table-cell table:style-name="Table2.A1" office:value-type="string">
            <text:p text:style-name="P43"><text:span text:style-name="T119">Green.</text:span> Radioactive green means it <text:soft-page-break/>was edited today.</text:p>
          </table:table-cell>
        </table:table-row>
        <table:table-row>
          <table:table-cell table:style-name="Table2.A1" office:value-type="string">
            <text:p text:style-name="P42"><text:span text:style-name="Strong_20_Emphasis"><text:span text:style-name="T32">Test Coverage</text:span></text:span></text:p>
          </table:table-cell>
          <table:table-cell table:style-name="Table2.A1" office:value-type="string">
            <text:p text:style-name="P43"><text:span text:style-name="T119">Is it verified?</text:span> Checks if the code has a safety net of tests proving it works.</text:p>
          </table:table-cell>
          <table:table-cell table:style-name="Table2.A1" office:value-type="string">
            <text:p text:style-name="P24">Pink</text:p>
          </table:table-cell>
          <table:table-cell table:style-name="Table2.A1" office:value-type="string">
            <text:p text:style-name="P43"><text:span text:style-name="T119">Pink.</text:span> Glowing pink means the code is heavily tested.</text:p>
          </table:table-cell>
        </table:table-row>
        <table:table-row>
          <table:table-cell table:style-name="Table2.A1" office:value-type="string">
            <text:p text:style-name="P29"><text:bookmark-start text:name="__RefHeading___Toc9523_2831427032"/>Civil War<text:bookmark-end text:name="__RefHeading___Toc9523_2831427032"/></text:p>
          </table:table-cell>
          <table:table-cell table:style-name="Table2.A1" office:value-type="string">
            <text:p text:style-name="P43"><text:span text:style-name="T119">Tabs or Spaces?</text:span> Checks for indentation consistency.</text:p>
          </table:table-cell>
          <table:table-cell table:style-name="Table2.A1" office:value-type="string">
            <text:p text:style-name="P25">Green Vs. Yellow</text:p>
          </table:table-cell>
          <table:table-cell table:style-name="Table2.A1" office:value-type="string">
            <text:p text:style-name="P43"><text:span text:style-name="T119">Green vs Yellow.</text:span> Blue indicates a messy mix of both.</text:p>
          </table:table-cell>
        </table:table-row>
        <table:table-row>
          <table:table-cell table:style-name="Table2.A1" office:value-type="string">
            <text:p text:style-name="P29"><text:bookmark-start text:name="__RefHeading___Toc9531_2831427032"/>Graveyard<text:bookmark-end text:name="__RefHeading___Toc9531_2831427032"/></text:p>
          </table:table-cell>
          <table:table-cell table:style-name="Table2.A1" office:value-type="string">
            <text:p text:style-name="P43"><text:span text:style-name="T119">Is there dead code?</text:span> Finds blocks of code that were commented out and abandoned.</text:p>
          </table:table-cell>
          <table:table-cell table:style-name="Table2.A1" office:value-type="string">
            <text:p text:style-name="P26">Purple</text:p>
          </table:table-cell>
          <table:table-cell table:style-name="Table2.A1" office:value-type="string">
            <text:p text:style-name="P43"><text:span text:style-name="T119">Purple.</text:span> A "haunted" purple glow indicates historical hoarding.</text:p>
          </table:table-cell>
        </table:table-row>
        <table:table-row>
          <table:table-cell table:style-name="Table2.A1" office:value-type="string">
            <text:p text:style-name="P30">API Exposure</text:p>
          </table:table-cell>
          <table:table-cell table:style-name="Table2.A1" office:value-type="string">
            <text:p text:style-name="P43"><text:span text:style-name="T119">Is it public?</text:span> Highlights the entry points where the system talks to the outside world.</text:p>
          </table:table-cell>
          <table:table-cell table:style-name="Table2.A1" office:value-type="string">
            <text:p text:style-name="P23">#ff007f</text:p>
            <text:p text:style-name="P23">Electric Rose</text:p>
          </table:table-cell>
          <table:table-cell table:style-name="Table2.A1" office:value-type="string">
            <text:p text:style-name="P43"><text:span text:style-name="T119">Electric Rose.</text:span> Indicates a public interface or endpoint.</text:p>
          </table:table-cell>
        </table:table-row>
        <table:table-row>
          <table:table-cell table:style-name="Table2.A1" office:value-type="string">
            <text:p text:style-name="P48">Concurrency Exposure</text:p>
          </table:table-cell>
          <table:table-cell table:style-name="Table2.A1" office:value-type="string">
            <text:p text:style-name="P43"><text:span text:style-name="T119">Is it multitasking?</text:span> Highlights complex timing, threads, or asynchronous logic.</text:p>
          </table:table-cell>
          <table:table-cell table:style-name="Table2.A1" office:value-type="string">
            <text:p text:style-name="P23">#7b2ff7 </text:p>
            <text:p text:style-name="P23"><text:span text:style-name="T155">E</text:span>lectric Ultraviolet</text:p>
          </table:table-cell>
          <table:table-cell table:style-name="Table2.A1" office:value-type="string">
            <text:p text:style-name="P43"><text:span text:style-name="T119">Ultraviolet.</text:span> Indicates potential race conditions or timing risks.</text:p>
          </table:table-cell>
        </table:table-row>
        <table:table-row table:style-name="Table2.14">
          <table:table-cell table:style-name="Table2.A1" office:value-type="string">
            <text:p text:style-name="P29">State Flux Exposure</text:p>
          </table:table-cell>
          <table:table-cell table:style-name="Table2.A1" office:value-type="string">
            <text:p text:style-name="P43"><text:span text:style-name="T119">Is the data changing?</text:span> Highlights variables that are constantly being modified/mutated.</text:p>
          </table:table-cell>
          <table:table-cell table:style-name="Table2.A1" office:value-type="string">
            <text:p text:style-name="P23">#ffb84e</text:p>
            <text:p text:style-name="P23">Clyde Orange</text:p>
          </table:table-cell>
          <table:table-cell table:style-name="Table2.A1" office:value-type="string">
            <text:p text:style-name="P43"><text:span text:style-name="T119">Clyde Orange.</text:span> Indicates "boiling" data that is hard to track.</text:p>
          </table:table-cell>
        </table:table-row>
      </table:table>
      <text:p text:style-name="P18"><text:span text:style-name="Strong_20_Emphasis"><text:span text:style-name="T1"/></text:span></text:p>
      <text:h text:style-name="P22" text:outline-level="4"><text:bookmark-start text:name="__RefHeading___Toc11765_959624642"/><text:span text:style-name="T146">2</text:span><text:span text:style-name="T155">.2.</text:span><text:span text:style-name="T139">B</text:span>. Sub-Equations<text:bookmark-end text:name="__RefHeading___Toc11765_959624642"/></text:h>
      <text:p text:style-name="P21">To ensure the equations above are actionable, the following variables are defined based on the scanner's regex hits:</text:p>
      <text:p text:style-name="P14"><text:bookmark text:name="p-rc_be5868252400bb32-684"/><text:span text:style-name="Strong_20_Emphasis"><text:span text:style-name="T5">branch_hits:</text:span></text:span><text:span text:style-name="Strong_20_Emphasis"><text:span text:style-name="T1"> Control flow constructs including conditionals (</text:span></text:span><text:span text:style-name="Source_20_Text">if</text:span><text:span text:style-name="Strong_20_Emphasis"><text:span text:style-name="T1">, </text:span></text:span><text:span text:style-name="Source_20_Text">switch</text:span><text:span text:style-name="Strong_20_Emphasis"><text:span text:style-name="T1">), loops (</text:span></text:span><text:span text:style-name="Source_20_Text">for</text:span><text:span text:style-name="Strong_20_Emphasis"><text:span text:style-name="T1">, </text:span></text:span><text:span text:style-name="Source_20_Text">while</text:span><text:span text:style-name="Strong_20_Emphasis"><text:span text:style-name="T1">), jumps (</text:span></text:span><text:span text:style-name="Source_20_Text">break</text:span><text:span text:style-name="Strong_20_Emphasis"><text:span text:style-name="T1">, </text:span></text:span><text:span text:style-name="Source_20_Text">throw</text:span><text:span text:style-name="Strong_20_Emphasis"><text:span text:style-name="T1">), and logical operators (</text:span></text:span><text:span text:style-name="Source_20_Text">&amp;&amp;</text:span><text:span text:style-name="Strong_20_Emphasis"><text:span text:style-name="T1">, </text:span></text:span><text:span text:style-name="Source_20_Text">||</text:span><text:span text:style-name="Strong_20_Emphasis"><text:span text:style-name="T1">) that divert execution paths. </text:span></text:span></text:p>
      <text:list text:style-name="L11">
        <text:list-item>
          <text:p text:style-name="P80"><text:bookmark text:name="p-rc_be5868252400bb32-685"/><text:span text:style-name="T119">args_hits:</text:span> Function signatures, parameter lists, input registers, or lambda arguments that define the data inputs for a logic block. </text:p>
        </text:list-item>
      </text:list>
      <text:list text:style-name="L12">
        <text:list-item>
          <text:p text:style-name="P81"><text:bookmark text:name="p-rc_be5868252400bb32-686"/><text:soft-page-break/><text:span text:style-name="T119">linear_hits:</text:span> Sequential flow markers, including variable declarations (<text:span text:style-name="Source_20_Text">const</text:span>, <text:span text:style-name="Source_20_Text">var</text:span>), imports, returns, and structural keywords that indicate non-branching logic. </text:p>
        </text:list-item>
      </text:list>
      <text:list text:style-name="L13">
        <text:list-item>
          <text:p text:style-name="P82"><text:bookmark text:name="p-rc_be5868252400bb32-687"/><text:span text:style-name="T119">func_start_hits:</text:span> The syntactic anchor identifying the beginning of a named function, method, subroutine, or procedure definition (excluding classes/interfaces). </text:p>
        </text:list-item>
      </text:list>
      <text:list text:style-name="L14">
        <text:list-item>
          <text:p text:style-name="P83"><text:bookmark text:name="p-rc_be5868252400bb32-688"/><text:span text:style-name="T119">class_start_hits:</text:span> The syntax that defines an object-oriented class, struct, record, or enum, driving API surface area calculations. </text:p>
        </text:list-item>
      </text:list>
      <text:list text:style-name="L15">
        <text:list-item>
          <text:p text:style-name="P84"><text:bookmark text:name="p-rc_be5868252400bb32-689"/><text:span text:style-name="T119">safety_hits:</text:span> Defensive constructs such as exception handling (<text:span text:style-name="Source_20_Text">try/catch</text:span>), type assertions, null checks, and memory protection mechanisms (<text:span text:style-name="Source_20_Text">readonly</text:span>). </text:p>
        </text:list-item>
      </text:list>
      <text:list text:style-name="L16">
        <text:list-item>
          <text:p text:style-name="P85"><text:bookmark text:name="p-rc_be5868252400bb32-690"/><text:span text:style-name="T119">safety_neg_hits:</text:span> Risk factors including error suppression, dynamic code execution (<text:span text:style-name="Source_20_Text">eval</text:span>), type-system bypasses (<text:span text:style-name="Source_20_Text">any</text:span>, <text:span text:style-name="Source_20_Text">!</text:span>), and unsafe pointer usage. </text:p>
        </text:list-item>
      </text:list>
      <text:list text:style-name="L17">
        <text:list-item>
          <text:p text:style-name="P86"><text:bookmark text:name="p-rc_be5868252400bb32-691"/><text:span text:style-name="T119">danger_hits:</text:span> Critical indicators of technical debt (<text:span text:style-name="Source_20_Text">TODO/FIXME</text:span>), destructive system calls (<text:span text:style-name="Source_20_Text">process.exit</text:span>), hardcoded secrets, or catastrophic failure modes. </text:p>
        </text:list-item>
      </text:list>
      <text:list text:style-name="L18">
        <text:list-item>
          <text:p text:style-name="P87"><text:bookmark text:name="p-rc_be5868252400bb32-692"/><text:span text:style-name="T119">io_hits:</text:span> Interactions with external boundaries, including file systems, network requests (<text:span text:style-name="Source_20_Text">fetch</text:span>), database queries, and hardware I/O. </text:p>
        </text:list-item>
      </text:list>
      <text:list text:style-name="L19">
        <text:list-item>
          <text:p text:style-name="P88"><text:bookmark text:name="p-rc_be5868252400bb32-693"/><text:span text:style-name="T119">api_hits:</text:span> Keywords identifying public interfaces (<text:span text:style-name="Source_20_Text">export</text:span>, <text:span text:style-name="Source_20_Text">public</text:span>), exported members, or globally accessible entry points that define surface area. </text:p>
        </text:list-item>
      </text:list>
      <text:list text:style-name="L20">
        <text:list-item>
          <text:p text:style-name="P89"><text:bookmark text:name="p-rc_be5868252400bb32-694"/><text:span text:style-name="T119">flux_hits:</text:span> Markers of state change, including variable assignment (<text:span text:style-name="Source_20_Text">let</text:span>, <text:span text:style-name="Source_20_Text">mut</text:span>), mutable collections, pointer updates, and side-effect triggers. </text:p>
        </text:list-item>
      </text:list>
      <text:list text:style-name="L21">
        <text:list-item>
          <text:p text:style-name="P90"><text:bookmark text:name="p-rc_be5868252400bb32-695"/><text:span text:style-name="T119">graveyard_hits:</text:span> Patterns detecting commented-out code blocks (<text:span text:style-name="Source_20_Text">// if</text:span>), legacy logic, or "zombie" code (<text:span text:style-name="Source_20_Text">// console.log</text:span>) that remains in the source file. </text:p>
        </text:list-item>
      </text:list>
      <text:list text:style-name="L22">
        <text:list-item>
          <text:p text:style-name="P91"><text:bookmark text:name="p-rc_be5868252400bb32-696"/><text:span text:style-name="T119">doc_hits:</text:span> Structured documentation syntax, including JSDoc (<text:span text:style-name="Source_20_Text">/**</text:span>), XML comments, and standard metadata tags describing code intent. </text:p>
        </text:list-item>
      </text:list>
      <text:list text:style-name="L23">
        <text:list-item>
          <text:p text:style-name="P92"><text:bookmark text:name="p-rc_be5868252400bb32-697"/><text:span text:style-name="T119">test_hits:</text:span> Framework-specific keywords for assertions, unit test definitions, mocks, and verification suites (<text:span text:style-name="Source_20_Text">describe</text:span>, <text:span text:style-name="Source_20_Text">assert</text:span>, <text:span text:style-name="Source_20_Text">mock</text:span>). </text:p>
        </text:list-item>
      </text:list>
      <text:list text:style-name="L24">
        <text:list-item>
          <text:p text:style-name="P93"><text:bookmark text:name="p-rc_be5868252400bb32-698"/><text:span text:style-name="T119">concurrency_hits:</text:span> Constructs for asynchronous execution (<text:span text:style-name="Source_20_Text">async/await</text:span>), threading, parallel processing, coroutines, and synchronization primitives. </text:p>
        </text:list-item>
      </text:list>
      <text:list text:style-name="L25">
        <text:list-item>
          <text:p text:style-name="P94"><text:bookmark text:name="p-rc_be5868252400bb32-699"/><text:span text:style-name="T119">ui_framework_hits:</text:span> Patterns specific to frontend or UI development, including component definitions, view bindings (<text:span text:style-name="Source_20_Text">document.getElementById</text:span>), and rendering logic. </text:p>
        </text:list-item>
      </text:list>
      <text:list text:style-name="L26">
        <text:list-item>
          <text:p text:style-name="P95"><text:bookmark text:name="p-rc_be5868252400bb32-700"/><text:span text:style-name="T119">closures_hits:</text:span> Syntax for anonymous functions, lambdas, blocks, or inline delegates that capture local context (<text:span text:style-name="Source_20_Text">=&gt;</text:span>). </text:p>
        </text:list-item>
      </text:list>
      <text:list text:style-name="L27">
        <text:list-item>
          <text:p text:style-name="P96"><text:bookmark text:name="p-rc_be5868252400bb32-701"/><text:span text:style-name="T119">globals_hits:</text:span> References to global scope (<text:span text:style-name="Source_20_Text">window.</text:span>, <text:span text:style-name="Source_20_Text">process.env</text:span>), environment variables, singletons, or system-wide shared state. </text:p>
        </text:list-item>
      </text:list>
      <text:list text:style-name="L28">
        <text:list-item>
          <text:p text:style-name="P97"><text:bookmark text:name="p-rc_be5868252400bb32-702"/><text:span text:style-name="T119">decorators_hits:</text:span> Annotations, attributes, or wrapper syntax used to modify or tag classes and methods with metadata (<text:span text:style-name="Source_20_Text">@Injectable</text:span>). </text:p>
        </text:list-item>
      </text:list>
      <text:list text:style-name="L29">
        <text:list-item>
          <text:p text:style-name="P98"><text:bookmark text:name="p-rc_be5868252400bb32-703"/><text:soft-page-break/><text:span text:style-name="T119">generics_hits:</text:span> Syntax defining type parameters (<text:span text:style-name="Source_20_Text">&lt;T&gt;</text:span>), templates, or polymorphic structures for type-agnostic logic. </text:p>
        </text:list-item>
      </text:list>
      <text:list text:style-name="L30">
        <text:list-item>
          <text:p text:style-name="P99"><text:bookmark text:name="p-rc_be5868252400bb32-704"/><text:span text:style-name="T119">comprehensions_hits:</text:span> High-density logic patterns including list comprehensions, functional chains (<text:span text:style-name="Source_20_Text">.map</text:span>, <text:span text:style-name="Source_20_Text">.filter</text:span>), and array transformations. </text:p>
        </text:list-item>
      </text:list>
      <text:list text:style-name="L31">
        <text:list-item>
          <text:p text:style-name="P100"><text:bookmark text:name="p-rc_be5868252400bb32-705"/><text:span text:style-name="T119">scientific_hits:</text:span> Usage of mathematical libraries (<text:span text:style-name="Source_20_Text">Math.</text:span>, <text:span text:style-name="Source_20_Text">numpy</text:span>), tensor operations, arbitrary precision arithmetic, or complex number processing. </text:p>
        </text:list-item>
      </text:list>
      <text:list text:style-name="L32">
        <text:list-item>
          <text:p text:style-name="P101"><text:bookmark text:name="p-rc_be5868252400bb32-706"/><text:span text:style-name="T119">heat_triggers_hits:</text:span> High-complexity constructs such as metaprogramming, reflection (<text:span text:style-name="Source_20_Text">Proxy</text:span>, <text:span text:style-name="Source_20_Text">eval</text:span>), macros, or dynamic dispatch that increase cognitive load. </text:p>
        </text:list-item>
      </text:list>
      <text:list text:style-name="L33">
        <text:list-item>
          <text:p text:style-name="P102"><text:bookmark text:name="p-rc_be5868252400bb32-707"/><text:span text:style-name="T119">import_hits:</text:span> Syntax for dependency management, module loading (<text:span text:style-name="Source_20_Text">import</text:span>, <text:span text:style-name="Source_20_Text">require</text:span>), file inclusion, or library linking. </text:p>
        </text:list-item>
      </text:list>
      <text:list text:style-name="L34">
        <text:list-item>
          <text:p text:style-name="P103"><text:bookmark text:name="p-rc_be5868252400bb32-708"/><text:span text:style-name="T119">ownership_hits:</text:span> Metadata extraction patterns for identifying authors, maintainers, or copyright holders within file headers (<text:span text:style-name="Source_20_Text">@author</text:span>).</text:p>
        </text:list-item>
      </text:list>
      <text:p text:style-name="P14"><text:span text:style-name="Strong_20_Emphasis"><text:span text:style-name="T1"/></text:span></text:p>
      <text:h text:style-name="P8" text:outline-level="4"><text:bookmark-start text:name="__RefHeading___Toc26218_2298275600"/><text:span text:style-name="T23">2.2.C. Transforming </text:span><text:span text:style-name="T24">N</text:span><text:span text:style-name="T23">oisy </text:span><text:span text:style-name="T24">R</text:span><text:span text:style-name="T23">egex </text:span><text:span text:style-name="T24">C</text:span><text:span text:style-name="T23">ounts </text:span><text:span text:style-name="T24">I</text:span><text:span text:style-name="T23">nto </text:span><text:span text:style-name="T24">S</text:span><text:span text:style-name="T23">omething </text:span><text:span text:style-name="T24">M</text:span><text:span text:style-name="T23">eaningful</text:span><text:bookmark-end text:name="__RefHeading___Toc26218_2298275600"/></text:h>
      <text:p text:style-name="P49">We recognize that raw heuristic counts are inherently fragile; they are easily fooled by "safety theater" (like empty catch blocks) and lack the deep contextual awareness of a compiler. To transform this fuzzy, easily manipulated data into actionable intelligence, we implemented a <text:span text:style-name="T119">Universal Exposure Framework</text:span> that treats code metrics not as absolute truths, but as weighted signals within a "Physics Engine." This approach applies four specific stabilizing forces to counteract the noise of static analysis:</text:p>
      <text:list text:style-name="L35">
        <text:list-item>
          <text:p text:style-name="P104"><text:span text:style-name="T119">Weighted Asymmetry (The Entropy Check):</text:span> A simple counter treats a vulnerability and a safeguard as equal opposites (1 - 1 = 0). In reality, it is significantly harder to secure a system than to break it. We apply a <text:span text:style-name="T119">2.5x multiplier</text:span> to all detected risks, forcing the code to demonstrate disproportionate defensive density before it can achieve a "Safe" rating. This prevents minor cosmetic fixes from masking structural brittleness.</text:p>
        </text:list-item>
        <text:list-item>
          <text:p text:style-name="P105"><text:span text:style-name="T157">The Breach Cap (Zero-Trust Logic):</text:span><text:span text:style-name="T156"> To prevent large files with high test coverage from masking critical flaws, we enforce a hard limit: if the raw count of </text:span><text:span text:style-name="Source_20_Text"><text:span text:style-name="T156">Risk Hits</text:span></text:span><text:span text:style-name="T156"> exceeds </text:span><text:span text:style-name="Source_20_Text"><text:span text:style-name="T156">Guardrail Hits</text:span></text:span><text:span text:style-name="T156">, the module is capped at a "Fragile" rating regardless of its other qualities. This overrides the math with a reality check—no amount of unit testing can neutralize a fundamentally insecure architecture.</text:span></text:p>
        </text:list-item>
        <text:list-item>
          <text:p text:style-name="P104"><text:span text:style-name="T119">The Sigmoid Clamp (Noise Gating):</text:span> Linear counting penalizes large files for having trace amounts of technical debt. We utilize a logistic function to act as a noise gate, suppressing trivial findings (0-5% density) while aggressively <text:soft-page-break/>highlighting clusters of debt once they cross a critical threshold (~20%). This ensures the visualization focuses on systemic patterns rather than isolated infractions.</text:p>
        </text:list-item>
        <text:list-item>
          <text:p text:style-name="P104"><text:span text:style-name="T119">Quantized </text:span><text:span text:style-name="T131">Final </text:span><text:span text:style-name="T119">Tiering (Removing False Precision):</text:span> Presenting a "Safety Score" of 87.4% implies a level of precision that regex cannot provide. By binning complex scores into five distinct <text:span text:style-name="T119">Qualitative Tiers</text:span> (Unshielded, Fragile, Stable, Defended, Fortified), we remove false precision and deliver a binary truth: the module is either sufficiently defended for its context, or it is not.</text:p>
        </text:list-item>
      </text:list>
      <text:p text:style-name="P50"/>
      <text:p text:style-name="P14"><text:span text:style-name="Source_20_Text"><text:span text:style-name="T91">Instead of a single "Master Equation" </text:span></text:span><text:span text:style-name="Source_20_Text"><text:span text:style-name="T92">for </text:span></text:span><text:span text:style-name="Source_20_Text"><text:span text:style-name="T93">all</text:span></text:span><text:span text:style-name="Source_20_Text"><text:span text:style-name="T92"> Risk Exposure</text:span></text:span><text:span text:style-name="Source_20_Text"><text:span text:style-name="T93">s</text:span></text:span><text:span text:style-name="Source_20_Text"><text:span text:style-name="T92">,</text:span></text:span><text:span text:style-name="Source_20_Text"><text:span text:style-name="T91"> we employ a </text:span></text:span><text:span text:style-name="Strong_20_Emphasis"><text:span text:style-name="T91">Universal Framework</text:span></text:span><text:span text:style-name="Source_20_Text"><text:span text:style-name="T91"> that is instantiated and calibrated for each of the Risk Exposure domains. </text:span></text:span><text:span text:style-name="Source_20_Text"><text:span text:style-name="T92"><text:s/></text:span></text:span></text:p>
      <text:p text:style-name="P14"><text:span text:style-name="Strong_20_Emphasis">The Standardization:</text:span> While each <text:span text:style-name="T158">Risk Exposure </text:span>equation is unique, they all adhere to the same physics:</text:p>
      <text:p text:style-name="P31">Each coding language is set in a tier that determines the value for Fc, Irc. </text:p>
      <text:list text:style-name="L36">
        <text:list-item>
          <text:p text:style-name="P71"><text:span text:style-name="T119">Tier 1</text:span> = Explicit Languages (High Trust, e.g., Rust).</text:p>
        </text:list-item>
        <text:list-item>
          <text:p text:style-name="P71"><text:span text:style-name="T119">Tier 2</text:span> = Structured Languages (Minor Doubt, e.g., Java).</text:p>
        </text:list-item>
        <text:list-item>
          <text:p text:style-name="P106"><text:span text:style-name="Source_20_Text"><text:span text:style-name="T29">Tier 3</text:span></text:span><text:span text:style-name="Source_20_Text"><text:span text:style-name="T92"> = Implicit Languages (Fog of War, e.g., Shell).</text:span></text:span></text:p>
          <text:p text:style-name="P106"><text:span text:style-name="Strong_20_Emphasis"><text:span text:style-name="T92"/></text:span></text:p>
        </text:list-item>
      </text:list>
      <text:list text:style-name="L37">
        <text:list-item>
          <text:p text:style-name="P72"><text:span text:style-name="T119">Fc</text:span> = Fidelity Coefficient. (A dampener used to reduce trust in ambiguous languages).</text:p>
        </text:list-item>
        <text:list-item>
          <text:p text:style-name="P72"><text:span text:style-name="T119">Irc</text:span> = Implicit Risk Correction. (A flat penalty added to ambiguous languages aka "Opacity Tax").</text:p>
        </text:list-item>
        <text:list-item>
          <text:p text:style-name="P72"><text:span text:style-name="T119">Mp</text:span> = Multiplier / Path Modifier. (Scales risk based on file location, e.g., Core vs. Lab). <text:span text:style-name="T159">We reward people for good file structure, when we can. </text:span></text:p>
        </text:list-item>
      </text:list>
      <text:p text:style-name="P19"/>
      <text:p text:style-name="P14">While each risk domain has a unique formula, they all follow this general form. We weigh risk (Asymmetry) heavier than defenses, add the "Opacity Tax" to the risk, and dampen the defenses with the "Trust Coefficient."</text:p>
      <text:p text:style-name="P11"><text:span text:style-name="Source_20_Text">RiskExposure = [ ((RiskHits + Irc) * Weight) - (DefenseHits * Fc) ] / LOC * Mp</text:span></text:p>
      <text:p text:style-name="P11"><text:span text:style-name="Source_20_Text"/></text:p>
      <text:h text:style-name="P7" text:outline-level="3"><text:bookmark-start text:name="__RefHeading___Toc11737_959624642"/><text:span text:style-name="T82">2</text:span><text:span text:style-name="T1">.</text:span><text:span text:style-name="T94">3</text:span><text:span text:style-name="T1"> </text:span><text:span text:style-name="Source_20_Text"><text:span text:style-name="T91">Data Analysis Pipeline </text:span></text:span><text:bookmark-end text:name="__RefHeading___Toc11737_959624642"/></text:h>
      <text:p text:style-name="P14"><text:span text:style-name="Source_20_Text"><text:span text:style-name="T91">Sometimes code is art. Right now, its data, and </text:span></text:span><text:span text:style-name="Source_20_Text"><text:span text:style-name="T95">it’s gotta be cleaned up to be meaningful.</text:span></text:span><text:span text:style-name="Source_20_Text"><text:span text:style-name="T91"> Basically, we need to assess </text:span></text:span><text:span text:style-name="Source_20_Text"><text:span text:style-name="T95">what to assess, find what language its in, strip out the comments,</text:span></text:span><text:span text:style-name="Source_20_Text"><text:span text:style-name="T91"> regex count </text:span></text:span><text:span text:style-name="Source_20_Text"><text:span text:style-name="T95">and then calculate risk based on standardization </text:span></text:span><text:soft-page-break/><text:span text:style-name="Source_20_Text"><text:span text:style-name="T95">metrics. </text:span></text:span><text:span text:style-name="Source_20_Text"><text:span text:style-name="T91"><text:s/>The GalaxyScope is a modular computational instrument designed to resolve raw source code into intuitive 3D physical structures. Rather than a standard "scanner," the system operates as an optical pipeline where each module serves as a discrete <text:s/>component housed within the </text:span></text:span><text:span text:style-name="Strong_20_Emphasis"><text:span text:style-name="T91">GalaxyScope Chassis</text:span></text:span><text:span text:style-name="Source_20_Text"><text:span text:style-name="T91">. </text:span></text:span><text:span text:style-name="Source_20_Text"><text:span text:style-name="T96">Just as light flows through a telescope, data flows through our GalaxyScope. We adjust the aperture (what files are blocked), we use guidestars (creator’s READMEs), each file’s language is brought into focus, the data stream is sent through a prism to split the coding_stream from the comment_stream (comment parsing), each info stream is fed to a detector (regex count data), analyzed by a signal processor (2</text:span></text:span><text:span text:style-name="Source_20_Text"><text:span text:style-name="T160">nd</text:span></text:span><text:span text:style-name="Source_20_Text"><text:span text:style-name="T96"> pass calculations, equations), and then validated by a spectral auditor (statistical anomaly analysis), where it is finally packaged by a record keeper (saved into a vectorized json). Just as different telescopes can have different lens and prisms to see different things, I hope this architecture inspires people to build better versions of these things and view data analysis through the lens of scientific instrumentation. </text:span></text:span></text:p>
      <text:p text:style-name="P51">Incoming data is treated as raw light. To resolve a clear image of the codebase, it must pass through the following interchangeable parts:</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13">The Component</text:p>
          </table:table-cell>
          <table:table-cell table:style-name="Table19.A1" office:value-type="string">
            <text:p text:style-name="P13">Digital Module (<text:span text:style-name="Source_20_Text">.py</text:span>)</text:p>
          </table:table-cell>
          <table:table-cell table:style-name="Table19.A1" office:value-type="string">
            <text:p text:style-name="P13">Operational Function</text:p>
          </table:table-cell>
          <table:table-cell table:style-name="Table19.A1" office:value-type="string">
            <text:p text:style-name="P13">"Optical" Result</text:p>
          </table:table-cell>
        </table:table-row>
        <table:table-row>
          <table:table-cell table:style-name="Table19.A1" office:value-type="string">
            <text:p text:style-name="P38">The Adaptive Light Path System</text:p>
          </table:table-cell>
          <table:table-cell table:style-name="Table19.A1" office:value-type="string">
            <text:p text:style-name="P12"><text:span text:style-name="Source_20_Text"><text:span text:style-name="T162">galaxyscope.py</text:span></text:span></text:p>
          </table:table-cell>
          <table:table-cell table:style-name="Table19.A1" office:value-type="string">
            <text:p text:style-name="P44">Orchestrator. Parses data through specific files and functions <text:span text:style-name="T163">during the analysis. </text:span></text:p>
          </table:table-cell>
          <table:table-cell table:style-name="Table19.A1" office:value-type="string">
            <text:p text:style-name="P44">The adaptive <text:span text:style-name="T163">light path is able to swap lenses on the fly to ensure focus and visibility. </text:span></text:p>
          </table:table-cell>
        </table:table-row>
        <table:table-row>
          <table:table-cell table:style-name="Table19.A1" office:value-type="string">
            <text:p text:style-name="P12"><text:span text:style-name="Strong_20_Emphasis">The Aperture Filter</text:span></text:p>
          </table:table-cell>
          <table:table-cell table:style-name="Table19.A1" office:value-type="string">
            <text:p text:style-name="P12"><text:span text:style-name="Source_20_Text">aperture_filter.py</text:span></text:p>
          </table:table-cell>
          <table:table-cell table:style-name="Table19.A1" office:value-type="string">
            <text:p text:style-name="P12">Noise reduction; strips <text:span text:style-name="Source_20_Text">.gitignore</text:span> noise, binaries, and minified artifacts.</text:p>
          </table:table-cell>
          <table:table-cell table:style-name="Table19.A1" office:value-type="string">
            <text:p text:style-name="P12"><text:span text:style-name="Strong_20_Emphasis">Clear Field:</text:span> Eliminates "Radio Noise" before it hits the sensors.</text:p>
          </table:table-cell>
        </table:table-row>
        <table:table-row>
          <table:table-cell table:style-name="Table19.A1" office:value-type="string">
            <text:p text:style-name="P12"><text:span text:style-name="Strong_20_Emphasis">The GuideStar Protocol</text:span></text:p>
          </table:table-cell>
          <table:table-cell table:style-name="Table19.A1" office:value-type="string">
            <text:p text:style-name="P12"><text:span text:style-name="Source_20_Text">guidestar_protocol.py</text:span></text:p>
          </table:table-cell>
          <table:table-cell table:style-name="Table19.A1" office:value-type="string">
            <text:p text:style-name="P12">Calibration and indexing; ensures the instrument is focused on core architectural importance. <text:span text:style-name="T163">Reads git lists, package.json, etc. </text:span></text:p>
          </table:table-cell>
          <table:table-cell table:style-name="Table19.A1" office:value-type="string">
            <text:p text:style-name="P12"><text:span text:style-name="Strong_20_Emphasis">Alignment:</text:span> Establishes the coordinate center of the survey.</text:p>
          </table:table-cell>
        </table:table-row>
        <table:table-row>
          <table:table-cell table:style-name="Table19.A1" office:value-type="string">
            <text:p text:style-name="P12"><text:span text:style-name="Strong_20_Emphasis">The Language Lens</text:span></text:p>
          </table:table-cell>
          <table:table-cell table:style-name="Table19.A1" office:value-type="string">
            <text:p text:style-name="P12"><text:span text:style-name="Source_20_Text">language_lens.py</text:span></text:p>
          </table:table-cell>
          <table:table-cell table:style-name="Table19.A1" office:value-type="string">
            <text:p text:style-name="P45">Language identification. Compares lines of evidence (ext/shebang), system context to assign a language to each file along with a confidence score based on the quality of that evidence to allow us later more thoroughly assess if our determinations seem plausible for that <text:soft-page-break/>evidence.</text:p>
          </table:table-cell>
          <table:table-cell table:style-name="Table19.A1" office:value-type="string">
            <text:p text:style-name="P12"><text:span text:style-name="Strong_20_Emphasis">Focus:</text:span> Spectral identification; <text:span text:style-name="T163">determines if we have a lens</text:span> to <text:span text:style-name="T163">best focus that wavelength of light</text:span>. </text:p>
          </table:table-cell>
        </table:table-row>
        <table:table-row>
          <table:table-cell table:style-name="Table19.A1" office:value-type="string">
            <text:p text:style-name="P12"><text:span text:style-name="Strong_20_Emphasis">The </text:span><text:span text:style-name="Strong_20_Emphasis"><text:span text:style-name="T164">Prism</text:span></text:span></text:p>
          </table:table-cell>
          <table:table-cell table:style-name="Table19.A1" office:value-type="string">
            <text:p text:style-name="P12"><text:span text:style-name="Source_20_Text"><text:span text:style-name="T164">prism</text:span></text:span><text:span text:style-name="Source_20_Text">.py</text:span></text:p>
          </table:table-cell>
          <table:table-cell table:style-name="Table19.A1" office:value-type="string">
            <text:p text:style-name="P46">Once the language has been identified the correct comment style can be applied to parse comments from code</text:p>
          </table:table-cell>
          <table:table-cell table:style-name="Table19.A1" office:value-type="string">
            <text:p text:style-name="P12"><text:span text:style-name="Strong_20_Emphasis"><text:span text:style-name="T164">Spectral Splitting</text:span></text:span><text:span text:style-name="Strong_20_Emphasis">:</text:span> <text:s/><text:span text:style-name="T164">Splits the wavelength of light into two streams that can be analyzed separately from each other</text:span></text:p>
          </table:table-cell>
        </table:table-row>
        <table:table-row>
          <table:table-cell table:style-name="Table19.A1" office:value-type="string">
            <text:p text:style-name="P12"><text:span text:style-name="Strong_20_Emphasis">The Primary Detector</text:span></text:p>
          </table:table-cell>
          <table:table-cell table:style-name="Table19.A1" office:value-type="string">
            <text:p text:style-name="P12"><text:span text:style-name="Source_20_Text">detector.py</text:span></text:p>
          </table:table-cell>
          <table:table-cell table:style-name="Table19.A1" office:value-type="string">
            <text:p text:style-name="P12">Heuristic sensor; performs high-speed regex counting to detect functional intent.</text:p>
          </table:table-cell>
          <table:table-cell table:style-name="Table19.A1" office:value-type="string">
            <text:p text:style-name="P12"><text:span text:style-name="Strong_20_Emphasis">Raw Signal:</text:span> Captures the discrete counts of logic hits. <text:span text:style-name="T165">Where the photons hit the EMCCD chip. </text:span></text:p>
          </table:table-cell>
        </table:table-row>
        <table:table-row>
          <table:table-cell table:style-name="Table19.A1" office:value-type="string">
            <text:p text:style-name="P12"><text:span text:style-name="Strong_20_Emphasis">The Signal Processor</text:span></text:p>
          </table:table-cell>
          <table:table-cell table:style-name="Table19.A1" office:value-type="string">
            <text:p text:style-name="P12"><text:span text:style-name="Source_20_Text">signal_processor.py</text:span></text:p>
          </table:table-cell>
          <table:table-cell table:style-name="Table19.A1" office:value-type="string">
            <text:p text:style-name="P12">Equation engine; converts raw counts into non-linear risk exposures and physical mass.</text:p>
          </table:table-cell>
          <table:table-cell table:style-name="Table19.A1" office:value-type="string">
            <text:p text:style-name="P12"><text:span text:style-name="Strong_20_Emphasis"><text:span text:style-name="T164">Analyzed Signal</text:span></text:span><text:span text:style-name="Strong_20_Emphasis">:</text:span> Transforms hits into meaningful 0-100 exposure scores.</text:p>
          </table:table-cell>
        </table:table-row>
        <table:table-row>
          <table:table-cell table:style-name="Table19.A1" office:value-type="string">
            <text:p text:style-name="P12"><text:span text:style-name="Strong_20_Emphasis">The Spectral Auditor</text:span></text:p>
          </table:table-cell>
          <table:table-cell table:style-name="Table19.A1" office:value-type="string">
            <text:p text:style-name="P12"><text:span text:style-name="Source_20_Text">spectral_auditor.py</text:span></text:p>
          </table:table-cell>
          <table:table-cell table:style-name="Table19.A1" office:value-type="string">
            <text:p text:style-name="P12"><text:span text:style-name="T166">Bayesian </text:span>Quality control. <text:span text:style-name="T163">I</text:span><text:span text:style-name="T167">f sample size permits,</text:span> performs statistical Z-<text:span text:style-name="T163">s</text:span>core checks to <text:span text:style-name="T163">assess if files with low confidence language determinations have further evidence that they </text:span><text:span text:style-name="T166">have code written in </text:span><text:span text:style-name="T163">that language. </text:span><text:span text:style-name="T166">T</text:span><text:span text:style-name="T163">hat an extension-less shebang-less file that we </text:span><text:span text:style-name="T166">labeled as</text:span><text:span text:style-name="T163"> shell actually contains shell related regex hits </text:span><text:span text:style-name="T166">at an expected regex hit density, as measured from your other files. </text:span></text:p>
          </table:table-cell>
          <table:table-cell table:style-name="Table19.A1" office:value-type="string">
            <text:p text:style-name="P12"><text:span text:style-name="Strong_20_Emphasis">Integrity:</text:span> Relegates <text:span text:style-name="T166">Mysterious</text:span> <text:span text:style-name="T166">signals </text:span>to the <text:span text:style-name="T120">Singularity of Ambiguity, </text:span><text:span text:style-name="T112">to highlight that the system was unable to analyze these signals. </text:span></text:p>
          </table:table-cell>
        </table:table-row>
        <table:table-row>
          <table:table-cell table:style-name="Table19.A1" office:value-type="string">
            <text:p text:style-name="P44">The Audit Recorder</text:p>
          </table:table-cell>
          <table:table-cell table:style-name="Table19.A1" office:value-type="string">
            <text:p text:style-name="P12"><text:span text:style-name="Source_20_Text"><text:span text:style-name="T162">audit_recorder</text:span></text:span><text:span text:style-name="Source_20_Text">.py</text:span></text:p>
          </table:table-cell>
          <table:table-cell table:style-name="Table19.A1" office:value-type="string">
            <text:p text:style-name="P12"><text:span text:style-name="T162">Full level audit record of every file scanned, results and hits</text:span>; <text:span text:style-name="T162">into a large</text:span> JSON archive. <text:span text:style-name="T166">To make your lawyers happy. </text:span></text:p>
          </table:table-cell>
          <table:table-cell table:style-name="Table19.A1" office:value-type="string">
            <text:p text:style-name="P12"><text:span text:style-name="Strong_20_Emphasis"><text:span text:style-name="T128">The SHBOM</text:span></text:span><text:span text:style-name="Strong_20_Emphasis"><text:span text:style-name="T113">: A permanent "Black Box" record (Structural Health Bill of Materials). </text:span></text:span></text:p>
          </table:table-cell>
        </table:table-row>
        <table:table-row>
          <table:table-cell table:style-name="Table19.A1" office:value-type="string">
            <text:p text:style-name="P12"><text:span text:style-name="Strong_20_Emphasis"><text:span text:style-name="T162">The GPU Recorder</text:span></text:span></text:p>
          </table:table-cell>
          <table:table-cell table:style-name="Table19.A1" office:value-type="string">
            <text:p text:style-name="P12"><text:span text:style-name="Source_20_Text"><text:span text:style-name="T162">gpu_recorder</text:span></text:span><text:span text:style-name="Source_20_Text">.py</text:span></text:p>
          </table:table-cell>
          <table:table-cell table:style-name="Table19.A1" office:value-type="string">
            <text:p text:style-name="P12">Vectorization; seals the processed signal into a lightweight, high-density JSON archive.</text:p>
          </table:table-cell>
          <table:table-cell table:style-name="Table19.A1" office:value-type="string">
            <text:p text:style-name="P12"><text:span text:style-name="T120">The Starmap</text:span>: Converts analyzed data into <text:span text:style-name="T162">galaxy format</text:span> for the 3D rendering engine.</text:p>
          </table:table-cell>
        </table:table-row>
      </table:table>
      <text:p text:style-name="P51"><text:span text:style-name="Source_20_Text"/></text:p>
      <text:h text:style-name="P6" text:outline-level="2"><text:bookmark-start text:name="__RefHeading___Toc277554_2813440148"/><text:soft-page-break/><text:span text:style-name="T101">8</text:span><text:span text:style-name="T1">. </text:span><text:span text:style-name="T102">Impacts &amp; </text:span><text:span text:style-name="T1">Future Outlooks</text:span><text:bookmark-end text:name="__RefHeading___Toc277554_2813440148"/></text:h>
      <text:h text:style-name="P7" text:outline-level="3"><text:bookmark-start text:name="__RefHeading___Toc656524_2813440148"/><text:span text:style-name="Strong_20_Emphasis"><text:span text:style-name="T25">8</text:span></text:span><text:span text:style-name="Strong_20_Emphasis"><text:span text:style-name="T26">.1 Integration into the publishing pipeline for 24/7 Risk Exposure Analyses</text:span></text:span><text:bookmark-end text:name="__RefHeading___Toc656524_2813440148"/></text:h>
      <text:p text:style-name="P14"><text:span text:style-name="Strong_20_Emphasis"><text:span text:style-name="T45">The ultimate realization of the GitGalaxy standard is the transition from point-in-time inspections to a </text:span></text:span><text:span text:style-name="Strong_20_Emphasis"><text:span text:style-name="T103">24/7 Rolling Risk Exposure</text:span></text:span><text:span text:style-name="Strong_20_Emphasis"><text:span text:style-name="T45"> model. By deploying a headless version of the engine—</text:span></text:span><text:span text:style-name="Source_20_Text"><text:span text:style-name="T114">scanner.py</text:span></text:span><text:span text:style-name="Strong_20_Emphasis"><text:span text:style-name="T45">—directly into the publishing pipeline, we move beyond the "User-Triggered Audit" into a state of continuous architectural awareness. Every push or pull request triggers a full-fidelity scan, ensuring the system’s health is never more than one commit out of date. By utilizing a heuristic regex-based engine rather than full AST (Abstract Syntax Tree) parsing, the scanner remains lightweight enough to process millions of lines of code in seconds, making real-time, high-frequency audits technically viable for even the largest enterprise monoliths. This creates an automated, objective heartbeat that treats human-written code and AI-generated logic with the same clinical scrutiny, ensuring the map and the territory never drift apart in silence.</text:span></text:span></text:p>
      <text:p text:style-name="P14">This rolling assessment is designed to <text:span text:style-name="T168">highlight</text:span> <text:span text:style-name="T120">Risk Exposure </text:span>in real-time. Instead of waiting for a manual review to discover that a critical module has become a "Brain Melting" zone or that its "Safety Armor" has been compromised, the sentinel identifies these deviations the moment they are pushed. It tracks the cumulative tension of the system, flagging when the "Cognitive Tax" of a new feature exceeds the team's documented intent. This transforms auditing from a reactive, punitive event into a proactive, atmospheric sensor that allows teams to see risk coming long before it manifests as a production failure.</text:p>
      <text:h text:style-name="P7" text:outline-level="3"><text:bookmark-start text:name="__RefHeading___Toc480075_2813440148"/><text:span text:style-name="T25">8</text:span><text:span text:style-name="T27">.</text:span><text:span text:style-name="T26">2</text:span><text:span text:style-name="T27"> </text:span><text:span text:style-name="T28">One </text:span><text:span text:style-name="T27">Non-Numeric Dashboard </text:span><text:span text:style-name="T28">to rule them all</text:span><text:bookmark-end text:name="__RefHeading___Toc480075_2813440148"/></text:h>
      <text:p text:style-name="P21">GitGalaxy is a system designed to visualize code complexity through the use of procedurally generated equations to create spatial information and color overlays. This paradigm naturally extends to assess other forms of amorphous complex systems, such as microservice ecosystems, server clusters, global infrastructure, and the health of agent AI fleets. Just as Level of Detail (LOD) algorithms are used to alter appearances at distances in gaming engines, we can apply equivalent concepts to zoom in and out at orders of magnitude, allowing us to visualize entire levels of systems simultaneously. The goal <text:span text:style-name="T169">could be, if we are bold enough,</text:span> to connect in <text:span text:style-name="T169">a single </text:span>dashboard, the microscopic code to the macroscopic infrastructure.</text:p>
      <text:h text:style-name="P16" text:outline-level="3"><text:bookmark-start text:name="__RefHeading___Toc277556_2813440148"/><text:soft-page-break/><text:span text:style-name="T170">8</text:span>.<text:span text:style-name="T171">3</text:span> The <text:span text:style-name="T172">Cockpit </text:span>Crisis<text:bookmark-end text:name="__RefHeading___Toc277556_2813440148"/></text:h>
      <text:p text:style-name="P14"><text:span text:style-name="T32">Standard</text:span><text:span text:style-name="T111"> </text:span><text:span text:style-name="T32">dashboards are failing the needs of modern computing. We are building systems with unpredictable emergent behaviors. But our dashboards, the very way we measure those systems, are still rooted in the “cockpit” philosophy, that we can predict every important error ahead of time and make a warning light for it. This relies on </text:span><text:span text:style-name="Strong_20_Emphasis"><text:span text:style-name="T1">Finite State Anticipation,</text:span></text:span><text:span text:style-name="Strong_20_Emphasis"> </text:span><text:span text:style-name="Strong_20_Emphasis"><text:span text:style-name="T31">that</text:span></text:span><text:span text:style-name="T111"> </text:span><text:span text:style-name="T32">one can predict every way that</text:span><text:span text:style-name="T111"> </text:span><text:span text:style-name="T32">system will fail. But what happens when the system fails in a way no one predicted? </text:span><text:span text:style-name="T30">If a system can produce emergent behaviors, any worthwhile dashboard must be able to capture and report on emergent behaviors.</text:span><text:span text:style-name="T46"> </text:span><text:span text:style-name="T47">Do you know what the most data-rich sensor of a cockpit is? The windshield. The very design of the airplane itself recognizes that we can’t make a warning light for everything, that sometimes we need to let the user see the chaotic world themselves and trust them to act appropriately. </text:span></text:p>
      <text:h text:style-name="P7" text:outline-level="3"><text:bookmark-start text:name="__RefHeading___Toc480077_2813440148"/><text:span text:style-name="T101">8</text:span><text:span text:style-name="T104">.</text:span><text:span text:style-name="T103">4</text:span><text:span text:style-name="T1"> Time to </text:span><text:span text:style-name="T105">tend a Garden</text:span><text:bookmark-end text:name="__RefHeading___Toc480077_2813440148"/></text:h>
      <text:p text:style-name="P14"><text:span text:style-name="T46">GitGalaxy uses </text:span><text:span text:style-name="T44">9</text:span><text:span text:style-name="T46"> independent metrics to </text:span><text:span text:style-name="T48">visually</text:span><text:span text:style-name="T46"> display complexity. To capture and display emergent behavior, one could adapt these equations into a </text:span><text:span text:style-name="T48">system of</text:span><text:span text:style-name="T46"> feedback loop</text:span><text:span text:style-name="T48">s</text:span><text:span text:style-name="T46"> that would then create </text:span><text:span text:style-name="T48">visual</text:span><text:span text:style-name="T46"> fractal patterns. We could easily display these fractal patterns in a way that the human mind enjoys, using biomimetic patterns. Just as a flower's droop integrates thirst, heat, and soil quality into a single visual signal, dashboard</text:span><text:span text:style-name="T49">s could</text:span><text:span text:style-name="T46"> </text:span><text:span text:style-name="T49">do the same with</text:span><text:span text:style-name="T46"> CPU, RAM, and Latency. </text:span><text:span text:style-name="T50">One </text:span><text:span text:style-name="T46">could display a fleet of</text:span><text:span text:style-name="T48"> servers</text:span><text:span text:style-name="T46"> as a field of </text:span><text:span text:style-name="T50">stars or alien </text:span><text:span text:style-name="T46">flowers, that initially </text:span><text:span text:style-name="T51">were </text:span><text:span text:style-name="T46">all identical in quality, but as time </text:span><text:span text:style-name="T51">went on </text:span><text:span text:style-name="T46">we </text:span><text:span text:style-name="T51">could </text:span><text:span text:style-name="T46">see that e</text:span><text:span text:style-name="T50">ach diverged in pattern</text:span><text:span text:style-name="T46">. </text:span><text:span text:style-name="T52">Alerting teams that it might be time to tend to </text:span><text:span text:style-name="T50">the system</text:span><text:span text:style-name="T52">, </text:span><text:span text:style-name="T49">before</text:span><text:span text:style-name="T52"> we find any corpses. <text:s/></text:span></text:p>
      <text:p text:style-name="P14"><text:span text:style-name="T51">As our systems become more alive, we can no longer depend on just discrete numbers and traditional sensors to monitor them. We need sensors that can detect unpredictable emergent behaviors, before drift causes </text:span><text:span text:style-name="T48">downtime</text:span><text:span text:style-name="T51">. By leaning on the evolutionary strengths of the human mind, we can easily create such sensors. A chaos sensor </text:span><text:span text:style-name="T48">for the 21</text:span><text:span text:style-name="T161">st</text:span><text:span text:style-name="T48"> century, but for people. </text:span></text:p>
      <text:h text:style-name="P7" text:outline-level="3"><text:bookmark-start text:name="__RefHeading___Toc656526_2813440148"/><text:span text:style-name="Strong_20_Emphasis"><text:span text:style-name="T170">8</text:span></text:span><text:span text:style-name="Strong_20_Emphasis">.</text:span><text:span text:style-name="Strong_20_Emphasis"><text:span text:style-name="T171">5</text:span></text:span><text:span text:style-name="Strong_20_Emphasis"> Circling back to Specifications </text:span><text:span text:style-name="Strong_20_Emphasis"><text:span text:style-name="T173">Exposure </text:span></text:span><text:span text:style-name="Strong_20_Emphasis"><text:span text:style-name="T174">&amp; Auditing</text:span></text:span><text:bookmark-end text:name="__RefHeading___Toc656526_2813440148"/></text:h>
      <text:p text:style-name="P14"><text:span text:style-name="Strong_20_Emphasis"><text:span text:style-name="T115">By embedding </text:span></text:span><text:span text:style-name="Strong_20_Emphasis"><text:span text:style-name="T116">a specification</text:span></text:span><text:span text:style-name="Strong_20_Emphasis"><text:span text:style-name="T115"> audit trail into the README, we turn documentation into a living sensor. We move away from the "Big Bang" release where specs are checked once at the end, and toward a continuous, visual heartbeat of alignment. If this becomes the standard, we stop seeing specifications as a "gate" to pass through and start seeing them as a "home" for our logic to inhabit. </text:span></text:span></text:p>
      <text:p text:style-name="P14"><text:soft-page-break/><text:span text:style-name="Strong_20_Emphasis"><text:span text:style-name="T115">The true power of the [audit] standard lies in its ability to formalize the natural, bottom-up documentation that already lives in a developer's README. While high-level "user specs" might define the destination, the real engineering happens in the sub-specifications and complex edge cases that usually stay hidden. By tagging these technical hurdles right where they are described, we transform the README from a static file into a living </text:span></text:span><text:span text:style-name="Strong_20_Emphasis"><text:span text:style-name="T173">Engineering Roadmap</text:span></text:span><text:span text:style-name="Strong_20_Emphasis"><text:span text:style-name="T115">.</text:span></text:span></text:p>
      <text:p text:style-name="P14"><text:span text:style-name="T48">This isn't about assessing how we are meeting a rigid, top-down "God Spec." It’s about the dev team marking where their work really went. By tagging specific sub-problems or edge cases, the CTO or Team Lead can finally assess the </text:span><text:span text:style-name="Emphasis"><text:span text:style-name="T48">true</text:span></text:span><text:span text:style-name="T48"> steps the team is focusing on. This allows a leader to see exactly which technical sub-problems are being solved, providing a no-blame way to understand why a specific module is taking more time: because the team is busy "civilizing" five different sub-specs that were required to make the high-level plan a reality.</text:span></text:p>
      <text:h text:style-name="P37" text:outline-level="3"><text:bookmark-start text:name="__RefHeading___Toc36598_1787320247"/><text:span text:style-name="T106">8.</text:span><text:span text:style-name="T97">6. </text:span><text:span text:style-name="T107">The Field of AI Forensics</text:span><text:bookmark-end text:name="__RefHeading___Toc36598_1787320247"/></text:h>
      <text:p text:style-name="P52"><text:span text:style-name="Source_20_Text"><text:span text:style-name="T97">Large Language Models (LLMs) do not write code like humans. Humans are pragmatic, lazy, and highly contextual. AI agents are deterministic, hyper-focused on their immediate context window, and strictly driven by their RLHF (Reinforcement Learning from Human Feedback) guardrails. They don't just use different variable names; they build </text:span></text:span><text:span text:style-name="Source_20_Text"><text:span text:style-name="T108">differently</text:span></text:span><text:span text:style-name="Source_20_Text"><text:span text:style-name="T98">. With enough training data (AI generated code), there is high odds that one could identify unique fingerprints based on a multi-dimensional analys</text:span></text:span><text:span text:style-name="Source_20_Text"><text:span text:style-name="T99">e</text:span></text:span><text:span text:style-name="Source_20_Text"><text:span text:style-name="T98">s </text:span></text:span><text:span text:style-name="Source_20_Text"><text:span text:style-name="T99">with</text:span></text:span><text:span text:style-name="Source_20_Text"><text:span text:style-name="T100"> the ~50 different metrics assessed </text:span></text:span><text:span text:style-name="Source_20_Text"><text:span text:style-name="T99">here </text:span></text:span><text:span text:style-name="Source_20_Text"><text:span text:style-name="T100">for each file</text:span></text:span><text:span text:style-name="Source_20_Text"><text:span text:style-name="T98">. Claude Code appears focus on high safety scores and low danger scores while Copilot, often focused at the function level, </text:span></text:span><text:span text:style-name="Source_20_Text"><text:span text:style-name="T100">might have unique function scoring values</text:span></text:span><text:span text:style-name="Source_20_Text"><text:span text:style-name="T98">. This could useful to determine which models, and even which model versions, were likely or not likely involved in creating </text:span></text:span><text:span text:style-name="Source_20_Text"><text:span text:style-name="T100">a</text:span></text:span><text:span text:style-name="Source_20_Text"><text:span text:style-name="T98"> </text:span></text:span><text:span text:style-name="Source_20_Text"><text:span text:style-name="T100">file</text:span></text:span><text:span text:style-name="Source_20_Text"><text:span text:style-name="T98">. Or, </text:span></text:span><text:span text:style-name="Source_20_Text"><text:span text:style-name="T100">alternatively,</text:span></text:span><text:span text:style-name="Source_20_Text"><text:span text:style-name="T98"> fingerprints could be </text:span></text:span><text:span text:style-name="Source_20_Text"><text:span text:style-name="T100">specifically </text:span></text:span><text:span text:style-name="Source_20_Text"><text:span text:style-name="T98">built in to create a new </text:span></text:span><text:span text:style-name="Source_20_Text"><text:span text:style-name="T100">ability</text:span></text:span><text:span text:style-name="Source_20_Text"><text:span text:style-name="T98"> </text:span></text:span><text:span text:style-name="Source_20_Text"><text:span text:style-name="T100">to track one model’s </text:span></text:span><text:span text:style-name="Source_20_Text"><text:span text:style-name="T99">produced </text:span></text:span><text:span text:style-name="Source_20_Text"><text:span text:style-name="T100">code throughout the world (...There is a 95% chance that Gemini 3 wrote this function,...</text:span></text:span><text:span text:style-name="Source_20_Text"><text:span text:style-name="T99">this code was likely human generated...10% of the files on github are from an OpenAI model</text:span></text:span><text:span text:style-name="Source_20_Text"><text:span text:style-name="T100">…).</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tyle:font-face style:name="roboto1" svg:font-family="roboto" style:font-adornments="Bol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roboto1" fo:font-family="roboto" style:font-style-name="Bold"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60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roboto1" fo:font-family="roboto" style:font-style-name="Bold"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600"/>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22T07:27:01.589204043</meta:creation-date>
    <dc:date>2026-03-22T07:55:34.630448240</dc:date>
    <meta:editing-duration>PT15M7S</meta:editing-duration>
    <meta:editing-cycles>2</meta:editing-cycles>
    <meta:generator>LibreOffice/24.2.7.2$Linux_X86_64 LibreOffice_project/420$Build-2</meta:generator>
    <meta:document-statistic meta:table-count="3" meta:image-count="0" meta:object-count="0" meta:page-count="19" meta:paragraph-count="377" meta:word-count="5861" meta:character-count="38884" meta:non-whitespace-character-count="32917"/>
  </office:meta>
</office:document-meta>
</file>